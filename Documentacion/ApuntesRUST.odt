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paragraph-properties fo:line-height="1cm" fo:text-align="center" style:justify-single-word="false"/>
      <style:text-properties fo:color="#ffff00" loext:opacity="100%" style:font-name="Arial Rounded MT Bold" fo:font-size="26pt" officeooo:rsid="0017c700" officeooo:paragraph-rsid="0017c700" style:font-size-asian="22.75pt" style:font-size-complex="26pt"/>
    </style:style>
    <style:style style:name="P2" style:family="paragraph" style:parent-style-name="Standard">
      <style:paragraph-properties fo:line-height="1cm" fo:text-align="center" style:justify-single-word="false"/>
      <style:text-properties fo:color="#000000" loext:opacity="100%" style:font-name="Arial1" fo:font-size="12pt" officeooo:rsid="0017c700" officeooo:paragraph-rsid="0017c700" style:font-size-asian="12pt" style:font-size-complex="12pt"/>
    </style:style>
    <style:style style:name="P3" style:family="paragraph" style:parent-style-name="Text_20_body">
      <style:paragraph-properties fo:line-height="100%"/>
      <style:text-properties fo:color="#00a933" loext:opacity="100%" style:font-name="Arial1" officeooo:rsid="0017c700" officeooo:paragraph-rsid="0207f6ae"/>
    </style:style>
    <style:style style:name="P4" style:family="paragraph" style:parent-style-name="Text_20_body">
      <style:paragraph-properties fo:line-height="100%"/>
      <style:text-properties fo:color="#00a933" loext:opacity="100%" style:font-name="Arial1" officeooo:rsid="0017c700" officeooo:paragraph-rsid="020908b2"/>
    </style:style>
    <style:style style:name="P5" style:family="paragraph" style:parent-style-name="Text_20_body">
      <style:paragraph-properties fo:line-height="100%"/>
      <style:text-properties fo:color="#00a933" loext:opacity="100%" style:font-name="Arial1" officeooo:rsid="0017c700" officeooo:paragraph-rsid="020aa978"/>
    </style:style>
    <style:style style:name="P6" style:family="paragraph" style:parent-style-name="Text_20_body">
      <style:paragraph-properties fo:line-height="100%"/>
      <style:text-properties fo:color="#00a933" loext:opacity="100%" style:font-name="Arial1" officeooo:rsid="0017c700" officeooo:paragraph-rsid="020fde34"/>
    </style:style>
    <style:style style:name="P7" style:family="paragraph" style:parent-style-name="Text_20_body">
      <style:paragraph-properties fo:line-height="100%"/>
      <style:text-properties fo:color="#00a933" loext:opacity="100%" style:font-name="Arial1" officeooo:rsid="0017c700" officeooo:paragraph-rsid="0213cb13"/>
    </style:style>
    <style:style style:name="P8" style:family="paragraph" style:parent-style-name="Text_20_body">
      <style:paragraph-properties fo:line-height="100%"/>
      <style:text-properties fo:color="#00a933" loext:opacity="100%" style:font-name="Arial1" officeooo:rsid="0017c700" officeooo:paragraph-rsid="0235268e"/>
    </style:style>
    <style:style style:name="P9" style:family="paragraph" style:parent-style-name="Heading_20_3">
      <style:paragraph-properties fo:line-height="100%"/>
      <style:text-properties fo:color="#00a933" loext:opacity="100%" style:font-name="Arial1" style:text-underline-style="none" officeooo:rsid="0235268e" officeooo:paragraph-rsid="0235268e"/>
    </style:style>
    <style:style style:name="P10" style:family="paragraph" style:parent-style-name="Text_20_body">
      <style:paragraph-properties fo:line-height="100%"/>
      <style:text-properties fo:color="#00a933" loext:opacity="100%" style:font-name="Arial1" style:text-underline-style="none" officeooo:rsid="0017c700" officeooo:paragraph-rsid="0216a37b"/>
    </style:style>
    <style:style style:name="P11" style:family="paragraph" style:parent-style-name="Heading_20_3">
      <style:paragraph-properties fo:line-height="100%"/>
      <style:text-properties fo:color="#ffffff" loext:opacity="100%" style:font-name="Arial1" style:text-underline-style="none" officeooo:rsid="022aeaa7" officeooo:paragraph-rsid="022aeaa7"/>
    </style:style>
    <style:style style:name="P12" style:family="paragraph" style:parent-style-name="Text_20_body">
      <style:paragraph-properties fo:line-height="100%"/>
      <style:text-properties fo:color="#ffffff" loext:opacity="100%" style:font-name="Arial1" style:text-underline-style="none" officeooo:rsid="02259ec8" officeooo:paragraph-rsid="02259ec8"/>
    </style:style>
    <style:style style:name="P13" style:family="paragraph" style:parent-style-name="Text_20_body">
      <style:paragraph-properties fo:line-height="100%"/>
      <style:text-properties fo:color="#ffffff" loext:opacity="100%" style:font-name="Arial1" style:text-underline-style="none" officeooo:rsid="02259ec8" officeooo:paragraph-rsid="0227dcad"/>
    </style:style>
    <style:style style:name="P14" style:family="paragraph" style:parent-style-name="Text_20_body">
      <style:paragraph-properties fo:line-height="100%"/>
      <style:text-properties fo:color="#ffffff" loext:opacity="100%" style:font-name="Arial1" style:text-underline-style="none" officeooo:rsid="0226a567" officeooo:paragraph-rsid="0226a567"/>
    </style:style>
    <style:style style:name="P15" style:family="paragraph" style:parent-style-name="Text_20_body">
      <style:paragraph-properties fo:line-height="100%"/>
      <style:text-properties fo:color="#00a933" loext:opacity="100%" style:font-name="Arial1" style:text-underline-style="none" officeooo:rsid="0226a567" officeooo:paragraph-rsid="0226a567"/>
    </style:style>
    <style:style style:name="P16" style:family="paragraph" style:parent-style-name="Heading_20_3">
      <style:paragraph-properties fo:line-height="100%"/>
      <style:text-properties fo:color="#ffffff" loext:opacity="100%" style:font-name="Arial1" style:text-underline-style="none" officeooo:rsid="0216a37b" officeooo:paragraph-rsid="0216a37b"/>
    </style:style>
    <style:style style:name="P17" style:family="paragraph" style:parent-style-name="Text_20_body">
      <style:paragraph-properties fo:line-height="100%"/>
      <style:text-properties fo:color="#ffffff" loext:opacity="100%" style:font-name="Arial1" style:text-underline-style="none" officeooo:rsid="0216a37b" officeooo:paragraph-rsid="0216a37b"/>
    </style:style>
    <style:style style:name="P18" style:family="paragraph" style:parent-style-name="Text_20_body">
      <style:paragraph-properties fo:line-height="100%"/>
      <style:text-properties officeooo:rsid="0216a37b" officeooo:paragraph-rsid="0216a37b"/>
    </style:style>
    <style:style style:name="P19" style:family="paragraph" style:parent-style-name="Text_20_body">
      <style:paragraph-properties fo:line-height="100%"/>
      <style:text-properties officeooo:rsid="0216a37b" officeooo:paragraph-rsid="0216c522"/>
    </style:style>
    <style:style style:name="P20" style:family="paragraph" style:parent-style-name="Text_20_body">
      <style:paragraph-properties fo:line-height="100%"/>
      <style:text-properties officeooo:rsid="0216a37b" officeooo:paragraph-rsid="02171d48"/>
    </style:style>
    <style:style style:name="P21" style:family="paragraph" style:parent-style-name="Heading_20_3">
      <style:paragraph-properties fo:line-height="100%"/>
      <style:text-properties style:text-underline-style="none" officeooo:rsid="0216a37b" officeooo:paragraph-rsid="0216a37b" fo:background-color="#bf0041"/>
    </style:style>
    <style:style style:name="P22" style:family="paragraph" style:parent-style-name="Heading_20_3">
      <style:paragraph-properties fo:line-height="100%"/>
      <style:text-properties fo:color="#c9211e" loext:opacity="100%" style:font-name="Arial1" style:text-underline-style="none" officeooo:rsid="023aa484" officeooo:paragraph-rsid="023aa484" fo:background-color="#ffff00"/>
    </style:style>
    <style:style style:name="P23" style:family="paragraph" style:parent-style-name="Text_20_body">
      <style:paragraph-properties fo:line-height="100%"/>
      <style:text-properties fo:color="#00a933" loext:opacity="100%" style:font-name="Arial1" officeooo:rsid="0017c700" officeooo:paragraph-rsid="023aa484"/>
    </style:style>
    <style:style style:name="P24" style:family="paragraph" style:parent-style-name="Heading_20_3">
      <style:paragraph-properties fo:line-height="100%"/>
      <style:text-properties fo:color="#c9211e" loext:opacity="100%" style:font-name="Arial1" style:text-underline-style="none" officeooo:rsid="023aa484" officeooo:paragraph-rsid="023d09dc" fo:background-color="#ffff00"/>
    </style:style>
    <style:style style:name="P25" style:family="paragraph" style:parent-style-name="Text_20_body">
      <style:paragraph-properties fo:line-height="100%"/>
      <style:text-properties fo:color="#00a933" loext:opacity="100%" style:font-name="Arial1" officeooo:rsid="0017c700" officeooo:paragraph-rsid="023c909b"/>
    </style:style>
    <style:style style:name="P26" style:family="paragraph" style:parent-style-name="Text_20_body">
      <style:paragraph-properties fo:line-height="100%"/>
      <style:text-properties fo:color="#00a933" loext:opacity="100%" style:font-name="Arial1" officeooo:rsid="0017c700" officeooo:paragraph-rsid="023d09dc"/>
    </style:style>
    <style:style style:name="P27" style:family="paragraph" style:parent-style-name="Text_20_body">
      <style:paragraph-properties fo:line-height="100%"/>
      <style:text-properties fo:color="#00a933" loext:opacity="100%" style:font-name="Arial1" officeooo:rsid="0017c700" officeooo:paragraph-rsid="023ee483"/>
    </style:style>
    <style:style style:name="P28" style:family="paragraph" style:parent-style-name="Text_20_body">
      <style:paragraph-properties fo:line-height="100%"/>
      <style:text-properties fo:color="#00a933" loext:opacity="100%" style:font-name="Arial1" officeooo:rsid="0017c700" officeooo:paragraph-rsid="0240b662"/>
    </style:style>
    <style:style style:name="P29" style:family="paragraph" style:parent-style-name="Text_20_body">
      <style:paragraph-properties fo:line-height="100%"/>
      <style:text-properties fo:color="#00a933" loext:opacity="100%" style:font-name="Arial1" officeooo:rsid="0017c700" officeooo:paragraph-rsid="024209b0"/>
    </style:style>
    <style:style style:name="P30" style:family="paragraph" style:parent-style-name="Text_20_body">
      <style:paragraph-properties fo:line-height="100%"/>
      <style:text-properties fo:color="#00a933" loext:opacity="100%" style:font-name="Arial1" officeooo:rsid="0017c700" officeooo:paragraph-rsid="02425b33"/>
    </style:style>
    <style:style style:name="P31" style:family="paragraph" style:parent-style-name="Heading_20_3">
      <style:paragraph-properties fo:line-height="100%"/>
      <style:text-properties style:text-underline-style="none" officeooo:rsid="020908b2" officeooo:paragraph-rsid="020908b2" fo:background-color="#bf0041"/>
    </style:style>
    <style:style style:name="P32" style:family="paragraph" style:parent-style-name="Text_20_body">
      <style:paragraph-properties fo:line-height="100%"/>
      <style:text-properties fo:color="#00a933" loext:opacity="100%" style:font-name="Arial1" officeooo:rsid="0017c700" officeooo:paragraph-rsid="020d2357"/>
    </style:style>
    <style:style style:name="P33" style:family="paragraph" style:parent-style-name="Text_20_body">
      <style:paragraph-properties fo:line-height="100%"/>
      <style:text-properties fo:color="#00a933" loext:opacity="100%" style:font-name="Arial1" officeooo:rsid="0017c700" officeooo:paragraph-rsid="02113cfb"/>
    </style:style>
    <style:style style:name="P34" style:family="paragraph" style:parent-style-name="Text_20_body">
      <style:paragraph-properties fo:line-height="100%"/>
      <style:text-properties fo:color="#00a933" loext:opacity="100%" style:font-name="Arial1" officeooo:rsid="0017c700" officeooo:paragraph-rsid="02171d48"/>
    </style:style>
    <style:style style:name="P35" style:family="paragraph" style:parent-style-name="Text_20_body">
      <style:paragraph-properties fo:line-height="100%"/>
      <style:text-properties fo:color="#00a933" loext:opacity="100%" style:font-name="Arial1" officeooo:rsid="0017c700" officeooo:paragraph-rsid="02120630"/>
    </style:style>
    <style:style style:name="P36" style:family="paragraph" style:parent-style-name="Text_20_body">
      <style:paragraph-properties fo:line-height="100%"/>
      <style:text-properties fo:color="#00a933" loext:opacity="100%" style:font-name="Arial1" officeooo:rsid="0017c700" officeooo:paragraph-rsid="021770f8"/>
    </style:style>
    <style:style style:name="P37" style:family="paragraph" style:parent-style-name="Heading_20_3">
      <style:paragraph-properties fo:line-height="100%"/>
      <style:text-properties fo:color="#00a933" loext:opacity="100%" style:font-name="Arial1" style:text-underline-style="none" officeooo:rsid="020908b2" officeooo:paragraph-rsid="021c3799" fo:background-color="#bf0041"/>
    </style:style>
    <style:style style:name="P38" style:family="paragraph" style:parent-style-name="Text_20_body">
      <style:paragraph-properties fo:line-height="100%"/>
      <style:text-properties fo:color="#00a933" loext:opacity="100%" style:font-name="Arial1" officeooo:rsid="0017c700" officeooo:paragraph-rsid="021d5bcc"/>
    </style:style>
    <style:style style:name="P39" style:family="paragraph" style:parent-style-name="Text_20_body">
      <style:paragraph-properties fo:line-height="100%"/>
      <style:text-properties fo:color="#00a933" loext:opacity="100%" style:font-name="Arial1" officeooo:rsid="0017c700" officeooo:paragraph-rsid="021fa2ef"/>
    </style:style>
    <style:style style:name="P40" style:family="paragraph" style:parent-style-name="Heading_20_3">
      <style:paragraph-properties fo:line-height="100%"/>
      <style:text-properties fo:color="#00a933" loext:opacity="100%" style:font-name="Arial1" style:text-underline-style="none" officeooo:rsid="020908b2" officeooo:paragraph-rsid="0234a03a" fo:background-color="#bf0041"/>
    </style:style>
    <style:style style:name="P41" style:family="paragraph" style:parent-style-name="Text_20_body">
      <style:paragraph-properties fo:line-height="100%"/>
      <style:text-properties fo:color="#00a933" loext:opacity="100%" style:font-name="Arial1" officeooo:rsid="0017c700" officeooo:paragraph-rsid="0234a03a"/>
    </style:style>
    <style:style style:name="P42" style:family="paragraph" style:parent-style-name="Heading_20_3">
      <style:paragraph-properties fo:line-height="100%"/>
      <style:text-properties fo:color="#00a933" loext:opacity="100%" style:font-name="Arial1" style:text-underline-style="none" officeooo:rsid="020908b2" officeooo:paragraph-rsid="022b8b4d" fo:background-color="#bf0041"/>
    </style:style>
    <style:style style:name="P43" style:family="paragraph" style:parent-style-name="Text_20_body">
      <style:paragraph-properties fo:line-height="100%"/>
      <style:text-properties fo:color="#00a933" loext:opacity="100%" style:font-name="Arial1" officeooo:rsid="0017c700" officeooo:paragraph-rsid="022b8b4d"/>
    </style:style>
    <style:style style:name="P44" style:family="paragraph" style:parent-style-name="Text_20_body">
      <style:paragraph-properties fo:line-height="100%"/>
      <style:text-properties fo:color="#00a933" loext:opacity="100%" style:font-name="Arial1" officeooo:rsid="0017c700" officeooo:paragraph-rsid="02300a0c"/>
    </style:style>
    <style:style style:name="P45" style:family="paragraph" style:parent-style-name="Standard">
      <style:paragraph-properties fo:line-height="100%"/>
      <style:text-properties fo:color="#00a933" loext:opacity="100%" style:font-name="Arial1" officeooo:rsid="0017c700" officeooo:paragraph-rsid="02300a0c"/>
    </style:style>
    <style:style style:name="P46" style:family="paragraph" style:parent-style-name="Text_20_body">
      <style:paragraph-properties fo:line-height="100%"/>
      <style:text-properties fo:color="#00a933" loext:opacity="100%" style:font-name="Arial1" officeooo:rsid="0017c700" officeooo:paragraph-rsid="02463c3d"/>
    </style:style>
    <style:style style:name="P47" style:family="paragraph" style:parent-style-name="Text_20_body">
      <style:paragraph-properties fo:line-height="100%"/>
      <style:text-properties fo:color="#00a933" loext:opacity="100%" style:font-name="Arial1" officeooo:rsid="0017c700" officeooo:paragraph-rsid="022bdc6a"/>
    </style:style>
    <style:style style:name="P48" style:family="paragraph" style:parent-style-name="Text_20_body">
      <style:paragraph-properties fo:line-height="100%" fo:text-align="left" style:justify-single-word="false"/>
      <style:text-properties fo:color="#00a933" loext:opacity="100%" style:font-name="Arial1" officeooo:rsid="0017c700" officeooo:paragraph-rsid="022bdc6a"/>
    </style:style>
    <style:style style:name="P49" style:family="paragraph" style:parent-style-name="Text_20_body">
      <style:paragraph-properties fo:line-height="100%" fo:text-align="left" style:justify-single-word="false"/>
      <style:text-properties fo:color="#00a933" loext:opacity="100%" style:font-name="Arial1" officeooo:rsid="0017c700" officeooo:paragraph-rsid="022ce022"/>
    </style:style>
    <style:style style:name="P50" style:family="paragraph" style:parent-style-name="Text_20_body">
      <style:paragraph-properties fo:line-height="100%" fo:text-align="left" style:justify-single-word="false"/>
      <style:text-properties fo:color="#00a933" loext:opacity="100%" style:font-name="Arial1" officeooo:rsid="0017c700" officeooo:paragraph-rsid="022e246b"/>
    </style:style>
    <style:style style:name="P51" style:family="paragraph" style:parent-style-name="Text_20_body">
      <style:paragraph-properties fo:line-height="100%" fo:text-align="left" style:justify-single-word="false"/>
      <style:text-properties fo:color="#00a933" loext:opacity="100%" style:font-name="Arial1" officeooo:rsid="0017c700" officeooo:paragraph-rsid="022f38c4"/>
    </style:style>
    <style:style style:name="P52" style:family="paragraph" style:parent-style-name="Text_20_body">
      <style:paragraph-properties fo:line-height="100%" fo:text-align="left" style:justify-single-word="false"/>
      <style:text-properties fo:color="#00a933" loext:opacity="100%" style:font-name="Arial1" officeooo:rsid="0017c700" officeooo:paragraph-rsid="022fb6a2"/>
    </style:style>
    <style:style style:name="P53" style:family="paragraph" style:parent-style-name="Text_20_body">
      <style:paragraph-properties fo:line-height="100%" fo:text-align="left" style:justify-single-word="false"/>
      <style:text-properties fo:color="#00a933" loext:opacity="100%" style:font-name="Arial1" officeooo:rsid="0017c700" officeooo:paragraph-rsid="02300a0c"/>
    </style:style>
    <style:style style:name="P54" style:family="paragraph" style:parent-style-name="Text_20_body">
      <style:paragraph-properties fo:line-height="100%" fo:text-align="left" style:justify-single-word="false"/>
      <style:text-properties fo:color="#00a933" loext:opacity="100%" style:font-name="Arial1" officeooo:rsid="0017c700" officeooo:paragraph-rsid="0231bbe3"/>
    </style:style>
    <style:style style:name="P55" style:family="paragraph" style:parent-style-name="Text_20_body">
      <style:paragraph-properties fo:line-height="100%" fo:text-align="left" style:justify-single-word="false"/>
      <style:text-properties fo:color="#00a933" loext:opacity="100%" style:font-name="Arial1" officeooo:rsid="0017c700" officeooo:paragraph-rsid="023299ec"/>
    </style:style>
    <style:style style:name="P56" style:family="paragraph" style:parent-style-name="Heading_20_3">
      <style:paragraph-properties fo:line-height="100%"/>
      <style:text-properties fo:color="#00a933" loext:opacity="100%" style:font-name="Arial1" style:text-underline-style="none" officeooo:rsid="020908b2" officeooo:paragraph-rsid="02483f67" fo:background-color="#bf0041"/>
    </style:style>
    <style:style style:name="P57" style:family="paragraph" style:parent-style-name="Text_20_body">
      <style:paragraph-properties fo:line-height="100%" fo:text-align="left" style:justify-single-word="false"/>
      <style:text-properties fo:color="#00a933" loext:opacity="100%" style:font-name="Arial1" officeooo:rsid="0017c700" officeooo:paragraph-rsid="02483f67"/>
    </style:style>
    <style:style style:name="P58" style:family="paragraph" style:parent-style-name="Heading_20_3">
      <style:paragraph-properties fo:line-height="100%"/>
      <style:text-properties fo:color="#00a933" loext:opacity="100%" style:font-name="Arial1" style:text-underline-style="none" officeooo:rsid="020908b2" officeooo:paragraph-rsid="02212731" fo:background-color="#bf0041"/>
    </style:style>
    <style:style style:name="P59" style:family="paragraph" style:parent-style-name="Text_20_body">
      <style:paragraph-properties fo:line-height="100%"/>
      <style:text-properties fo:color="#00a933" loext:opacity="100%" style:font-name="Arial1" officeooo:rsid="0017c700" officeooo:paragraph-rsid="02212731"/>
    </style:style>
    <style:style style:name="P60" style:family="paragraph" style:parent-style-name="Text_20_body">
      <style:paragraph-properties fo:line-height="100%"/>
      <style:text-properties fo:color="#00a933" loext:opacity="100%" style:font-name="Arial1" officeooo:rsid="0017c700" officeooo:paragraph-rsid="022317e8"/>
    </style:style>
    <style:style style:name="P61" style:family="paragraph" style:parent-style-name="Heading_20_3">
      <style:paragraph-properties fo:line-height="100%"/>
      <style:text-properties fo:color="#00a933" loext:opacity="100%" style:font-name="Arial1" style:text-underline-style="none" officeooo:rsid="020908b2" officeooo:paragraph-rsid="022317e8" fo:background-color="#bf0041"/>
    </style:style>
    <style:style style:name="P62" style:family="paragraph" style:parent-style-name="Text_20_body">
      <style:paragraph-properties fo:line-height="100%"/>
      <style:text-properties fo:color="#00a933" loext:opacity="100%" style:font-name="Arial1" officeooo:rsid="0017c700" officeooo:paragraph-rsid="023943ac"/>
    </style:style>
    <style:style style:name="P63" style:family="paragraph" style:parent-style-name="Text_20_body">
      <style:paragraph-properties fo:line-height="100%"/>
      <style:text-properties fo:color="#00a933" loext:opacity="100%" style:font-name="Arial1" officeooo:rsid="0017c700" officeooo:paragraph-rsid="0236e83a"/>
    </style:style>
    <style:style style:name="P64" style:family="paragraph" style:parent-style-name="Heading_20_3">
      <style:paragraph-properties fo:line-height="100%"/>
      <style:text-properties fo:color="#00a933" loext:opacity="100%" style:font-name="Arial1" style:text-underline-style="none" officeooo:rsid="020908b2" officeooo:paragraph-rsid="0227dcad" fo:background-color="#bf0041"/>
    </style:style>
    <style:style style:name="P65" style:family="paragraph" style:parent-style-name="Text_20_body">
      <style:paragraph-properties fo:line-height="100%"/>
      <style:text-properties fo:color="#00a933" loext:opacity="100%" style:font-name="Arial1" officeooo:rsid="0017c700" officeooo:paragraph-rsid="0227dcad"/>
    </style:style>
    <style:style style:name="P66" style:family="paragraph" style:parent-style-name="Text_20_body">
      <style:paragraph-properties fo:line-height="100%"/>
      <style:text-properties fo:color="#00a933" loext:opacity="100%" style:font-name="Arial1" officeooo:rsid="0017c700" officeooo:paragraph-rsid="0228c36d"/>
    </style:style>
    <style:style style:name="P67" style:family="paragraph" style:parent-style-name="Text_20_body">
      <style:paragraph-properties fo:line-height="100%"/>
      <style:text-properties fo:color="#00a933" loext:opacity="100%" style:font-name="Arial1" officeooo:rsid="0017c700" officeooo:paragraph-rsid="0229133e"/>
    </style:style>
    <style:style style:name="P68" style:family="paragraph" style:parent-style-name="Text_20_body">
      <style:paragraph-properties fo:line-height="100%"/>
      <style:text-properties fo:color="#00a933" loext:opacity="100%" style:font-name="Arial1" officeooo:rsid="0017c700" officeooo:paragraph-rsid="0229172e"/>
    </style:style>
    <style:style style:name="P69" style:family="paragraph" style:parent-style-name="Text_20_body">
      <style:paragraph-properties fo:line-height="100%"/>
      <style:text-properties fo:color="#00a933" loext:opacity="100%" style:font-name="Arial1" officeooo:rsid="0017c700" officeooo:paragraph-rsid="0229bac5"/>
    </style:style>
    <style:style style:name="P70" style:family="paragraph" style:parent-style-name="Heading_20_3">
      <style:paragraph-properties fo:line-height="100%"/>
      <style:text-properties fo:color="#00a933" loext:opacity="100%" style:font-name="Arial1" style:text-underline-style="none" officeooo:rsid="020908b2" officeooo:paragraph-rsid="0243785a" fo:background-color="#bf0041"/>
    </style:style>
    <style:style style:name="P71" style:family="paragraph" style:parent-style-name="Text_20_body">
      <style:paragraph-properties fo:line-height="100%"/>
      <style:text-properties fo:color="#00a933" loext:opacity="100%" style:font-name="Arial1" officeooo:rsid="0017c700" officeooo:paragraph-rsid="0243785a"/>
    </style:style>
    <style:style style:name="P72" style:family="paragraph" style:parent-style-name="Text_20_body">
      <style:paragraph-properties fo:line-height="100%"/>
      <style:text-properties fo:color="#00a933" loext:opacity="100%" style:font-name="Arial1" officeooo:rsid="0017c700" officeooo:paragraph-rsid="0244af53"/>
    </style:style>
    <style:style style:name="T1" style:family="text">
      <style:text-properties officeooo:rsid="0207f6ae"/>
    </style:style>
    <style:style style:name="T2" style:family="text">
      <style:text-properties style:text-underline-style="none"/>
    </style:style>
    <style:style style:name="T3" style:family="text">
      <style:text-properties style:text-underline-style="none" officeooo:rsid="0017c700"/>
    </style:style>
    <style:style style:name="T4" style:family="text">
      <style:text-properties fo:color="#ffffff" loext:opacity="100%" fo:font-size="12pt" officeooo:rsid="0207f6ae" fo:background-color="transparent" loext:char-shading-value="0" style:font-size-asian="12pt" style:font-size-complex="12pt"/>
    </style:style>
    <style:style style:name="T5" style:family="text">
      <style:text-properties fo:color="#ffffff" loext:opacity="100%" style:font-name="Arial" fo:font-size="12pt" officeooo:rsid="0207f6ae" fo:background-color="transparent" loext:char-shading-value="0" style:font-size-asian="12pt" style:font-size-complex="12pt"/>
    </style:style>
    <style:style style:name="T6" style:family="text">
      <style:text-properties fo:background-color="transparent" loext:char-shading-value="0"/>
    </style:style>
    <style:style style:name="T7" style:family="text">
      <style:text-properties fo:color="#ffffff" loext:opacity="100%" fo:font-size="12pt" officeooo:rsid="0207f6ae" style:font-size-asian="12pt" style:font-size-complex="12pt"/>
    </style:style>
    <style:style style:name="T8" style:family="text">
      <style:text-properties fo:color="#ffffff" loext:opacity="100%" officeooo:rsid="0207f6ae"/>
    </style:style>
    <style:style style:name="T9" style:family="text">
      <style:text-properties officeooo:rsid="020908b2"/>
    </style:style>
    <style:style style:name="T10" style:family="text">
      <style:text-properties fo:color="#ffffff" loext:opacity="100%" fo:font-size="12pt" style:text-underline-style="none" fo:font-weight="normal" officeooo:rsid="020908b2" fo:background-color="transparent" loext:char-shading-value="0" style:font-size-asian="12pt" style:font-size-complex="12pt"/>
    </style:style>
    <style:style style:name="T11" style:family="text">
      <style:text-properties fo:color="#ffffff" loext:opacity="100%" fo:font-size="14pt" style:text-underline-style="none" fo:font-weight="normal" officeooo:rsid="020908b2" fo:background-color="transparent" loext:char-shading-value="0" style:font-size-asian="14pt" style:font-size-complex="14pt"/>
    </style:style>
    <style:style style:name="T12" style:family="text">
      <style:text-properties style:text-underline-style="none" fo:font-weight="normal" fo:background-color="transparent" loext:char-shading-value="0"/>
    </style:style>
    <style:style style:name="T13" style:family="text">
      <style:text-properties style:text-underline-style="none" fo:font-weight="normal" officeooo:rsid="020aa978" fo:background-color="transparent" loext:char-shading-value="0"/>
    </style:style>
    <style:style style:name="T14" style:family="text">
      <style:text-properties fo:color="#ffffff" loext:opacity="100%" fo:font-size="14pt" style:text-underline-style="none" fo:font-weight="normal" officeooo:rsid="020aa978" fo:background-color="transparent" loext:char-shading-value="0" style:font-size-asian="14pt" style:font-size-complex="14pt"/>
    </style:style>
    <style:style style:name="T15" style:family="text">
      <style:text-properties style:text-underline-style="none" fo:background-color="transparent" loext:char-shading-value="0"/>
    </style:style>
    <style:style style:name="T16" style:family="text">
      <style:text-properties fo:color="#ffffff" loext:opacity="100%" fo:font-size="14pt" style:text-underline-style="none" fo:font-weight="normal" officeooo:rsid="020fde34" fo:background-color="transparent" loext:char-shading-value="0" style:font-size-asian="14pt" style:font-size-complex="14pt"/>
    </style:style>
    <style:style style:name="T17" style:family="text">
      <style:text-properties fo:color="#ffffff" loext:opacity="100%" fo:font-size="14pt" style:text-underline-style="none" fo:font-weight="normal" officeooo:rsid="021593b3" fo:background-color="transparent" loext:char-shading-value="0" style:font-size-asian="14pt" style:font-size-complex="14pt"/>
    </style:style>
    <style:style style:name="T18" style:family="text">
      <style:text-properties fo:color="#ffffff" loext:opacity="100%" fo:font-size="14pt" style:text-underline-style="none" fo:font-weight="normal" officeooo:rsid="021b0962" fo:background-color="transparent" loext:char-shading-value="0" style:font-size-asian="14pt" style:font-size-complex="14pt"/>
    </style:style>
    <style:style style:name="T19" style:family="text">
      <style:text-properties fo:color="#ffffff" loext:opacity="100%" fo:font-size="14pt" style:text-underline-style="none" fo:font-weight="normal" officeooo:rsid="0213cb13" fo:background-color="transparent" loext:char-shading-value="0" style:font-size-asian="14pt" style:font-size-complex="14pt"/>
    </style:style>
    <style:style style:name="T20" style:family="text">
      <style:text-properties style:text-underline-style="none" fo:font-weight="normal" officeooo:rsid="021593b3" fo:background-color="transparent" loext:char-shading-value="0"/>
    </style:style>
    <style:style style:name="T21" style:family="text">
      <style:text-properties style:text-underline-style="none" fo:font-weight="normal" officeooo:rsid="0213cb13" fo:background-color="transparent" loext:char-shading-value="0"/>
    </style:style>
    <style:style style:name="T22" style:family="text">
      <style:text-properties fo:color="#ffffff" loext:opacity="100%" fo:font-size="12pt" fo:font-weight="normal" officeooo:rsid="0235268e" fo:background-color="transparent" loext:char-shading-value="0" style:font-size-asian="12pt" style:font-size-complex="12pt"/>
    </style:style>
    <style:style style:name="T23" style:family="text">
      <style:text-properties fo:font-weight="normal" fo:background-color="transparent" loext:char-shading-value="0"/>
    </style:style>
    <style:style style:name="T24" style:family="text">
      <style:text-properties officeooo:rsid="0227dcad"/>
    </style:style>
    <style:style style:name="T25" style:family="text">
      <style:text-properties officeooo:rsid="02259ec8"/>
    </style:style>
    <style:style style:name="T26" style:family="text">
      <style:text-properties officeooo:rsid="0226a567"/>
    </style:style>
    <style:style style:name="T27" style:family="text">
      <style:text-properties style:text-underline-style="none" officeooo:rsid="0216a37b"/>
    </style:style>
    <style:style style:name="T28" style:family="text">
      <style:text-properties officeooo:rsid="0216a37b"/>
    </style:style>
    <style:style style:name="T29" style:family="text">
      <style:text-properties officeooo:rsid="0216c522"/>
    </style:style>
    <style:style style:name="T30" style:family="text">
      <style:text-properties fo:color="#ffffff" loext:opacity="100%" style:font-name="Arial1" style:text-underline-style="none" officeooo:rsid="0216c522"/>
    </style:style>
    <style:style style:name="T31" style:family="text">
      <style:text-properties officeooo:rsid="02171d48"/>
    </style:style>
    <style:style style:name="T32" style:family="text">
      <style:text-properties fo:color="#469df9" loext:opacity="100%" style:font-name="Arial" fo:font-size="10pt" officeooo:rsid="02171d48" style:font-size-asian="10pt" style:font-size-complex="10pt"/>
    </style:style>
    <style:style style:name="T33" style:family="text">
      <style:text-properties fo:color="#ffffff" loext:opacity="100%" fo:font-size="12pt" fo:font-weight="normal" officeooo:rsid="020908b2" fo:background-color="transparent" loext:char-shading-value="0" style:font-size-asian="12pt" style:font-size-complex="12pt"/>
    </style:style>
    <style:style style:name="T34" style:family="text">
      <style:text-properties fo:color="#ffffff" loext:opacity="100%" fo:font-size="12pt" fo:font-weight="normal" officeooo:rsid="023aa484" fo:background-color="transparent" loext:char-shading-value="0" style:font-size-asian="12pt" style:font-size-complex="12pt"/>
    </style:style>
    <style:style style:name="T35" style:family="text">
      <style:text-properties fo:font-weight="normal" officeooo:rsid="023c909b" fo:background-color="transparent" loext:char-shading-value="0"/>
    </style:style>
    <style:style style:name="T36" style:family="text">
      <style:text-properties fo:color="#c9211e" loext:opacity="100%" style:font-name="Arial1" fo:font-size="14pt" fo:font-weight="normal" officeooo:rsid="023aa484" style:font-size-asian="14pt" style:font-size-complex="14pt"/>
    </style:style>
    <style:style style:name="T37" style:family="text">
      <style:text-properties fo:color="#ffffff" loext:opacity="100%" fo:font-size="12pt" officeooo:rsid="023c909b" fo:background-color="transparent" loext:char-shading-value="0" style:font-size-asian="12pt" style:font-size-complex="12pt"/>
    </style:style>
    <style:style style:name="T38" style:family="text">
      <style:text-properties fo:color="#c9211e" loext:opacity="100%" style:font-name="Arial1" fo:font-size="14pt" officeooo:rsid="023c909b" style:font-size-asian="14pt" style:font-size-complex="14pt"/>
    </style:style>
    <style:style style:name="T39" style:family="text">
      <style:text-properties fo:color="#ffffff" loext:opacity="100%" fo:font-size="12pt" fo:font-weight="normal" officeooo:rsid="023c909b" fo:background-color="transparent" loext:char-shading-value="0" style:font-size-asian="12pt" style:font-size-complex="12pt"/>
    </style:style>
    <style:style style:name="T40" style:family="text">
      <style:text-properties fo:color="#ffffff" loext:opacity="100%" fo:font-size="12pt" fo:font-weight="normal" officeooo:rsid="023d09dc" fo:background-color="transparent" loext:char-shading-value="0" style:font-size-asian="12pt" style:font-size-complex="12pt"/>
    </style:style>
    <style:style style:name="T41" style:family="text">
      <style:text-properties style:text-line-through-style="none" style:text-line-through-type="none" style:text-underline-style="none" fo:font-weight="normal" style:text-blinking="false" fo:background-color="transparent" loext:char-shading-value="0" loext:padding="0cm" loext:border="none"/>
    </style:style>
    <style:style style:name="T42" style:family="text">
      <style:text-properties fo:color="#ffffff" loext:opacity="100%" style:text-line-through-style="none" style:text-line-through-type="none" fo:font-size="12pt" style:text-underline-style="none" fo:font-weight="normal" officeooo:rsid="023c909b" style:text-blinking="false" fo:background-color="transparent" loext:char-shading-value="0" style:font-size-asian="12pt" style:font-size-complex="12pt" loext:padding="0cm" loext:border="none"/>
    </style:style>
    <style:style style:name="T43" style:family="text">
      <style:text-properties style:text-line-through-style="none" style:text-line-through-type="none" style:text-underline-style="none" style:text-blinking="false" fo:background-color="transparent" loext:char-shading-value="0" loext:padding="0cm" loext:border="none"/>
    </style:style>
    <style:style style:name="T44" style:family="text">
      <style:text-properties fo:color="#ffffff" loext:opacity="100%" fo:font-size="12pt" fo:font-weight="normal" officeooo:rsid="023ee483" fo:background-color="transparent" loext:char-shading-value="0" style:font-size-asian="12pt" style:font-size-complex="12pt"/>
    </style:style>
    <style:style style:name="T45" style:family="text">
      <style:text-properties fo:font-weight="normal" officeooo:rsid="0240b662" fo:background-color="transparent" loext:char-shading-value="0"/>
    </style:style>
    <style:style style:name="T46" style:family="text">
      <style:text-properties fo:color="#a1467e" loext:opacity="100%" fo:font-weight="normal" fo:background-color="transparent" loext:char-shading-value="0"/>
    </style:style>
    <style:style style:name="T47" style:family="text">
      <style:text-properties fo:color="#00a933" loext:opacity="100%" fo:font-weight="normal" fo:background-color="transparent" loext:char-shading-value="0"/>
    </style:style>
    <style:style style:name="T48" style:family="text">
      <style:text-properties fo:font-weight="normal" officeooo:rsid="024209b0" fo:background-color="transparent" loext:char-shading-value="0"/>
    </style:style>
    <style:style style:name="T49" style:family="text">
      <style:text-properties fo:color="#ffffff" loext:opacity="100%" fo:font-size="12pt" fo:font-weight="normal" officeooo:rsid="024209b0" fo:background-color="transparent" loext:char-shading-value="0" style:font-size-asian="12pt" style:font-size-complex="12pt"/>
    </style:style>
    <style:style style:name="T50" style:family="text">
      <style:text-properties fo:font-weight="normal" officeooo:rsid="02425b33" fo:background-color="transparent" loext:char-shading-value="0"/>
    </style:style>
    <style:style style:name="T51" style:family="text">
      <style:text-properties fo:color="#ffffff" loext:opacity="100%" style:font-name="Arial" fo:font-size="12pt" fo:font-weight="normal" officeooo:rsid="020908b2" fo:background-color="transparent" loext:char-shading-value="0" style:font-size-asian="12pt" style:font-size-complex="12pt"/>
    </style:style>
    <style:style style:name="T52" style:family="text">
      <style:text-properties fo:color="#ffffff" loext:opacity="100%" fo:font-size="12pt" fo:font-weight="normal" officeooo:rsid="020bd315" fo:background-color="transparent" loext:char-shading-value="0" style:font-size-asian="12pt" style:font-size-complex="12pt"/>
    </style:style>
    <style:style style:name="T53" style:family="text">
      <style:text-properties fo:font-size="12pt" fo:background-color="transparent" loext:char-shading-value="0" style:font-size-asian="12pt" style:font-size-complex="12pt"/>
    </style:style>
    <style:style style:name="T54" style:family="text">
      <style:text-properties fo:color="#ffffff" loext:opacity="100%" fo:font-size="12pt" fo:font-weight="normal" officeooo:rsid="020d2357" fo:background-color="transparent" loext:char-shading-value="0" style:font-size-asian="12pt" style:font-size-complex="12pt"/>
    </style:style>
    <style:style style:name="T55" style:family="text">
      <style:text-properties fo:color="#ffffff" loext:opacity="100%" fo:font-size="14pt" fo:font-weight="normal" officeooo:rsid="020d2357" fo:background-color="transparent" loext:char-shading-value="0" style:font-size-asian="14pt" style:font-size-complex="14pt"/>
    </style:style>
    <style:style style:name="T56" style:family="text">
      <style:text-properties officeooo:rsid="020ebc40" fo:background-color="transparent" loext:char-shading-value="0"/>
    </style:style>
    <style:style style:name="T57" style:family="text">
      <style:text-properties fo:font-weight="normal" officeooo:rsid="020ebc40" fo:background-color="transparent" loext:char-shading-value="0"/>
    </style:style>
    <style:style style:name="T58" style:family="text">
      <style:text-properties fo:color="#ffffff" loext:opacity="100%" fo:font-size="14pt" fo:font-weight="normal" officeooo:rsid="02113cfb" fo:background-color="transparent" loext:char-shading-value="0" style:font-size-asian="14pt" style:font-size-complex="14pt"/>
    </style:style>
    <style:style style:name="T59" style:family="text">
      <style:text-properties fo:color="#ffffff" loext:opacity="100%" fo:font-size="14pt" style:text-underline-style="none" fo:font-weight="normal" officeooo:rsid="02113cfb" fo:background-color="transparent" loext:char-shading-value="0" style:font-size-asian="14pt" style:font-size-complex="14pt"/>
    </style:style>
    <style:style style:name="T60" style:family="text">
      <style:text-properties style:text-underline-style="none" fo:font-weight="normal" officeooo:rsid="02120630" fo:background-color="transparent" loext:char-shading-value="0"/>
    </style:style>
    <style:style style:name="T61" style:family="text">
      <style:text-properties style:text-underline-style="none" fo:font-weight="normal" officeooo:rsid="021770f8" fo:background-color="transparent" loext:char-shading-value="0"/>
    </style:style>
    <style:style style:name="T62" style:family="text">
      <style:text-properties fo:color="#ffffff" loext:opacity="100%" style:font-name="Arial" fo:font-size="14pt" style:text-underline-style="none" fo:font-weight="normal" officeooo:rsid="02113cfb" fo:background-color="transparent" loext:char-shading-value="0" style:font-size-asian="14pt" style:font-size-complex="14pt"/>
    </style:style>
    <style:style style:name="T63" style:family="text">
      <style:text-properties style:text-underline-style="none" fo:font-weight="normal" officeooo:rsid="02171d48" fo:background-color="transparent" loext:char-shading-value="0"/>
    </style:style>
    <style:style style:name="T64" style:family="text">
      <style:text-properties style:text-underline-style="none" fo:font-weight="normal" officeooo:rsid="02191726" fo:background-color="transparent" loext:char-shading-value="0"/>
    </style:style>
    <style:style style:name="T65" style:family="text">
      <style:text-properties fo:color="#ffffff" loext:opacity="100%" fo:font-size="14pt" style:text-underline-style="none" fo:font-weight="normal" officeooo:rsid="02120630" fo:background-color="transparent" loext:char-shading-value="0" style:font-size-asian="14pt" style:font-size-complex="14pt"/>
    </style:style>
    <style:style style:name="T66" style:family="text">
      <style:text-properties fo:color="#ffffff" loext:opacity="100%" fo:font-size="14pt" fo:font-weight="normal" officeooo:rsid="021c3799" style:font-size-asian="14pt" style:font-size-complex="14pt"/>
    </style:style>
    <style:style style:name="T67" style:family="text">
      <style:text-properties fo:color="#ffffff" loext:opacity="100%" fo:font-size="14pt" style:text-underline-style="none" fo:font-weight="normal" officeooo:rsid="021d5bcc" fo:background-color="transparent" loext:char-shading-value="0" style:font-size-asian="14pt" style:font-size-complex="14pt"/>
    </style:style>
    <style:style style:name="T68" style:family="text">
      <style:text-properties fo:color="#ffffff" loext:opacity="100%" style:font-name="Arial" fo:font-size="14pt" style:text-underline-style="none" fo:font-weight="normal" officeooo:rsid="021d5bcc" fo:background-color="transparent" loext:char-shading-value="0" style:font-size-asian="14pt" style:font-size-complex="14pt"/>
    </style:style>
    <style:style style:name="T69" style:family="text">
      <style:text-properties style:text-underline-style="none" fo:font-weight="normal" officeooo:rsid="021d5bcc" fo:background-color="transparent" loext:char-shading-value="0"/>
    </style:style>
    <style:style style:name="T70" style:family="text">
      <style:text-properties style:text-underline-style="none" fo:font-weight="normal" officeooo:rsid="021fa2ef" fo:background-color="transparent" loext:char-shading-value="0"/>
    </style:style>
    <style:style style:name="T71" style:family="text">
      <style:text-properties fo:color="#ffffff" loext:opacity="100%" fo:font-size="14pt" style:text-underline-style="none" fo:font-weight="normal" officeooo:rsid="021fa2ef" fo:background-color="transparent" loext:char-shading-value="0" style:font-size-asian="14pt" style:font-size-complex="14pt"/>
    </style:style>
    <style:style style:name="T72" style:family="text">
      <style:text-properties fo:color="#ffffff" loext:opacity="100%" fo:font-size="14pt" fo:font-weight="normal" officeooo:rsid="0234a03a" style:font-size-asian="14pt" style:font-size-complex="14pt"/>
    </style:style>
    <style:style style:name="T73" style:family="text">
      <style:text-properties fo:color="#ffffff" loext:opacity="100%" fo:font-size="14pt" style:text-underline-style="none" fo:font-weight="normal" officeooo:rsid="0234a03a" fo:background-color="transparent" loext:char-shading-value="0" style:font-size-asian="14pt" style:font-size-complex="14pt"/>
    </style:style>
    <style:style style:name="T74" style:family="text">
      <style:text-properties style:text-underline-style="none" officeooo:rsid="0234a03a" fo:background-color="transparent" loext:char-shading-value="0"/>
    </style:style>
    <style:style style:name="T75" style:family="text">
      <style:text-properties style:text-underline-style="none" fo:font-weight="normal" officeooo:rsid="0234a03a" fo:background-color="transparent" loext:char-shading-value="0"/>
    </style:style>
    <style:style style:name="T76" style:family="text">
      <style:text-properties fo:color="#ffffff" loext:opacity="100%" fo:font-size="14pt" fo:font-weight="normal" officeooo:rsid="022b8b4d" style:font-size-asian="14pt" style:font-size-complex="14pt"/>
    </style:style>
    <style:style style:name="T77" style:family="text">
      <style:text-properties fo:color="#ffffff" loext:opacity="100%" fo:font-size="14pt" style:text-underline-style="none" fo:font-weight="normal" officeooo:rsid="022b8b4d" fo:background-color="transparent" loext:char-shading-value="0" style:font-size-asian="14pt" style:font-size-complex="14pt"/>
    </style:style>
    <style:style style:name="T78" style:family="text">
      <style:text-properties fo:color="#ffffff" loext:opacity="100%" fo:font-size="14pt" style:text-underline-style="none" fo:font-weight="normal" officeooo:rsid="02300a0c" fo:background-color="transparent" loext:char-shading-value="0" style:font-size-asian="14pt" style:font-size-complex="14pt"/>
    </style:style>
    <style:style style:name="T79" style:family="text">
      <style:text-properties style:text-underline-style="none" fo:font-weight="normal" officeooo:rsid="02300a0c" fo:background-color="transparent" loext:char-shading-value="0"/>
    </style:style>
    <style:style style:name="T80" style:family="text">
      <style:text-properties style:text-underline-style="none" fo:font-weight="normal" officeooo:rsid="02463c3d" fo:background-color="transparent" loext:char-shading-value="0"/>
    </style:style>
    <style:style style:name="T81" style:family="text">
      <style:text-properties fo:color="#ff7b72" loext:opacity="100%" fo:font-family="'Droid Sans Mono', monospace" fo:font-size="10.5pt" style:text-underline-style="none" fo:font-weight="normal" officeooo:rsid="02463c3d" fo:background-color="#121314" loext:char-shading-value="0"/>
    </style:style>
    <style:style style:name="T82" style:family="text">
      <style:text-properties fo:color="#bbbebf" loext:opacity="100%" fo:font-family="'Droid Sans Mono', monospace" fo:font-size="10.5pt" style:text-underline-style="none" fo:font-weight="normal" officeooo:rsid="02463c3d" fo:background-color="#121314" loext:char-shading-value="0"/>
    </style:style>
    <style:style style:name="T83" style:family="text">
      <style:text-properties fo:color="#4ec9b0" loext:opacity="100%" fo:font-family="'Droid Sans Mono', monospace" fo:font-size="10.5pt" style:text-underline-style="none" fo:font-weight="normal" officeooo:rsid="02463c3d" fo:background-color="#121314" loext:char-shading-value="0"/>
    </style:style>
    <style:style style:name="T84" style:family="text">
      <style:text-properties fo:color="#d4d4d4" loext:opacity="100%" fo:font-family="'Droid Sans Mono', monospace" fo:font-size="10.5pt" style:text-underline-style="none" fo:font-weight="normal" officeooo:rsid="02463c3d" fo:background-color="#121314" loext:char-shading-value="0"/>
    </style:style>
    <style:style style:name="T85" style:family="text">
      <style:text-properties style:text-line-through-style="none" style:text-line-through-type="none" style:text-underline-style="none" fo:font-weight="normal" officeooo:rsid="02463c3d" style:text-blinking="false" fo:background-color="transparent" loext:char-shading-value="0" loext:padding="0cm" loext:border="none"/>
    </style:style>
    <style:style style:name="T86" style:family="text">
      <style:text-properties fo:color="#ffffff" loext:opacity="100%" fo:font-size="14pt" style:text-underline-style="none" fo:font-weight="normal" officeooo:rsid="02463c3d" fo:background-color="transparent" loext:char-shading-value="0" style:font-size-asian="14pt" style:font-size-complex="14pt"/>
    </style:style>
    <style:style style:name="T87" style:family="text">
      <style:text-properties fo:color="#ffffff" loext:opacity="100%" fo:font-size="14pt" style:text-underline-style="none" fo:font-weight="normal" officeooo:rsid="022bdc6a" fo:background-color="transparent" loext:char-shading-value="0" style:font-size-asian="14pt" style:font-size-complex="14pt"/>
    </style:style>
    <style:style style:name="T88" style:family="text">
      <style:text-properties fo:color="#ffffff" loext:opacity="100%" style:font-name="Arial" fo:font-size="14pt" style:text-underline-style="none" fo:font-weight="normal" officeooo:rsid="022bdc6a" fo:background-color="transparent" loext:char-shading-value="0" style:font-size-asian="14pt" style:font-size-complex="14pt"/>
    </style:style>
    <style:style style:name="T89" style:family="text">
      <style:text-properties fo:color="#e6e905" loext:opacity="100%" fo:font-size="14pt" style:text-underline-style="none" fo:font-weight="normal" officeooo:rsid="022bdc6a" fo:background-color="transparent" loext:char-shading-value="0" style:font-size-asian="14pt" style:font-size-complex="14pt"/>
    </style:style>
    <style:style style:name="T90" style:family="text">
      <style:text-properties fo:color="#e6e905" loext:opacity="100%" fo:font-size="14pt" style:text-underline-style="none" fo:font-weight="normal" officeooo:rsid="022e246b" fo:background-color="transparent" loext:char-shading-value="0" style:font-size-asian="14pt" style:font-size-complex="14pt"/>
    </style:style>
    <style:style style:name="T91" style:family="text">
      <style:text-properties fo:color="#e6e905" loext:opacity="100%" fo:font-size="14pt" style:text-underline-style="none" fo:font-weight="normal" officeooo:rsid="022ce022" fo:background-color="transparent" loext:char-shading-value="0" style:font-size-asian="14pt" style:font-size-complex="14pt"/>
    </style:style>
    <style:style style:name="T92" style:family="text">
      <style:text-properties fo:color="#e6e905" loext:opacity="100%" fo:font-size="14pt" style:text-underline-style="none" fo:font-weight="normal" officeooo:rsid="022f38c4" fo:background-color="transparent" loext:char-shading-value="0" style:font-size-asian="14pt" style:font-size-complex="14pt"/>
    </style:style>
    <style:style style:name="T93" style:family="text">
      <style:text-properties fo:color="#e6e905" loext:opacity="100%" fo:font-size="14pt" style:text-underline-style="none" fo:font-weight="normal" officeooo:rsid="022fb6a2" fo:background-color="transparent" loext:char-shading-value="0" style:font-size-asian="14pt" style:font-size-complex="14pt"/>
    </style:style>
    <style:style style:name="T94" style:family="text">
      <style:text-properties fo:color="#e6e905" loext:opacity="100%" fo:font-size="14pt" style:text-underline-style="none" fo:font-weight="normal" officeooo:rsid="022fd944" fo:background-color="transparent" loext:char-shading-value="0" style:font-size-asian="14pt" style:font-size-complex="14pt"/>
    </style:style>
    <style:style style:name="T95" style:family="text">
      <style:text-properties fo:color="#e6e905" loext:opacity="100%" fo:font-size="14pt" style:text-underline-style="none" fo:font-weight="normal" officeooo:rsid="023019b2" fo:background-color="transparent" loext:char-shading-value="0" style:font-size-asian="14pt" style:font-size-complex="14pt"/>
    </style:style>
    <style:style style:name="T96" style:family="text">
      <style:text-properties fo:color="#ffffff" loext:opacity="100%" fo:font-size="14pt" style:text-underline-style="none" fo:font-weight="normal" officeooo:rsid="0231bbe3" fo:background-color="transparent" loext:char-shading-value="0" style:font-size-asian="14pt" style:font-size-complex="14pt"/>
    </style:style>
    <style:style style:name="T97" style:family="text">
      <style:text-properties fo:color="#ffffff" loext:opacity="100%" fo:font-size="14pt" style:text-underline-style="none" fo:font-weight="normal" officeooo:rsid="023299ec" fo:background-color="transparent" loext:char-shading-value="0" style:font-size-asian="14pt" style:font-size-complex="14pt"/>
    </style:style>
    <style:style style:name="T98" style:family="text">
      <style:text-properties fo:color="#ffffff" loext:opacity="100%" fo:font-size="14pt" fo:font-weight="normal" officeooo:rsid="02483f67" style:font-size-asian="14pt" style:font-size-complex="14pt"/>
    </style:style>
    <style:style style:name="T99" style:family="text">
      <style:text-properties fo:color="#ffffff" loext:opacity="100%" fo:font-size="14pt" style:text-underline-style="none" fo:font-weight="normal" officeooo:rsid="02483f67" fo:background-color="transparent" loext:char-shading-value="0" style:font-size-asian="14pt" style:font-size-complex="14pt"/>
    </style:style>
    <style:style style:name="T100" style:family="text">
      <style:text-properties style:text-underline-style="none" fo:font-weight="normal" officeooo:rsid="02483f67" fo:background-color="transparent" loext:char-shading-value="0"/>
    </style:style>
    <style:style style:name="T101" style:family="text">
      <style:text-properties fo:color="#ffffff" loext:opacity="100%" fo:font-size="14pt" fo:font-weight="normal" officeooo:rsid="02212731" fo:background-color="#b47804" loext:char-shading-value="0" style:font-size-asian="14pt" style:font-size-complex="14pt"/>
    </style:style>
    <style:style style:name="T102" style:family="text">
      <style:text-properties fo:color="#ffffff" loext:opacity="100%" fo:font-size="14pt" style:text-underline-style="none" fo:font-weight="normal" officeooo:rsid="02212731" fo:background-color="transparent" loext:char-shading-value="0" style:font-size-asian="14pt" style:font-size-complex="14pt"/>
    </style:style>
    <style:style style:name="T103" style:family="text">
      <style:text-properties fo:color="#ffffff" loext:opacity="100%" fo:font-size="14pt" style:text-underline-style="none" fo:font-weight="normal" officeooo:rsid="022317e8" fo:background-color="transparent" loext:char-shading-value="0" style:font-size-asian="14pt" style:font-size-complex="14pt"/>
    </style:style>
    <style:style style:name="T104" style:family="text">
      <style:text-properties fo:color="#ffffff" loext:opacity="100%" style:font-name="Arial" fo:font-size="14pt" style:text-underline-style="none" fo:font-weight="normal" officeooo:rsid="022317e8" fo:background-color="transparent" loext:char-shading-value="0" style:font-size-asian="14pt" style:font-size-complex="14pt"/>
    </style:style>
    <style:style style:name="T105" style:family="text">
      <style:text-properties fo:color="#ffffff" loext:opacity="100%" fo:font-weight="normal" officeooo:rsid="02212731"/>
    </style:style>
    <style:style style:name="T106" style:family="text">
      <style:text-properties fo:color="#ffffff" loext:opacity="100%" fo:font-size="14pt" fo:font-weight="normal" officeooo:rsid="022317e8" fo:background-color="#b47804" loext:char-shading-value="0" style:font-size-asian="14pt" style:font-size-complex="14pt"/>
    </style:style>
    <style:style style:name="T107" style:family="text">
      <style:text-properties style:text-underline-style="none" officeooo:rsid="023943ac" fo:background-color="transparent" loext:char-shading-value="0"/>
    </style:style>
    <style:style style:name="T108" style:family="text">
      <style:text-properties fo:color="#ffffff" loext:opacity="100%" fo:font-size="14pt" style:text-underline-style="none" fo:font-weight="normal" officeooo:rsid="0236e83a" fo:background-color="transparent" loext:char-shading-value="0" style:font-size-asian="14pt" style:font-size-complex="14pt"/>
    </style:style>
    <style:style style:name="T109" style:family="text">
      <style:text-properties style:text-underline-style="none" officeooo:rsid="0236e83a" fo:background-color="transparent" loext:char-shading-value="0"/>
    </style:style>
    <style:style style:name="T110" style:family="text">
      <style:text-properties style:text-underline-style="none" fo:font-weight="normal" officeooo:rsid="0236e83a" fo:background-color="transparent" loext:char-shading-value="0"/>
    </style:style>
    <style:style style:name="T111" style:family="text">
      <style:text-properties style:text-underline-style="none" fo:font-weight="normal" officeooo:rsid="023943ac" fo:background-color="transparent" loext:char-shading-value="0"/>
    </style:style>
    <style:style style:name="T112" style:family="text">
      <style:text-properties fo:color="#ffffff" loext:opacity="100%" fo:font-size="14pt" fo:font-weight="normal" officeooo:rsid="0227dcad" fo:background-color="#069a2e" loext:char-shading-value="0" style:font-size-asian="14pt" style:font-size-complex="14pt"/>
    </style:style>
    <style:style style:name="T113" style:family="text">
      <style:text-properties fo:color="#ffffff" loext:opacity="100%" fo:font-size="14pt" style:text-underline-style="none" fo:font-weight="normal" officeooo:rsid="0227dcad" fo:background-color="transparent" loext:char-shading-value="0" style:font-size-asian="14pt" style:font-size-complex="14pt"/>
    </style:style>
    <style:style style:name="T114" style:family="text">
      <style:text-properties fo:color="#ffffff" loext:opacity="100%" fo:font-size="14pt" style:text-underline-style="none" fo:font-weight="normal" officeooo:rsid="0228c36d" fo:background-color="#069a2e" loext:char-shading-value="0" style:font-size-asian="14pt" style:font-size-complex="14pt"/>
    </style:style>
    <style:style style:name="T115" style:family="text">
      <style:text-properties style:text-underline-style="none" fo:font-weight="normal" officeooo:rsid="0229133e" fo:background-color="transparent" loext:char-shading-value="0"/>
    </style:style>
    <style:style style:name="T116" style:family="text">
      <style:text-properties fo:color="#ffffff" loext:opacity="100%" fo:font-size="14pt" style:text-underline-style="none" fo:font-weight="normal" officeooo:rsid="0229133e" fo:background-color="transparent" loext:char-shading-value="0" style:font-size-asian="14pt" style:font-size-complex="14pt"/>
    </style:style>
    <style:style style:name="T117" style:family="text">
      <style:text-properties fo:color="#ffffff" loext:opacity="100%" fo:font-size="14pt" style:text-underline-style="none" fo:font-weight="normal" officeooo:rsid="0229172e" fo:background-color="transparent" loext:char-shading-value="0" style:font-size-asian="14pt" style:font-size-complex="14pt"/>
    </style:style>
    <style:style style:name="T118" style:family="text">
      <style:text-properties fo:color="#ffffff" loext:opacity="100%" fo:font-size="14pt" style:text-underline-style="none" fo:font-weight="normal" officeooo:rsid="0229bac5" fo:background-color="transparent" loext:char-shading-value="0" style:font-size-asian="14pt" style:font-size-complex="14pt"/>
    </style:style>
    <style:style style:name="T119" style:family="text">
      <style:text-properties fo:color="#ffffff" loext:opacity="100%" fo:font-size="14pt" style:text-underline-style="none" fo:font-weight="normal" officeooo:rsid="0228c36d" fo:background-color="transparent" loext:char-shading-value="0" style:font-size-asian="14pt" style:font-size-complex="14pt"/>
    </style:style>
    <style:style style:name="T120" style:family="text">
      <style:text-properties fo:color="#ff0000" loext:opacity="100%" fo:font-size="14pt" fo:font-weight="normal" officeooo:rsid="0243785a" fo:background-color="#ffff00" loext:char-shading-value="0" style:font-size-asian="14pt" style:font-size-complex="14pt"/>
    </style:style>
    <style:style style:name="T121" style:family="text">
      <style:text-properties fo:color="#ffffff" loext:opacity="100%" fo:font-size="12pt" style:text-underline-style="none" fo:font-weight="normal" officeooo:rsid="0243785a" fo:background-color="transparent" loext:char-shading-value="0" style:font-size-asian="12pt" style:font-size-complex="12pt"/>
    </style:style>
    <style:style style:name="T122" style:family="text">
      <style:text-properties style:text-underline-style="none" fo:font-weight="normal" officeooo:rsid="0243785a" fo:background-color="transparent" loext:char-shading-value="0"/>
    </style:style>
    <style:style style:name="T123" style:family="text">
      <style:text-properties fo:color="#ffffff" loext:opacity="100%" fo:font-size="12pt" style:text-underline-style="none" fo:font-weight="normal" officeooo:rsid="0244af53" fo:background-color="transparent" loext:char-shading-value="0" style:font-size-asian="12pt" style:font-size-complex="12pt"/>
    </style:style>
    <style:style style:name="T124" style:family="text">
      <style:text-properties style:text-underline-style="none" officeooo:rsid="0244af53"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UNTES DE <text:span text:style-name="T1">RUST</text:span></text:p>
      <text:p text:style-name="P2"><text:span text:style-name="Internet_20_link"/></text:p>
      <text:p text:style-name="P2"/>
      <text:h text:style-name="Heading_20_3" text:outline-level="3"><text:span text:style-name="T2">DECLARACI</text:span><text:span text:style-name="T3">Ó</text:span><text:span text:style-name="T2">N DE VARIABLES</text:span></text:h>
      <text:p text:style-name="P3"><text:span text:style-name="_2f__2f_C"><text:span text:style-name="T4">La declaraci</text:span></text:span><text:span text:style-name="_2f__2f_C"><text:span text:style-name="T5">ón</text:span></text:span><text:span text:style-name="_2f__2f_C"><text:span text:style-name="T4"> de la variable es inversa a c:</text:span></text:span></text:p>
      <text:p text:style-name="P3"><text:span text:style-name="_3c_C_2b__2b__3e_"><text:span text:style-name="T6">Nombre_de_variable: tipo</text:span></text:span></text:p>
      <text:p text:style-name="P3"><text:span text:style-name="_3c_C_3e_">var1: f32</text:span></text:p>
      <text:p text:style-name="P3"><text:span text:style-name="_3c_C_3e_">var2: f64</text:span></text:p>
      <text:p text:style-name="P3"><text:span text:style-name="_3c_C_2b__2b__3e_"><text:span text:style-name="T7">Los tipos en comparativa:</text:span></text:span></text:p>
      <text:p text:style-name="P3"><text:span text:style-name="_3c_C_2b__2b__3e_"><text:span text:style-name="T8"/></text:span></text:p>
      <text:p text:style-name="P3"><text:span text:style-name="_3c_C_2b__2b__3e_"><text:span text:style-name="T1">int<text:tab/><text:tab/><text:tab/>-&gt; i32</text:span></text:span><text:span text:style-name="_3c_C_2b__2b__3e_"><text:span text:style-name="T9"><text:tab/><text:tab/><text:tab/><text:tab/><text:tab/>char<text:tab/><text:tab/><text:tab/><text:tab/>-&gt;<text:tab/> char (son 4bytes unicode no solo ascii)</text:span></text:span></text:p>
      <text:p text:style-name="P3"><text:span text:style-name="_3c_C_2b__2b__3e_"><text:span text:style-name="T1">long <text:tab/><text:tab/>-&gt; i64</text:span></text:span><text:span text:style-name="_3c_C_2b__2b__3e_"><text:span text:style-name="T9"><text:tab/><text:tab/><text:tab/><text:tab/><text:tab/>bool<text:tab/><text:tab/><text:tab/><text:tab/>-&gt; bool</text:span></text:span></text:p>
      <text:p text:style-name="P3"><text:span text:style-name="_3c_C_2b__2b__3e_"><text:span text:style-name="T1">float<text:tab/><text:tab/>-&gt; f32</text:span></text:span><text:span text:style-name="_3c_C_2b__2b__3e_"><text:span text:style-name="T9"><text:tab/><text:tab/><text:tab/><text:tab/><text:tab/>char*<text:tab/><text:tab/><text:tab/>-&gt; &amp;str</text:span></text:span></text:p>
      <text:p text:style-name="P3"><text:span text:style-name="_3c_C_2b__2b__3e_"><text:span text:style-name="T1">double<text:tab/>-&gt; f64</text:span></text:span><text:span text:style-name="_3c_C_2b__2b__3e_"><text:span text:style-name="T9"><text:tab/><text:tab/><text:tab/><text:tab/><text:tab/>std::string<text:tab/><text:tab/>-&gt; String</text:span></text:span></text:p>
      <text:p text:style-name="P3"><text:span text:style-name="_3c_C_2b__2b__3e_"><text:span text:style-name="T1">U-Int<text:tab/><text:tab/>-&gt; u32</text:span></text:span></text:p>
      <text:p text:style-name="P3"><text:span text:style-name="_3c_C_2b__2b__3e_"><text:span text:style-name="T1">U-long<text:tab/>-&gt;<text:tab/>u64</text:span></text:span></text:p>
      <text:p text:style-name="P4"><text:span text:style-name="_2f__2f_C"><text:span text:style-name="T10">Para asignar un valor a una variable seria:</text:span></text:span><text:span text:style-name="_2f__2f_C"><text:span text:style-name="T11"><text:line-break/><text:line-break/></text:span></text:span><text:span text:style-name="_3c_C_3e_"><text:span text:style-name="T12">let a = 32;</text:span></text:span><text:span text:style-name="_3c_C_3e_"><text:span text:style-name="T13"> </text:span></text:span><text:span text:style-name="_2f__2f_C"><text:span text:style-name="T13">//no habría una declaracion previa tipo a: i32, y Rust deduce lo que es.\</text:span></text:span></text:p>
      <text:p text:style-name="P5"><text:span text:style-name="_3c_C_3e_"><text:span text:style-name="T12">let a = 32 as f32</text:span></text:span><text:span text:style-name="_2f__2f_C"><text:span text:style-name="T13"> //le indicamos que es un float</text:span></text:span></text:p>
      <text:p text:style-name="P5"><text:span text:style-name="_2f__2f_C"><text:span text:style-name="T14">o</text:span></text:span></text:p>
      <text:p text:style-name="P5"><text:span text:style-name="_3c_C_3e_"><text:span text:style-name="T12">let a: i32 = 42;</text:span></text:span></text:p>
      <text:p text:style-name="P5"><text:span text:style-name="_3c_C_3e_"><text:span text:style-name="T12"/></text:span></text:p>
      <text:p text:style-name="P6"><text:span text:style-name="_3c_C_2b__2b__3e_"><text:span text:style-name="T15">LET</text:span></text:span><text:span text:style-name="_2f__2f_C"><text:span text:style-name="T16"> es para hacer que no pueda variar</text:span></text:span><text:span text:style-name="_2f__2f_C"><text:span text:style-name="T17"> (NO PUEDE SER GLOBAL).</text:span></text:span><text:span text:style-name="_2f__2f_C"><text:span text:style-name="T18"> </text:span></text:span><text:span text:style-name="_3c_C_2b__2b__3e_"><text:span text:style-name="T15">LET</text:span></text:span><text:span text:style-name="_2f__2f_C"><text:span text:style-name="T17"> </text:span></text:span><text:span text:style-name="_3c_C_2b__2b__3e_"><text:span text:style-name="T15">MUT</text:span></text:span><text:span text:style-name="_2f__2f_C"><text:span text:style-name="T16"> para que varie</text:span></text:span><text:span text:style-name="_2f__2f_C"><text:span text:style-name="T17"> (Hay que poner </text:span></text:span><text:span text:style-name="_3c_C_2b__2b__3e_"><text:span text:style-name="T15">let</text:span></text:span><text:span text:style-name="_2f__2f_C"><text:span text:style-name="T17"> delante)</text:span></text:span><text:span text:style-name="_2f__2f_C"><text:span text:style-name="T16">, y </text:span></text:span><text:span text:style-name="_3c_C_2b__2b__3e_"><text:span text:style-name="T15">CONST</text:span></text:span><text:span text:style-name="_2f__2f_C"><text:span text:style-name="T16"> para constante</text:span></text:span><text:span text:style-name="_2f__2f_C"><text:span text:style-name="T17"> (si puede ser global)</text:span></text:span></text:p>
      <text:p text:style-name="P7"><text:span text:style-name="_2f__2f_C"><text:span text:style-name="T19"/></text:span></text:p>
      <text:p text:style-name="P7"><text:span text:style-name="_3c_C_2b__2b__3e_"><text:span text:style-name="T15">let mut</text:span></text:span><text:span text:style-name="_3c_C_3e_"><text:span text:style-name="T12"> i = 0; </text:span></text:span><text:span text:style-name="_2f__2f_C"><text:span text:style-name="T12">//tipico para hacer while ya que la i variará. No global</text:span></text:span><text:span text:style-name="_2f__2f_C"><text:span text:style-name="T20">. En runtime</text:span></text:span></text:p>
      <text:p text:style-name="P7"><text:span text:style-name="_3c_C_2b__2b__3e_"><text:span text:style-name="T15">const i: i32</text:span></text:span><text:span text:style-name="_3c_C_3e_"><text:span text:style-name="T12"> = 0; </text:span></text:span><text:span text:style-name="_2f__2f_C"><text:span text:style-name="T12">//no puede mutar NUNCA en compilacion y puede ser global</text:span></text:span><text:span text:style-name="_2f__2f_C"><text:span text:style-name="T21">. Necesita ser declarado el tipo.</text:span></text:span><text:span text:style-name="_2f__2f_C"><text:span text:style-name="T20"> y se crea en tiempo de compilación</text:span></text:span></text:p>
      <text:p text:style-name="P8"><text:span text:style-name="_2f__2f_C"><text:span text:style-name="T22">Si a una variable le ponemos '_’ delante, esta variable aunque no se use, el compilador no se quejará de ella:</text:span></text:span></text:p>
      <text:p text:style-name="P8"><text:span text:style-name="_3c_C_3e_"><text:span text:style-name="T23">let </text:span></text:span><text:span text:style-name="_3c_C_2b__2b__3e_"><text:span text:style-name="T6">_</text:span></text:span><text:span text:style-name="_3c_C_3e_"><text:span text:style-name="T23">num: f32 = 0.4; </text:span></text:span><text:span text:style-name="_2f__2f_C"><text:span text:style-name="T23">//aunque no la use el compilador no lanzara un warning</text:span></text:span></text:p>
      <text:h text:style-name="P9" text:outline-level="3"><text:soft-page-break/></text:h>
      <text:p text:style-name="P10"/>
      <text:h text:style-name="P11" text:outline-level="3">MATRICES</text:h>
      <text:p text:style-name="P12">Podemos usar matrices como en C:<text:line-break/></text:p>
      <text:p text:style-name="P12"><text:span text:style-name="_3c_C_2b__2b__3e_">let x: </text:span><text:span text:style-name="_3c_C_2b__2b__3e_"><text:span text:style-name="T24">[i32; 3]</text:span></text:span><text:span text:style-name="_3c_C_2b__2b__3e_"> = [1, 2 , 3];</text:span></text:p>
      <text:p text:style-name="P13"><text:span text:style-name="_2f__2f_C"><text:span text:style-name="T24">//let x = [1, 2, 3]; puede ser asi tambien y el deduciria el tipo.</text:span></text:span></text:p>
      <text:p text:style-name="P12"><text:span text:style-name="_3c_C_3e_">println!("{}", x[1]); </text:span><text:span text:style-name="_2f__2f_C">//imprimiría 2, pero es arriesgado</text:span></text:p>
      <text:p text:style-name="P12"><text:span text:style-name="_3c_C_3e_"><text:span text:style-name="T25">println!("{}", x[7]);</text:span></text:span><text:span text:style-name="_2f__2f_C"> //Entraría en modo "panic" que saldría de forma segura. No soltaria basura</text:span></text:p>
      <text:p text:style-name="P12"><text:span text:style-name="_2f__2f_C"/></text:p>
      <text:p text:style-name="P14">Para hacerlo de forma segura se puede usar </text:p>
      <text:p text:style-name="P14"><text:span text:style-name="_3c_C_2b__2b__3e_">x.get(1)</text:span><text:span text:style-name="_3c_C_3e_">; </text:span><text:span text:style-name="_2f__2f_C">//devolveria "Some(2)" en mayusculas la S</text:span></text:p>
      <text:p text:style-name="P14"><text:span text:style-name="_3c_C_3e_">x.get(7);</text:span><text:span text:style-name="_2f__2f_C"> //devolveria "None" en mayusculas la N</text:span></text:p>
      <text:p text:style-name="P14">Por lo tanto para usarlo por que un x.get(1) devolveria en pantalla un some(2) con un println! tenemos que hacer:<text:line-break/><text:line-break/><text:span text:style-name="_3c_C_2b__2b__3e_">if let Some(</text:span><text:span text:style-name="_3c_C_2b__2b__3e_"><text:span text:style-name="T26">i</text:span></text:span><text:span text:style-name="_3c_C_2b__2b__3e_">) = x.get(1) </text:span><text:span text:style-name="_3c_C_3e_">{</text:span></text:p>
      <text:p text:style-name="P14"><text:span text:style-name="_3c_C_3e_"><text:tab/>println!("{}", </text:span><text:span text:style-name="_3c_C_3e_"><text:span text:style-name="T26">i</text:span></text:span><text:span text:style-name="_3c_C_3e_"><text:span text:style-name="T24">)</text:span></text:span><text:span text:style-name="_3c_C_3e_">;</text:span></text:p>
      <text:p text:style-name="P14"><text:span text:style-name="_3c_C_3e_">}</text:span><text:span text:style-name="_3c_C_3e_"><text:span text:style-name="T24"> </text:span></text:span><text:span text:style-name="_3c_C_3e_">else {</text:span></text:p>
      <text:p text:style-name="P14"><text:span text:style-name="_3c_C_3e_"><text:tab/>println!("no existe");</text:span></text:p>
      <text:p text:style-name="P14"><text:span text:style-name="_3c_C_3e_">}</text:span></text:p>
      <text:p text:style-name="P14">O en formáto Rust:</text:p>
      <text:p text:style-name="P14"/>
      <text:p text:style-name="P15"><text:span text:style-name="_3c_C_2b__2b__3e_">match x.get(2) {</text:span></text:p>
      <text:p text:style-name="P15"><text:span text:style-name="_3c_C_2b__2b__3e_"><text:tab/>Some(i) =&gt; println!("{}", i),</text:span></text:p>
      <text:p text:style-name="P15"><text:span text:style-name="_3c_C_2b__2b__3e_"><text:tab/>None<text:tab/>=&gt;<text:tab/> println!("No existe"),</text:span></text:p>
      <text:p text:style-name="P15"><text:span text:style-name="_3c_C_2b__2b__3e_">}</text:span></text:p>
      <text:p text:style-name="P10"/>
      <text:h text:style-name="P16" text:outline-level="3">VARIABLES GLOBALES</text:h>
      <text:p text:style-name="P17">El tener una variable global en Rust es <text:s/>un problema, ya que puede haber dataraces para modificarla asi que tiene que estar protegida.. si no no deja. </text:p>
      <text:p text:style-name="P17">La forma clásica es:<text:line-break/></text:p>
      <text:p text:style-name="P18"><text:span text:style-name="_3c_C_2b__2b__3e_"><text:span text:style-name="T2">static mut </text:span></text:span><text:span text:style-name="_3c_C_3e_"><text:span text:style-name="T2">A: i32 = 0;</text:span></text:span><text:span text:style-name="_3c_C_3e_"><text:span text:style-name="T27"> </text:span></text:span><text:span text:style-name="_2f__2f_C"><text:span text:style-name="T2">//variable global</text:span></text:span></text:p>
      <text:p text:style-name="P18"><text:span text:style-name="_3c_C_3e_"><text:span text:style-name="T28">fn main(){</text:span></text:span></text:p>
      <text:p text:style-name="P18"><text:span text:style-name="_3c_C_3e_"><text:span text:style-name="T28"><text:tab/>if true{</text:span></text:span></text:p>
      <text:p text:style-name="P18"><text:soft-page-break/><text:span text:style-name="_3c_C_3e_"><text:span text:style-name="T28"><text:tab/><text:tab/></text:span></text:span><text:span text:style-name="_3c_C_2b__2b__3e_">unsafe{</text:span><text:span text:style-name="_3c_C_3e_"><text:span text:style-name="T28"> A = 10;</text:span></text:span><text:span text:style-name="_3c_C_2b__2b__3e_">}</text:span><text:span text:style-name="_3c_C_2b__2b__3e_"><text:span text:style-name="T28"> </text:span></text:span><text:span text:style-name="_2f__2f_C">//no se recomienda pero permitido</text:span><text:span text:style-name="_2f__2f_C"><text:span text:style-name="T29">. unsafe le dice el compilador que confie en el programador. </text:span></text:span></text:p>
      <text:p text:style-name="P18"><text:span text:style-name="_3c_C_3e_"><text:span text:style-name="T28"><text:tab/>}</text:span></text:span></text:p>
      <text:p text:style-name="P18"><text:span text:style-name="_3c_C_3e_"><text:span text:style-name="T28">}</text:span></text:span></text:p>
      <text:p text:style-name="P18"><text:span text:style-name="_3c_C_3e_"/></text:p>
      <text:p text:style-name="P19"><text:span text:style-name="_3c_C_2b__2b__3e_"><text:span text:style-name="T2">Unsafe</text:span></text:span><text:span text:style-name="_3c_C_3e_"><text:span text:style-name="T30"> es un peligro.. asi que usamos </text:span></text:span><text:span text:style-name="_3c_C_2b__2b__3e_"><text:span text:style-name="T2">atomic</text:span></text:span><text:span text:style-name="_3c_C_3e_"><text:span text:style-name="T30"> para no provocar dataraces:<text:line-break/></text:span></text:span></text:p>
      <text:p text:style-name="P19"><text:span text:style-name="_3c_C_2b__2b__3e_">use std::sync::atomic::{AtomicI32, ordering}</text:span></text:p>
      <text:p text:style-name="P19"><text:span text:style-name="_3c_C_3e_"><text:span text:style-name="T29">static A: </text:span></text:span><text:span text:style-name="_3c_C_2b__2b__3e_">AtomicI32</text:span><text:span text:style-name="_3c_C_3e_"><text:span text:style-name="T29"> = AtomicI32::new(0); </text:span></text:span><text:span text:style-name="_2f__2f_C"><text:span text:style-name="T29">//no hace reserva de memoria. Solo inicializa a cero</text:span></text:span></text:p>
      <text:p text:style-name="P20"><text:span text:style-name="_3c_C_3e_">fn main() {<text:line-break/></text:span><text:span text:style-name="_3c_C_3e_"><text:span text:style-name="T29"><text:tab/></text:span></text:span><text:span text:style-name="_3c_C_3e_">if true {<text:line-break/></text:span><text:span text:style-name="_3c_C_3e_"><text:span text:style-name="T29"><text:tab/><text:tab/></text:span></text:span><text:span text:style-name="_3c_C_2b__2b__3e_">A.store</text:span><text:span text:style-name="_3c_C_3e_">(10, </text:span><text:span text:style-name="_3c_C_2b__2b__3e_">Ordering::Relaxed</text:span><text:span text:style-name="_3c_C_3e_">);</text:span><text:span text:style-name="_3c_C_3e_"><text:span text:style-name="T31"> </text:span></text:span><text:span text:style-name="_2f__2f_C"><text:span text:style-name="T31">//Relaxed es el nivel más débil del ordenamiento at</text:span></text:span><text:span text:style-name="_2f__2f_C"><text:span text:style-name="T32">ó</text:span></text:span><text:span text:style-name="_2f__2f_C"><text:span text:style-name="T31">mico. solo </text:span></text:span></text:p>
      <text:p text:style-name="P20"><text:span text:style-name="_2f__2f_C"><text:span text:style-name="T31">me importa modificar el valor, no el orden del tiempo en que se haga.</text:span></text:span><text:span text:style-name="_3c_C_3e_"><text:line-break/> }<text:line-break/>}</text:span></text:p>
      <text:h text:style-name="P21" text:outline-level="3"/>
      <text:h text:style-name="P22" text:outline-level="3">PANIC!()</text:h>
      <text:p text:style-name="P23"><text:span text:style-name="_2f__2f_C"><text:span text:style-name="T33">R</text:span></text:span><text:span text:style-name="_2f__2f_C"><text:span text:style-name="T34">ust cuando encuentra un proceso que no puede solventar (por ejemplo dividir por cero) entra en </text:span></text:span><text:span text:style-name="_3c_C_2b__2b__3e_"><text:span text:style-name="T6">Panic</text:span></text:span><text:span text:style-name="_2f__2f_C"><text:span text:style-name="T34"> liberando toda la memoria y saliendo limpiamente. Para forzarlo se usa esto:</text:span></text:span></text:p>
      <text:p text:style-name="P23"><text:span text:style-name="_3c_C_3e_"><text:span text:style-name="T23">fn set_title(&amp;mut self, title: String){ </text:span></text:span><text:span text:style-name="_2f__2f_C"><text:span text:style-name="T23">//</text:span></text:span><text:span text:style-name="_2f__2f_C"><text:span text:style-name="T35">esto es un setter de una estructura por eso lleva el self</text:span></text:span></text:p>
      <text:p text:style-name="P23"><text:span text:style-name="_3c_C_3e_"><text:span text:style-name="T23"><text:tab/>if title.is_empty(){</text:span></text:span><text:span text:style-name="_3c_C_2b__2b__3e_"><text:span text:style-name="T6">panic!(“El título no puede ser vacio”);</text:span></text:span><text:span text:style-name="_3c_C_3e_"><text:span text:style-name="T23">} </text:span></text:span><text:span text:style-name="_2f__2f_C"><text:span text:style-name="T23">//</text:span></text:span><text:span text:style-name="_2f__2f_C"><text:span text:style-name="T35">panic hará salirse el programa</text:span></text:span></text:p>
      <text:p text:style-name="P23"><text:span text:style-name="_3c_C_3e_"><text:span text:style-name="T23"><text:tab/>if title.len() &gt; 50 {</text:span></text:span><text:span text:style-name="_3c_C_2b__2b__3e_"><text:span text:style-name="T6">panic!(</text:span></text:span><text:span text:style-name="_3c_C_3e_"><text:span text:style-name="T23">“El título es más largo de 50 bits”</text:span></text:span><text:span text:style-name="_3c_C_2b__2b__3e_"><text:span text:style-name="T6">)</text:span></text:span><text:span text:style-name="_3c_C_3e_"><text:span text:style-name="T23">;}</text:span></text:span></text:p>
      <text:p text:style-name="P23"><text:span text:style-name="_3c_C_3e_"><text:span text:style-name="T23"><text:tab/>self.title = title</text:span></text:span></text:p>
      <text:p text:style-name="P23"><text:span text:style-name="_3c_C_3e_"><text:span text:style-name="T23">}</text:span></text:span></text:p>
      <text:h text:style-name="P24" text:outline-level="3"><text:span text:style-name="_3c_C_3e_"><text:span text:style-name="T36">ExitCode</text:span></text:span></text:h>
      <text:p text:style-name="P25"><text:span text:style-name="_2f__2f_C"><text:span text:style-name="T37">Como en C, podemos retornar un valor de restorno 1 o 0 del programa. Para ello usamos el ExitCode de esta manera:</text:span></text:span></text:p>
      <text:p text:style-name="P25"><text:span text:style-name="_3c_C_2b__2b__3e_"><text:span text:style-name="T6">use std::process::ExitCode;</text:span></text:span></text:p>
      <text:p text:style-name="P25"><text:span text:style-name="_3c_C_3e_"><text:span text:style-name="T6">fn main() -</text:span></text:span><text:span text:style-name="_3c_C_2b__2b__3e_"><text:span text:style-name="T6"> &gt; ExitCode</text:span></text:span><text:span text:style-name="_3c_C_3e_"><text:span text:style-name="T6">{</text:span></text:span></text:p>
      <text:p text:style-name="P25"><text:span text:style-name="_3c_C_3e_"><text:span text:style-name="T6"><text:tab/>…</text:span></text:span></text:p>
      <text:p text:style-name="P25"><text:span text:style-name="_3c_C_3e_"><text:span text:style-name="T6"><text:tab/></text:span></text:span><text:span text:style-name="_3c_C_2b__2b__3e_"><text:span text:style-name="T6">ExitCode::from(0)</text:span></text:span></text:p>
      <text:p text:style-name="P25"><text:span text:style-name="_3c_C_3e_"><text:span text:style-name="T6">}</text:span></text:span></text:p>
      <text:p text:style-name="P25"><text:span text:style-name="_3c_C_3e_"><text:span text:style-name="T6"/></text:span></text:p>
      <text:h text:style-name="P24" text:outline-level="3"><text:soft-page-break/><text:span text:style-name="_3c_C_3e_"><text:span text:style-name="T38">Result()</text:span></text:span></text:h>
      <text:p text:style-name="P25"><text:span text:style-name="_2f__2f_C"><text:span text:style-name="T33">R</text:span></text:span><text:span text:style-name="_2f__2f_C"><text:span text:style-name="T34">ust </text:span></text:span><text:span text:style-name="_2f__2f_C"><text:span text:style-name="T39">la forma de devolver valores es muchas veces un Result(), que es una pareja donde el primero es un Ok</text:span></text:span><text:span text:style-name="_2f__2f_C"><text:span text:style-name="T40">(valor)</text:span></text:span><text:span text:style-name="_2f__2f_C"><text:span text:style-name="T39">, y el segundo un Err</text:span></text:span><text:span text:style-name="_2f__2f_C"><text:span text:style-name="T40">(error)</text:span></text:span><text:span text:style-name="_2f__2f_C"><text:span text:style-name="T39">. </text:span></text:span><text:span text:style-name="_2f__2f_C"><text:span text:style-name="T40">Es como un interruptor de dos posiciones</text:span></text:span></text:p>
      <text:p text:style-name="P26"><text:span text:style-name="_2f__2f_C"><text:span text:style-name="T41">// Devuelve un Ok con el resultado (f32) O un Err con un texto (&amp;'static str)</text:span></text:span><text:span text:style-name="T42"/></text:p>
      <text:p text:style-name="P26"><text:span text:style-name="_3c_C_3e_"><text:span text:style-name="T41">fn dividir(dividendo: f32, divisor: f32) -&gt; </text:span></text:span><text:span text:style-name="_3c_C_2b__2b__3e_"><text:span text:style-name="T43">Result&lt;f32, &amp;'static str&gt;</text:span></text:span><text:span text:style-name="_3c_C_3e_"><text:span text:style-name="T41"> {</text:span></text:span></text:p>
      <text:p text:style-name="P26"><text:span text:style-name="_3c_C_3e_"><text:span text:style-name="T41">if divisor == 0.0 {</text:span></text:span></text:p>
      <text:p text:style-name="P26"><text:span text:style-name="_3c_C_3e_"><text:span text:style-name="T41"><text:tab/></text:span></text:span><text:span text:style-name="_3c_C_2b__2b__3e_"><text:span text:style-name="T43">return Err(</text:span></text:span><text:span text:style-name="_3c_C_3e_"><text:span text:style-name="T41">"¡No se puede dividir entre cero!"); </text:span></text:span><text:span text:style-name="_2f__2f_C"><text:span text:style-name="T41">// Pasó algo malo</text:span></text:span></text:p>
      <text:p text:style-name="P26"><text:span text:style-name="_3c_C_3e_"><text:span text:style-name="T41">}</text:span></text:span></text:p>
      <text:p text:style-name="P26"><text:span text:style-name="_3c_C_2b__2b__3e_"><text:span text:style-name="T43">Ok(dividendo / divisor)</text:span></text:span><text:span text:style-name="_3c_C_3e_"><text:span text:style-name="T41"> // Todo salió bien }</text:span></text:span></text:p>
      <text:p text:style-name="P26"><text:span text:style-name="_3c_C_3e_"><text:span text:style-name="T41">fn main() {</text:span></text:span></text:p>
      <text:p text:style-name="P26"><text:span text:style-name="_3c_C_3e_"><text:span text:style-name="T41"><text:tab/>// Cómo usar el resultado con un 'match' limpio</text:span></text:span></text:p>
      <text:p text:style-name="P26"><text:span text:style-name="_3c_C_3e_"><text:span text:style-name="T41"><text:tab/></text:span></text:span><text:span text:style-name="_3c_C_2b__2b__3e_"><text:span text:style-name="T43">match</text:span></text:span><text:span text:style-name="_3c_C_3e_"><text:span text:style-name="T41"> dividir(10.0, 2.0) {</text:span></text:span></text:p>
      <text:p text:style-name="P26"><text:span text:style-name="_3c_C_3e_"><text:span text:style-name="T41"><text:tab/><text:tab/></text:span></text:span><text:span text:style-name="_3c_C_2b__2b__3e_"><text:span text:style-name="T43">Ok(resultado) =&gt;</text:span></text:span><text:span text:style-name="_3c_C_3e_"><text:span text:style-name="T41"> println!("El resultado es: {}", resultado),</text:span></text:span></text:p>
      <text:p text:style-name="P26"><text:span text:style-name="_3c_C_3e_"><text:span text:style-name="T41"><text:tab/><text:tab/></text:span></text:span><text:span text:style-name="_3c_C_2b__2b__3e_"><text:span text:style-name="T43">Err(mensaje) =&gt;</text:span></text:span><text:span text:style-name="_3c_C_3e_"><text:span text:style-name="T41"> println!("Error: {}", mensaje),</text:span></text:span></text:p>
      <text:p text:style-name="P26"><text:span text:style-name="_3c_C_3e_"><text:span text:style-name="T41"><text:tab/>} </text:span></text:span></text:p>
      <text:p text:style-name="P27"><text:span text:style-name="_3c_C_3e_"><text:span text:style-name="T41">}</text:span></text:span></text:p>
      <text:p text:style-name="P27"><text:span text:style-name="_2f__2f_C"><text:span text:style-name="T44">Vamos a verlo con una forma más compleja. Abriendo un archivo que puede dar errores:</text:span></text:span></text:p>
      <text:p text:style-name="P27"><text:span text:style-name="_3c_C_3e_"><text:span text:style-name="T23">fn process_file(str: &amp;str) - &gt; </text:span></text:span><text:span text:style-name="_3c_C_2b__2b__3e_"><text:span text:style-name="T6">Result &lt;(), &amp;’static str&gt;</text:span></text:span><text:span text:style-name="_3c_C_3e_"><text:span text:style-name="T23">{ </text:span></text:span><text:span text:style-name="_2f__2f_C"><text:span text:style-name="T23">//() no nos interesa el tipo devuelto. </text:span></text:span><text:span text:style-name="_2f__2f_C"><text:span text:style-name="T45">U</text:span></text:span><text:span text:style-name="_2f__2f_C"><text:span text:style-name="T23">n void.</text:span></text:span><text:span text:style-name="_3c_C_3e_"><text:span text:style-name="T23"><text:line-break/><text:tab/>If let Ok(input_file) = </text:span></text:span><text:a xlink:type="simple" xlink:href="../../../../../:open(str" text:style-name="Internet_20_link" text:visited-style-name="Visited_20_Internet_20_Link"><text:span text:style-name="_3c_C_3e_"><text:span text:style-name="T46">File::open(str</text:span></text:span></text:a><text:span text:style-name="_3c_C_3e_"><text:span text:style-name="T47">)</text:span></text:span><text:span text:style-name="_3c_C_3e_"><text:span text:style-name="T23">{</text:span></text:span><text:span text:style-name="_2f__2f_C"><text:span text:style-name="T45">//tras el open es un Result&lt;File, std::io:.error&gt;</text:span></text:span></text:p>
      <text:p text:style-name="P28"><text:span text:style-name="_3c_C_3e_"><text:span text:style-name="T45"><text:tab/><text:tab/>let _reader = BufReader::new(input_file);</text:span></text:span></text:p>
      <text:p text:style-name="P28"><text:span text:style-name="_3c_C_3e_"><text:span text:style-name="T45"><text:tab/><text:tab/>for line in _reader.lines(){</text:span></text:span></text:p>
      <text:p text:style-name="P29"><text:span text:style-name="_3c_C_3e_"><text:span text:style-name="T45"><text:tab/><text:tab/><text:tab/></text:span></text:span><text:span text:style-name="_3c_C_2b__2b__3e_"><text:span text:style-name="T6">let line = match line{</text:span></text:span></text:p>
      <text:p text:style-name="P29"><text:span text:style-name="_3c_C_2b__2b__3e_"><text:span text:style-name="T6"><text:tab/><text:tab/><text:tab/><text:tab/>Ok(value) =&gt; value,</text:span></text:span></text:p>
      <text:p text:style-name="P29"><text:span text:style-name="_3c_C_2b__2b__3e_"><text:span text:style-name="T6"><text:tab/><text:tab/><text:tab/><text:tab/>Err(e) =&gt; return Err(“Error: Error leyendo el archivo\n”),</text:span></text:span></text:p>
      <text:p text:style-name="P29"><text:span text:style-name="_3c_C_3e_"><text:span text:style-name="T48"><text:tab/><text:tab/><text:tab/></text:span></text:span><text:span text:style-name="_3c_C_2b__2b__3e_"><text:span text:style-name="T6">};</text:span></text:span></text:p>
      <text:p text:style-name="P28"><text:span text:style-name="_3c_C_3e_"><text:span text:style-name="T45"><text:tab/><text:tab/>}</text:span></text:span></text:p>
      <text:p text:style-name="P28"><text:span text:style-name="_3c_C_2b__2b__3e_"><text:span text:style-name="T6">return Ok(());</text:span></text:span></text:p>
      <text:p text:style-name="P29"><text:span text:style-name="_3c_C_3e_"><text:span text:style-name="T48">} else {</text:span></text:span></text:p>
      <text:p text:style-name="P29"><text:span text:style-name="_3c_C_3e_"><text:span text:style-name="T48"><text:tab/></text:span></text:span><text:span text:style-name="_3c_C_2b__2b__3e_"><text:span text:style-name="T6">return Err(“Error: No puede abrir el fichero\n”);</text:span></text:span></text:p>
      <text:p text:style-name="P29"><text:span text:style-name="_3c_C_3e_"><text:span text:style-name="T48">}</text:span></text:span></text:p>
      <text:p text:style-name="P29"><text:span text:style-name="_3c_C_3e_"><text:span text:style-name="T48">}</text:span></text:span></text:p>
      <text:p text:style-name="P29"><text:span text:style-name="_2f__2f_C"><text:span text:style-name="T49">En este caso _reader.lines() devuelve un ITERADOR line y cada uno de ellos devuelve un Result&lt;String, error&gt; para averiguarlo hemos usado el match.. pero se puede hacer más pa linea:</text:span></text:span></text:p>
      <text:p text:style-name="P29"><text:span text:style-name="_3c_C_2b__2b__3e_"><text:span text:style-name="T6">let line = line?;</text:span></text:span></text:p>
      <text:p text:style-name="P30"><text:soft-page-break/><text:span text:style-name="_2f__2f_C"><text:span text:style-name="T50">Esto lo que hace es preguntar con el ?, si es Ok, suelta el line y si no un Err, pero dicho Err sería del tipo std::io::error y no &amp;’static str como lo que devuelve por lo que el compilador fallaría. <text:line-break/>Para solucionarlo, debemos mapear el error con map_err, pero este métido necesita una función que recibe el error std::io::error y devuelve un &amp;str. Le decimos que nos da igual lo que recibimos, y solo devuelva el string. Para ello usamos una función closure, detallana más abajo en los apuntes y ponermos la linea como:</text:span></text:span></text:p>
      <text:p text:style-name="P30"><text:span text:style-name="_3c_C_2b__2b__3e_"><text:span text:style-name="T6">let line = line.map_err(|_|, “Error: Error leyendo el archivo\n”)?;</text:span></text:span></text:p>
      <text:h text:style-name="P31" text:outline-level="3"/>
      <text:h text:style-name="P31" text:outline-level="3">ESTRUCTURAS</text:h>
      <text:p text:style-name="P4"><text:span text:style-name="_2f__2f_C"><text:span text:style-name="T33">Rust no tiene objectos ni clases, pero s</text:span></text:span><text:span text:style-name="_2f__2f_C"><text:span text:style-name="T51">í </text:span></text:span><text:span text:style-name="_2f__2f_C"><text:span text:style-name="T33">que puede acercarse a ellos con las estructuras. En Rust todo es privado que se declare</text:span></text:span><text:span text:style-name="_2f__2f_C"><text:span text:style-name="T52">. Para hacerlo accesible hay que ponerle la palabra </text:span></text:span><text:span text:style-name="_3c_C_2b__2b__3e_"><text:span text:style-name="T53">pub</text:span></text:span><text:span text:style-name="_2f__2f_C"><text:span text:style-name="T52"> delante. No solo a la estructura</text:span></text:span><text:span text:style-name="_2f__2f_C"><text:span text:style-name="T54">.</text:span></text:span></text:p>
      <text:p text:style-name="P32"><text:span text:style-name="_2f__2f_C"><text:span text:style-name="T55">(</text:span></text:span><text:span text:style-name="_3c_C_3e_"><text:span text:style-name="T23">fichero.rs</text:span></text:span><text:span text:style-name="_2f__2f_C"><text:span text:style-name="T55">)</text:span></text:span></text:p>
      <text:p text:style-name="P32"><text:span text:style-name="_3c_C_2b__2b__3e_"><text:span text:style-name="T6">pub struct </text:span></text:span><text:span text:style-name="_3c_C_2b__2b__3e_"><text:span text:style-name="T56">P</text:span></text:span><text:span text:style-name="_3c_C_3e_"><text:span text:style-name="T23">rueba{</text:span></text:span><text:span text:style-name="_3c_C_3e_"><text:span text:style-name="T57"> </text:span></text:span><text:span text:style-name="_2f__2f_C"><text:span text:style-name="T57">//debe ser CamelCase P mayúscula</text:span></text:span></text:p>
      <text:p text:style-name="P32"><text:span text:style-name="_3c_C_3e_"><text:span text:style-name="T23"><text:tab/></text:span></text:span><text:span text:style-name="_3c_C_2b__2b__3e_"><text:span text:style-name="T6">pub</text:span></text:span><text:span text:style-name="_3c_C_3e_"><text:span text:style-name="T23"> var1: i32</text:span></text:span><text:span text:style-name="_3c_C_2b__2b__3e_"><text:span text:style-name="T6">,</text:span></text:span></text:p>
      <text:p text:style-name="P32"><text:span text:style-name="_3c_C_3e_"><text:span text:style-name="T23"><text:tab/></text:span></text:span><text:span text:style-name="_3c_C_2b__2b__3e_"><text:span text:style-name="T6">pub</text:span></text:span><text:span text:style-name="_3c_C_3e_"><text:span text:style-name="T23"> var2: char</text:span></text:span><text:span text:style-name="_3c_C_2b__2b__3e_"><text:span text:style-name="T6">,</text:span></text:span><text:span text:style-name="_3c_C_3e_"><text:span text:style-name="T57"> </text:span></text:span><text:span text:style-name="_2f__2f_C"><text:span text:style-name="T23">//si no son pub estas variables no se puede acceder a ellas</text:span></text:span></text:p>
      <text:p text:style-name="P32"><text:span text:style-name="_3c_C_3e_"><text:span text:style-name="T23">}</text:span></text:span></text:p>
      <text:p text:style-name="P32"><text:span text:style-name="_2f__2f_C"><text:span text:style-name="T55">Importando el </text:span></text:span><text:span text:style-name="_3c_C_3e_"><text:span text:style-name="T23">fichero.rs</text:span></text:span><text:span text:style-name="_2f__2f_C"><text:span text:style-name="T55"> como <text:line-break/></text:span></text:span></text:p>
      <text:p text:style-name="P33"><text:span text:style-name="_2f__2f_C"><text:span text:style-name="T58">(fichero: main.rs)</text:span></text:span></text:p>
      <text:p text:style-name="P32"><text:span text:style-name="_3c_C_2b__2b__3e_"><text:span text:style-name="T6">mod</text:span></text:span><text:span text:style-name="_3c_C_3e_"><text:span text:style-name="T23"> fichero;</text:span></text:span><text:span text:style-name="_3c_C_3e_"><text:span text:style-name="T57"> </text:span></text:span><text:span text:style-name="_2f__2f_C"><text:span text:style-name="T57">//importa el fichero fichero.rs</text:span></text:span></text:p>
      <text:p text:style-name="P32"><text:span text:style-name="_3c_C_3e_"><text:span text:style-name="T23">fn main(){</text:span></text:span></text:p>
      <text:p text:style-name="P32"><text:span text:style-name="_3c_C_3e_"><text:span text:style-name="T23"><text:tab/>let a = fichero::prueba { var1: 42, var2: 'a'</text:span></text:span><text:span text:style-name="_3c_C_3e_"><text:span text:style-name="T57">}</text:span></text:span><text:span text:style-name="_3c_C_3e_"><text:span text:style-name="T23">;</text:span></text:span></text:p>
      <text:p text:style-name="P32"><text:span text:style-name="_3c_C_3e_"><text:span text:style-name="T23">} </text:span></text:span></text:p>
      <text:p text:style-name="P32"><text:span text:style-name="_3c_C_3e_"><text:span text:style-name="T23"/></text:span></text:p>
      <text:p text:style-name="P33"><text:span text:style-name="_2f__2f_C"><text:span text:style-name="T59">Ahora imaginemos que tenemos un archivo.rs que tiene esto:</text:span></text:span></text:p>
      <text:p text:style-name="P33"><text:span text:style-name="_2f__2f_C"><text:span text:style-name="T59">(</text:span></text:span><text:span text:style-name="_3c_C_3e_"><text:span text:style-name="T12">fichero.rs</text:span></text:span><text:span text:style-name="_2f__2f_C"><text:span text:style-name="T59">)</text:span></text:span></text:p>
      <text:p text:style-name="P33"><text:span text:style-name="_3c_C_3e_"><text:span text:style-name="T60">pub </text:span></text:span><text:span text:style-name="_3c_C_3e_"><text:span text:style-name="T12">struct Prueba{</text:span></text:span><text:span text:style-name="_3c_C_3e_"><text:span text:style-name="T60"> //para implementar el getter tiene que ser la estructura pub</text:span></text:span></text:p>
      <text:p text:style-name="P33"><text:span text:style-name="_3c_C_3e_"><text:span text:style-name="T12"><text:tab/>x: i32,</text:span></text:span></text:p>
      <text:p text:style-name="P33"><text:span text:style-name="_3c_C_3e_"><text:span text:style-name="T12">}</text:span></text:span></text:p>
      <text:p text:style-name="P33"><text:span text:style-name="_3c_C_3e_"><text:span text:style-name="T21">pub </text:span></text:span><text:span text:style-name="_3c_C_3e_"><text:span text:style-name="T12">fn test()</text:span></text:span><text:span text:style-name="_3c_C_3e_"><text:span text:style-name="T61"> -&gt; Prueba</text:span></text:span><text:span text:style-name="_3c_C_3e_"><text:span text:style-name="T12">{</text:span></text:span><text:span text:style-name="_2f__2f_C"><text:span text:style-name="T61"> //-&gt; devuelve un tipo Prueba (estructura)</text:span></text:span></text:p>
      <text:p text:style-name="P33"><text:span text:style-name="_3c_C_3e_"><text:span text:style-name="T61"><text:tab/></text:span></text:span><text:span text:style-name="_3c_C_3e_"><text:span text:style-name="T12">Prueba {x: 56}</text:span></text:span></text:p>
      <text:p text:style-name="P33"><text:span text:style-name="_3c_C_3e_"><text:span text:style-name="T12">}</text:span></text:span></text:p>
      <text:p text:style-name="P33"><text:span text:style-name="_2f__2f_C"><text:span text:style-name="T59">No habr</text:span></text:span><text:span text:style-name="_2f__2f_C"><text:span text:style-name="T62">í</text:span></text:span><text:span text:style-name="_2f__2f_C"><text:span text:style-name="T59">a problema en darle valor dentro de fichero.rs PERO si queremos acceder a el, tendriamos que hacer un metodo de la estructura en el propio archivo fichero.rs:<text:line-break/><text:line-break/></text:span></text:span><text:span text:style-name="_3c_C_2b__2b__3e_"><text:span text:style-name="T15">impl</text:span></text:span><text:span text:style-name="_3c_C_3e_"><text:span text:style-name="T12"> Prueba{</text:span></text:span></text:p>
      <text:p text:style-name="P33"><text:soft-page-break/><text:span text:style-name="_3c_C_3e_"><text:span text:style-name="T12"><text:tab/></text:span></text:span><text:span text:style-name="_3c_C_3e_"><text:span text:style-name="T60">pub </text:span></text:span><text:span text:style-name="_3c_C_3e_"><text:span text:style-name="T12">fn get_x(&amp;self) -&gt; i32{</text:span></text:span><text:span text:style-name="_3c_C_3e_"><text:span text:style-name="T60"> </text:span></text:span><text:span text:style-name="_2f__2f_C"><text:span text:style-name="T60">//tiene que ser pub tambien</text:span></text:span><text:span text:style-name="_2f__2f_C"><text:span text:style-name="T61">. -&gt; i32 = devuelve un int.</text:span></text:span></text:p>
      <text:p text:style-name="P34"><text:span text:style-name="_2f__2f_C"><text:span text:style-name="T63"><text:tab/>//&amp;self es como los objetos.. o this en c++ va implicito</text:span></text:span></text:p>
      <text:p text:style-name="P34"><text:span text:style-name="_2f__2f_C"><text:span text:style-name="T63"><text:tab/><text:tab/>(self) lo moveria el valor</text:span></text:span></text:p>
      <text:p text:style-name="P34"><text:span text:style-name="_2f__2f_C"><text:span text:style-name="T63"><text:tab/><text:tab/>(&amp;self) es inmutable</text:span></text:span></text:p>
      <text:p text:style-name="P34"><text:span text:style-name="_2f__2f_C"><text:span text:style-name="T63"><text:tab/><text:tab/>(&amp;mut self) lo podria cambiar.</text:span></text:span></text:p>
      <text:p text:style-name="P33"><text:span text:style-name="_3c_C_3e_"><text:span text:style-name="T12"><text:tab/><text:tab/>self.</text:span></text:span><text:span text:style-name="_3c_C_3e_"><text:span text:style-name="T60">x</text:span></text:span><text:span text:style-name="_3c_C_3e_"><text:span text:style-name="T64"> </text:span></text:span><text:span text:style-name="_2f__2f_C"><text:span text:style-name="T64">//IMPORTANTE!!! SI NO TIENE ';' ES UN RETURN IMPLICITO!!!</text:span></text:span></text:p>
      <text:p text:style-name="P33"><text:span text:style-name="_3c_C_3e_"><text:span text:style-name="T12"><text:tab/>}</text:span></text:span></text:p>
      <text:p text:style-name="P33"><text:span text:style-name="_3c_C_3e_"><text:span text:style-name="T12">}</text:span></text:span></text:p>
      <text:p text:style-name="P35"><text:span text:style-name="_2f__2f_C"><text:span text:style-name="T65">En el main.rs:<text:line-break/></text:span></text:span></text:p>
      <text:p text:style-name="P35"><text:span text:style-name="_3c_C_3e_"><text:span text:style-name="T12">mod fichero;</text:span></text:span></text:p>
      <text:p text:style-name="P35"><text:span text:style-name="_3c_C_3e_"><text:span text:style-name="T12">fn main (){</text:span></text:span></text:p>
      <text:p text:style-name="P36"><text:span text:style-name="_3c_C_3e_"><text:span text:style-name="T61"><text:tab/>let a = fichero::test(); </text:span></text:span><text:span text:style-name="_2f__2f_C"><text:span text:style-name="T61">//llama a la funcion externa en fichero y le da el valor 56</text:span></text:span><text:span text:style-name="_3c_C_3e_"><text:span text:style-name="T12"><text:tab/></text:span></text:span></text:p>
      <text:p text:style-name="P36"><text:span text:style-name="_3c_C_3e_"><text:span text:style-name="T61"><text:tab/></text:span></text:span><text:span text:style-name="_3c_C_3e_"><text:span text:style-name="T12">println!("{}", a.get_x());</text:span></text:span></text:p>
      <text:p text:style-name="P35"><text:span text:style-name="_3c_C_3e_"><text:span text:style-name="T12">}</text:span></text:span></text:p>
      <text:p text:style-name="P35"><text:span text:style-name="_3c_C_3e_"><text:span text:style-name="T12"/></text:span></text:p>
      <text:p text:style-name="P35"><text:span text:style-name="_3c_C_3e_"><text:span text:style-name="T12"/></text:span></text:p>
      <text:h text:style-name="P37" text:outline-level="3"><text:span text:style-name="_3c_C_3e_"><text:span text:style-name="T66">FUNCIONES</text:span></text:span></text:h>
      <text:p text:style-name="P38"><text:span text:style-name="_2f__2f_C"><text:span text:style-name="T67">Las funciones en Rust estan divididas entre las que no devuelven nada y las que s</text:span></text:span><text:span text:style-name="_2f__2f_C"><text:span text:style-name="T68">í</text:span></text:span><text:span text:style-name="_2f__2f_C"><text:span text:style-name="T67">. </text:span></text:span></text:p>
      <text:p text:style-name="P38"><text:span text:style-name="_2f__2f_C"><text:span text:style-name="T67">NO DEVUELVE:</text:span></text:span></text:p>
      <text:p text:style-name="P38"><text:span text:style-name="_3c_C_3e_"><text:span text:style-name="T12">fn funcion(num1: &amp;i32){</text:span></text:span><text:span text:style-name="_3c_C_3e_"><text:span text:style-name="T69"> </text:span></text:span><text:span text:style-name="_2f__2f_C"><text:span text:style-name="T69">//</text:span></text:span><text:span text:style-name="_2f__2f_C"><text:span text:style-name="T70">referenciada</text:span></text:span></text:p>
      <text:p text:style-name="P38"><text:span text:style-name="_3c_C_3e_"><text:span text:style-name="T12"><text:tab/>println!("El numero es: {}", num1</text:span></text:span><text:span text:style-name="_3c_C_3e_"><text:span text:style-name="T70">)</text:span></text:span><text:span text:style-name="_3c_C_3e_"><text:span text:style-name="T12">;</text:span></text:span></text:p>
      <text:p text:style-name="P38"><text:span text:style-name="_3c_C_3e_"><text:span text:style-name="T12">}</text:span></text:span></text:p>
      <text:p text:style-name="P38"><text:span text:style-name="_2f__2f_C"><text:span text:style-name="T67">DEVUELVE:</text:span></text:span></text:p>
      <text:p text:style-name="P38"><text:span text:style-name="_3c_C_3e_"><text:span text:style-name="T12">fn<text:tab/>suma(num1: &amp;i32, num2: &amp;i32) </text:span></text:span><text:span text:style-name="_3c_C_2b__2b__3e_"><text:span text:style-name="T15">-&gt; i32</text:span></text:span><text:span text:style-name="_3c_C_3e_"><text:span text:style-name="T12">{</text:span></text:span><text:span text:style-name="_3c_C_3e_"><text:span text:style-name="T69"> </text:span></text:span><text:span text:style-name="_2f__2f_C"><text:span text:style-name="T69">//-&gt; lo que devuelve</text:span></text:span></text:p>
      <text:p text:style-name="P38"><text:span text:style-name="_3c_C_3e_"><text:span text:style-name="T12"><text:tab/></text:span></text:span><text:span text:style-name="_3c_C_3e_"><text:span text:style-name="T70">*</text:span></text:span><text:span text:style-name="_3c_C_3e_"><text:span text:style-name="T12">num1 + </text:span></text:span><text:span text:style-name="_3c_C_3e_"><text:span text:style-name="T70">*</text:span></text:span><text:span text:style-name="_3c_C_3e_"><text:span text:style-name="T12">num2 </text:span></text:span><text:span text:style-name="_2f__2f_C"><text:span text:style-name="T12">//es importante que no tenga ; ya que este es un return oculto, sin ese punto y coma.</text:span></text:span></text:p>
      <text:p text:style-name="P39"><text:span text:style-name="_2f__2f_C"><text:span text:style-name="T70"><text:tab/>//Hay que derreferenciar, ya que son referencias (direcciones de memoria)</text:span></text:span></text:p>
      <text:p text:style-name="P38"><text:span text:style-name="_3c_C_3e_"><text:span text:style-name="T12">}</text:span></text:span></text:p>
      <text:p text:style-name="P38"><text:span text:style-name="_2f__2f_C"><text:span text:style-name="T67">Para llamarlas:</text:span></text:span></text:p>
      <text:p text:style-name="P38"><text:span text:style-name="_3c_C_3e_"><text:span text:style-name="T12">funcion(&amp;n);</text:span></text:span></text:p>
      <text:p text:style-name="P38"><text:span text:style-name="_3c_C_3e_"><text:span text:style-name="T12">suma(&amp;x, &amp;y);</text:span></text:span></text:p>
      <text:p text:style-name="P38"><text:span text:style-name="_3c_C_3e_"><text:span text:style-name="T12"/></text:span></text:p>
      <text:p text:style-name="P39"><text:span text:style-name="_2f__2f_C"><text:span text:style-name="T67">Para </text:span></text:span><text:span text:style-name="_2f__2f_C"><text:span text:style-name="T71">cambiar el valor de un numero</text:span></text:span><text:span text:style-name="_2f__2f_C"><text:span text:style-name="T67">:</text:span></text:span></text:p>
      <text:p text:style-name="P39"><text:span text:style-name="_3c_C_3e_"><text:span text:style-name="T12">fn cambia(n: &amp;mut i32){</text:span></text:span></text:p>
      <text:p text:style-name="P39"><text:soft-page-break/><text:span text:style-name="_3c_C_3e_"><text:span text:style-name="T12"><text:tab/>*n = 42;</text:span></text:span></text:p>
      <text:p text:style-name="P39"><text:span text:style-name="_3c_C_3e_"><text:span text:style-name="T12">}</text:span></text:span></text:p>
      <text:p text:style-name="P39"><text:span text:style-name="_2f__2f_C"><text:span text:style-name="T71">y para llamarla:</text:span></text:span></text:p>
      <text:p text:style-name="P39"><text:span text:style-name="_3c_C_3e_"><text:span text:style-name="T12">cambia(&amp;mut x);</text:span></text:span></text:p>
      <text:p text:style-name="P39"><text:span text:style-name="_3c_C_3e_"><text:span text:style-name="T12"/></text:span></text:p>
      <text:h text:style-name="P40" text:outline-level="3"><text:span text:style-name="_3c_C_3e_"><text:span text:style-name="T66">FUNCIONES</text:span></text:span><text:span text:style-name="_3c_C_3e_"><text:span text:style-name="T72"> CLOSURE |parametros|</text:span></text:span></text:h>
      <text:p text:style-name="P41"><text:span text:style-name="_2f__2f_C"><text:span text:style-name="T73">Hay veces que queremos pasar una funcion mas limpiamente o mas corta. Se puede definir la normal como:<text:line-break/></text:span></text:span></text:p>
      <text:p text:style-name="P41"><text:span text:style-name="_3c_C_3e_"><text:span text:style-name="T12">fn sumar (x: i32, y: i32) -&gt; i32{</text:span></text:span></text:p>
      <text:p text:style-name="P41"><text:span text:style-name="_3c_C_3e_"><text:span text:style-name="T12"><text:tab/>x + y</text:span></text:span></text:p>
      <text:p text:style-name="P41"><text:span text:style-name="_3c_C_3e_"><text:span text:style-name="T12">}</text:span></text:span></text:p>
      <text:p text:style-name="P41"><text:span text:style-name="_2f__2f_C"><text:span text:style-name="T73">Pero podemos hacerla Closure:</text:span></text:span></text:p>
      <text:p text:style-name="P41"><text:span text:style-name="_3c_C_2b__2b__3e_"><text:span text:style-name="T15">let sumar = |x</text:span></text:span><text:span text:style-name="_3c_C_2b__2b__3e_"><text:span text:style-name="T74">,</text:span></text:span><text:span text:style-name="_3c_C_2b__2b__3e_"><text:span text:style-name="T15"> y| x + y;</text:span></text:span></text:p>
      <text:p text:style-name="P41"><text:span text:style-name="_2f__2f_C"><text:span text:style-name="T73">y se la llama como:</text:span></text:span></text:p>
      <text:p text:style-name="P41"><text:span text:style-name="_3c_C_3e_"><text:span text:style-name="T75">let resultado = </text:span></text:span><text:span text:style-name="_3c_C_3e_"><text:span text:style-name="T12">sumar(2, 3);</text:span></text:span></text:p>
      <text:p text:style-name="P41"><text:span text:style-name="_2f__2f_C"><text:span text:style-name="T73">esto mismo se puede hacer en una unica linea asi:</text:span></text:span></text:p>
      <text:p text:style-name="P41"><text:span text:style-name="_3c_C_2b__2b__3e_"><text:span text:style-name="T15">let sumar = </text:span></text:span><text:span text:style-name="_3c_C_2b__2b__3e_"><text:span text:style-name="T74">(</text:span></text:span><text:span text:style-name="_3c_C_2b__2b__3e_"><text:span text:style-name="T15">|x</text:span></text:span><text:span text:style-name="_3c_C_2b__2b__3e_"><text:span text:style-name="T74">,</text:span></text:span><text:span text:style-name="_3c_C_2b__2b__3e_"><text:span text:style-name="T15"> y| x + y</text:span></text:span><text:span text:style-name="_3c_C_2b__2b__3e_"><text:span text:style-name="T74">)(2, 3);</text:span></text:span></text:p>
      <text:p text:style-name="P41"><text:span text:style-name="_2f__2f_C"><text:span text:style-name="T73"/></text:span></text:p>
      <text:p text:style-name="P41"><text:span text:style-name="_2f__2f_C"><text:span text:style-name="T73"/></text:span></text:p>
      <text:h text:style-name="P42" text:outline-level="3"><text:span text:style-name="_3c_C_3e_"><text:span text:style-name="T76">SOBRECARGA DE OPERADORES</text:span></text:span></text:h>
      <text:p text:style-name="P43"><text:span text:style-name="_2f__2f_C"><text:span text:style-name="T77">Rust tiene sobrecarga de operadores, y la forma de declararlos es en el </text:span></text:span><text:span text:style-name="_3c_C_2b__2b__3e_"><text:span text:style-name="T15">impl</text:span></text:span><text:span text:style-name="_2f__2f_C"><text:span text:style-name="T77"> de tal forma:</text:span></text:span></text:p>
      <text:p text:style-name="P44"><text:span text:style-name="_3c_C_3e_"><text:span text:style-name="T12">use std::ops::Add;</text:span></text:span><text:span text:style-name="_2f__2f_C"><text:span text:style-name="T78"> </text:span></text:span><text:span text:style-name="_2f__2f_C"><text:span text:style-name="T79">//importa el trait (el operador) de Add. Si no no se puede usar. </text:span></text:span><text:span text:style-name="_2f__2f_C"><text:span text:style-name="T80">Para implementar muchos poner:</text:span></text:span></text:p>
      <text:p text:style-name="P45"><text:span text:style-name="_2f__2f_C"><text:span text:style-name="T81">use</text:span></text:span><text:span text:style-name="_2f__2f_C"><text:span text:style-name="T82"> </text:span></text:span><text:span text:style-name="_2f__2f_C"><text:span text:style-name="T83">std</text:span></text:span><text:span text:style-name="_2f__2f_C"><text:span text:style-name="T84">::</text:span></text:span><text:span text:style-name="_2f__2f_C"><text:span text:style-name="T83">ops</text:span></text:span><text:span text:style-name="_2f__2f_C"><text:span text:style-name="T84">::</text:span></text:span><text:span text:style-name="_2f__2f_C"><text:span text:style-name="T82">{</text:span></text:span><text:span text:style-name="_2f__2f_C"><text:span text:style-name="T83">Add</text:span></text:span><text:span text:style-name="_2f__2f_C"><text:span text:style-name="T82">, </text:span></text:span><text:span text:style-name="_2f__2f_C"><text:span text:style-name="T83">AddAssign</text:span></text:span><text:span text:style-name="_2f__2f_C"><text:span text:style-name="T82">, </text:span></text:span><text:span text:style-name="_2f__2f_C"><text:span text:style-name="T83">Sub</text:span></text:span><text:span text:style-name="_2f__2f_C"><text:span text:style-name="T82">, </text:span></text:span><text:span text:style-name="_2f__2f_C"><text:span text:style-name="T83">SubAssign</text:span></text:span><text:span text:style-name="_2f__2f_C"><text:span text:style-name="T82">, </text:span></text:span><text:span text:style-name="_2f__2f_C"><text:span text:style-name="T83">Mul</text:span></text:span><text:span text:style-name="_2f__2f_C"><text:span text:style-name="T82">, </text:span></text:span><text:span text:style-name="_2f__2f_C"><text:span text:style-name="T83">MulAssign</text:span></text:span><text:span text:style-name="_2f__2f_C"><text:span text:style-name="T82">, </text:span></text:span><text:span text:style-name="_2f__2f_C"><text:span text:style-name="T83">Div</text:span></text:span><text:span text:style-name="_2f__2f_C"><text:span text:style-name="T82">, </text:span></text:span><text:span text:style-name="_2f__2f_C"><text:span text:style-name="T83">DivAssign</text:span></text:span><text:span text:style-name="_2f__2f_C"><text:span text:style-name="T82">};</text:span></text:span></text:p>
      <text:p text:style-name="P44"><text:span text:style-name="_2f__2f_C"><text:span text:style-name="T80"/></text:span></text:p>
      <text:p text:style-name="P46"><text:span text:style-name="_2f__2f_C"><text:span text:style-name="T41">// Es muy útil derivar Copy y Clone para tipos matemáticos simples </text:span></text:span><text:span text:style-name="_2f__2f_C"><text:span text:style-name="T85">hay que hacerlo copy por que sino será un clone que pierde su propiedad y no se puede usar al pasarlo a dicha función.</text:span></text:span></text:p>
      <text:p text:style-name="P46"><text:span text:style-name="_3c_C_2b__2b__3e_"><text:span text:style-name="T43">#[derive(Debug, Clone, Copy)]</text:span></text:span></text:p>
      <text:p text:style-name="P43"><text:span text:style-name="_3c_C_3e_"><text:span text:style-name="T12">struct Vector3{...}</text:span></text:span></text:p>
      <text:p text:style-name="P43"><text:span text:style-name="_3c_C_2b__2b__3e_"><text:span text:style-name="T15">impl</text:span></text:span><text:span text:style-name="_3c_C_3e_"><text:span text:style-name="T12"><text:tab/></text:span></text:span><text:span text:style-name="_3c_C_2b__2b__3e_"><text:span text:style-name="T15">Add</text:span></text:span><text:span text:style-name="_3c_C_3e_"><text:span text:style-name="T12"> for Vector3{</text:span></text:span></text:p>
      <text:p text:style-name="P43"><text:span text:style-name="_3c_C_3e_"><text:span text:style-name="T12"><text:tab/>type Output = Vect</text:span></text:span><text:span text:style-name="_3c_C_3e_"><text:span text:style-name="T79">or</text:span></text:span><text:span text:style-name="_3c_C_3e_"><text:span text:style-name="T12">3; </text:span></text:span><text:span text:style-name="_2f__2f_C"><text:span text:style-name="T12">//el resultado de la operacion v1 + v2 sera un Vect3</text:span></text:span></text:p>
      <text:p text:style-name="P43"><text:span text:style-name="_3c_C_3e_"><text:span text:style-name="T12"><text:tab/>fn </text:span></text:span><text:span text:style-name="_3c_C_2b__2b__3e_"><text:span text:style-name="T15">add</text:span></text:span><text:span text:style-name="_3c_C_3e_"><text:span text:style-name="T12">(self, other: Vect</text:span></text:span><text:span text:style-name="_3c_C_3e_"><text:span text:style-name="T79">or</text:span></text:span><text:span text:style-name="_3c_C_3e_"><text:span text:style-name="T12">3) -&gt; Vect</text:span></text:span><text:span text:style-name="_3c_C_3e_"><text:span text:style-name="T79">or</text:span></text:span><text:span text:style-name="_3c_C_3e_"><text:span text:style-name="T12">3{…}</text:span></text:span></text:p>
      <text:p text:style-name="P46"><text:soft-page-break/><text:span text:style-name="_2f__2f_C"><text:span text:style-name="T86">Como se ve, necesita el tipo de output, es decir lo <text:s/>que va a devolver, por que podría ser cualquier otra cosa. Pero en los de asignación no hay que ponerlo:</text:span></text:span></text:p>
      <text:p text:style-name="P46"><text:span text:style-name="_3c_C_3e_"><text:span text:style-name="T12">impl </text:span></text:span><text:span text:style-name="_3c_C_2b__2b__3e_"><text:span text:style-name="T15">AddAssign</text:span></text:span><text:span text:style-name="_3c_C_3e_"><text:span text:style-name="T12"> for Vector3{</text:span></text:span></text:p>
      <text:p text:style-name="P46"><text:span text:style-name="_3c_C_3e_"><text:span text:style-name="T12"><text:tab/>fn </text:span></text:span><text:span text:style-name="_3c_C_2b__2b__3e_"><text:span text:style-name="T15">add_assign</text:span></text:span><text:span text:style-name="_3c_C_3e_"><text:span text:style-name="T12">(</text:span></text:span><text:span text:style-name="_3c_C_2b__2b__3e_"><text:span text:style-name="T15">&amp;mut </text:span></text:span><text:span text:style-name="_3c_C_3e_"><text:span text:style-name="T12">self, other: Vector3){</text:span></text:span></text:p>
      <text:p text:style-name="P46"><text:span text:style-name="_3c_C_3e_"><text:span text:style-name="T12"><text:tab/><text:tab/>self.x += other.x;</text:span></text:span></text:p>
      <text:p text:style-name="P46"><text:span text:style-name="_3c_C_3e_"><text:span text:style-name="T12"><text:tab/><text:tab/>self.y += other.y;</text:span></text:span></text:p>
      <text:p text:style-name="P46"><text:span text:style-name="_3c_C_3e_"><text:span text:style-name="T12"><text:tab/><text:tab/>self.z += other.z;</text:span></text:span></text:p>
      <text:p text:style-name="P46"><text:span text:style-name="_3c_C_3e_"><text:span text:style-name="T12"><text:tab/>}</text:span></text:span></text:p>
      <text:p text:style-name="P46"><text:span text:style-name="_3c_C_3e_"><text:span text:style-name="T12">}</text:span></text:span></text:p>
      <text:p text:style-name="P43"><text:span text:style-name="_3c_C_3e_"><text:span text:style-name="T12"/></text:span></text:p>
      <text:p text:style-name="P47"><text:span text:style-name="_2f__2f_C"><text:span text:style-name="T87">La sobrecarga es con nombre may</text:span></text:span><text:span text:style-name="_2f__2f_C"><text:span text:style-name="T88">ú</text:span></text:span><text:span text:style-name="_2f__2f_C"><text:span text:style-name="T87">scula, y la funci</text:span></text:span><text:span text:style-name="_2f__2f_C"><text:span text:style-name="T88">ón</text:span></text:span><text:span text:style-name="_2f__2f_C"><text:span text:style-name="T87"> en min</text:span></text:span><text:span text:style-name="_2f__2f_C"><text:span text:style-name="T88">ú</text:span></text:span><text:span text:style-name="_2f__2f_C"><text:span text:style-name="T87">scula pero llamada igual. La lista es la siguiente para las sobrecargas (entre par</text:span></text:span><text:span text:style-name="_2f__2f_C"><text:span text:style-name="T88">éntesis el nombre a la función)</text:span></text:span><text:span text:style-name="_2f__2f_C"><text:span text:style-name="T87">:</text:span></text:span></text:p>
      <text:p text:style-name="P48"><text:span text:style-name="_2f__2f_C"><text:span text:style-name="T89">+<text:tab/>-&gt; <text:tab/>Add (add)<text:tab/><text:tab/><text:tab/><text:tab/></text:span></text:span><text:span text:style-name="_2f__2f_C"><text:span text:style-name="T90"><text:tab/><text:tab/><text:tab/><text:tab/></text:span></text:span><text:span text:style-name="_2f__2f_C"><text:span text:style-name="T89">+=<text:tab/>-&gt;<text:tab/><text:tab/>AddAssign (add</text:span></text:span><text:span text:style-name="_2f__2f_C"><text:span text:style-name="T91">_</text:span></text:span><text:span text:style-name="_2f__2f_C"><text:span text:style-name="T89">assign)<text:tab/><text:tab/><text:tab/><text:tab/><text:tab/></text:span></text:span></text:p>
      <text:p text:style-name="P48"><text:span text:style-name="_2f__2f_C"><text:span text:style-name="T89">-<text:tab/>-&gt;<text:tab/></text:span></text:span><text:span text:style-name="_2f__2f_C"><text:span text:style-name="T91"><text:tab/></text:span></text:span><text:span text:style-name="_2f__2f_C"><text:span text:style-name="T89">Sub (sub)</text:span></text:span><text:span text:style-name="_2f__2f_C"><text:span text:style-name="T91"><text:tab/><text:tab/><text:tab/><text:tab/></text:span></text:span><text:span text:style-name="_2f__2f_C"><text:span text:style-name="T90"><text:tab/><text:tab/><text:tab/><text:tab/></text:span></text:span><text:span text:style-name="_2f__2f_C"><text:span text:style-name="T91">-=<text:tab/><text:tab/>-&gt;<text:tab/><text:tab/>SubAssign (sub_assign)</text:span></text:span></text:p>
      <text:p text:style-name="P49"><text:span text:style-name="_2f__2f_C"><text:span text:style-name="T89">*<text:tab/>-&gt;<text:tab/><text:tab/>Mul (mul)</text:span></text:span><text:span text:style-name="_2f__2f_C"><text:span text:style-name="T91"><text:tab/><text:tab/><text:tab/><text:tab/></text:span></text:span><text:span text:style-name="_2f__2f_C"><text:span text:style-name="T90"><text:tab/><text:tab/><text:tab/><text:tab/></text:span></text:span><text:span text:style-name="_2f__2f_C"><text:span text:style-name="T91">*=<text:tab/><text:tab/>-&gt;<text:tab/><text:tab/>MulAssign (mul_assign)</text:span></text:span></text:p>
      <text:p text:style-name="P49"><text:span text:style-name="_2f__2f_C"><text:span text:style-name="T91">/</text:span></text:span><text:span text:style-name="_2f__2f_C"><text:span text:style-name="T92"><text:tab/></text:span></text:span><text:span text:style-name="_2f__2f_C"><text:span text:style-name="T91">-&gt;<text:tab/><text:tab/>Div (div)<text:tab/><text:tab/><text:tab/><text:tab/><text:tab/></text:span></text:span><text:span text:style-name="_2f__2f_C"><text:span text:style-name="T90"><text:tab/><text:tab/><text:tab/><text:tab/></text:span></text:span><text:span text:style-name="_2f__2f_C"><text:span text:style-name="T91">/=<text:tab/><text:tab/>-&gt;<text:tab/><text:tab/>DivAssign<text:tab/>(div_assign)</text:span></text:span></text:p>
      <text:p text:style-name="P49"><text:span text:style-name="_2f__2f_C"><text:span text:style-name="T91">%</text:span></text:span><text:span text:style-name="_2f__2f_C"><text:span text:style-name="T92"> </text:span></text:span><text:span text:style-name="_2f__2f_C"><text:span text:style-name="T91"><text:tab/>-&gt;<text:tab/>Rem </text:span></text:span><text:span text:style-name="_2f__2f_C"><text:span text:style-name="T89">(rem</text:span></text:span><text:span text:style-name="_2f__2f_C"><text:span text:style-name="T91">)</text:span></text:span><text:span text:style-name="_2f__2f_C"><text:span text:style-name="T89"><text:tab/></text:span></text:span><text:span text:style-name="_2f__2f_C"><text:span text:style-name="T91"><text:tab/><text:tab/><text:tab/></text:span></text:span><text:span text:style-name="_2f__2f_C"><text:span text:style-name="T90"><text:tab/><text:tab/><text:tab/><text:tab/></text:span></text:span><text:span text:style-name="_2f__2f_C"><text:span text:style-name="T91">%=<text:tab/>-&gt;<text:tab/><text:tab/>RemAssign (rem_assign)</text:span></text:span></text:p>
      <text:p text:style-name="P50"><text:span text:style-name="_2f__2f_C"><text:span text:style-name="T89">==<text:tab/>-&gt; PartialEq</text:span></text:span><text:span text:style-name="_2f__2f_C"><text:span text:style-name="T90"> (eq)</text:span></text:span><text:span text:style-name="_2f__2f_C"><text:span text:style-name="T89"><text:tab/><text:tab/></text:span></text:span><text:span text:style-name="_2f__2f_C"><text:span text:style-name="T93"><text:tab/><text:tab/><text:tab/></text:span></text:span><text:span text:style-name="_2f__2f_C"><text:span text:style-name="T89"><text:tab/></text:span></text:span><text:span text:style-name="_2f__2f_C"><text:span text:style-name="T90">!=<text:tab/><text:tab/>-&gt;<text:tab/><text:tab/>PartialEq (</text:span></text:span><text:span text:style-name="_2f__2f_C"><text:span text:style-name="T94">ne</text:span></text:span><text:span text:style-name="_2f__2f_C"><text:span text:style-name="T90">)</text:span></text:span></text:p>
      <text:p text:style-name="P51"><text:span text:style-name="_2f__2f_C"><text:span text:style-name="T89">[ ]</text:span></text:span><text:span text:style-name="_2f__2f_C"><text:span text:style-name="T90"><text:tab/><text:tab/>-&gt;</text:span></text:span><text:span text:style-name="_2f__2f_C"><text:span text:style-name="T92"> </text:span></text:span><text:span text:style-name="_2f__2f_C"><text:span text:style-name="T90">Index (index)</text:span></text:span><text:span text:style-name="_2f__2f_C"><text:span text:style-name="T92"><text:tab/></text:span></text:span><text:span text:style-name="_2f__2f_C"><text:span text:style-name="T89"><text:tab/><text:tab/></text:span></text:span><text:span text:style-name="_2f__2f_C"><text:span text:style-name="T90"><text:tab/><text:tab/><text:tab/><text:tab/>[ ] =<text:tab/>-&gt;<text:tab/><text:tab/>IndexMut (index_mut)</text:span></text:span></text:p>
      <text:p text:style-name="P51"><text:span text:style-name="_2f__2f_C"><text:span text:style-name="T92">-x<text:tab/><text:tab/>-&gt; Neg (neg)<text:tab/><text:tab/><text:tab/><text:tab/><text:tab/><text:tab/><text:tab/><text:tab/>!x = -&gt;<text:tab/><text:tab/>Not (not)</text:span></text:span></text:p>
      <text:p text:style-name="P52"><text:span text:style-name="_2f__2f_C"><text:span text:style-name="T92">&amp;<text:tab/><text:tab/>-&gt; BitAnd (bitand)<text:tab/><text:tab/><text:tab/><text:tab/><text:tab/></text:span></text:span><text:span text:style-name="_2f__2f_C"><text:span text:style-name="T95"><text:tab/></text:span></text:span><text:span text:style-name="_2f__2f_C"><text:span text:style-name="T93">&amp;=</text:span></text:span><text:span text:style-name="_2f__2f_C"><text:span text:style-name="T92"><text:tab/>-&gt;<text:tab/><text:tab/></text:span></text:span><text:span text:style-name="_2f__2f_C"><text:span text:style-name="T93">BitAndAssign (bit_and_assign)</text:span></text:span></text:p>
      <text:p text:style-name="P52"><text:span text:style-name="_2f__2f_C"><text:span text:style-name="T93">|<text:tab/><text:tab/>-&gt; BitOr (bitor)<text:tab/><text:tab/><text:tab/><text:tab/><text:tab/><text:tab/><text:tab/>|=<text:tab/><text:tab/>-&gt;<text:tab/><text:tab/>BitOrAssign (bit_or_assign)</text:span></text:span></text:p>
      <text:p text:style-name="P52"><text:span text:style-name="_2f__2f_C"><text:span text:style-name="T93">^<text:tab/><text:tab/>-&gt;<text:tab/>BitXor (bitxor)<text:tab/><text:tab/><text:tab/><text:tab/><text:tab/><text:tab/>^=<text:tab/>-&gt;<text:tab/><text:tab/>BitXorAssign (bit_xor_assign)</text:span></text:span></text:p>
      <text:p text:style-name="P52"><text:span text:style-name="_2f__2f_C"><text:span text:style-name="T93">&lt;&lt;<text:tab/>-&gt;<text:tab/>Shl<text:tab/>(shl)<text:tab/><text:tab/><text:tab/><text:tab/><text:tab/><text:tab/><text:tab/><text:tab/><text:tab/>&lt;&lt;=<text:tab/>-&gt;<text:tab/><text:tab/>ShlAssign (shl_assign)</text:span></text:span></text:p>
      <text:p text:style-name="P52"><text:span text:style-name="_2f__2f_C"><text:span text:style-name="T93">&gt;&gt;<text:tab/>-&gt;<text:tab/>Shr<text:tab/>(shr)<text:tab/><text:tab/><text:tab/><text:tab/><text:tab/><text:tab/><text:tab/><text:tab/>&gt;&gt;=<text:tab/>-&gt;<text:tab/><text:tab/>ShrAssign (shr_assign)</text:span></text:span></text:p>
      <text:p text:style-name="P52"><text:span text:style-name="_2f__2f_C"><text:span text:style-name="T93">*x<text:tab/><text:tab/>-&gt;<text:tab/>Deref (deref)<text:tab/><text:tab/><text:tab/><text:tab/><text:tab/><text:tab/><text:tab/>*x=<text:tab/>-&gt;<text:tab/><text:tab/>DerefMut (deref_mut)</text:span></text:span></text:p>
      <text:p text:style-name="P52"><text:span text:style-name="_2f__2f_C"><text:span text:style-name="T93">x..y<text:tab/>-&gt;<text:tab/>Range </text:span></text:span><text:span text:style-name="_2f__2f_C"><text:span text:style-name="T94">(no hay</text:span></text:span><text:span text:style-name="_2f__2f_C"><text:span text:style-name="T93">)<text:tab/><text:tab/><text:tab/></text:span></text:span><text:span text:style-name="_2f__2f_C"><text:span text:style-name="T94"><text:tab/><text:tab/></text:span></text:span><text:span text:style-name="_2f__2f_C"><text:span text:style-name="T93"><text:tab/>()<text:tab/>-&gt;<text:tab/><text:tab/>Fn, FnMut, FnOnce (</text:span></text:span><text:span text:style-name="_2f__2f_C"><text:span text:style-name="T94">call</text:span></text:span><text:span text:style-name="_2f__2f_C"><text:span text:style-name="T93">)</text:span></text:span></text:p>
      <text:p text:style-name="P53"><text:span text:style-name="_2f__2f_C"><text:span text:style-name="T87"><text:tab/></text:span></text:span><text:span text:style-name="_2f__2f_C"><text:span text:style-name="T93"><text:tab/><text:tab/><text:tab/></text:span></text:span><text:span text:style-name="_2f__2f_C"><text:span text:style-name="T89">&lt;, &lt;=, &gt;, &gt;=<text:tab/>-&gt; PartialOrd (partial_cm</text:span></text:span><text:span text:style-name="_2f__2f_C"><text:span text:style-name="T94">p</text:span></text:span><text:span text:style-name="_2f__2f_C"><text:span text:style-name="T90">)</text:span></text:span><text:span text:style-name="_2f__2f_C"><text:span text:style-name="T89"><text:tab/><text:tab/></text:span></text:span></text:p>
      <text:p text:style-name="P53"><text:span text:style-name="_2f__2f_C"><text:span text:style-name="T89"/></text:span></text:p>
      <text:p text:style-name="P54"><text:span text:style-name="_2f__2f_C"><text:span text:style-name="T96">Para alterar el orden por ejemplo en una multiplicacion de un Vector3 por ejemplo seria:<text:line-break/></text:span></text:span><text:soft-page-break/><text:span text:style-name="_2f__2f_C"><text:span text:style-name="T96"><text:line-break/>2 * v1</text:span></text:span></text:p>
      <text:p text:style-name="P54"><text:span text:style-name="_3c_C_3e_"><text:span text:style-name="T12">impl<text:tab/><text:tab/>Mul&lt;Vect3&gt; for i32{</text:span></text:span></text:p>
      <text:p text:style-name="P54"><text:span text:style-name="_3c_C_3e_"><text:span text:style-name="T12"><text:tab/>type Output = Vect3</text:span></text:span></text:p>
      <text:p text:style-name="P54"><text:span text:style-name="_3c_C_3e_"><text:span text:style-name="T12"><text:tab/>fn mul(self, other: Vect3) -&gt; Vect3{</text:span></text:span></text:p>
      <text:p text:style-name="P54"><text:span text:style-name="_3c_C_3e_"><text:span text:style-name="T12"><text:tab/><text:tab/>return Vect3 {x: self * other.x, y: self * other.y, z: self * other.z}; //hay return, entonces hay ;</text:span></text:span></text:p>
      <text:p text:style-name="P54"><text:span text:style-name="_3c_C_3e_"><text:span text:style-name="T12"><text:tab/>}</text:span></text:span></text:p>
      <text:p text:style-name="P54"><text:span text:style-name="_3c_C_3e_"><text:span text:style-name="T12">}</text:span></text:span></text:p>
      <text:p text:style-name="P55"><text:span text:style-name="_2f__2f_C"><text:span text:style-name="T97">v1 * 2</text:span></text:span></text:p>
      <text:p text:style-name="P55"><text:span text:style-name="_3c_C_3e_"><text:span text:style-name="T12">impl Mul&lt;i32&gt; for Vect3{</text:span></text:span></text:p>
      <text:p text:style-name="P55"><text:span text:style-name="_3c_C_3e_"><text:span text:style-name="T12"><text:tab/>type Output = Vect3;</text:span></text:span></text:p>
      <text:p text:style-name="P55"><text:span text:style-name="_3c_C_3e_"><text:span text:style-name="T12"><text:tab/>fn mul(self, n: i32) -&gt; Vect3{</text:span></text:span></text:p>
      <text:p text:style-name="P55"><text:span text:style-name="_3c_C_3e_"><text:span text:style-name="T12"><text:tab/><text:tab/>Vect3 {x: self.x * n , y: self.y * n, z: self.z * n} //no hay return no hay ;</text:span></text:span></text:p>
      <text:p text:style-name="P55"><text:span text:style-name="_3c_C_3e_"><text:span text:style-name="T12"><text:tab/>}</text:span></text:span></text:p>
      <text:p text:style-name="P55"><text:span text:style-name="_3c_C_3e_"><text:span text:style-name="T12">}</text:span></text:span></text:p>
      <text:p text:style-name="P55"><text:span text:style-name="_2f__2f_C"><text:span text:style-name="T97">El formato es:<text:line-break/></text:span></text:span></text:p>
      <text:p text:style-name="P55"><text:span text:style-name="_3c_C_3e_"><text:span text:style-name="T12">impl Trait</text:span></text:span><text:span text:style-name="_3c_C_2b__2b__3e_"><text:span text:style-name="T15">&lt;RightHandElement&gt;</text:span></text:span><text:span text:style-name="_3c_C_3e_"><text:span text:style-name="T12"> for </text:span></text:span><text:span text:style-name="_3c_C_2b__2b__3e_"><text:span text:style-name="T15">LeftHandElement</text:span></text:span></text:p>
      <text:p text:style-name="P55"><text:span text:style-name="_2f__2f_C"><text:span text:style-name="T97">entonces el self es del tipo del LeftHandElement</text:span></text:span></text:p>
      <text:p text:style-name="P54"><text:span text:style-name="_2f__2f_C"><text:span text:style-name="T96"/></text:span></text:p>
      <text:h text:style-name="P56" text:outline-level="3"><text:span text:style-name="_3c_C_3e_"><text:span text:style-name="T76">SOBRECARGA DE OPERADORES </text:span></text:span><text:span text:style-name="_3c_C_3e_"><text:span text:style-name="T98">POR INSTANCIA</text:span></text:span></text:h>
      <text:p text:style-name="P57"><text:span text:style-name="_2f__2f_C"><text:span text:style-name="T99">En la sobrecarga hemos visto que teniamos que hacer un:</text:span></text:span></text:p>
      <text:p text:style-name="P57"><text:span text:style-name="_3c_C_2b__2b__3e_"><text:span text:style-name="T15">#[derive(Debug, Clone, Copy)] </text:span></text:span><text:span text:style-name="_2f__2f_C"><text:span text:style-name="T99">al principio para que no pasara los datos de ownership a la función y así tenerlo después disponible. Esto se puede hacer por referencia en vez de copy, sin esta instrucción. En un Vector3 no merece la pena, pero sí en estructuras muy grandes como 1000x1000 por velocidad:</text:span></text:span></text:p>
      <text:p text:style-name="P57"><text:span text:style-name="_3c_C_3e_"><text:span text:style-name="T12">use::std::ops::Add;</text:span></text:span></text:p>
      <text:p text:style-name="P57"><text:span text:style-name="_3c_C_3e_"><text:span text:style-name="T12">struct Vect3{ todo lo de x y z pero sin ser pub f32,}</text:span></text:span></text:p>
      <text:p text:style-name="P57"><text:span text:style-name="_3c_C_3e_"><text:span text:style-name="T12">impl</text:span></text:span><text:span text:style-name="_3c_C_2b__2b__3e_"><text:span text:style-name="T15">&lt;’a, ‘b&gt;</text:span></text:span><text:span text:style-name="_3c_C_3e_"><text:span text:style-name="T12"> Add</text:span></text:span><text:span text:style-name="_3c_C_2b__2b__3e_"><text:span text:style-name="T15">&lt;&amp;’b Vect3&gt;</text:span></text:span><text:span text:style-name="_3c_C_3e_"><text:span text:style-name="T12"> for </text:span></text:span><text:span text:style-name="_3c_C_2b__2b__3e_"><text:span text:style-name="T15">&amp;’a</text:span></text:span><text:span text:style-name="_3c_C_3e_"><text:span text:style-name="T12"> Vect3{</text:span></text:span></text:p>
      <text:p text:style-name="P57"><text:span text:style-name="_3c_C_3e_"><text:span text:style-name="T12"><text:tab/>type Output = Vect3;</text:span></text:span></text:p>
      <text:p text:style-name="P57"><text:span text:style-name="_3c_C_3e_"><text:span text:style-name="T12"><text:tab/>fn add(self, other: </text:span></text:span><text:span text:style-name="_3c_C_2b__2b__3e_"><text:span text:style-name="T15">&amp;</text:span></text:span><text:span text:style-name="_3c_C_3e_"><text:span text:style-name="T12">Vect3) → Vect3{</text:span></text:span></text:p>
      <text:p text:style-name="P57"><text:span text:style-name="_3c_C_3e_"><text:span text:style-name="T12"><text:tab/><text:tab/>x: self.x + other.x, ….</text:span></text:span></text:p>
      <text:p text:style-name="P57"><text:span text:style-name="_3c_C_3e_"><text:span text:style-name="T12"><text:tab/>}</text:span></text:span></text:p>
      <text:p text:style-name="P57"><text:span text:style-name="_3c_C_3e_"><text:span text:style-name="T12">}</text:span></text:span></text:p>
      <text:p text:style-name="P57"><text:soft-page-break/><text:span text:style-name="_2f__2f_C"><text:span text:style-name="T99">y para usarlo sería :</text:span></text:span></text:p>
      <text:p text:style-name="P57"><text:span text:style-name="_3c_C_3e_"><text:span text:style-name="T12">let v3 = </text:span></text:span><text:span text:style-name="_3c_C_2b__2b__3e_"><text:span text:style-name="T15">&amp;</text:span></text:span><text:span text:style-name="_3c_C_3e_"><text:span text:style-name="T12">v1 + </text:span></text:span><text:span text:style-name="_3c_C_2b__2b__3e_"><text:span text:style-name="T15">&amp;</text:span></text:span><text:span text:style-name="_3c_C_3e_"><text:span text:style-name="T12">v2;</text:span></text:span></text:p>
      <text:p text:style-name="P57"><text:span text:style-name="_3c_C_3e_"><text:span text:style-name="T12">println!(“{}”, v1.</text:span></text:span><text:span text:style-name="_3c_C_3e_"><text:span text:style-name="T100">x</text:span></text:span><text:span text:style-name="_3c_C_3e_"><text:span text:style-name="T12">); </text:span></text:span><text:span text:style-name="_2f__2f_C"><text:span text:style-name="T12">//aquí ya no daría error el compilador por que todavía existe.</text:span></text:span></text:p>
      <text:h text:style-name="P58" text:outline-level="3"><text:span text:style-name="_3c_C_3e_"><text:span text:style-name="T101"/></text:span></text:h>
      <text:h text:style-name="P58" text:outline-level="3"><text:span text:style-name="_3c_C_3e_"><text:span text:style-name="T101">WHILE</text:span></text:span></text:h>
      <text:p text:style-name="P59"><text:span text:style-name="_2f__2f_C"><text:span text:style-name="T102">El bucle while es:</text:span></text:span></text:p>
      <text:p text:style-name="P59"><text:span text:style-name="_3c_C_3e_"><text:span text:style-name="T12">let mut i: u32 = 1;<text:line-break/></text:span></text:span><text:span text:style-name="_3c_C_2b__2b__3e_"><text:span text:style-name="T15">while i &lt; 10 &amp;&amp; i &gt; 0</text:span></text:span><text:span text:style-name="_3c_C_3e_"><text:span text:style-name="T12">{</text:span></text:span></text:p>
      <text:p text:style-name="P59"><text:span text:style-name="_3c_C_3e_"><text:span text:style-name="T12"><text:tab/>....</text:span></text:span></text:p>
      <text:p text:style-name="P59"><text:span text:style-name="_3c_C_3e_"><text:span text:style-name="T12"><text:tab/>i += 1;</text:span></text:span></text:p>
      <text:p text:style-name="P59"><text:span text:style-name="_3c_C_3e_"><text:span text:style-name="T12">}</text:span></text:span></text:p>
      <text:p text:style-name="P60"><text:span text:style-name="_2f__2f_C"><text:span text:style-name="T103">La condici</text:span></text:span><text:span text:style-name="_2f__2f_C"><text:span text:style-name="T104">ón</text:span></text:span><text:span text:style-name="_2f__2f_C"><text:span text:style-name="T103"> nunca va entre par</text:span></text:span><text:span text:style-name="_2f__2f_C"><text:span text:style-name="T104">é</text:span></text:span><text:span text:style-name="_2f__2f_C"><text:span text:style-name="T103">ntesis para evitar la confusi</text:span></text:span><text:span text:style-name="_2f__2f_C"><text:span text:style-name="T104">ón</text:span></text:span><text:span text:style-name="_2f__2f_C"><text:span text:style-name="T103"> de C ya que en rust la condici</text:span></text:span><text:span text:style-name="_2f__2f_C"><text:span text:style-name="T104">ón</text:span></text:span><text:span text:style-name="_2f__2f_C"><text:span text:style-name="T103"> es una expresi</text:span></text:span><text:span text:style-name="_2f__2f_C"><text:span text:style-name="T104">ón</text:span></text:span><text:span text:style-name="_2f__2f_C"><text:span text:style-name="T103"> booleana. Esto es un error:</text:span></text:span></text:p>
      <text:p text:style-name="P60"><text:span text:style-name="_3c_C_3e_"><text:span text:style-name="T12">while 5</text:span></text:span><text:span text:style-name="_2f__2f_C"><text:span text:style-name="T103"> o </text:span></text:span><text:span text:style-name="_3c_C_3e_"><text:span text:style-name="T12">while (5)</text:span></text:span></text:p>
      <text:h text:style-name="P58" text:outline-level="3"><text:span text:style-name="_3c_C_3e_"><text:span text:style-name="T105"/></text:span></text:h>
      <text:h text:style-name="P58" text:outline-level="3"><text:span text:style-name="_3c_C_3e_"><text:span text:style-name="T105"/></text:span></text:h>
      <text:h text:style-name="P58" text:outline-level="3"><text:span text:style-name="_3c_C_3e_"><text:span text:style-name="T101">LOOP</text:span></text:span></text:h>
      <text:p text:style-name="P59"><text:span text:style-name="_2f__2f_C"><text:span text:style-name="T102">loop es infinito a no ser que se saque</text:span></text:span></text:p>
      <text:p text:style-name="P59"><text:span text:style-name="_3c_C_2b__2b__3e_"><text:span text:style-name="T15">loop</text:span></text:span><text:span text:style-name="_3c_C_3e_"><text:span text:style-name="T12"> {</text:span></text:span></text:p>
      <text:p text:style-name="P59"><text:span text:style-name="_3c_C_3e_"><text:span text:style-name="T12"><text:tab/>codigo();</text:span></text:span></text:p>
      <text:p text:style-name="P59"><text:span text:style-name="_3c_C_3e_"><text:span text:style-name="T12"><text:tab/>if !condicion {</text:span></text:span></text:p>
      <text:p text:style-name="P59"><text:span text:style-name="_3c_C_3e_"><text:span text:style-name="T12"><text:tab/><text:tab/>break; </text:span></text:span><text:span text:style-name="_2f__2f_C"><text:span text:style-name="T12">// asi sale</text:span></text:span></text:p>
      <text:p text:style-name="P59"><text:span text:style-name="_3c_C_3e_"><text:span text:style-name="T12"><text:tab/>}</text:span></text:span></text:p>
      <text:p text:style-name="P59"><text:span text:style-name="_3c_C_3e_"><text:span text:style-name="T12">}</text:span></text:span></text:p>
      <text:p text:style-name="P59"><text:span text:style-name="_3c_C_3e_"><text:span text:style-name="T12"/></text:span></text:p>
      <text:h text:style-name="P61" text:outline-level="3"><text:span text:style-name="_3c_C_3e_"><text:span text:style-name="T106">FOR</text:span></text:span></text:h>
      <text:p text:style-name="P60"><text:span text:style-name="_2f__2f_C"><text:span text:style-name="T103">El for en Rust es bajo iteradores</text:span></text:span></text:p>
      <text:p text:style-name="P60"><text:span text:style-name="_3c_C_2b__2b__3e_"><text:span text:style-name="T15">for elemento in iterable {...}</text:span></text:span></text:p>
      <text:p text:style-name="P60"><text:span text:style-name="_2f__2f_C"><text:span text:style-name="T103">Por ejemplo:</text:span></text:span></text:p>
      <text:p text:style-name="P60"><text:span text:style-name="_3c_C_2b__2b__3e_"><text:span text:style-name="T15">for i in 0..10{</text:span></text:span><text:span text:style-name="_3c_C_3e_"><text:span text:style-name="T12"> ... }</text:span></text:span><text:span text:style-name="_3c_C_2b__2b__3e_"><text:span text:style-name="T15"> </text:span></text:span><text:span text:style-name="_2f__2f_C"><text:span text:style-name="T15">//i va de 0 a 9</text:span></text:span></text:p>
      <text:p text:style-name="P62"><text:span text:style-name="_3c_C_2b__2b__3e_"><text:span text:style-name="T15">for i in 0..</text:span></text:span><text:span text:style-name="_3c_C_2b__2b__3e_"><text:span text:style-name="T107">=</text:span></text:span><text:span text:style-name="_3c_C_2b__2b__3e_"><text:span text:style-name="T15">10{</text:span></text:span><text:span text:style-name="_3c_C_3e_"><text:span text:style-name="T12"> ... }</text:span></text:span><text:span text:style-name="_3c_C_2b__2b__3e_"><text:span text:style-name="T15"> </text:span></text:span><text:span text:style-name="_2f__2f_C"><text:span text:style-name="T15">//i va de 0 a </text:span></text:span><text:span text:style-name="_2f__2f_C"><text:span text:style-name="T107">10</text:span></text:span></text:p>
      <text:p text:style-name="P60"><text:span text:style-name="_2f__2f_C"><text:span text:style-name="T103">o con matrices:</text:span></text:span></text:p>
      <text:p text:style-name="P60"><text:soft-page-break/><text:span text:style-name="_3c_C_3e_"><text:span text:style-name="T12">let v = [1, 2, 3];</text:span></text:span></text:p>
      <text:p text:style-name="P60"><text:span text:style-name="_3c_C_2b__2b__3e_"><text:span text:style-name="T15">for i in v</text:span></text:span><text:span text:style-name="_3c_C_3e_"><text:span text:style-name="T12">{ ... }</text:span></text:span></text:p>
      <text:p text:style-name="P63"><text:span text:style-name="_2f__2f_C"><text:span text:style-name="T108">Si queremos ir en inversa debemos aplicar el método .rev()</text:span></text:span><text:span text:style-name="_2f__2f_C"><text:span text:style-name="T103">:</text:span></text:span></text:p>
      <text:p text:style-name="P63"><text:span text:style-name="_3c_C_2b__2b__3e_"><text:span text:style-name="T15">for i in </text:span></text:span><text:span text:style-name="_3c_C_2b__2b__3e_"><text:span text:style-name="T109">(</text:span></text:span><text:span text:style-name="_3c_C_2b__2b__3e_"><text:span text:style-name="T15">0..10</text:span></text:span><text:span text:style-name="_3c_C_2b__2b__3e_"><text:span text:style-name="T109">).rev()</text:span></text:span><text:span text:style-name="_3c_C_2b__2b__3e_"><text:span text:style-name="T15">{</text:span></text:span><text:span text:style-name="_3c_C_3e_"><text:span text:style-name="T12"> ... }</text:span></text:span><text:span text:style-name="_3c_C_2b__2b__3e_"><text:span text:style-name="T15"> </text:span></text:span><text:span text:style-name="_2f__2f_C"><text:span text:style-name="T12">//i va de </text:span></text:span><text:span text:style-name="_2f__2f_C"><text:span text:style-name="T110">9 a 0. </text:span></text:span><text:span text:style-name="_2f__2f_C"><text:span text:style-name="T111">Tiene que ponerse los paréntesis para que se forme el grupo primero.</text:span></text:span></text:p>
      <text:p text:style-name="P60"><text:span text:style-name="_3c_C_3e_"><text:span text:style-name="T12"/></text:span></text:p>
      <text:h text:style-name="P64" text:outline-level="3"><text:span text:style-name="_3c_C_3e_"><text:span text:style-name="T112">COLLECTIONS (contenedores)</text:span></text:span></text:h>
      <text:p text:style-name="P65"><text:span text:style-name="_2f__2f_C"><text:span text:style-name="T113">Como en C++ tenemos contenedores:</text:span></text:span></text:p>
      <text:p text:style-name="P65"><text:span text:style-name="_2f__2f_C"><text:span text:style-name="T113"/></text:span></text:p>
      <text:p text:style-name="P66"><text:span text:style-name="_2f__2f_C"><text:span text:style-name="T114">1. VECTOR DINAMICO:</text:span></text:span></text:p>
      <text:p text:style-name="P66"><text:span text:style-name="_3c_C_3e_"><text:span text:style-name="T12">let mut v = </text:span></text:span><text:span text:style-name="_3c_C_2b__2b__3e_"><text:span text:style-name="T15">Vec::new();</text:span></text:span></text:p>
      <text:p text:style-name="P66"><text:span text:style-name="_3c_C_3e_"><text:span text:style-name="T12">v.push(1);</text:span></text:span><text:span text:style-name="_3c_C_3e_"><text:span text:style-name="T115"> </text:span></text:span><text:span text:style-name="_2f__2f_C"><text:span text:style-name="T115">//mete el 1</text:span></text:span></text:p>
      <text:p text:style-name="P66"><text:span text:style-name="_3c_C_3e_"><text:span text:style-name="T12">v.push(2);</text:span></text:span><text:span text:style-name="_3c_C_3e_"><text:span text:style-name="T115"> </text:span></text:span><text:span text:style-name="_2f__2f_C"><text:span text:style-name="T115">//mete el 2 detrás del 1.</text:span></text:span></text:p>
      <text:p text:style-name="P67"><text:span text:style-name="_3c_C_3e_"><text:span text:style-name="T12">v.pop(); </text:span></text:span><text:span text:style-name="_2f__2f_C"><text:span text:style-name="T12">// quita el 2 (el ultimo)</text:span></text:span><text:span text:style-name="_2f__2f_C"><text:span text:style-name="T115"> Devuelve un Option&lt;T&gt;</text:span></text:span></text:p>
      <text:p text:style-name="P67"><text:span text:style-name="_2f__2f_C"><text:span text:style-name="T116">Para acceder a los datos se puede usar:</text:span></text:span></text:p>
      <text:p text:style-name="P67"><text:span text:style-name="_3c_C_3e_"><text:span text:style-name="T12">v[i]; </text:span></text:span><text:span text:style-name="_2f__2f_C"><text:span text:style-name="T12">//puede ser panic</text:span></text:span></text:p>
      <text:p text:style-name="P67"><text:span text:style-name="_3c_C_3e_"><text:span text:style-name="T12">v.get(i);</text:span></text:span><text:span text:style-name="_2f__2f_C"><text:span text:style-name="T12"> //seguro.</text:span></text:span></text:p>
      <text:p text:style-name="P67"><text:span text:style-name="_2f__2f_C"><text:span text:style-name="T116">El tamaño es con:</text:span></text:span></text:p>
      <text:p text:style-name="P67"><text:span text:style-name="_3c_C_3e_"><text:span text:style-name="T12">v.len();</text:span></text:span></text:p>
      <text:p text:style-name="P68"><text:span text:style-name="_2f__2f_C"><text:span text:style-name="T117">Se puede usar iteradores:</text:span></text:span></text:p>
      <text:p text:style-name="P68"><text:span text:style-name="_3c_C_3e_"><text:span text:style-name="T12">let mut it = v</text:span></text:span><text:span text:style-name="_3c_C_2b__2b__3e_"><text:span text:style-name="T15">.iter();</text:span></text:span></text:p>
      <text:p text:style-name="P68"><text:span text:style-name="_3c_C_2b__2b__3e_"><text:span text:style-name="T15">it.next();</text:span></text:span><text:span text:style-name="_3c_C_3e_"><text:span text:style-name="T12"> //es el siguiente.</text:span></text:span></text:p>
      <text:p text:style-name="P68"><text:span text:style-name="_3c_C_2b__2b__3e_"><text:span text:style-name="T15">it.next_back()</text:span></text:span><text:span text:style-name="_3c_C_3e_"><text:span text:style-name="T12">; es el anterior.</text:span></text:span></text:p>
      <text:p text:style-name="P68"><text:span text:style-name="_2f__2f_C"><text:span text:style-name="T117">Los dos devuelven Option&lt;&amp;T&gt;</text:span></text:span><text:span text:style-name="_2f__2f_C"><text:span text:style-name="T118"> por lo tanto para usarlos:</text:span></text:span></text:p>
      <text:p text:style-name="P69"><text:span text:style-name="_3c_C_3e_"><text:span text:style-name="T12">if let Some(x) = it.next(){...}</text:span></text:span></text:p>
      <text:p text:style-name="P68"><text:span text:style-name="_2f__2f_C"><text:span text:style-name="T117"/></text:span></text:p>
      <text:p text:style-name="P66"><text:span text:style-name="_3c_C_3e_"><text:span text:style-name="T12"/></text:span></text:p>
      <text:p text:style-name="P66"><text:span text:style-name="_3c_C_3e_"><text:span text:style-name="T12"/></text:span></text:p>
      <text:p text:style-name="P66"><text:span text:style-name="_2f__2f_C"><text:span text:style-name="T119">2. ARRAYS</text:span></text:span></text:p>
      <text:p text:style-name="P66"><text:span text:style-name="_2f__2f_C"><text:span text:style-name="T119"/></text:span></text:p>
      <text:p text:style-name="P66"><text:span text:style-name="_2f__2f_C"><text:span text:style-name="T119">3. STRING</text:span></text:span></text:p>
      <text:p text:style-name="P66"><text:span text:style-name="_2f__2f_C"><text:span text:style-name="T119"/></text:span></text:p>
      <text:p text:style-name="P66"><text:span text:style-name="_2f__2f_C"><text:span text:style-name="T119">4. HASHMAP</text:span></text:span></text:p>
      <text:p text:style-name="P66"><text:soft-page-break/><text:span text:style-name="_2f__2f_C"><text:span text:style-name="T119"/></text:span></text:p>
      <text:p text:style-name="P66"><text:span text:style-name="_2f__2f_C"><text:span text:style-name="T119">5. VECDEQUE</text:span></text:span></text:p>
      <text:p text:style-name="P66"><text:span text:style-name="_2f__2f_C"><text:span text:style-name="T119"/></text:span></text:p>
      <text:p text:style-name="P66"><text:span text:style-name="_2f__2f_C"><text:span text:style-name="T119">6. HASHSET</text:span></text:span></text:p>
      <text:p text:style-name="P66"><text:span text:style-name="_2f__2f_C"><text:span text:style-name="T119"/></text:span></text:p>
      <text:p text:style-name="P66"><text:span text:style-name="_2f__2f_C"><text:span text:style-name="T119">7. BTREEMAP</text:span></text:span></text:p>
      <text:p text:style-name="P66"><text:span text:style-name="_2f__2f_C"><text:span text:style-name="T119"/></text:span></text:p>
      <text:h text:style-name="P70" text:outline-level="3"><text:span text:style-name="_3c_C_3e_"><text:span text:style-name="T120">RESERVA DE MEMORIA EN EL HEAP</text:span></text:span></text:h>
      <text:p text:style-name="P71"><text:span text:style-name="_2f__2f_C"><text:span text:style-name="T121">No se puede. Rust lo prohibe. De hecho esa es la protección de Rust frente a las fugas de memoria, punteros colgantes etc. Cuando nosotros hacemos una estructura como:</text:span></text:span></text:p>
      <text:p text:style-name="P71"><text:span text:style-name="_3c_C_3e_"><text:span text:style-name="T12">pub struct Estructura{</text:span></text:span></text:p>
      <text:p text:style-name="P71"><text:span text:style-name="_3c_C_3e_"><text:span text:style-name="T12"><text:tab/>dato1: u32,</text:span></text:span></text:p>
      <text:p text:style-name="P71"><text:span text:style-name="_3c_C_3e_"><text:span text:style-name="T12"><text:tab/>dato2: String,</text:span></text:span></text:p>
      <text:p text:style-name="P71"><text:span text:style-name="_3c_C_3e_"><text:span text:style-name="T12">}</text:span></text:span></text:p>
      <text:p text:style-name="P71"><text:span text:style-name="_3c_C_3e_"><text:span text:style-name="T12"/></text:span></text:p>
      <text:p text:style-name="P71"><text:span text:style-name="_3c_C_3e_"><text:span text:style-name="T12">fn main ()</text:span></text:span><text:span text:style-name="_3c_C_2b__2b__3e_"><text:span text:style-name="T15">{</text:span></text:span></text:p>
      <text:p text:style-name="P71"><text:span text:style-name="_3c_C_3e_"><text:span text:style-name="T12"><text:tab/></text:span></text:span><text:span text:style-name="_2f__2f_C"><text:span text:style-name="T12">//Rust no deja hacer esto:</text:span></text:span></text:p>
      <text:p text:style-name="P71"><text:span text:style-name="_2f__2f_C"><text:span text:style-name="T12"><text:tab/>//let mi_estructura: Estructura; por que contendría valores basura. Algo prohibido en Rust.</text:span></text:span></text:p>
      <text:p text:style-name="P71"><text:span text:style-name="_2f__2f_C"><text:span text:style-name="T12"><text:tab/>//Sino que hay que inicializarla de esta manera:</text:span></text:span></text:p>
      <text:p text:style-name="P71"><text:span text:style-name="_3c_C_3e_"><text:span text:style-name="T12"><text:tab/></text:span></text:span><text:span text:style-name="_3c_C_2b__2b__3e_"><text:span text:style-name="T15">let mi_estructura = Estructura{</text:span></text:span></text:p>
      <text:p text:style-name="P71"><text:span text:style-name="_3c_C_2b__2b__3e_"><text:span text:style-name="T15"><text:tab/><text:tab/>dato1: 32, </text:span></text:span><text:span text:style-name="_2f__2f_C"><text:span text:style-name="T15">//se asigna 4 bytes en el STACK ya que sabe cuanto son y es más rapido.</text:span></text:span></text:p>
      <text:p text:style-name="P71"><text:span text:style-name="_3c_C_2b__2b__3e_"><text:span text:style-name="T15"><text:tab/><text:tab/>dato2: “hola”.into(),</text:span></text:span><text:span text:style-name="_3c_C_3e_"><text:span text:style-name="T12"> </text:span></text:span><text:span text:style-name="_2f__2f_C"><text:span text:style-name="T12">//se reserva 4 bytes en el HEAP y 24 bytes en el STACK con los metadatos <text:tab/><text:tab/><text:tab/>(que incluyen la direccion de memoria, el numero de bytes ocupados y el num de bytes de capacidad.</text:span></text:span></text:p>
      <text:p text:style-name="P71"><text:span text:style-name="_3c_C_3e_"><text:span text:style-name="T12"><text:tab/>}</text:span></text:span></text:p>
      <text:p text:style-name="P71"><text:span text:style-name="_3c_C_2b__2b__3e_"><text:span text:style-name="T15">}</text:span></text:span><text:span text:style-name="_3c_C_3e_"><text:span text:style-name="T12"> </text:span></text:span><text:span text:style-name="_2f__2f_C"><text:span text:style-name="T12">//al salir del main se hace el free automaticamente de la memoria reservada en el HEA</text:span></text:span><text:span text:style-name="_2f__2f_C"><text:span text:style-name="T122">P y el STACK</text:span></text:span></text:p>
      <text:p text:style-name="P71"><text:span text:style-name="_2f__2f_C"><text:span text:style-name="T121"/></text:span></text:p>
      <text:p text:style-name="P71"><text:span text:style-name="_2f__2f_C"><text:span text:style-name="T121">Para elementos que no sabemos cuanto van a ser de grandes, como String o Vector, se hace esto:</text:span></text:span></text:p>
      <text:p text:style-name="P71"><text:span text:style-name="_3c_C_3e_"><text:span text:style-name="T12">let mut s = </text:span></text:span><text:span text:style-name="_3c_C_2b__2b__3e_"><text:span text:style-name="T15">String::with_capacity(5);</text:span></text:span><text:span text:style-name="_2f__2f_C"><text:span text:style-name="T15">//</text:span></text:span><text:span text:style-name="_2f__2f_C"><text:span text:style-name="T122">aquí reservamos 5 bytes en el HEAP para que pueda crecer y en el STACK están los metadatos del String con 8 bytes para la dirección de memoria inicial en el HEAP, la longitud actual en número entero que sería cero por ahora (8 bytes más) y la capacidad que son otros 8 bytes.</text:span></text:span></text:p>
      <text:p text:style-name="P72"><text:span text:style-name="_2f__2f_C"><text:span text:style-name="T121">Pa</text:span></text:span><text:span text:style-name="_2f__2f_C"><text:span text:style-name="T123">ra los vectores, por ejemplo capacidad para 5 numeros enteros:</text:span></text:span></text:p>
      <text:p text:style-name="P72"><text:span text:style-name="_3c_C_2b__2b__3e_"><text:span text:style-name="T15">let mut v = Vec&lt;i32&gt; = Vec::with_capacity(5);</text:span></text:span><text:span text:style-name="_3c_C_3e_"><text:span text:style-name="T12"> /</text:span></text:span><text:span text:style-name="_2f__2f_C"><text:span text:style-name="T12">/STACK (8bytes memoria, 8bytes 0longitud, 8bytes 5 capacidad.</text:span></text:span></text:p>
      <text:p text:style-name="P72"><text:span text:style-name="_3c_C_3e_"><text:span text:style-name="T12">v.push(12); </text:span></text:span><text:span text:style-name="_2f__2f_C"><text:span text:style-name="T12">//la longitud pasa a ser 1 y la capacidad sigue siendo 5.</text:span></text:span></text:p>
      <text:p text:style-name="P72"><text:span text:style-name="_2f__2f_C"><text:span text:style-name="T12"/></text:span></text:p>
      <text:p text:style-name="P72"><text:soft-page-break/><text:span text:style-name="_2f__2f_C"><text:span text:style-name="T123">En ambos como en el caso de la estructura, al salir de su scope {}, se hace el free automatico.. pero se podría forzar un free con esta instrucción antes de terminar las llaves:</text:span></text:span></text:p>
      <text:p text:style-name="P72"><text:span text:style-name="_3c_C_2b__2b__3e_"><text:span text:style-name="T124">drop(v);</text:span></text:span></text:p>
      <text:p text:style-name="P72"><text:span text:style-name="_3c_C_2b__2b__3e_"><text:span text:style-name="T15">drop(</text:span></text:span><text:span text:style-name="_3c_C_2b__2b__3e_"><text:span text:style-name="T124">s</text:span></text:span><text:span text:style-name="_3c_C_2b__2b__3e_"><text:span text:style-name="T15">);</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9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333333"/>
      <style:paragraph-properties fo:background-color="#333333"/>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text-properties fo:color="#b2b2b2" loext:opacity="100%" style:font-name="Arial1" fo:font-family="Arial" style:font-style-name="Negrita" style:font-family-generic="swiss" style:font-pitch="variable" officeooo:rsid="0073ede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line-height="100%"/>
      <style:text-properties fo:color="#dddddd" loext:opacity="100%" style:font-name="Arial1" fo:font-family="Arial" style:font-style-name="Negrita" style:font-family-generic="swiss" style:font-pitch="variable" fo:font-size="14pt" fo:font-weight="bold" officeooo:rsid="018075d2" fo:background-color="#bf0041"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a1467e" loext:opacity="100%" style:font-name="Arial1" fo:font-family="Arial" style:font-style-name="Negrita" style:font-family-generic="swiss" style:font-pitch="variable" style:text-underline-style="solid" style:text-underline-width="auto" style:text-underline-color="font-color" officeooo:rsid="00c3c542"/>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_3c_C_3e_" style:display-name="&lt;C&gt;" style:family="text">
      <style:text-properties fo:color="#00a933" loext:opacity="100%" style:font-name="Arial" fo:font-family="Arial" style:font-family-generic="swiss" style:font-pitch="variable" fo:font-size="12pt" officeooo:rsid="0181aa02" style:font-size-asian="12pt" style:font-size-complex="12pt"/>
    </style:style>
    <style:style style:name="_2f__2f_C" style:display-name="//C" style:family="text">
      <style:text-properties fo:color="#469df9" loext:opacity="100%" style:font-name="Arial" fo:font-family="Arial" style:font-family-generic="swiss" style:font-pitch="variable" fo:font-size="10pt" style:font-size-asian="10pt" style:font-size-complex="10pt"/>
    </style:style>
    <style:style style:name="_3c_C_2b__2b__3e_" style:display-name="&lt;C++&gt;" style:family="text">
      <style:text-properties fo:color="#81d41a" loext:opacity="100%" style:font-name="Arial" fo:font-family="Arial" style:font-family-generic="swiss" style:font-pitch="variable" fo:font-size="13pt" fo:font-weight="normal" officeooo:rsid="018075d2" style:font-size-asian="13pt" style:font-weight-asian="normal" style:font-size-complex="13pt" style:font-weight-complex="norma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333333" style:writing-mode="lr-tb" style:layout-grid-color="#c0c0c0" style:layout-grid-lines="20" style:layout-grid-base-height="0.706cm" style:layout-grid-ruby-height="0.353cm" style:layout-grid-mode="none" style:layout-grid-ruby-below="false" style:layout-grid-print="false" style:layout-grid-display="false" draw:fill="solid" draw:fill-color="#333333"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333333"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2-17T10:34:38.234000000</meta:creation-date>
    <dc:date>2026-07-06T19:46:28.415625803</dc:date>
    <meta:editing-duration>P3DT4H35M6S</meta:editing-duration>
    <meta:editing-cycles>468</meta:editing-cycles>
    <meta:generator>LibreOffice/26.2.4.2$Linux_X86_64 LibreOffice_project/620$Build-2</meta:generator>
    <meta:print-date>2025-01-04T16:07:11.302000000</meta:print-date>
    <meta:printed-by>Archivos PDF</meta:printed-by>
    <meta:document-statistic meta:table-count="0" meta:image-count="0" meta:object-count="0" meta:page-count="13" meta:paragraph-count="309" meta:word-count="2455" meta:character-count="13841" meta:non-whitespace-character-count="11384"/>
  </office:meta>
</office:document-meta>
</file>