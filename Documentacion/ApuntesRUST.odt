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35268e"/>
    </style:style>
    <style:style style:name="P9" style:family="paragraph" style:parent-style-name="Heading_20_3">
      <style:paragraph-properties fo:line-height="100%"/>
      <style:text-properties fo:color="#00a933" loext:opacity="100%" style:font-name="Arial1" style:text-underline-style="none" officeooo:rsid="0235268e" officeooo:paragraph-rsid="0235268e"/>
    </style:style>
    <style:style style:name="P10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11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12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13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14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1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16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7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8" style:family="paragraph" style:parent-style-name="Text_20_body">
      <style:paragraph-properties fo:line-height="100%"/>
      <style:text-properties officeooo:rsid="0216a37b" officeooo:paragraph-rsid="0216a37b"/>
    </style:style>
    <style:style style:name="P19" style:family="paragraph" style:parent-style-name="Text_20_body">
      <style:paragraph-properties fo:line-height="100%"/>
      <style:text-properties officeooo:rsid="0216a37b" officeooo:paragraph-rsid="0216c522"/>
    </style:style>
    <style:style style:name="P20" style:family="paragraph" style:parent-style-name="Text_20_body">
      <style:paragraph-properties fo:line-height="100%"/>
      <style:text-properties officeooo:rsid="0216a37b" officeooo:paragraph-rsid="02171d48"/>
    </style:style>
    <style:style style:name="P21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22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24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25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26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27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2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29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31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P3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34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35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36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37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bdc6a"/>
    </style:style>
    <style:style style:name="P38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ce022"/>
    </style:style>
    <style:style style:name="P39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e246b"/>
    </style:style>
    <style:style style:name="P40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38c4"/>
    </style:style>
    <style:style style:name="P41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b6a2"/>
    </style:style>
    <style:style style:name="P42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00a0c"/>
    </style:style>
    <style:style style:name="P43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1bbe3"/>
    </style:style>
    <style:style style:name="P44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299ec"/>
    </style:style>
    <style:style style:name="P45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46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47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4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49" style:family="paragraph" style:parent-style-name="Text_20_body">
      <style:paragraph-properties fo:line-height="100%"/>
      <style:text-properties fo:color="#00a933" loext:opacity="100%" style:font-name="Arial1" officeooo:rsid="0017c700" officeooo:paragraph-rsid="023943ac"/>
    </style:style>
    <style:style style:name="P50" style:family="paragraph" style:parent-style-name="Text_20_body">
      <style:paragraph-properties fo:line-height="100%"/>
      <style:text-properties fo:color="#00a933" loext:opacity="100%" style:font-name="Arial1" officeooo:rsid="0017c700" officeooo:paragraph-rsid="0236e83a"/>
    </style:style>
    <style:style style:name="P51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52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53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54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55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56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T1" style:family="text">
      <style:text-properties officeooo:rsid="0207f6a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c700"/>
    </style:style>
    <style:style style:name="T4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5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ffffff" loext:opacity="100%" officeooo:rsid="0207f6ae"/>
    </style:style>
    <style:style style:name="T8" style:family="text">
      <style:text-properties officeooo:rsid="020908b2"/>
    </style:style>
    <style:style style:name="T9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10" style:family="text">
      <style:text-properties style:text-underline-style="none" fo:font-weight="normal" fo:background-color="transparent" loext:char-shading-value="0"/>
    </style:style>
    <style:style style:name="T11" style:family="text">
      <style:text-properties style:text-underline-style="none" fo:font-weight="normal" officeooo:rsid="020aa978" fo:background-color="transparent" loext:char-shading-value="0"/>
    </style:style>
    <style:style style:name="T12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13" style:family="text">
      <style:text-properties style:text-underline-style="none" fo:background-color="transparent" loext:char-shading-value="0"/>
    </style:style>
    <style:style style:name="T14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15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16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17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18" style:family="text">
      <style:text-properties style:text-underline-style="none" fo:font-weight="normal" officeooo:rsid="021593b3" fo:background-color="transparent" loext:char-shading-value="0"/>
    </style:style>
    <style:style style:name="T19" style:family="text">
      <style:text-properties style:text-underline-style="none" fo:font-weight="normal" officeooo:rsid="0213cb13" fo:background-color="transparent" loext:char-shading-value="0"/>
    </style:style>
    <style:style style:name="T20" style:family="text">
      <style:text-properties fo:color="#ffffff" loext:opacity="100%" fo:font-size="14pt" fo:font-weight="normal" officeooo:rsid="0235268e" fo:background-color="transparent" loext:char-shading-value="0" style:font-size-asian="14pt" style:font-size-complex="14pt"/>
    </style:style>
    <style:style style:name="T21" style:family="text">
      <style:text-properties fo:font-weight="normal" fo:background-color="transparent" loext:char-shading-value="0"/>
    </style:style>
    <style:style style:name="T22" style:family="text">
      <style:text-properties officeooo:rsid="0227dcad"/>
    </style:style>
    <style:style style:name="T23" style:family="text">
      <style:text-properties officeooo:rsid="02259ec8"/>
    </style:style>
    <style:style style:name="T24" style:family="text">
      <style:text-properties officeooo:rsid="0226a567"/>
    </style:style>
    <style:style style:name="T25" style:family="text">
      <style:text-properties style:text-underline-style="none" officeooo:rsid="0216a37b"/>
    </style:style>
    <style:style style:name="T26" style:family="text">
      <style:text-properties officeooo:rsid="0216a37b"/>
    </style:style>
    <style:style style:name="T27" style:family="text">
      <style:text-properties officeooo:rsid="0216c522"/>
    </style:style>
    <style:style style:name="T28" style:family="text">
      <style:text-properties fo:color="#ffffff" loext:opacity="100%" style:font-name="Arial1" style:text-underline-style="none" officeooo:rsid="0216c522"/>
    </style:style>
    <style:style style:name="T29" style:family="text">
      <style:text-properties officeooo:rsid="02171d48"/>
    </style:style>
    <style:style style:name="T30" style:family="text">
      <style:text-properties fo:color="#469df9" loext:opacity="100%" style:font-name="Arial" fo:font-size="10pt" officeooo:rsid="02171d48" style:font-size-asian="10pt" style:font-size-complex="10pt"/>
    </style:style>
    <style:style style:name="T31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32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33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34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35" style:family="text">
      <style:text-properties officeooo:rsid="020ebc40" fo:background-color="transparent" loext:char-shading-value="0"/>
    </style:style>
    <style:style style:name="T36" style:family="text">
      <style:text-properties fo:font-weight="normal" officeooo:rsid="020ebc40" fo:background-color="transparent" loext:char-shading-value="0"/>
    </style:style>
    <style:style style:name="T37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38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39" style:family="text">
      <style:text-properties style:text-underline-style="none" fo:font-weight="normal" officeooo:rsid="02120630" fo:background-color="transparent" loext:char-shading-value="0"/>
    </style:style>
    <style:style style:name="T40" style:family="text">
      <style:text-properties style:text-underline-style="none" fo:font-weight="normal" officeooo:rsid="021770f8" fo:background-color="transparent" loext:char-shading-value="0"/>
    </style:style>
    <style:style style:name="T41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42" style:family="text">
      <style:text-properties style:text-underline-style="none" fo:font-weight="normal" officeooo:rsid="02171d48" fo:background-color="transparent" loext:char-shading-value="0"/>
    </style:style>
    <style:style style:name="T43" style:family="text">
      <style:text-properties style:text-underline-style="none" fo:font-weight="normal" officeooo:rsid="02191726" fo:background-color="transparent" loext:char-shading-value="0"/>
    </style:style>
    <style:style style:name="T44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45" style:family="text">
      <style:text-properties fo:color="#ffffff" loext:opacity="100%" fo:font-size="14pt" fo:font-weight="normal" officeooo:rsid="021c3799" style:font-size-asian="14pt" style:font-size-complex="14pt"/>
    </style:style>
    <style:style style:name="T46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7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8" style:family="text">
      <style:text-properties style:text-underline-style="none" fo:font-weight="normal" officeooo:rsid="021d5bcc" fo:background-color="transparent" loext:char-shading-value="0"/>
    </style:style>
    <style:style style:name="T49" style:family="text">
      <style:text-properties style:text-underline-style="none" fo:font-weight="normal" officeooo:rsid="021fa2ef" fo:background-color="transparent" loext:char-shading-value="0"/>
    </style:style>
    <style:style style:name="T50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51" style:family="text">
      <style:text-properties fo:color="#ffffff" loext:opacity="100%" fo:font-size="14pt" fo:font-weight="normal" officeooo:rsid="0234a03a" style:font-size-asian="14pt" style:font-size-complex="14pt"/>
    </style:style>
    <style:style style:name="T52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53" style:family="text">
      <style:text-properties style:text-underline-style="none" officeooo:rsid="0234a03a" fo:background-color="transparent" loext:char-shading-value="0"/>
    </style:style>
    <style:style style:name="T54" style:family="text">
      <style:text-properties style:text-underline-style="none" fo:font-weight="normal" officeooo:rsid="0234a03a" fo:background-color="transparent" loext:char-shading-value="0"/>
    </style:style>
    <style:style style:name="T55" style:family="text">
      <style:text-properties fo:color="#ffffff" loext:opacity="100%" fo:font-size="14pt" fo:font-weight="normal" officeooo:rsid="022b8b4d" style:font-size-asian="14pt" style:font-size-complex="14pt"/>
    </style:style>
    <style:style style:name="T56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57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58" style:family="text">
      <style:text-properties style:text-underline-style="none" fo:font-weight="normal" officeooo:rsid="02300a0c" fo:background-color="transparent" loext:char-shading-value="0"/>
    </style:style>
    <style:style style:name="T59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60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61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62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63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64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65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66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67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  <style:style style:name="T68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69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70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71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72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73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74" style:family="text">
      <style:text-properties fo:color="#ffffff" loext:opacity="100%" fo:font-weight="normal" officeooo:rsid="02212731"/>
    </style:style>
    <style:style style:name="T75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76" style:family="text">
      <style:text-properties style:text-underline-style="none" officeooo:rsid="023943ac" fo:background-color="transparent" loext:char-shading-value="0"/>
    </style:style>
    <style:style style:name="T77" style:family="text">
      <style:text-properties fo:color="#ffffff" loext:opacity="100%" fo:font-size="14pt" style:text-underline-style="none" fo:font-weight="normal" officeooo:rsid="0236e83a" fo:background-color="transparent" loext:char-shading-value="0" style:font-size-asian="14pt" style:font-size-complex="14pt"/>
    </style:style>
    <style:style style:name="T78" style:family="text">
      <style:text-properties style:text-underline-style="none" officeooo:rsid="0236e83a" fo:background-color="transparent" loext:char-shading-value="0"/>
    </style:style>
    <style:style style:name="T79" style:family="text">
      <style:text-properties style:text-underline-style="none" fo:font-weight="normal" officeooo:rsid="0236e83a" fo:background-color="transparent" loext:char-shading-value="0"/>
    </style:style>
    <style:style style:name="T80" style:family="text">
      <style:text-properties style:text-underline-style="none" fo:font-weight="normal" officeooo:rsid="023943ac" fo:background-color="transparent" loext:char-shading-value="0"/>
    </style:style>
    <style:style style:name="T81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82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83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84" style:family="text">
      <style:text-properties style:text-underline-style="none" fo:font-weight="normal" officeooo:rsid="0229133e" fo:background-color="transparent" loext:char-shading-value="0"/>
    </style:style>
    <style:style style:name="T85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86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87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88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1">RUST</text:span></text:p>
      <text:p text:style-name="P2"><text:span text:style-name="Internet_20_link"/></text:p>
      <text:p text:style-name="P2"/>
      <text:h text:style-name="Heading_20_3" text:outline-level="3"><text:span text:style-name="T2">DECLARACI</text:span><text:span text:style-name="T3">Ó</text:span><text:span text:style-name="T2">N DE VARIABLES</text:span></text:h>
      <text:p text:style-name="P3"><text:span text:style-name="_2f__2f_C"><text:span text:style-name="T4">La declaraci</text:span></text:span><text:span text:style-name="_2f__2f_C"><text:span text:style-name="T5">ón</text:span></text:span><text:span text:style-name="_2f__2f_C"><text:span text:style-name="T4"> de la variable es inversa a c:</text:span></text:span></text:p>
      <text:p text:style-name="P3"><text:span text:style-name="_3c_C_2b__2b__3e_"><text:span text:style-name="T6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7">Los tipos en comparativa:</text:span></text:span></text:p>
      <text:p text:style-name="P3"><text:span text:style-name="_3c_C_2b__2b__3e_"><text:span text:style-name="T7"/></text:span></text:p>
      <text:p text:style-name="P3"><text:span text:style-name="_3c_C_2b__2b__3e_"><text:span text:style-name="T1">int<text:tab/><text:tab/><text:tab/>-&gt; i32</text:span></text:span><text:span text:style-name="_3c_C_2b__2b__3e_"><text:span text:style-name="T8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1">long <text:tab/><text:tab/>-&gt; i64</text:span></text:span><text:span text:style-name="_3c_C_2b__2b__3e_"><text:span text:style-name="T8"><text:tab/><text:tab/><text:tab/><text:tab/><text:tab/>bool<text:tab/><text:tab/><text:tab/><text:tab/>-&gt; bool</text:span></text:span></text:p>
      <text:p text:style-name="P3"><text:span text:style-name="_3c_C_2b__2b__3e_"><text:span text:style-name="T1">float<text:tab/><text:tab/>-&gt; f32</text:span></text:span><text:span text:style-name="_3c_C_2b__2b__3e_"><text:span text:style-name="T8"><text:tab/><text:tab/><text:tab/><text:tab/><text:tab/>char*<text:tab/><text:tab/><text:tab/>-&gt; &amp;str</text:span></text:span></text:p>
      <text:p text:style-name="P3"><text:span text:style-name="_3c_C_2b__2b__3e_"><text:span text:style-name="T1">double<text:tab/>-&gt; f64</text:span></text:span><text:span text:style-name="_3c_C_2b__2b__3e_"><text:span text:style-name="T8"><text:tab/><text:tab/><text:tab/><text:tab/><text:tab/>std::string<text:tab/><text:tab/>-&gt; String</text:span></text:span></text:p>
      <text:p text:style-name="P3"><text:span text:style-name="_3c_C_2b__2b__3e_"><text:span text:style-name="T1">U-Int<text:tab/><text:tab/>-&gt; u32</text:span></text:span></text:p>
      <text:p text:style-name="P3"><text:span text:style-name="_3c_C_2b__2b__3e_"><text:span text:style-name="T1">U-long<text:tab/>-&gt;<text:tab/>u64</text:span></text:span></text:p>
      <text:p text:style-name="P4"><text:span text:style-name="_2f__2f_C"><text:span text:style-name="T9">Para asignar un valor a una variable seria:<text:line-break/><text:line-break/></text:span></text:span><text:span text:style-name="_3c_C_3e_"><text:span text:style-name="T10">let a = 32;</text:span></text:span><text:span text:style-name="_3c_C_3e_"><text:span text:style-name="T11"> </text:span></text:span><text:span text:style-name="_2f__2f_C"><text:span text:style-name="T11">//no habría una declaracion previa tipo a: i32, y Rust deduce lo que es.\</text:span></text:span></text:p>
      <text:p text:style-name="P5"><text:span text:style-name="_3c_C_3e_"><text:span text:style-name="T10">let a = 32 as f32</text:span></text:span><text:span text:style-name="_2f__2f_C"><text:span text:style-name="T11"> //le indicamos que es un float</text:span></text:span></text:p>
      <text:p text:style-name="P5"><text:span text:style-name="_2f__2f_C"><text:span text:style-name="T12">o</text:span></text:span></text:p>
      <text:p text:style-name="P5"><text:span text:style-name="_3c_C_3e_"><text:span text:style-name="T10">let a: i32 = 42;</text:span></text:span></text:p>
      <text:p text:style-name="P5"><text:span text:style-name="_3c_C_3e_"><text:span text:style-name="T10"/></text:span></text:p>
      <text:p text:style-name="P6"><text:span text:style-name="_3c_C_2b__2b__3e_"><text:span text:style-name="T13">LET</text:span></text:span><text:span text:style-name="_2f__2f_C"><text:span text:style-name="T14"> es para hacer que no pueda variar</text:span></text:span><text:span text:style-name="_2f__2f_C"><text:span text:style-name="T15"> (NO PUEDE SER GLOBAL).</text:span></text:span><text:span text:style-name="_2f__2f_C"><text:span text:style-name="T16"> </text:span></text:span><text:span text:style-name="_3c_C_2b__2b__3e_"><text:span text:style-name="T13">LET</text:span></text:span><text:span text:style-name="_2f__2f_C"><text:span text:style-name="T15"> </text:span></text:span><text:span text:style-name="_3c_C_2b__2b__3e_"><text:span text:style-name="T13">MUT</text:span></text:span><text:span text:style-name="_2f__2f_C"><text:span text:style-name="T14"> para que varie</text:span></text:span><text:span text:style-name="_2f__2f_C"><text:span text:style-name="T15"> (Hay que poner </text:span></text:span><text:span text:style-name="_3c_C_2b__2b__3e_"><text:span text:style-name="T13">let</text:span></text:span><text:span text:style-name="_2f__2f_C"><text:span text:style-name="T15"> delante)</text:span></text:span><text:span text:style-name="_2f__2f_C"><text:span text:style-name="T14">, y </text:span></text:span><text:span text:style-name="_3c_C_2b__2b__3e_"><text:span text:style-name="T13">CONST</text:span></text:span><text:span text:style-name="_2f__2f_C"><text:span text:style-name="T14"> para constante</text:span></text:span><text:span text:style-name="_2f__2f_C"><text:span text:style-name="T15"> (si puede ser global)</text:span></text:span></text:p>
      <text:p text:style-name="P7"><text:span text:style-name="_2f__2f_C"><text:span text:style-name="T17"/></text:span></text:p>
      <text:p text:style-name="P7"><text:span text:style-name="_3c_C_2b__2b__3e_"><text:span text:style-name="T13">let mut</text:span></text:span><text:span text:style-name="_3c_C_3e_"><text:span text:style-name="T10"> i = 0; </text:span></text:span><text:span text:style-name="_2f__2f_C"><text:span text:style-name="T10">//tipico para hacer while ya que la i variará. No global</text:span></text:span><text:span text:style-name="_2f__2f_C"><text:span text:style-name="T18">. En runtime</text:span></text:span></text:p>
      <text:p text:style-name="P7"><text:span text:style-name="_3c_C_2b__2b__3e_"><text:span text:style-name="T13">const i: i32</text:span></text:span><text:span text:style-name="_3c_C_3e_"><text:span text:style-name="T10"> = 0; </text:span></text:span><text:span text:style-name="_2f__2f_C"><text:span text:style-name="T10">//no puede mutar NUNCA en compilacion y puede ser global</text:span></text:span><text:span text:style-name="_2f__2f_C"><text:span text:style-name="T19">. Necesita ser declarado el tipo.</text:span></text:span><text:span text:style-name="_2f__2f_C"><text:span text:style-name="T18"> y se crea en tiempo de compilación</text:span></text:span></text:p>
      <text:p text:style-name="P8"><text:span text:style-name="_2f__2f_C"><text:span text:style-name="T20">Si a una variable le ponemos '_’ delante, esta variable aunque no se use, el compilador no se quejará de ella:</text:span></text:span></text:p>
      <text:p text:style-name="P8"><text:span text:style-name="_3c_C_3e_"><text:span text:style-name="T21">let </text:span></text:span><text:span text:style-name="_3c_C_2b__2b__3e_"><text:span text:style-name="T6">_</text:span></text:span><text:span text:style-name="_3c_C_3e_"><text:span text:style-name="T21">num: f32 = 0.4; </text:span></text:span><text:span text:style-name="_2f__2f_C"><text:span text:style-name="T21">//aunque no la use el compilador no lanzara un warning</text:span></text:span></text:p>
      <text:h text:style-name="P9" text:outline-level="3"><text:soft-page-break/></text:h>
      <text:p text:style-name="P10"/>
      <text:h text:style-name="P11" text:outline-level="3">MATRICES</text:h>
      <text:p text:style-name="P12">Podemos usar matrices como en C:<text:line-break/></text:p>
      <text:p text:style-name="P12"><text:span text:style-name="_3c_C_2b__2b__3e_">let x: </text:span><text:span text:style-name="_3c_C_2b__2b__3e_"><text:span text:style-name="T22">[i32; 3]</text:span></text:span><text:span text:style-name="_3c_C_2b__2b__3e_"> = [1, 2 , 3];</text:span></text:p>
      <text:p text:style-name="P13"><text:span text:style-name="_2f__2f_C"><text:span text:style-name="T22">//let x = [1, 2, 3]; puede ser asi tambien y el deduciria el tipo.</text:span></text:span></text:p>
      <text:p text:style-name="P12"><text:span text:style-name="_3c_C_3e_">println!("{}", x[1]); </text:span><text:span text:style-name="_2f__2f_C">//imprimiría 2, pero es arriesgado</text:span></text:p>
      <text:p text:style-name="P12"><text:span text:style-name="_3c_C_3e_"><text:span text:style-name="T23">println!("{}", x[7]);</text:span></text:span><text:span text:style-name="_2f__2f_C"> //Entraría en modo "panic" que saldría de forma segura. No soltaria basura</text:span></text:p>
      <text:p text:style-name="P12"><text:span text:style-name="_2f__2f_C"/></text:p>
      <text:p text:style-name="P14">Para hacerlo de forma segura se puede usar </text:p>
      <text:p text:style-name="P14"><text:span text:style-name="_3c_C_2b__2b__3e_">x.get(1)</text:span><text:span text:style-name="_3c_C_3e_">; </text:span><text:span text:style-name="_2f__2f_C">//devolveria "Some(2)" en mayusculas la S</text:span></text:p>
      <text:p text:style-name="P14"><text:span text:style-name="_3c_C_3e_">x.get(7);</text:span><text:span text:style-name="_2f__2f_C"> //devolveria "None" en mayusculas la N</text:span></text:p>
      <text:p text:style-name="P14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24">i</text:span></text:span><text:span text:style-name="_3c_C_2b__2b__3e_">) = x.get(1) </text:span><text:span text:style-name="_3c_C_3e_">{</text:span></text:p>
      <text:p text:style-name="P14"><text:span text:style-name="_3c_C_3e_"><text:tab/>println!("{}", </text:span><text:span text:style-name="_3c_C_3e_"><text:span text:style-name="T24">i</text:span></text:span><text:span text:style-name="_3c_C_3e_"><text:span text:style-name="T22">)</text:span></text:span><text:span text:style-name="_3c_C_3e_">;</text:span></text:p>
      <text:p text:style-name="P14"><text:span text:style-name="_3c_C_3e_">}</text:span><text:span text:style-name="_3c_C_3e_"><text:span text:style-name="T22"> </text:span></text:span><text:span text:style-name="_3c_C_3e_">else {</text:span></text:p>
      <text:p text:style-name="P14"><text:span text:style-name="_3c_C_3e_"><text:tab/>println!("no existe");</text:span></text:p>
      <text:p text:style-name="P14"><text:span text:style-name="_3c_C_3e_">}</text:span></text:p>
      <text:p text:style-name="P14">O en formáto Rust:</text:p>
      <text:p text:style-name="P14"/>
      <text:p text:style-name="P15"><text:span text:style-name="_3c_C_2b__2b__3e_">match x.get(2) {</text:span></text:p>
      <text:p text:style-name="P15"><text:span text:style-name="_3c_C_2b__2b__3e_"><text:tab/>Some(i) =&gt; println!("{}", i),</text:span></text:p>
      <text:p text:style-name="P15"><text:span text:style-name="_3c_C_2b__2b__3e_"><text:tab/>None<text:tab/>=&gt;<text:tab/> println!("No existe"),</text:span></text:p>
      <text:p text:style-name="P15"><text:span text:style-name="_3c_C_2b__2b__3e_">}</text:span></text:p>
      <text:p text:style-name="P10"/>
      <text:h text:style-name="P16" text:outline-level="3">VARIABLES GLOBALES</text:h>
      <text:p text:style-name="P17">El tener una variable global en Rust es <text:s/>un problema, ya que puede haber dataraces para modificarla asi que tiene que estar protegida.. si no no deja. </text:p>
      <text:p text:style-name="P17">La forma clásica es:<text:line-break/></text:p>
      <text:p text:style-name="P18"><text:span text:style-name="_3c_C_2b__2b__3e_"><text:span text:style-name="T2">static mut </text:span></text:span><text:span text:style-name="_3c_C_3e_"><text:span text:style-name="T2">A: i32 = 0;</text:span></text:span><text:span text:style-name="_3c_C_3e_"><text:span text:style-name="T25"> </text:span></text:span><text:span text:style-name="_2f__2f_C"><text:span text:style-name="T2">//variable global</text:span></text:span></text:p>
      <text:p text:style-name="P18"><text:span text:style-name="_3c_C_3e_"><text:span text:style-name="T26">fn main(){</text:span></text:span></text:p>
      <text:p text:style-name="P18"><text:span text:style-name="_3c_C_3e_"><text:span text:style-name="T26"><text:tab/>if true{</text:span></text:span></text:p>
      <text:p text:style-name="P18"><text:soft-page-break/><text:span text:style-name="_3c_C_3e_"><text:span text:style-name="T26"><text:tab/><text:tab/></text:span></text:span><text:span text:style-name="_3c_C_2b__2b__3e_">unsafe{</text:span><text:span text:style-name="_3c_C_3e_"><text:span text:style-name="T26"> A = 10;</text:span></text:span><text:span text:style-name="_3c_C_2b__2b__3e_">}</text:span><text:span text:style-name="_3c_C_2b__2b__3e_"><text:span text:style-name="T26"> </text:span></text:span><text:span text:style-name="_2f__2f_C">//no se recomienda pero permitido</text:span><text:span text:style-name="_2f__2f_C"><text:span text:style-name="T27">. unsafe le dice el compilador que confie en el programador. </text:span></text:span></text:p>
      <text:p text:style-name="P18"><text:span text:style-name="_3c_C_3e_"><text:span text:style-name="T26"><text:tab/>}</text:span></text:span></text:p>
      <text:p text:style-name="P18"><text:span text:style-name="_3c_C_3e_"><text:span text:style-name="T26">}</text:span></text:span></text:p>
      <text:p text:style-name="P18"><text:span text:style-name="_3c_C_3e_"/></text:p>
      <text:p text:style-name="P19"><text:span text:style-name="_3c_C_2b__2b__3e_"><text:span text:style-name="T2">Unsafe</text:span></text:span><text:span text:style-name="_3c_C_3e_"><text:span text:style-name="T28"> es un peligro.. asi que usamos </text:span></text:span><text:span text:style-name="_3c_C_2b__2b__3e_"><text:span text:style-name="T2">atomic</text:span></text:span><text:span text:style-name="_3c_C_3e_"><text:span text:style-name="T28"> para no provocar dataraces:<text:line-break/></text:span></text:span></text:p>
      <text:p text:style-name="P19"><text:span text:style-name="_3c_C_2b__2b__3e_">use std::sync::atomic::{AtomicI32, ordering}</text:span></text:p>
      <text:p text:style-name="P19"><text:span text:style-name="_3c_C_3e_"><text:span text:style-name="T27">static A: </text:span></text:span><text:span text:style-name="_3c_C_2b__2b__3e_">AtomicI32</text:span><text:span text:style-name="_3c_C_3e_"><text:span text:style-name="T27"> = AtomicI32::new(0); </text:span></text:span><text:span text:style-name="_2f__2f_C"><text:span text:style-name="T27">//no hace reserva de memoria. Solo inicializa a cero</text:span></text:span></text:p>
      <text:p text:style-name="P20"><text:span text:style-name="_3c_C_3e_">fn main() {<text:line-break/></text:span><text:span text:style-name="_3c_C_3e_"><text:span text:style-name="T27"><text:tab/></text:span></text:span><text:span text:style-name="_3c_C_3e_">if true {<text:line-break/></text:span><text:span text:style-name="_3c_C_3e_"><text:span text:style-name="T27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29"> </text:span></text:span><text:span text:style-name="_2f__2f_C"><text:span text:style-name="T29">//Relaxed es el nivel más débil del ordenamiento at</text:span></text:span><text:span text:style-name="_2f__2f_C"><text:span text:style-name="T30">ó</text:span></text:span><text:span text:style-name="_2f__2f_C"><text:span text:style-name="T29">mico. solo </text:span></text:span></text:p>
      <text:p text:style-name="P20"><text:span text:style-name="_2f__2f_C"><text:span text:style-name="T29">me importa modificar el valor, no el orden del tiempo en que se haga.</text:span></text:span><text:span text:style-name="_3c_C_3e_"><text:line-break/></text:span><text:span text:style-name="_3c_C_3e_"><text:span text:style-name="T27"><text:tab/></text:span></text:span><text:span text:style-name="_3c_C_3e_">}<text:line-break/>}</text:span></text:p>
      <text:h text:style-name="P21" text:outline-level="3"/>
      <text:h text:style-name="P22" text:outline-level="3">ESTRUCTURAS</text:h>
      <text:p text:style-name="P4"><text:span text:style-name="_2f__2f_C"><text:span text:style-name="T31">Rust no tiene objectos ni clases, pero s</text:span></text:span><text:span text:style-name="_2f__2f_C"><text:span text:style-name="T32">í </text:span></text:span><text:span text:style-name="_2f__2f_C"><text:span text:style-name="T31">que puede acercarse a ellos con las estructuras. En Rust todo es privado que se declare</text:span></text:span><text:span text:style-name="_2f__2f_C"><text:span text:style-name="T33">. Para hacerlo accesible hay que ponerle la palabra </text:span></text:span><text:span text:style-name="_3c_C_2b__2b__3e_"><text:span text:style-name="T6">pub</text:span></text:span><text:span text:style-name="_2f__2f_C"><text:span text:style-name="T33"> delante. No solo a la estructura</text:span></text:span><text:span text:style-name="_2f__2f_C"><text:span text:style-name="T34">.</text:span></text:span></text:p>
      <text:p text:style-name="P23"><text:span text:style-name="_2f__2f_C"><text:span text:style-name="T34">(</text:span></text:span><text:span text:style-name="_3c_C_3e_"><text:span text:style-name="T21">fichero.rs</text:span></text:span><text:span text:style-name="_2f__2f_C"><text:span text:style-name="T34">)</text:span></text:span></text:p>
      <text:p text:style-name="P23"><text:span text:style-name="_3c_C_2b__2b__3e_"><text:span text:style-name="T6">pub struct </text:span></text:span><text:span text:style-name="_3c_C_2b__2b__3e_"><text:span text:style-name="T35">P</text:span></text:span><text:span text:style-name="_3c_C_3e_"><text:span text:style-name="T21">rueba{</text:span></text:span><text:span text:style-name="_3c_C_3e_"><text:span text:style-name="T36"> </text:span></text:span><text:span text:style-name="_2f__2f_C"><text:span text:style-name="T36">//debe ser CamelCase P mayúscula</text:span></text:span></text:p>
      <text:p text:style-name="P23"><text:span text:style-name="_3c_C_3e_"><text:span text:style-name="T21"><text:tab/></text:span></text:span><text:span text:style-name="_3c_C_2b__2b__3e_"><text:span text:style-name="T6">pub</text:span></text:span><text:span text:style-name="_3c_C_3e_"><text:span text:style-name="T21"> var1: i32</text:span></text:span><text:span text:style-name="_3c_C_2b__2b__3e_"><text:span text:style-name="T6">,</text:span></text:span></text:p>
      <text:p text:style-name="P23"><text:span text:style-name="_3c_C_3e_"><text:span text:style-name="T21"><text:tab/></text:span></text:span><text:span text:style-name="_3c_C_2b__2b__3e_"><text:span text:style-name="T6">pub</text:span></text:span><text:span text:style-name="_3c_C_3e_"><text:span text:style-name="T21"> var2: char</text:span></text:span><text:span text:style-name="_3c_C_2b__2b__3e_"><text:span text:style-name="T6">,</text:span></text:span><text:span text:style-name="_3c_C_3e_"><text:span text:style-name="T36"> </text:span></text:span><text:span text:style-name="_2f__2f_C"><text:span text:style-name="T21">//si no son pub estas variables no se puede acceder a ellas</text:span></text:span></text:p>
      <text:p text:style-name="P23"><text:span text:style-name="_3c_C_3e_"><text:span text:style-name="T21">}</text:span></text:span></text:p>
      <text:p text:style-name="P23"><text:span text:style-name="_2f__2f_C"><text:span text:style-name="T34">Importando el </text:span></text:span><text:span text:style-name="_3c_C_3e_"><text:span text:style-name="T21">fichero.rs</text:span></text:span><text:span text:style-name="_2f__2f_C"><text:span text:style-name="T34"> como <text:line-break/></text:span></text:span></text:p>
      <text:p text:style-name="P24"><text:span text:style-name="_2f__2f_C"><text:span text:style-name="T37">(fichero: main.rs)</text:span></text:span></text:p>
      <text:p text:style-name="P23"><text:span text:style-name="_3c_C_2b__2b__3e_"><text:span text:style-name="T6">mod</text:span></text:span><text:span text:style-name="_3c_C_3e_"><text:span text:style-name="T21"> fichero;</text:span></text:span><text:span text:style-name="_3c_C_3e_"><text:span text:style-name="T36"> </text:span></text:span><text:span text:style-name="_2f__2f_C"><text:span text:style-name="T36">//importa el fichero fichero.rs</text:span></text:span></text:p>
      <text:p text:style-name="P23"><text:span text:style-name="_3c_C_3e_"><text:span text:style-name="T21">fn main(){</text:span></text:span></text:p>
      <text:p text:style-name="P23"><text:span text:style-name="_3c_C_3e_"><text:span text:style-name="T21"><text:tab/>let a = fichero::prueba { var1: 42, var2: 'a'</text:span></text:span><text:span text:style-name="_3c_C_3e_"><text:span text:style-name="T36">}</text:span></text:span><text:span text:style-name="_3c_C_3e_"><text:span text:style-name="T21">;</text:span></text:span></text:p>
      <text:p text:style-name="P23"><text:span text:style-name="_3c_C_3e_"><text:span text:style-name="T21">} </text:span></text:span></text:p>
      <text:p text:style-name="P23"><text:span text:style-name="_3c_C_3e_"><text:span text:style-name="T21"/></text:span></text:p>
      <text:p text:style-name="P24"><text:span text:style-name="_2f__2f_C"><text:span text:style-name="T38">Ahora imaginemos que tenemos un archivo.rs que tiene esto:</text:span></text:span></text:p>
      <text:p text:style-name="P24"><text:span text:style-name="_2f__2f_C"><text:span text:style-name="T38">(</text:span></text:span><text:span text:style-name="_3c_C_3e_"><text:span text:style-name="T10">fichero.rs</text:span></text:span><text:span text:style-name="_2f__2f_C"><text:span text:style-name="T38">)</text:span></text:span></text:p>
      <text:p text:style-name="P24"><text:soft-page-break/><text:span text:style-name="_3c_C_3e_"><text:span text:style-name="T39">pub </text:span></text:span><text:span text:style-name="_3c_C_3e_"><text:span text:style-name="T10">struct Prueba{</text:span></text:span><text:span text:style-name="_3c_C_3e_"><text:span text:style-name="T39"> //para implementar el getter tiene que ser la estructura pub</text:span></text:span></text:p>
      <text:p text:style-name="P24"><text:span text:style-name="_3c_C_3e_"><text:span text:style-name="T10"><text:tab/>x: i32,</text:span></text:span></text:p>
      <text:p text:style-name="P24"><text:span text:style-name="_3c_C_3e_"><text:span text:style-name="T10">}</text:span></text:span></text:p>
      <text:p text:style-name="P24"><text:span text:style-name="_3c_C_3e_"><text:span text:style-name="T19">pub </text:span></text:span><text:span text:style-name="_3c_C_3e_"><text:span text:style-name="T10">fn test()</text:span></text:span><text:span text:style-name="_3c_C_3e_"><text:span text:style-name="T40"> -&gt; Prueba</text:span></text:span><text:span text:style-name="_3c_C_3e_"><text:span text:style-name="T10">{</text:span></text:span><text:span text:style-name="_2f__2f_C"><text:span text:style-name="T40"> //-&gt; devuelve un tipo Prueba (estructura)</text:span></text:span></text:p>
      <text:p text:style-name="P24"><text:span text:style-name="_3c_C_3e_"><text:span text:style-name="T40"><text:tab/></text:span></text:span><text:span text:style-name="_3c_C_3e_"><text:span text:style-name="T10">Prueba {x: 56}</text:span></text:span></text:p>
      <text:p text:style-name="P24"><text:span text:style-name="_3c_C_3e_"><text:span text:style-name="T10">}</text:span></text:span></text:p>
      <text:p text:style-name="P24"><text:span text:style-name="_2f__2f_C"><text:span text:style-name="T38">No habr</text:span></text:span><text:span text:style-name="_2f__2f_C"><text:span text:style-name="T41">í</text:span></text:span><text:span text:style-name="_2f__2f_C"><text:span text:style-name="T38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3">impl</text:span></text:span><text:span text:style-name="_3c_C_3e_"><text:span text:style-name="T10"> Prueba{</text:span></text:span></text:p>
      <text:p text:style-name="P24"><text:span text:style-name="_3c_C_3e_"><text:span text:style-name="T10"><text:tab/></text:span></text:span><text:span text:style-name="_3c_C_3e_"><text:span text:style-name="T39">pub </text:span></text:span><text:span text:style-name="_3c_C_3e_"><text:span text:style-name="T10">fn get_x(&amp;self) -&gt; i32{</text:span></text:span><text:span text:style-name="_3c_C_3e_"><text:span text:style-name="T39"> </text:span></text:span><text:span text:style-name="_2f__2f_C"><text:span text:style-name="T39">//tiene que ser pub tambien</text:span></text:span><text:span text:style-name="_2f__2f_C"><text:span text:style-name="T40">. -&gt; i32 = devuelve un int.</text:span></text:span></text:p>
      <text:p text:style-name="P25"><text:span text:style-name="_2f__2f_C"><text:span text:style-name="T42"><text:tab/>//&amp;self es como los objetos.. o this en c++ va implicito</text:span></text:span></text:p>
      <text:p text:style-name="P25"><text:span text:style-name="_2f__2f_C"><text:span text:style-name="T42"><text:tab/><text:tab/>(self) lo moveria el valor</text:span></text:span></text:p>
      <text:p text:style-name="P25"><text:span text:style-name="_2f__2f_C"><text:span text:style-name="T42"><text:tab/><text:tab/>(&amp;self) es inmutable</text:span></text:span></text:p>
      <text:p text:style-name="P25"><text:span text:style-name="_2f__2f_C"><text:span text:style-name="T42"><text:tab/><text:tab/>(&amp;mut self) lo podria cambiar.</text:span></text:span></text:p>
      <text:p text:style-name="P24"><text:span text:style-name="_3c_C_3e_"><text:span text:style-name="T10"><text:tab/><text:tab/>self.</text:span></text:span><text:span text:style-name="_3c_C_3e_"><text:span text:style-name="T39">x</text:span></text:span><text:span text:style-name="_3c_C_3e_"><text:span text:style-name="T43"> </text:span></text:span><text:span text:style-name="_2f__2f_C"><text:span text:style-name="T43">//IMPORTANTE!!! SI NO TIENE ';' ES UN RETURN IMPLICITO!!!</text:span></text:span></text:p>
      <text:p text:style-name="P24"><text:span text:style-name="_3c_C_3e_"><text:span text:style-name="T10"><text:tab/>}</text:span></text:span></text:p>
      <text:p text:style-name="P24"><text:span text:style-name="_3c_C_3e_"><text:span text:style-name="T10">}</text:span></text:span></text:p>
      <text:p text:style-name="P26"><text:span text:style-name="_2f__2f_C"><text:span text:style-name="T44">En el main.rs:<text:line-break/></text:span></text:span></text:p>
      <text:p text:style-name="P26"><text:span text:style-name="_3c_C_3e_"><text:span text:style-name="T10">mod fichero;</text:span></text:span></text:p>
      <text:p text:style-name="P26"><text:span text:style-name="_3c_C_3e_"><text:span text:style-name="T10">fn main (){</text:span></text:span></text:p>
      <text:p text:style-name="P27"><text:span text:style-name="_3c_C_3e_"><text:span text:style-name="T40"><text:tab/>let a = fichero::test(); </text:span></text:span><text:span text:style-name="_2f__2f_C"><text:span text:style-name="T40">//llama a la funcion externa en fichero y le da el valor 56</text:span></text:span><text:span text:style-name="_3c_C_3e_"><text:span text:style-name="T10"><text:tab/></text:span></text:span></text:p>
      <text:p text:style-name="P27"><text:span text:style-name="_3c_C_3e_"><text:span text:style-name="T40"><text:tab/></text:span></text:span><text:span text:style-name="_3c_C_3e_"><text:span text:style-name="T10">println!("{}", a.get_x());</text:span></text:span></text:p>
      <text:p text:style-name="P26"><text:span text:style-name="_3c_C_3e_"><text:span text:style-name="T10">}</text:span></text:span></text:p>
      <text:p text:style-name="P26"><text:span text:style-name="_3c_C_3e_"><text:span text:style-name="T10"/></text:span></text:p>
      <text:p text:style-name="P26"><text:span text:style-name="_3c_C_3e_"><text:span text:style-name="T10"/></text:span></text:p>
      <text:h text:style-name="P28" text:outline-level="3"><text:span text:style-name="_3c_C_3e_"><text:span text:style-name="T45">FUNCIONES</text:span></text:span></text:h>
      <text:p text:style-name="P29"><text:span text:style-name="_2f__2f_C"><text:span text:style-name="T46">Las funciones en Rust estan divididas entre las que no devuelven nada y las que s</text:span></text:span><text:span text:style-name="_2f__2f_C"><text:span text:style-name="T47">í</text:span></text:span><text:span text:style-name="_2f__2f_C"><text:span text:style-name="T46">. </text:span></text:span></text:p>
      <text:p text:style-name="P29"><text:span text:style-name="_2f__2f_C"><text:span text:style-name="T46">NO DEVUELVE:</text:span></text:span></text:p>
      <text:p text:style-name="P29"><text:span text:style-name="_3c_C_3e_"><text:span text:style-name="T10">fn funcion(num1: &amp;i32){</text:span></text:span><text:span text:style-name="_3c_C_3e_"><text:span text:style-name="T48"> </text:span></text:span><text:span text:style-name="_2f__2f_C"><text:span text:style-name="T48">//</text:span></text:span><text:span text:style-name="_2f__2f_C"><text:span text:style-name="T49">referenciada</text:span></text:span></text:p>
      <text:p text:style-name="P29"><text:span text:style-name="_3c_C_3e_"><text:span text:style-name="T10"><text:tab/>println!("El numero es: {}", num1</text:span></text:span><text:span text:style-name="_3c_C_3e_"><text:span text:style-name="T49">)</text:span></text:span><text:span text:style-name="_3c_C_3e_"><text:span text:style-name="T10">;</text:span></text:span></text:p>
      <text:p text:style-name="P29"><text:span text:style-name="_3c_C_3e_"><text:span text:style-name="T10">}</text:span></text:span></text:p>
      <text:p text:style-name="P29"><text:span text:style-name="_2f__2f_C"><text:span text:style-name="T46">DEVUELVE:</text:span></text:span></text:p>
      <text:p text:style-name="P29"><text:soft-page-break/><text:span text:style-name="_3c_C_3e_"><text:span text:style-name="T10">fn<text:tab/>suma(num1: &amp;i32, num2: &amp;i32) </text:span></text:span><text:span text:style-name="_3c_C_2b__2b__3e_"><text:span text:style-name="T13">-&gt; i32</text:span></text:span><text:span text:style-name="_3c_C_3e_"><text:span text:style-name="T10">{</text:span></text:span><text:span text:style-name="_3c_C_3e_"><text:span text:style-name="T48"> </text:span></text:span><text:span text:style-name="_2f__2f_C"><text:span text:style-name="T48">//-&gt; lo que devuelve</text:span></text:span></text:p>
      <text:p text:style-name="P29"><text:span text:style-name="_3c_C_3e_"><text:span text:style-name="T10"><text:tab/></text:span></text:span><text:span text:style-name="_3c_C_3e_"><text:span text:style-name="T49">*</text:span></text:span><text:span text:style-name="_3c_C_3e_"><text:span text:style-name="T10">num1 + </text:span></text:span><text:span text:style-name="_3c_C_3e_"><text:span text:style-name="T49">*</text:span></text:span><text:span text:style-name="_3c_C_3e_"><text:span text:style-name="T10">num2 </text:span></text:span><text:span text:style-name="_2f__2f_C"><text:span text:style-name="T10">//es importante que no tenga ; ya que este es un return oculto, sin ese punto y coma.</text:span></text:span></text:p>
      <text:p text:style-name="P30"><text:span text:style-name="_2f__2f_C"><text:span text:style-name="T49"><text:tab/>//Hay que derreferenciar, ya que son referencias (direcciones de memoria)</text:span></text:span></text:p>
      <text:p text:style-name="P29"><text:span text:style-name="_3c_C_3e_"><text:span text:style-name="T10">}</text:span></text:span></text:p>
      <text:p text:style-name="P29"><text:span text:style-name="_2f__2f_C"><text:span text:style-name="T46">Para llamarlas:</text:span></text:span></text:p>
      <text:p text:style-name="P29"><text:span text:style-name="_3c_C_3e_"><text:span text:style-name="T10">funcion(&amp;n);</text:span></text:span></text:p>
      <text:p text:style-name="P29"><text:span text:style-name="_3c_C_3e_"><text:span text:style-name="T10">suma(&amp;x, &amp;y);</text:span></text:span></text:p>
      <text:p text:style-name="P29"><text:span text:style-name="_3c_C_3e_"><text:span text:style-name="T10"/></text:span></text:p>
      <text:p text:style-name="P30"><text:span text:style-name="_2f__2f_C"><text:span text:style-name="T46">Para </text:span></text:span><text:span text:style-name="_2f__2f_C"><text:span text:style-name="T50">cambiar el valor de un numero</text:span></text:span><text:span text:style-name="_2f__2f_C"><text:span text:style-name="T46">:</text:span></text:span></text:p>
      <text:p text:style-name="P30"><text:span text:style-name="_3c_C_3e_"><text:span text:style-name="T10">fn cambia(n: &amp;mut i32){</text:span></text:span></text:p>
      <text:p text:style-name="P30"><text:span text:style-name="_3c_C_3e_"><text:span text:style-name="T10"><text:tab/>*n = 42;</text:span></text:span></text:p>
      <text:p text:style-name="P30"><text:span text:style-name="_3c_C_3e_"><text:span text:style-name="T10">}</text:span></text:span></text:p>
      <text:p text:style-name="P30"><text:span text:style-name="_2f__2f_C"><text:span text:style-name="T50">y para llamarla:</text:span></text:span></text:p>
      <text:p text:style-name="P30"><text:span text:style-name="_3c_C_3e_"><text:span text:style-name="T10">cambia(&amp;mut x);</text:span></text:span></text:p>
      <text:p text:style-name="P30"><text:span text:style-name="_3c_C_3e_"><text:span text:style-name="T10"/></text:span></text:p>
      <text:h text:style-name="P31" text:outline-level="3"><text:span text:style-name="_3c_C_3e_"><text:span text:style-name="T45">FUNCIONES</text:span></text:span><text:span text:style-name="_3c_C_3e_"><text:span text:style-name="T51"> CLOSURE |parametros|</text:span></text:span></text:h>
      <text:p text:style-name="P32"><text:span text:style-name="_2f__2f_C"><text:span text:style-name="T52">Hay veces que queremos pasar una funcion mas limpiamente o mas corta. Se puede definir la normal como:<text:line-break/></text:span></text:span></text:p>
      <text:p text:style-name="P32"><text:span text:style-name="_3c_C_3e_"><text:span text:style-name="T10">fn sumar (x: i32, y: i32) -&gt; i32{</text:span></text:span></text:p>
      <text:p text:style-name="P32"><text:span text:style-name="_3c_C_3e_"><text:span text:style-name="T10"><text:tab/>x + y</text:span></text:span></text:p>
      <text:p text:style-name="P32"><text:span text:style-name="_3c_C_3e_"><text:span text:style-name="T10">}</text:span></text:span></text:p>
      <text:p text:style-name="P32"><text:span text:style-name="_2f__2f_C"><text:span text:style-name="T52">Pero podemos hacerla Closure:</text:span></text:span></text:p>
      <text:p text:style-name="P32"><text:span text:style-name="_3c_C_2b__2b__3e_"><text:span text:style-name="T13">let sumar = |x</text:span></text:span><text:span text:style-name="_3c_C_2b__2b__3e_"><text:span text:style-name="T53">,</text:span></text:span><text:span text:style-name="_3c_C_2b__2b__3e_"><text:span text:style-name="T13"> y| x + y;</text:span></text:span></text:p>
      <text:p text:style-name="P32"><text:span text:style-name="_2f__2f_C"><text:span text:style-name="T52">y se la llama como:</text:span></text:span></text:p>
      <text:p text:style-name="P32"><text:span text:style-name="_3c_C_3e_"><text:span text:style-name="T54">let resultado = </text:span></text:span><text:span text:style-name="_3c_C_3e_"><text:span text:style-name="T10">sumar(2, 3);</text:span></text:span></text:p>
      <text:p text:style-name="P32"><text:span text:style-name="_2f__2f_C"><text:span text:style-name="T52">esto mismo se puede hacer en una unica linea asi:</text:span></text:span></text:p>
      <text:p text:style-name="P32"><text:span text:style-name="_3c_C_2b__2b__3e_"><text:span text:style-name="T13">let sumar = </text:span></text:span><text:span text:style-name="_3c_C_2b__2b__3e_"><text:span text:style-name="T53">(</text:span></text:span><text:span text:style-name="_3c_C_2b__2b__3e_"><text:span text:style-name="T13">|x</text:span></text:span><text:span text:style-name="_3c_C_2b__2b__3e_"><text:span text:style-name="T53">,</text:span></text:span><text:span text:style-name="_3c_C_2b__2b__3e_"><text:span text:style-name="T13"> y| x + y</text:span></text:span><text:span text:style-name="_3c_C_2b__2b__3e_"><text:span text:style-name="T53">)(2, 3);</text:span></text:span></text:p>
      <text:p text:style-name="P32"><text:span text:style-name="_2f__2f_C"><text:span text:style-name="T52"/></text:span></text:p>
      <text:p text:style-name="P32"><text:span text:style-name="_2f__2f_C"><text:span text:style-name="T52"/></text:span></text:p>
      <text:h text:style-name="P33" text:outline-level="3"><text:span text:style-name="_3c_C_3e_"><text:span text:style-name="T55">SOBRECARGA DE OPERADORES</text:span></text:span></text:h>
      <text:p text:style-name="P34"><text:span text:style-name="_2f__2f_C"><text:span text:style-name="T56">Rust tiene sobrecarga de operadores, y la forma de declararlos es en el </text:span></text:span><text:span text:style-name="_3c_C_2b__2b__3e_"><text:span text:style-name="T13">impl</text:span></text:span><text:span text:style-name="_2f__2f_C"><text:span text:style-name="T56"> de tal forma:</text:span></text:span></text:p>
      <text:p text:style-name="P35"><text:span text:style-name="_3c_C_3e_"><text:span text:style-name="T10">use std::ops::Add;</text:span></text:span><text:span text:style-name="_2f__2f_C"><text:span text:style-name="T57"> </text:span></text:span><text:span text:style-name="_2f__2f_C"><text:span text:style-name="T58">//importa el trait (el operador) de Add. Si no no se puede usar</text:span></text:span></text:p>
      <text:p text:style-name="P34"><text:soft-page-break/><text:span text:style-name="_3c_C_3e_"><text:span text:style-name="T10">struct Vector3{...}</text:span></text:span></text:p>
      <text:p text:style-name="P34"><text:span text:style-name="_3c_C_2b__2b__3e_"><text:span text:style-name="T13">impl</text:span></text:span><text:span text:style-name="_3c_C_3e_"><text:span text:style-name="T10"><text:tab/></text:span></text:span><text:span text:style-name="_3c_C_2b__2b__3e_"><text:span text:style-name="T13">Add</text:span></text:span><text:span text:style-name="_3c_C_3e_"><text:span text:style-name="T10"> for Vector3{</text:span></text:span></text:p>
      <text:p text:style-name="P34"><text:span text:style-name="_3c_C_3e_"><text:span text:style-name="T10"><text:tab/>type Output = Vect</text:span></text:span><text:span text:style-name="_3c_C_3e_"><text:span text:style-name="T58">or</text:span></text:span><text:span text:style-name="_3c_C_3e_"><text:span text:style-name="T10">3; </text:span></text:span><text:span text:style-name="_2f__2f_C"><text:span text:style-name="T10">//el resultado de la operacion v1 + v2 sera un Vect3</text:span></text:span></text:p>
      <text:p text:style-name="P34"><text:span text:style-name="_3c_C_3e_"><text:span text:style-name="T10"><text:tab/>fn </text:span></text:span><text:span text:style-name="_3c_C_2b__2b__3e_"><text:span text:style-name="T13">add</text:span></text:span><text:span text:style-name="_3c_C_3e_"><text:span text:style-name="T10">(self, other: Vect</text:span></text:span><text:span text:style-name="_3c_C_3e_"><text:span text:style-name="T58">or</text:span></text:span><text:span text:style-name="_3c_C_3e_"><text:span text:style-name="T10">3) -&gt; Vect</text:span></text:span><text:span text:style-name="_3c_C_3e_"><text:span text:style-name="T58">or</text:span></text:span><text:span text:style-name="_3c_C_3e_"><text:span text:style-name="T10">3{...}</text:span></text:span></text:p>
      <text:p text:style-name="P36"><text:span text:style-name="_2f__2f_C"><text:span text:style-name="T59">La sobrecarga es con nombre may</text:span></text:span><text:span text:style-name="_2f__2f_C"><text:span text:style-name="T60">ú</text:span></text:span><text:span text:style-name="_2f__2f_C"><text:span text:style-name="T59">scula, y la funci</text:span></text:span><text:span text:style-name="_2f__2f_C"><text:span text:style-name="T60">ón</text:span></text:span><text:span text:style-name="_2f__2f_C"><text:span text:style-name="T59"> en min</text:span></text:span><text:span text:style-name="_2f__2f_C"><text:span text:style-name="T60">ú</text:span></text:span><text:span text:style-name="_2f__2f_C"><text:span text:style-name="T59">scula pero llamada igual. La lista es la siguiente para las sobrecargas (entre par</text:span></text:span><text:span text:style-name="_2f__2f_C"><text:span text:style-name="T60">éntesis el nombre a la función)</text:span></text:span><text:span text:style-name="_2f__2f_C"><text:span text:style-name="T59">:</text:span></text:span></text:p>
      <text:p text:style-name="P37"><text:span text:style-name="_2f__2f_C"><text:span text:style-name="T61">+<text:tab/>-&gt; <text:tab/>Add (add)<text:tab/><text:tab/><text:tab/><text:tab/></text:span></text:span><text:span text:style-name="_2f__2f_C"><text:span text:style-name="T62"><text:tab/><text:tab/><text:tab/><text:tab/></text:span></text:span><text:span text:style-name="_2f__2f_C"><text:span text:style-name="T61">+=<text:tab/>-&gt;<text:tab/><text:tab/>AddAssign (add</text:span></text:span><text:span text:style-name="_2f__2f_C"><text:span text:style-name="T63">_</text:span></text:span><text:span text:style-name="_2f__2f_C"><text:span text:style-name="T61">assign)<text:tab/><text:tab/><text:tab/><text:tab/><text:tab/></text:span></text:span></text:p>
      <text:p text:style-name="P37"><text:span text:style-name="_2f__2f_C"><text:span text:style-name="T61">-<text:tab/>-&gt;<text:tab/></text:span></text:span><text:span text:style-name="_2f__2f_C"><text:span text:style-name="T63"><text:tab/></text:span></text:span><text:span text:style-name="_2f__2f_C"><text:span text:style-name="T61">Sub (sub)</text:span></text:span><text:span text:style-name="_2f__2f_C"><text:span text:style-name="T63"><text:tab/><text:tab/><text:tab/><text:tab/></text:span></text:span><text:span text:style-name="_2f__2f_C"><text:span text:style-name="T62"><text:tab/><text:tab/><text:tab/><text:tab/></text:span></text:span><text:span text:style-name="_2f__2f_C"><text:span text:style-name="T63">-=<text:tab/><text:tab/>-&gt;<text:tab/><text:tab/>SubAssign (sub_assign)</text:span></text:span></text:p>
      <text:p text:style-name="P38"><text:span text:style-name="_2f__2f_C"><text:span text:style-name="T61">*<text:tab/>-&gt;<text:tab/><text:tab/>Mul (mul)</text:span></text:span><text:span text:style-name="_2f__2f_C"><text:span text:style-name="T63"><text:tab/><text:tab/><text:tab/><text:tab/></text:span></text:span><text:span text:style-name="_2f__2f_C"><text:span text:style-name="T62"><text:tab/><text:tab/><text:tab/><text:tab/></text:span></text:span><text:span text:style-name="_2f__2f_C"><text:span text:style-name="T63">*=<text:tab/><text:tab/>-&gt;<text:tab/><text:tab/>MulAssign (mul_assign)</text:span></text:span></text:p>
      <text:p text:style-name="P38"><text:span text:style-name="_2f__2f_C"><text:span text:style-name="T63">/</text:span></text:span><text:span text:style-name="_2f__2f_C"><text:span text:style-name="T64"><text:tab/></text:span></text:span><text:span text:style-name="_2f__2f_C"><text:span text:style-name="T63">-&gt;<text:tab/><text:tab/>Div (div)<text:tab/><text:tab/><text:tab/><text:tab/><text:tab/></text:span></text:span><text:span text:style-name="_2f__2f_C"><text:span text:style-name="T62"><text:tab/><text:tab/><text:tab/><text:tab/></text:span></text:span><text:span text:style-name="_2f__2f_C"><text:span text:style-name="T63">/=<text:tab/><text:tab/>-&gt;<text:tab/><text:tab/>DivAssign<text:tab/>(div_assign)</text:span></text:span></text:p>
      <text:p text:style-name="P38"><text:span text:style-name="_2f__2f_C"><text:span text:style-name="T63">%</text:span></text:span><text:span text:style-name="_2f__2f_C"><text:span text:style-name="T64"> </text:span></text:span><text:span text:style-name="_2f__2f_C"><text:span text:style-name="T63"><text:tab/>-&gt;<text:tab/>Rem </text:span></text:span><text:span text:style-name="_2f__2f_C"><text:span text:style-name="T61">(rem</text:span></text:span><text:span text:style-name="_2f__2f_C"><text:span text:style-name="T63">)</text:span></text:span><text:span text:style-name="_2f__2f_C"><text:span text:style-name="T61"><text:tab/></text:span></text:span><text:span text:style-name="_2f__2f_C"><text:span text:style-name="T63"><text:tab/><text:tab/><text:tab/></text:span></text:span><text:span text:style-name="_2f__2f_C"><text:span text:style-name="T62"><text:tab/><text:tab/><text:tab/><text:tab/></text:span></text:span><text:span text:style-name="_2f__2f_C"><text:span text:style-name="T63">%=<text:tab/>-&gt;<text:tab/><text:tab/>RemAssign (rem_assign)</text:span></text:span></text:p>
      <text:p text:style-name="P39"><text:span text:style-name="_2f__2f_C"><text:span text:style-name="T61">==<text:tab/>-&gt; PartialEq</text:span></text:span><text:span text:style-name="_2f__2f_C"><text:span text:style-name="T62"> (eq)</text:span></text:span><text:span text:style-name="_2f__2f_C"><text:span text:style-name="T61"><text:tab/><text:tab/></text:span></text:span><text:span text:style-name="_2f__2f_C"><text:span text:style-name="T65"><text:tab/><text:tab/><text:tab/></text:span></text:span><text:span text:style-name="_2f__2f_C"><text:span text:style-name="T61"><text:tab/></text:span></text:span><text:span text:style-name="_2f__2f_C"><text:span text:style-name="T62">!=<text:tab/><text:tab/>-&gt;<text:tab/><text:tab/>PartialEq (</text:span></text:span><text:span text:style-name="_2f__2f_C"><text:span text:style-name="T66">ne</text:span></text:span><text:span text:style-name="_2f__2f_C"><text:span text:style-name="T62">)</text:span></text:span></text:p>
      <text:p text:style-name="P40"><text:span text:style-name="_2f__2f_C"><text:span text:style-name="T61">[ ]</text:span></text:span><text:span text:style-name="_2f__2f_C"><text:span text:style-name="T62"><text:tab/><text:tab/>-&gt;</text:span></text:span><text:span text:style-name="_2f__2f_C"><text:span text:style-name="T64"> </text:span></text:span><text:span text:style-name="_2f__2f_C"><text:span text:style-name="T62">Index (index)</text:span></text:span><text:span text:style-name="_2f__2f_C"><text:span text:style-name="T64"><text:tab/></text:span></text:span><text:span text:style-name="_2f__2f_C"><text:span text:style-name="T61"><text:tab/><text:tab/></text:span></text:span><text:span text:style-name="_2f__2f_C"><text:span text:style-name="T62"><text:tab/><text:tab/><text:tab/><text:tab/>[ ] =<text:tab/>-&gt;<text:tab/><text:tab/>IndexMut (index_mut)</text:span></text:span></text:p>
      <text:p text:style-name="P40"><text:span text:style-name="_2f__2f_C"><text:span text:style-name="T64">-x<text:tab/><text:tab/>-&gt; Neg (neg)<text:tab/><text:tab/><text:tab/><text:tab/><text:tab/><text:tab/><text:tab/><text:tab/>!x = -&gt;<text:tab/><text:tab/>Not (not)</text:span></text:span></text:p>
      <text:p text:style-name="P41"><text:span text:style-name="_2f__2f_C"><text:span text:style-name="T64">&amp;<text:tab/><text:tab/>-&gt; BitAnd (bitand)<text:tab/><text:tab/><text:tab/><text:tab/><text:tab/></text:span></text:span><text:span text:style-name="_2f__2f_C"><text:span text:style-name="T67"><text:tab/></text:span></text:span><text:span text:style-name="_2f__2f_C"><text:span text:style-name="T65">&amp;=</text:span></text:span><text:span text:style-name="_2f__2f_C"><text:span text:style-name="T64"><text:tab/>-&gt;<text:tab/><text:tab/></text:span></text:span><text:span text:style-name="_2f__2f_C"><text:span text:style-name="T65">BitAndAssign (bit_and_assign)</text:span></text:span></text:p>
      <text:p text:style-name="P41"><text:span text:style-name="_2f__2f_C"><text:span text:style-name="T65">|<text:tab/><text:tab/>-&gt; BitOr (bitor)<text:tab/><text:tab/><text:tab/><text:tab/><text:tab/><text:tab/><text:tab/>|=<text:tab/><text:tab/>-&gt;<text:tab/><text:tab/>BitOrAssign (bit_or_assign)</text:span></text:span></text:p>
      <text:p text:style-name="P41"><text:span text:style-name="_2f__2f_C"><text:span text:style-name="T65">^<text:tab/><text:tab/>-&gt;<text:tab/>BitXor (bitxor)<text:tab/><text:tab/><text:tab/><text:tab/><text:tab/><text:tab/>^=<text:tab/>-&gt;<text:tab/><text:tab/>BitXorAssign (bit_xor_assign)</text:span></text:span></text:p>
      <text:p text:style-name="P41"><text:span text:style-name="_2f__2f_C"><text:span text:style-name="T65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41"><text:span text:style-name="_2f__2f_C"><text:span text:style-name="T65">&gt;&gt;<text:tab/>-&gt;<text:tab/>Shr<text:tab/>(shr)<text:tab/><text:tab/><text:tab/><text:tab/><text:tab/><text:tab/><text:tab/><text:tab/>&gt;&gt;=<text:tab/>-&gt;<text:tab/><text:tab/>ShrAssign (shr_assign)</text:span></text:span></text:p>
      <text:p text:style-name="P41"><text:span text:style-name="_2f__2f_C"><text:span text:style-name="T65">*x<text:tab/><text:tab/>-&gt;<text:tab/>Deref (deref)<text:tab/><text:tab/><text:tab/><text:tab/><text:tab/><text:tab/><text:tab/>*x=<text:tab/>-&gt;<text:tab/><text:tab/>DerefMut (deref_mut)</text:span></text:span></text:p>
      <text:p text:style-name="P41"><text:span text:style-name="_2f__2f_C"><text:span text:style-name="T65">x..y<text:tab/>-&gt;<text:tab/>Range </text:span></text:span><text:span text:style-name="_2f__2f_C"><text:span text:style-name="T66">(no hay</text:span></text:span><text:span text:style-name="_2f__2f_C"><text:span text:style-name="T65">)<text:tab/><text:tab/><text:tab/></text:span></text:span><text:span text:style-name="_2f__2f_C"><text:span text:style-name="T66"><text:tab/><text:tab/></text:span></text:span><text:span text:style-name="_2f__2f_C"><text:span text:style-name="T65"><text:tab/>()<text:tab/>-&gt;<text:tab/><text:tab/>Fn, FnMut, FnOnce (</text:span></text:span><text:span text:style-name="_2f__2f_C"><text:span text:style-name="T66">call</text:span></text:span><text:span text:style-name="_2f__2f_C"><text:span text:style-name="T65">)</text:span></text:span></text:p>
      <text:p text:style-name="P42"><text:span text:style-name="_2f__2f_C"><text:span text:style-name="T59"><text:tab/></text:span></text:span><text:span text:style-name="_2f__2f_C"><text:span text:style-name="T65"><text:tab/><text:tab/><text:tab/></text:span></text:span><text:span text:style-name="_2f__2f_C"><text:span text:style-name="T61">&lt;, &lt;=, &gt;, &gt;=<text:tab/>-&gt; PartialOrd (partial_cm</text:span></text:span><text:span text:style-name="_2f__2f_C"><text:span text:style-name="T66">p</text:span></text:span><text:span text:style-name="_2f__2f_C"><text:span text:style-name="T62">)</text:span></text:span><text:span text:style-name="_2f__2f_C"><text:span text:style-name="T61"><text:tab/><text:tab/></text:span></text:span></text:p>
      <text:p text:style-name="P42"><text:span text:style-name="_2f__2f_C"><text:span text:style-name="T61"/></text:span></text:p>
      <text:p text:style-name="P43"><text:span text:style-name="_2f__2f_C"><text:span text:style-name="T68">Para alterar el orden por ejemplo en una multiplicacion de un Vector3 por ejemplo seria:<text:line-break/><text:line-break/>2 * v1</text:span></text:span></text:p>
      <text:p text:style-name="P43"><text:span text:style-name="_3c_C_3e_"><text:span text:style-name="T10">impl<text:tab/><text:tab/>Mul&lt;Vect3&gt; for i32{</text:span></text:span></text:p>
      <text:p text:style-name="P43"><text:span text:style-name="_3c_C_3e_"><text:span text:style-name="T10"><text:tab/>type Output = Vect3</text:span></text:span></text:p>
      <text:p text:style-name="P43"><text:span text:style-name="_3c_C_3e_"><text:span text:style-name="T10"><text:tab/>fn mul(self, other: Vect3) -&gt; Vect3{</text:span></text:span></text:p>
      <text:p text:style-name="P43"><text:span text:style-name="_3c_C_3e_"><text:span text:style-name="T10"><text:tab/><text:tab/>return Vect3 {x: self * other.x, y: self * other.y, z: self * other.z}; //hay return, entonces hay ;</text:span></text:span></text:p>
      <text:p text:style-name="P43"><text:span text:style-name="_3c_C_3e_"><text:span text:style-name="T10"><text:tab/>}</text:span></text:span></text:p>
      <text:p text:style-name="P43"><text:soft-page-break/><text:span text:style-name="_3c_C_3e_"><text:span text:style-name="T10">}</text:span></text:span></text:p>
      <text:p text:style-name="P44"><text:span text:style-name="_2f__2f_C"><text:span text:style-name="T69">v1 * 2</text:span></text:span></text:p>
      <text:p text:style-name="P44"><text:span text:style-name="_3c_C_3e_"><text:span text:style-name="T10">impl Mul&lt;i32&gt; for Vect3{</text:span></text:span></text:p>
      <text:p text:style-name="P44"><text:span text:style-name="_3c_C_3e_"><text:span text:style-name="T10"><text:tab/>type Output = Vect3;</text:span></text:span></text:p>
      <text:p text:style-name="P44"><text:span text:style-name="_3c_C_3e_"><text:span text:style-name="T10"><text:tab/>fn mul(self, n: i32) -&gt; Vect3{</text:span></text:span></text:p>
      <text:p text:style-name="P44"><text:span text:style-name="_3c_C_3e_"><text:span text:style-name="T10"><text:tab/><text:tab/>Vect3 {x: self.x * n , y: self.y * n, z: self.z * n} //no hay return no hay ;</text:span></text:span></text:p>
      <text:p text:style-name="P44"><text:span text:style-name="_3c_C_3e_"><text:span text:style-name="T10"><text:tab/>}</text:span></text:span></text:p>
      <text:p text:style-name="P44"><text:span text:style-name="_3c_C_3e_"><text:span text:style-name="T10">}</text:span></text:span></text:p>
      <text:p text:style-name="P44"><text:span text:style-name="_2f__2f_C"><text:span text:style-name="T69">El formato es:<text:line-break/></text:span></text:span></text:p>
      <text:p text:style-name="P44"><text:span text:style-name="_3c_C_3e_"><text:span text:style-name="T10">impl Trait</text:span></text:span><text:span text:style-name="_3c_C_2b__2b__3e_"><text:span text:style-name="T13">&lt;RightHandElement&gt;</text:span></text:span><text:span text:style-name="_3c_C_3e_"><text:span text:style-name="T10"> for </text:span></text:span><text:span text:style-name="_3c_C_2b__2b__3e_"><text:span text:style-name="T13">LeftHandElement</text:span></text:span></text:p>
      <text:p text:style-name="P44"><text:span text:style-name="_2f__2f_C"><text:span text:style-name="T69">entonces el self es del tipo del LeftHandElement</text:span></text:span></text:p>
      <text:p text:style-name="P43"><text:span text:style-name="_2f__2f_C"><text:span text:style-name="T68"/></text:span></text:p>
      <text:p text:style-name="P36"><text:span text:style-name="_3c_C_3e_"><text:span text:style-name="T10"/></text:span></text:p>
      <text:h text:style-name="P45" text:outline-level="3"><text:span text:style-name="_3c_C_3e_"><text:span text:style-name="T70">WHILE</text:span></text:span></text:h>
      <text:p text:style-name="P46"><text:span text:style-name="_2f__2f_C"><text:span text:style-name="T71">El bucle while es:</text:span></text:span></text:p>
      <text:p text:style-name="P46"><text:span text:style-name="_3c_C_3e_"><text:span text:style-name="T10">let mut i: u32 = 1;<text:line-break/></text:span></text:span><text:span text:style-name="_3c_C_2b__2b__3e_"><text:span text:style-name="T13">while i &lt; 10 &amp;&amp; i &gt; 0</text:span></text:span><text:span text:style-name="_3c_C_3e_"><text:span text:style-name="T10">{</text:span></text:span></text:p>
      <text:p text:style-name="P46"><text:span text:style-name="_3c_C_3e_"><text:span text:style-name="T10"><text:tab/>....</text:span></text:span></text:p>
      <text:p text:style-name="P46"><text:span text:style-name="_3c_C_3e_"><text:span text:style-name="T10"><text:tab/>i += 1;</text:span></text:span></text:p>
      <text:p text:style-name="P46"><text:span text:style-name="_3c_C_3e_"><text:span text:style-name="T10">}</text:span></text:span></text:p>
      <text:p text:style-name="P47"><text:span text:style-name="_2f__2f_C"><text:span text:style-name="T72">La condici</text:span></text:span><text:span text:style-name="_2f__2f_C"><text:span text:style-name="T73">ón</text:span></text:span><text:span text:style-name="_2f__2f_C"><text:span text:style-name="T72"> nunca va entre par</text:span></text:span><text:span text:style-name="_2f__2f_C"><text:span text:style-name="T73">é</text:span></text:span><text:span text:style-name="_2f__2f_C"><text:span text:style-name="T72">ntesis para evitar la confusi</text:span></text:span><text:span text:style-name="_2f__2f_C"><text:span text:style-name="T73">ón</text:span></text:span><text:span text:style-name="_2f__2f_C"><text:span text:style-name="T72"> de C ya que en rust la condici</text:span></text:span><text:span text:style-name="_2f__2f_C"><text:span text:style-name="T73">ón</text:span></text:span><text:span text:style-name="_2f__2f_C"><text:span text:style-name="T72"> es una expresi</text:span></text:span><text:span text:style-name="_2f__2f_C"><text:span text:style-name="T73">ón</text:span></text:span><text:span text:style-name="_2f__2f_C"><text:span text:style-name="T72"> booleana. Esto es un error:</text:span></text:span></text:p>
      <text:p text:style-name="P47"><text:span text:style-name="_3c_C_3e_"><text:span text:style-name="T10">while 5</text:span></text:span><text:span text:style-name="_2f__2f_C"><text:span text:style-name="T72"> o </text:span></text:span><text:span text:style-name="_3c_C_3e_"><text:span text:style-name="T10">while (5)</text:span></text:span></text:p>
      <text:h text:style-name="P45" text:outline-level="3"><text:span text:style-name="_3c_C_3e_"><text:span text:style-name="T74"/></text:span></text:h>
      <text:h text:style-name="P45" text:outline-level="3"><text:span text:style-name="_3c_C_3e_"><text:span text:style-name="T74"/></text:span></text:h>
      <text:h text:style-name="P45" text:outline-level="3"><text:span text:style-name="_3c_C_3e_"><text:span text:style-name="T70">LOOP</text:span></text:span></text:h>
      <text:p text:style-name="P46"><text:span text:style-name="_2f__2f_C"><text:span text:style-name="T71">loop es infinito a no ser que se saque</text:span></text:span></text:p>
      <text:p text:style-name="P46"><text:span text:style-name="_3c_C_2b__2b__3e_"><text:span text:style-name="T13">loop</text:span></text:span><text:span text:style-name="_3c_C_3e_"><text:span text:style-name="T10"> {</text:span></text:span></text:p>
      <text:p text:style-name="P46"><text:span text:style-name="_3c_C_3e_"><text:span text:style-name="T10"><text:tab/>codigo();</text:span></text:span></text:p>
      <text:p text:style-name="P46"><text:span text:style-name="_3c_C_3e_"><text:span text:style-name="T10"><text:tab/>if !condicion {</text:span></text:span></text:p>
      <text:p text:style-name="P46"><text:span text:style-name="_3c_C_3e_"><text:span text:style-name="T10"><text:tab/><text:tab/>break; </text:span></text:span><text:span text:style-name="_2f__2f_C"><text:span text:style-name="T10">// asi sale</text:span></text:span></text:p>
      <text:p text:style-name="P46"><text:span text:style-name="_3c_C_3e_"><text:span text:style-name="T10"><text:tab/>}</text:span></text:span></text:p>
      <text:p text:style-name="P46"><text:soft-page-break/><text:span text:style-name="_3c_C_3e_"><text:span text:style-name="T10">}</text:span></text:span></text:p>
      <text:p text:style-name="P46"><text:span text:style-name="_3c_C_3e_"><text:span text:style-name="T10"/></text:span></text:p>
      <text:h text:style-name="P48" text:outline-level="3"><text:span text:style-name="_3c_C_3e_"><text:span text:style-name="T75">FOR</text:span></text:span></text:h>
      <text:p text:style-name="P47"><text:span text:style-name="_2f__2f_C"><text:span text:style-name="T72">El for en Rust es bajo iteradores</text:span></text:span></text:p>
      <text:p text:style-name="P47"><text:span text:style-name="_3c_C_2b__2b__3e_"><text:span text:style-name="T13">for elemento in iterable {...}</text:span></text:span></text:p>
      <text:p text:style-name="P47"><text:span text:style-name="_2f__2f_C"><text:span text:style-name="T72">Por ejemplo:</text:span></text:span></text:p>
      <text:p text:style-name="P47"><text:span text:style-name="_3c_C_2b__2b__3e_"><text:span text:style-name="T13">for i in 0..10{</text:span></text:span><text:span text:style-name="_3c_C_3e_"><text:span text:style-name="T10"> ... }</text:span></text:span><text:span text:style-name="_3c_C_2b__2b__3e_"><text:span text:style-name="T13"> </text:span></text:span><text:span text:style-name="_2f__2f_C"><text:span text:style-name="T13">//i va de 0 a 9</text:span></text:span></text:p>
      <text:p text:style-name="P49"><text:span text:style-name="_3c_C_2b__2b__3e_"><text:span text:style-name="T13">for i in 0..</text:span></text:span><text:span text:style-name="_3c_C_2b__2b__3e_"><text:span text:style-name="T76">=</text:span></text:span><text:span text:style-name="_3c_C_2b__2b__3e_"><text:span text:style-name="T13">10{</text:span></text:span><text:span text:style-name="_3c_C_3e_"><text:span text:style-name="T10"> ... }</text:span></text:span><text:span text:style-name="_3c_C_2b__2b__3e_"><text:span text:style-name="T13"> </text:span></text:span><text:span text:style-name="_2f__2f_C"><text:span text:style-name="T13">//i va de 0 a </text:span></text:span><text:span text:style-name="_2f__2f_C"><text:span text:style-name="T76">10</text:span></text:span></text:p>
      <text:p text:style-name="P47"><text:span text:style-name="_2f__2f_C"><text:span text:style-name="T72">o con matrices:</text:span></text:span></text:p>
      <text:p text:style-name="P47"><text:span text:style-name="_3c_C_3e_"><text:span text:style-name="T10">let v = [1, 2, 3];</text:span></text:span></text:p>
      <text:p text:style-name="P47"><text:span text:style-name="_3c_C_2b__2b__3e_"><text:span text:style-name="T13">for i in v</text:span></text:span><text:span text:style-name="_3c_C_3e_"><text:span text:style-name="T10">{ ... }</text:span></text:span></text:p>
      <text:p text:style-name="P50"><text:span text:style-name="_2f__2f_C"><text:span text:style-name="T77">Si queremos ir en inversa debemos aplicar el método .rev()</text:span></text:span><text:span text:style-name="_2f__2f_C"><text:span text:style-name="T72">:</text:span></text:span></text:p>
      <text:p text:style-name="P50"><text:span text:style-name="_3c_C_2b__2b__3e_"><text:span text:style-name="T13">for i in </text:span></text:span><text:span text:style-name="_3c_C_2b__2b__3e_"><text:span text:style-name="T78">(</text:span></text:span><text:span text:style-name="_3c_C_2b__2b__3e_"><text:span text:style-name="T13">0..10</text:span></text:span><text:span text:style-name="_3c_C_2b__2b__3e_"><text:span text:style-name="T78">).rev()</text:span></text:span><text:span text:style-name="_3c_C_2b__2b__3e_"><text:span text:style-name="T13">{</text:span></text:span><text:span text:style-name="_3c_C_3e_"><text:span text:style-name="T10"> ... }</text:span></text:span><text:span text:style-name="_3c_C_2b__2b__3e_"><text:span text:style-name="T13"> </text:span></text:span><text:span text:style-name="_2f__2f_C"><text:span text:style-name="T10">//i va de </text:span></text:span><text:span text:style-name="_2f__2f_C"><text:span text:style-name="T79">9 a 0. </text:span></text:span><text:span text:style-name="_2f__2f_C"><text:span text:style-name="T80">Tiene que ponerse los paréntesis para que se forme el grupo primero.</text:span></text:span></text:p>
      <text:p text:style-name="P47"><text:span text:style-name="_3c_C_3e_"><text:span text:style-name="T10"/></text:span></text:p>
      <text:h text:style-name="P51" text:outline-level="3"><text:span text:style-name="_3c_C_3e_"><text:span text:style-name="T81">COLLECTIONS (contenedores)</text:span></text:span></text:h>
      <text:p text:style-name="P52"><text:span text:style-name="_2f__2f_C"><text:span text:style-name="T82">Como en C++ tenemos contenedores:</text:span></text:span></text:p>
      <text:p text:style-name="P52"><text:span text:style-name="_2f__2f_C"><text:span text:style-name="T82"/></text:span></text:p>
      <text:p text:style-name="P53"><text:span text:style-name="_2f__2f_C"><text:span text:style-name="T83">1. VECTOR DINAMICO:</text:span></text:span></text:p>
      <text:p text:style-name="P53"><text:span text:style-name="_3c_C_3e_"><text:span text:style-name="T10">let mut v = </text:span></text:span><text:span text:style-name="_3c_C_2b__2b__3e_"><text:span text:style-name="T13">Vec::new();</text:span></text:span></text:p>
      <text:p text:style-name="P53"><text:span text:style-name="_3c_C_3e_"><text:span text:style-name="T10">v.push(1);</text:span></text:span><text:span text:style-name="_3c_C_3e_"><text:span text:style-name="T84"> </text:span></text:span><text:span text:style-name="_2f__2f_C"><text:span text:style-name="T84">//mete el 1</text:span></text:span></text:p>
      <text:p text:style-name="P53"><text:span text:style-name="_3c_C_3e_"><text:span text:style-name="T10">v.push(2);</text:span></text:span><text:span text:style-name="_3c_C_3e_"><text:span text:style-name="T84"> </text:span></text:span><text:span text:style-name="_2f__2f_C"><text:span text:style-name="T84">//mete el 2 detrás del 1.</text:span></text:span></text:p>
      <text:p text:style-name="P54"><text:span text:style-name="_3c_C_3e_"><text:span text:style-name="T10">v.pop(); </text:span></text:span><text:span text:style-name="_2f__2f_C"><text:span text:style-name="T10">// quita el 2 (el ultimo)</text:span></text:span><text:span text:style-name="_2f__2f_C"><text:span text:style-name="T84"> Devuelve un Option&lt;T&gt;</text:span></text:span></text:p>
      <text:p text:style-name="P54"><text:span text:style-name="_2f__2f_C"><text:span text:style-name="T85">Para acceder a los datos se puede usar:</text:span></text:span></text:p>
      <text:p text:style-name="P54"><text:span text:style-name="_3c_C_3e_"><text:span text:style-name="T10">v[i]; </text:span></text:span><text:span text:style-name="_2f__2f_C"><text:span text:style-name="T10">//puede ser panic</text:span></text:span></text:p>
      <text:p text:style-name="P54"><text:span text:style-name="_3c_C_3e_"><text:span text:style-name="T10">v.get(i);</text:span></text:span><text:span text:style-name="_2f__2f_C"><text:span text:style-name="T10"> //seguro.</text:span></text:span></text:p>
      <text:p text:style-name="P54"><text:span text:style-name="_2f__2f_C"><text:span text:style-name="T85">El tamaño es con:</text:span></text:span></text:p>
      <text:p text:style-name="P54"><text:span text:style-name="_3c_C_3e_"><text:span text:style-name="T10">v.len();</text:span></text:span></text:p>
      <text:p text:style-name="P55"><text:span text:style-name="_2f__2f_C"><text:span text:style-name="T86">Se puede usar iteradores:</text:span></text:span></text:p>
      <text:p text:style-name="P55"><text:span text:style-name="_3c_C_3e_"><text:span text:style-name="T10">let mut it = v</text:span></text:span><text:span text:style-name="_3c_C_2b__2b__3e_"><text:span text:style-name="T13">.iter();</text:span></text:span></text:p>
      <text:p text:style-name="P55"><text:span text:style-name="_3c_C_2b__2b__3e_"><text:span text:style-name="T13">it.next();</text:span></text:span><text:span text:style-name="_3c_C_3e_"><text:span text:style-name="T10"> //es el siguiente.</text:span></text:span></text:p>
      <text:p text:style-name="P55"><text:span text:style-name="_3c_C_2b__2b__3e_"><text:span text:style-name="T13">it.next_back()</text:span></text:span><text:span text:style-name="_3c_C_3e_"><text:span text:style-name="T10">; es el anterior.</text:span></text:span></text:p>
      <text:p text:style-name="P55"><text:span text:style-name="_2f__2f_C"><text:span text:style-name="T86">Los dos devuelven Option&lt;&amp;T&gt;</text:span></text:span><text:span text:style-name="_2f__2f_C"><text:span text:style-name="T87"> por lo tanto para usarlos:</text:span></text:span></text:p>
      <text:p text:style-name="P56"><text:soft-page-break/><text:span text:style-name="_3c_C_3e_"><text:span text:style-name="T10">if let Some(x) = it.next(){...}</text:span></text:span></text:p>
      <text:p text:style-name="P55"><text:span text:style-name="_2f__2f_C"><text:span text:style-name="T86"/></text:span></text:p>
      <text:p text:style-name="P53"><text:span text:style-name="_3c_C_3e_"><text:span text:style-name="T10"/></text:span></text:p>
      <text:p text:style-name="P53"><text:span text:style-name="_3c_C_3e_"><text:span text:style-name="T10"/></text:span></text:p>
      <text:p text:style-name="P53"><text:span text:style-name="_2f__2f_C"><text:span text:style-name="T88">2. ARRAYS</text:span></text:span></text:p>
      <text:p text:style-name="P53"><text:span text:style-name="_2f__2f_C"><text:span text:style-name="T88"/></text:span></text:p>
      <text:p text:style-name="P53"><text:span text:style-name="_2f__2f_C"><text:span text:style-name="T88">3. STRING</text:span></text:span></text:p>
      <text:p text:style-name="P53"><text:span text:style-name="_2f__2f_C"><text:span text:style-name="T88"/></text:span></text:p>
      <text:p text:style-name="P53"><text:span text:style-name="_2f__2f_C"><text:span text:style-name="T88">4. HASHMAP</text:span></text:span></text:p>
      <text:p text:style-name="P53"><text:span text:style-name="_2f__2f_C"><text:span text:style-name="T88"/></text:span></text:p>
      <text:p text:style-name="P53"><text:span text:style-name="_2f__2f_C"><text:span text:style-name="T88">5. VECDEQUE</text:span></text:span></text:p>
      <text:p text:style-name="P53"><text:span text:style-name="_2f__2f_C"><text:span text:style-name="T88"/></text:span></text:p>
      <text:p text:style-name="P53"><text:span text:style-name="_2f__2f_C"><text:span text:style-name="T88">6. HASHSET</text:span></text:span></text:p>
      <text:p text:style-name="P53"><text:span text:style-name="_2f__2f_C"><text:span text:style-name="T88"/></text:span></text:p>
      <text:p text:style-name="P53"><text:span text:style-name="_2f__2f_C"><text:span text:style-name="T88">7. BTREEMAP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0:34:38.234000000</meta:creation-date>
    <dc:date>2026-07-02T18:29:50.472450198</dc:date>
    <meta:editing-duration>P3DT3H55M56S</meta:editing-duration>
    <meta:editing-cycles>460</meta:editing-cycles>
    <meta:generator>LibreOffice/26.2.4.2$Linux_X86_64 LibreOffice_project/620$Build-2</meta:generator>
    <meta:print-date>2025-01-04T16:07:11.302000000</meta:print-date>
    <meta:printed-by>Archivos PDF</meta:printed-by>
    <meta:document-statistic meta:table-count="0" meta:image-count="0" meta:object-count="0" meta:page-count="9" meta:paragraph-count="214" meta:word-count="1479" meta:character-count="8168" meta:non-whitespace-character-count="6657"/>
  </office:meta>
</office:document-meta>
</file>