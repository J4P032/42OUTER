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14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1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1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17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18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19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20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21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22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3cb13"/>
    </style:style>
    <style:style style:name="P23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24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25" style:family="paragraph" style:parent-style-name="Text_20_body">
      <style:paragraph-properties fo:line-height="100%"/>
      <style:text-properties officeooo:rsid="0216a37b" officeooo:paragraph-rsid="0216a37b"/>
    </style:style>
    <style:style style:name="P26" style:family="paragraph" style:parent-style-name="Text_20_body">
      <style:paragraph-properties fo:line-height="100%"/>
      <style:text-properties officeooo:rsid="0216a37b" officeooo:paragraph-rsid="0216c522"/>
    </style:style>
    <style:style style:name="P27" style:family="paragraph" style:parent-style-name="Text_20_body">
      <style:paragraph-properties fo:line-height="100%"/>
      <style:text-properties officeooo:rsid="0216a37b" officeooo:paragraph-rsid="02171d48"/>
    </style:style>
    <style:style style:name="P28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29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30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31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32" style:family="paragraph" style:parent-style-name="Heading_20_3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3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3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3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3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3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38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39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40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41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42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43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44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45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46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bdc6a"/>
    </style:style>
    <style:style style:name="P47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ce022"/>
    </style:style>
    <style:style style:name="P48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e246b"/>
    </style:style>
    <style:style style:name="P49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38c4"/>
    </style:style>
    <style:style style:name="P50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b6a2"/>
    </style:style>
    <style:style style:name="P51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00a0c"/>
    </style:style>
    <style:style style:name="P52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font-weight="normal" officeooo:rsid="021d5bcc" fo:background-color="transparent" loext:char-shading-value="0"/>
    </style:style>
    <style:style style:name="T12" style:family="text">
      <style:text-properties style:text-underline-style="none" fo:font-weight="normal" officeooo:rsid="021fa2ef" fo:background-color="transparent" loext:char-shading-value="0"/>
    </style:style>
    <style:style style:name="T13" style:family="text">
      <style:text-properties style:text-underline-style="none" fo:font-weight="normal" officeooo:rsid="0229133e" fo:background-color="transparent" loext:char-shading-value="0"/>
    </style:style>
    <style:style style:name="T14" style:family="text">
      <style:text-properties style:text-underline-style="none" fo:font-weight="normal" officeooo:rsid="022bdc6a" fo:background-color="transparent" loext:char-shading-value="0"/>
    </style:style>
    <style:style style:name="T15" style:family="text">
      <style:text-properties style:text-underline-style="none" fo:font-weight="normal" officeooo:rsid="022e246b" fo:background-color="transparent" loext:char-shading-value="0"/>
    </style:style>
    <style:style style:name="T16" style:family="text">
      <style:text-properties style:text-underline-style="none" fo:font-weight="normal" officeooo:rsid="02300a0c" fo:background-color="transparent" loext:char-shading-value="0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216a37b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20ebc40" fo:background-color="transparent" loext:char-shading-value="0"/>
    </style:style>
    <style:style style:name="T21" style:family="text">
      <style:text-properties fo:font-weight="normal" fo:background-color="transparent" loext:char-shading-value="0"/>
    </style:style>
    <style:style style:name="T22" style:family="text">
      <style:text-properties fo:font-weight="normal" officeooo:rsid="020ebc40" fo:background-color="transparent" loext:char-shading-value="0"/>
    </style:style>
    <style:style style:name="T23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24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5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6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27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28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4" style:family="text">
      <style:text-properties fo:color="#ffffff" loext:opacity="100%" fo:font-size="14pt" fo:font-weight="normal" officeooo:rsid="021c3799" style:font-size-asian="14pt" style:font-size-complex="14pt"/>
    </style:style>
    <style:style style:name="T35" style:family="text">
      <style:text-properties fo:color="#ffffff" loext:opacity="100%" fo:font-size="14pt" fo:font-weight="normal" officeooo:rsid="022b8b4d" style:font-size-asian="14pt" style:font-size-complex="14pt"/>
    </style:style>
    <style:style style:name="T36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37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38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39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40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41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42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3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4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47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8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49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50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53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54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55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58" style:family="text">
      <style:text-properties fo:color="#ffffff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61" style:family="text">
      <style:text-properties fo:color="#ffffff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62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63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64" style:family="text">
      <style:text-properties fo:color="#ffffff" loext:opacity="100%" officeooo:rsid="0207f6ae"/>
    </style:style>
    <style:style style:name="T65" style:family="text">
      <style:text-properties fo:color="#ffffff" loext:opacity="100%" style:font-name="Arial1" style:text-underline-style="none" officeooo:rsid="0216c522"/>
    </style:style>
    <style:style style:name="T66" style:family="text">
      <style:text-properties fo:color="#ffffff" loext:opacity="100%" fo:font-weight="normal" officeooo:rsid="02212731"/>
    </style:style>
    <style:style style:name="T67" style:family="text">
      <style:text-properties officeooo:rsid="0207f6ae"/>
    </style:style>
    <style:style style:name="T68" style:family="text">
      <style:text-properties officeooo:rsid="020908b2"/>
    </style:style>
    <style:style style:name="T69" style:family="text">
      <style:text-properties officeooo:rsid="0216a37b"/>
    </style:style>
    <style:style style:name="T70" style:family="text">
      <style:text-properties officeooo:rsid="0216c522"/>
    </style:style>
    <style:style style:name="T71" style:family="text">
      <style:text-properties officeooo:rsid="02171d48"/>
    </style:style>
    <style:style style:name="T72" style:family="text">
      <style:text-properties fo:color="#469df9" loext:opacity="100%" style:font-name="Arial" fo:font-size="10pt" officeooo:rsid="02171d48" style:font-size-asian="10pt" style:font-size-complex="10pt"/>
    </style:style>
    <style:style style:name="T73" style:family="text">
      <style:text-properties officeooo:rsid="02259ec8"/>
    </style:style>
    <style:style style:name="T74" style:family="text">
      <style:text-properties officeooo:rsid="0226a567"/>
    </style:style>
    <style:style style:name="T75" style:family="text">
      <style:text-properties officeooo:rsid="0227dcad"/>
    </style:style>
    <style:style style:name="T76" style:family="text">
      <style:text-properties fo:color="#c9211e" loext:opacity="100%" style:text-underline-style="none" fo:font-weight="normal" officeooo:rsid="022bdc6a" fo:background-color="transparent" loext:char-shading-value="0"/>
    </style:style>
    <style:style style:name="T77" style:family="text">
      <style:text-properties fo:color="#c9211e" loext:opacity="100%" style:text-underline-style="none" fo:font-weight="normal" officeooo:rsid="022e246b" fo:background-color="transparent" loext:char-shading-value="0"/>
    </style:style>
    <style:style style:name="T78" style:family="text">
      <style:text-properties fo:color="#c9211e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79" style:family="text">
      <style:text-properties fo:color="#c9211e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0" style:family="text">
      <style:text-properties fo:color="#c9211e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81" style:family="text">
      <style:text-properties fo:color="#c9211e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2" style:family="text">
      <style:text-properties fo:color="#c9211e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3" style:family="text">
      <style:text-properties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4" style:family="text">
      <style:text-properties fo:font-size="14pt" style:text-underline-style="none" fo:font-weight="normal" officeooo:rsid="022e246b" fo:background-color="transparent" loext:char-shading-value="0" style:font-size-asian="14pt" style:font-size-complex="14pt"/>
    </style:style>
    <style:style style:name="T85" style:family="text">
      <style:text-properties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6" style:family="text">
      <style:text-properties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7" style:family="text">
      <style:text-properties fo:font-size="14pt" style:text-underline-style="none" fo:font-weight="normal" officeooo:rsid="022fb6a2" fo:background-color="transparent" loext:char-shading-value="0" style:font-size-asian="14pt" style:font-size-complex="14pt"/>
    </style:style>
    <style:style style:name="T88" style:family="text">
      <style:text-properties fo:color="#e6e905" loext:opacity="100%" style:text-underline-style="none" fo:font-weight="normal" officeooo:rsid="022bdc6a" fo:background-color="transparent" loext:char-shading-value="0"/>
    </style:style>
    <style:style style:name="T89" style:family="text">
      <style:text-properties fo:color="#e6e905" loext:opacity="100%" style:text-underline-style="none" fo:font-weight="normal" officeooo:rsid="022e246b" fo:background-color="transparent" loext:char-shading-value="0"/>
    </style:style>
    <style:style style:name="T90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91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92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93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94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95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96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67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9">La declaraci</text:span></text:span><text:span text:style-name="_2f__2f_C"><text:span text:style-name="T23">ón</text:span></text:span><text:span text:style-name="_2f__2f_C"><text:span text:style-name="T29"> de la variable es inversa a c:</text:span></text:span></text:p>
      <text:p text:style-name="P3"><text:span text:style-name="_3c_C_2b__2b__3e_"><text:span text:style-name="T19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64">Los tipos en comparativa:</text:span></text:span></text:p>
      <text:p text:style-name="P3"><text:span text:style-name="_3c_C_2b__2b__3e_"><text:span text:style-name="T64"/></text:span></text:p>
      <text:p text:style-name="P3"><text:span text:style-name="_3c_C_2b__2b__3e_"><text:span text:style-name="T67">int<text:tab/><text:tab/><text:tab/>-&gt; i32</text:span></text:span><text:span text:style-name="_3c_C_2b__2b__3e_"><text:span text:style-name="T6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67">long <text:tab/><text:tab/>-&gt; i64</text:span></text:span><text:span text:style-name="_3c_C_2b__2b__3e_"><text:span text:style-name="T68"><text:tab/><text:tab/><text:tab/><text:tab/><text:tab/>bool<text:tab/><text:tab/><text:tab/><text:tab/>-&gt; bool</text:span></text:span></text:p>
      <text:p text:style-name="P3"><text:span text:style-name="_3c_C_2b__2b__3e_"><text:span text:style-name="T67">float<text:tab/><text:tab/>-&gt; f32</text:span></text:span><text:span text:style-name="_3c_C_2b__2b__3e_"><text:span text:style-name="T68"><text:tab/><text:tab/><text:tab/><text:tab/><text:tab/>char*<text:tab/><text:tab/><text:tab/>-&gt; &amp;str</text:span></text:span></text:p>
      <text:p text:style-name="P3"><text:span text:style-name="_3c_C_2b__2b__3e_"><text:span text:style-name="T67">double<text:tab/>-&gt; f64</text:span></text:span><text:span text:style-name="_3c_C_2b__2b__3e_"><text:span text:style-name="T68"><text:tab/><text:tab/><text:tab/><text:tab/><text:tab/>std::string<text:tab/><text:tab/>-&gt; String</text:span></text:span></text:p>
      <text:p text:style-name="P3"><text:span text:style-name="_3c_C_2b__2b__3e_"><text:span text:style-name="T67">U-Int<text:tab/><text:tab/>-&gt; u32</text:span></text:span></text:p>
      <text:p text:style-name="P3"><text:span text:style-name="_3c_C_2b__2b__3e_"><text:span text:style-name="T67">U-long<text:tab/>-&gt;<text:tab/>u64</text:span></text:span></text:p>
      <text:p text:style-name="P4"><text:span text:style-name="_2f__2f_C"><text:span text:style-name="T39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5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5"><text:span text:style-name="_2f__2f_C"><text:span text:style-name="T40">o</text:span></text:span></text:p>
      <text:p text:style-name="P5"><text:span text:style-name="_3c_C_3e_"><text:span text:style-name="T3">let a: i32 = 42;</text:span></text:span></text:p>
      <text:p text:style-name="P5"><text:span text:style-name="_3c_C_3e_"><text:span text:style-name="T3"/></text:span></text:p>
      <text:p text:style-name="P7"><text:span text:style-name="_3c_C_2b__2b__3e_"><text:span text:style-name="T17">LET</text:span></text:span><text:span text:style-name="_2f__2f_C"><text:span text:style-name="T41"> es para hacer que no pueda variar</text:span></text:span><text:span text:style-name="_2f__2f_C"><text:span text:style-name="T45"> (NO PUEDE SER GLOBAL).</text:span></text:span><text:span text:style-name="_2f__2f_C"><text:span text:style-name="T46"> </text:span></text:span><text:span text:style-name="_3c_C_2b__2b__3e_"><text:span text:style-name="T17">LET</text:span></text:span><text:span text:style-name="_2f__2f_C"><text:span text:style-name="T45"> </text:span></text:span><text:span text:style-name="_3c_C_2b__2b__3e_"><text:span text:style-name="T17">MUT</text:span></text:span><text:span text:style-name="_2f__2f_C"><text:span text:style-name="T41"> para que varie</text:span></text:span><text:span text:style-name="_2f__2f_C"><text:span text:style-name="T45"> (Hay que poner </text:span></text:span><text:span text:style-name="_3c_C_2b__2b__3e_"><text:span text:style-name="T17">let</text:span></text:span><text:span text:style-name="_2f__2f_C"><text:span text:style-name="T45"> delante)</text:span></text:span><text:span text:style-name="_2f__2f_C"><text:span text:style-name="T41">, y </text:span></text:span><text:span text:style-name="_3c_C_2b__2b__3e_"><text:span text:style-name="T17">CONST</text:span></text:span><text:span text:style-name="_2f__2f_C"><text:span text:style-name="T41"> para constante</text:span></text:span><text:span text:style-name="_2f__2f_C"><text:span text:style-name="T45"> (si puede ser global)</text:span></text:span></text:p>
      <text:p text:style-name="P10"><text:span text:style-name="_2f__2f_C"><text:span text:style-name="T44"/></text:span></text:p>
      <text:p text:style-name="P10"><text:span text:style-name="_3c_C_2b__2b__3e_"><text:span text:style-name="T17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0"><text:span text:style-name="_3c_C_2b__2b__3e_"><text:span text:style-name="T17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22"/>
      <text:h text:style-name="P32" text:outline-level="3"/>
      <text:p text:style-name="P23"/>
      <text:h text:style-name="P39" text:outline-level="3"><text:soft-page-break/>MATRICES</text:h>
      <text:p text:style-name="P29">Podemos usar matrices como en C:<text:line-break/></text:p>
      <text:p text:style-name="P29"><text:span text:style-name="_3c_C_2b__2b__3e_">let x: </text:span><text:span text:style-name="_3c_C_2b__2b__3e_"><text:span text:style-name="T75">[i32; 3]</text:span></text:span><text:span text:style-name="_3c_C_2b__2b__3e_"> = [1, 2 , 3];</text:span></text:p>
      <text:p text:style-name="P30"><text:span text:style-name="_2f__2f_C"><text:span text:style-name="T75">//let x = [1, 2, 3]; puede ser asi tambien y el deduciria el tipo.</text:span></text:span></text:p>
      <text:p text:style-name="P29"><text:span text:style-name="_3c_C_3e_">println!("{}", x[1]); </text:span><text:span text:style-name="_2f__2f_C">//imprimiría 2, pero es arriesgado</text:span></text:p>
      <text:p text:style-name="P29"><text:span text:style-name="_3c_C_3e_"><text:span text:style-name="T73">println!("{}", x[7]);</text:span></text:span><text:span text:style-name="_2f__2f_C"> //Entraría en modo "panic" que saldría de forma segura. No soltaria basura</text:span></text:p>
      <text:p text:style-name="P29"><text:span text:style-name="_2f__2f_C"/></text:p>
      <text:p text:style-name="P31">Para hacerlo de forma segura se puede usar </text:p>
      <text:p text:style-name="P31"><text:span text:style-name="_3c_C_2b__2b__3e_">x.get(1)</text:span><text:span text:style-name="_3c_C_3e_">; </text:span><text:span text:style-name="_2f__2f_C">//devolveria "Some(2)" en mayusculas la S</text:span></text:p>
      <text:p text:style-name="P31"><text:span text:style-name="_3c_C_3e_">x.get(7);</text:span><text:span text:style-name="_2f__2f_C"> //devolveria "None" en mayusculas la N</text:span></text:p>
      <text:p text:style-name="P31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74">i</text:span></text:span><text:span text:style-name="_3c_C_2b__2b__3e_">) = x.get(1) </text:span><text:span text:style-name="_3c_C_3e_">{</text:span></text:p>
      <text:p text:style-name="P31"><text:span text:style-name="_3c_C_3e_"><text:tab/>println!("{}", </text:span><text:span text:style-name="_3c_C_3e_"><text:span text:style-name="T74">i</text:span></text:span><text:span text:style-name="_3c_C_3e_"><text:span text:style-name="T75">)</text:span></text:span><text:span text:style-name="_3c_C_3e_">;</text:span></text:p>
      <text:p text:style-name="P31"><text:span text:style-name="_3c_C_3e_">}</text:span><text:span text:style-name="_3c_C_3e_"><text:span text:style-name="T75"> </text:span></text:span><text:span text:style-name="_3c_C_3e_">else {</text:span></text:p>
      <text:p text:style-name="P31"><text:span text:style-name="_3c_C_3e_"><text:tab/>println!("no existe");</text:span></text:p>
      <text:p text:style-name="P31"><text:span text:style-name="_3c_C_3e_">}</text:span></text:p>
      <text:p text:style-name="P31">O en formáto Rust:</text:p>
      <text:p text:style-name="P31"/>
      <text:p text:style-name="P24"><text:span text:style-name="_3c_C_2b__2b__3e_">match x.get(2) {</text:span></text:p>
      <text:p text:style-name="P24"><text:span text:style-name="_3c_C_2b__2b__3e_"><text:tab/>Some(i) =&gt; println!("{}", i),</text:span></text:p>
      <text:p text:style-name="P24"><text:span text:style-name="_3c_C_2b__2b__3e_"><text:tab/>None<text:tab/>=&gt;<text:tab/> println!("No existe"),</text:span></text:p>
      <text:p text:style-name="P24"><text:span text:style-name="_3c_C_2b__2b__3e_">}</text:span></text:p>
      <text:p text:style-name="P23"/>
      <text:h text:style-name="P38" text:outline-level="3">VARIABLES GLOBALES</text:h>
      <text:p text:style-name="P28">El tener una variable global en Rust es <text:s/>un problema, ya que puede haber dataraces para modificarla asi que tiene que estar protegida.. si no no deja. </text:p>
      <text:p text:style-name="P28">La forma clásica es:<text:line-break/></text:p>
      <text:p text:style-name="P25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8"> </text:span></text:span><text:span text:style-name="_2f__2f_C"><text:span text:style-name="T1">//variable global</text:span></text:span></text:p>
      <text:p text:style-name="P25"><text:span text:style-name="_3c_C_3e_"><text:span text:style-name="T69">fn main(){</text:span></text:span></text:p>
      <text:p text:style-name="P25"><text:span text:style-name="_3c_C_3e_"><text:span text:style-name="T69"><text:tab/>if true{</text:span></text:span></text:p>
      <text:p text:style-name="P25"><text:span text:style-name="_3c_C_3e_"><text:span text:style-name="T69"><text:tab/><text:tab/></text:span></text:span><text:span text:style-name="_3c_C_2b__2b__3e_">unsafe{</text:span><text:span text:style-name="_3c_C_3e_"><text:span text:style-name="T69"> A = 10;</text:span></text:span><text:span text:style-name="_3c_C_2b__2b__3e_">}</text:span><text:span text:style-name="_3c_C_2b__2b__3e_"><text:span text:style-name="T69"> </text:span></text:span><text:span text:style-name="_2f__2f_C">//no se recomienda pero permitido</text:span><text:span text:style-name="_2f__2f_C"><text:span text:style-name="T70">. unsafe le dice el compilador que confie en el programador. </text:span></text:span></text:p>
      <text:p text:style-name="P25"><text:span text:style-name="_3c_C_3e_"><text:span text:style-name="T69"><text:tab/>}</text:span></text:span></text:p>
      <text:p text:style-name="P25"><text:soft-page-break/><text:span text:style-name="_3c_C_3e_"><text:span text:style-name="T69">}</text:span></text:span></text:p>
      <text:p text:style-name="P25"><text:span text:style-name="_3c_C_3e_"/></text:p>
      <text:p text:style-name="P26"><text:span text:style-name="_3c_C_2b__2b__3e_"><text:span text:style-name="T1">Unsafe</text:span></text:span><text:span text:style-name="_3c_C_3e_"><text:span text:style-name="T65"> es un peligro.. asi que usamos </text:span></text:span><text:span text:style-name="_3c_C_2b__2b__3e_"><text:span text:style-name="T1">atomic</text:span></text:span><text:span text:style-name="_3c_C_3e_"><text:span text:style-name="T65"> para no provocar dataraces:<text:line-break/></text:span></text:span></text:p>
      <text:p text:style-name="P26"><text:span text:style-name="_3c_C_2b__2b__3e_">use std::sync::atomic::{AtomicI32, ordering}</text:span></text:p>
      <text:p text:style-name="P26"><text:span text:style-name="_3c_C_3e_"><text:span text:style-name="T70">static A: </text:span></text:span><text:span text:style-name="_3c_C_2b__2b__3e_">AtomicI32</text:span><text:span text:style-name="_3c_C_3e_"><text:span text:style-name="T70"> = AtomicI32::new(0); </text:span></text:span><text:span text:style-name="_2f__2f_C"><text:span text:style-name="T70">//no hace reserva de memoria. Solo inicializa a cero</text:span></text:span></text:p>
      <text:p text:style-name="P27"><text:span text:style-name="_3c_C_3e_">fn main() {<text:line-break/></text:span><text:span text:style-name="_3c_C_3e_"><text:span text:style-name="T70"><text:tab/></text:span></text:span><text:span text:style-name="_3c_C_3e_">if true {<text:line-break/></text:span><text:span text:style-name="_3c_C_3e_"><text:span text:style-name="T70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71"> </text:span></text:span><text:span text:style-name="_2f__2f_C"><text:span text:style-name="T71">//Relaxed es el nivel más débil del ordenamiento at</text:span></text:span><text:span text:style-name="_2f__2f_C"><text:span text:style-name="T72">ó</text:span></text:span><text:span text:style-name="_2f__2f_C"><text:span text:style-name="T71">mico. solo </text:span></text:span></text:p>
      <text:p text:style-name="P27"><text:span text:style-name="_2f__2f_C"><text:span text:style-name="T71">me importa modificar el valor, no el orden del tiempo en que se haga.</text:span></text:span><text:span text:style-name="_3c_C_3e_"><text:line-break/></text:span><text:span text:style-name="_3c_C_3e_"><text:span text:style-name="T70"><text:tab/></text:span></text:span><text:span text:style-name="_3c_C_3e_">}<text:line-break/>}</text:span></text:p>
      <text:h text:style-name="P40" text:outline-level="3"/>
      <text:h text:style-name="P41" text:outline-level="3">ESTRUCTURAS</text:h>
      <text:p text:style-name="P4"><text:span text:style-name="_2f__2f_C"><text:span text:style-name="T30">Rust no tiene objectos ni clases, pero s</text:span></text:span><text:span text:style-name="_2f__2f_C"><text:span text:style-name="T24">í </text:span></text:span><text:span text:style-name="_2f__2f_C"><text:span text:style-name="T30">que puede acercarse a ellos con las estructuras. En Rust todo es privado que se declare</text:span></text:span><text:span text:style-name="_2f__2f_C"><text:span text:style-name="T31">. Para hacerlo accesible hay que ponerle la palabra </text:span></text:span><text:span text:style-name="_3c_C_2b__2b__3e_"><text:span text:style-name="T19">pub</text:span></text:span><text:span text:style-name="_2f__2f_C"><text:span text:style-name="T31"> delante. No solo a la estructura</text:span></text:span><text:span text:style-name="_2f__2f_C"><text:span text:style-name="T32">.</text:span></text:span></text:p>
      <text:p text:style-name="P6"><text:span text:style-name="_2f__2f_C"><text:span text:style-name="T32">(</text:span></text:span><text:span text:style-name="_3c_C_3e_"><text:span text:style-name="T21">fichero.rs</text:span></text:span><text:span text:style-name="_2f__2f_C"><text:span text:style-name="T32">)</text:span></text:span></text:p>
      <text:p text:style-name="P6"><text:span text:style-name="_3c_C_2b__2b__3e_"><text:span text:style-name="T19">pub struct </text:span></text:span><text:span text:style-name="_3c_C_2b__2b__3e_"><text:span text:style-name="T20">P</text:span></text:span><text:span text:style-name="_3c_C_3e_"><text:span text:style-name="T21">rueba{</text:span></text:span><text:span text:style-name="_3c_C_3e_"><text:span text:style-name="T22"> </text:span></text:span><text:span text:style-name="_2f__2f_C"><text:span text:style-name="T22">//debe ser CamelCase P mayúscula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1: i32</text:span></text:span><text:span text:style-name="_3c_C_2b__2b__3e_"><text:span text:style-name="T19">,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2: char</text:span></text:span><text:span text:style-name="_3c_C_2b__2b__3e_"><text:span text:style-name="T19">,</text:span></text:span><text:span text:style-name="_3c_C_3e_"><text:span text:style-name="T22"> </text:span></text:span><text:span text:style-name="_2f__2f_C"><text:span text:style-name="T21">//si no son pub estas variables no se puede acceder a ellas</text:span></text:span></text:p>
      <text:p text:style-name="P6"><text:span text:style-name="_3c_C_3e_"><text:span text:style-name="T21">}</text:span></text:span></text:p>
      <text:p text:style-name="P6"><text:span text:style-name="_2f__2f_C"><text:span text:style-name="T32">Importando el </text:span></text:span><text:span text:style-name="_3c_C_3e_"><text:span text:style-name="T21">fichero.rs</text:span></text:span><text:span text:style-name="_2f__2f_C"><text:span text:style-name="T32"> como <text:line-break/></text:span></text:span></text:p>
      <text:p text:style-name="P8"><text:span text:style-name="_2f__2f_C"><text:span text:style-name="T33">(fichero: main.rs)</text:span></text:span></text:p>
      <text:p text:style-name="P6"><text:span text:style-name="_3c_C_2b__2b__3e_"><text:span text:style-name="T19">mod</text:span></text:span><text:span text:style-name="_3c_C_3e_"><text:span text:style-name="T21"> fichero;</text:span></text:span><text:span text:style-name="_3c_C_3e_"><text:span text:style-name="T22"> </text:span></text:span><text:span text:style-name="_2f__2f_C"><text:span text:style-name="T22">//importa el fichero fichero.rs</text:span></text:span></text:p>
      <text:p text:style-name="P6"><text:span text:style-name="_3c_C_3e_"><text:span text:style-name="T21">fn main(){</text:span></text:span></text:p>
      <text:p text:style-name="P6"><text:span text:style-name="_3c_C_3e_"><text:span text:style-name="T21"><text:tab/>let a = fichero::prueba { var1: 42, var2: 'a'</text:span></text:span><text:span text:style-name="_3c_C_3e_"><text:span text:style-name="T22">}</text:span></text:span><text:span text:style-name="_3c_C_3e_"><text:span text:style-name="T21">;</text:span></text:span></text:p>
      <text:p text:style-name="P6"><text:span text:style-name="_3c_C_3e_"><text:span text:style-name="T21">} </text:span></text:span></text:p>
      <text:p text:style-name="P6"><text:span text:style-name="_3c_C_3e_"><text:span text:style-name="T21"/></text:span></text:p>
      <text:p text:style-name="P8"><text:span text:style-name="_2f__2f_C"><text:span text:style-name="T42">Ahora imaginemos que tenemos un archivo.rs que tiene esto:</text:span></text:span></text:p>
      <text:p text:style-name="P8"><text:span text:style-name="_2f__2f_C"><text:span text:style-name="T42">(</text:span></text:span><text:span text:style-name="_3c_C_3e_"><text:span text:style-name="T3">fichero.rs</text:span></text:span><text:span text:style-name="_2f__2f_C"><text:span text:style-name="T42">)</text:span></text:span></text:p>
      <text:p text:style-name="P8"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8"><text:span text:style-name="_3c_C_3e_"><text:span text:style-name="T3"><text:tab/>x: i32,</text:span></text:span></text:p>
      <text:p text:style-name="P8"><text:span text:style-name="_3c_C_3e_"><text:span text:style-name="T3">}</text:span></text:span></text:p>
      <text:p text:style-name="P8"><text:soft-page-break/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8"><text:span text:style-name="_3c_C_3e_"><text:span text:style-name="T9"><text:tab/></text:span></text:span><text:span text:style-name="_3c_C_3e_"><text:span text:style-name="T3">Prueba {x: 56}</text:span></text:span></text:p>
      <text:p text:style-name="P8"><text:span text:style-name="_3c_C_3e_"><text:span text:style-name="T3">}</text:span></text:span></text:p>
      <text:p text:style-name="P8"><text:span text:style-name="_2f__2f_C"><text:span text:style-name="T42">No habr</text:span></text:span><text:span text:style-name="_2f__2f_C"><text:span text:style-name="T25">í</text:span></text:span><text:span text:style-name="_2f__2f_C"><text:span text:style-name="T42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7">impl</text:span></text:span><text:span text:style-name="_3c_C_3e_"><text:span text:style-name="T3"> Prueba{</text:span></text:span></text:p>
      <text:p text:style-name="P8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1"><text:span text:style-name="_2f__2f_C"><text:span text:style-name="T8"><text:tab/>//&amp;self es como los objetos.. o this en c++ va implicito</text:span></text:span></text:p>
      <text:p text:style-name="P11"><text:span text:style-name="_2f__2f_C"><text:span text:style-name="T8"><text:tab/><text:tab/>(self) lo moveria el valor</text:span></text:span></text:p>
      <text:p text:style-name="P11"><text:span text:style-name="_2f__2f_C"><text:span text:style-name="T8"><text:tab/><text:tab/>(&amp;self) es inmutable</text:span></text:span></text:p>
      <text:p text:style-name="P11"><text:span text:style-name="_2f__2f_C"><text:span text:style-name="T8"><text:tab/><text:tab/>(&amp;mut self) lo podria cambiar.</text:span></text:span></text:p>
      <text:p text:style-name="P8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8"><text:span text:style-name="_3c_C_3e_"><text:span text:style-name="T3"><text:tab/>}</text:span></text:span></text:p>
      <text:p text:style-name="P8"><text:span text:style-name="_3c_C_3e_"><text:span text:style-name="T3">}</text:span></text:span></text:p>
      <text:p text:style-name="P9"><text:span text:style-name="_2f__2f_C"><text:span text:style-name="T43">En el main.rs:<text:line-break/></text:span></text:span></text:p>
      <text:p text:style-name="P9"><text:span text:style-name="_3c_C_3e_"><text:span text:style-name="T3">mod fichero;</text:span></text:span></text:p>
      <text:p text:style-name="P9"><text:span text:style-name="_3c_C_3e_"><text:span text:style-name="T3">fn main (){</text:span></text:span></text:p>
      <text:p text:style-name="P12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2"><text:span text:style-name="_3c_C_3e_"><text:span text:style-name="T9"><text:tab/></text:span></text:span><text:span text:style-name="_3c_C_3e_"><text:span text:style-name="T3">println!("{}", a.get_x());</text:span></text:span></text:p>
      <text:p text:style-name="P9"><text:span text:style-name="_3c_C_3e_"><text:span text:style-name="T3">}</text:span></text:span></text:p>
      <text:p text:style-name="P9"><text:span text:style-name="_3c_C_3e_"><text:span text:style-name="T3"/></text:span></text:p>
      <text:p text:style-name="P9"><text:span text:style-name="_3c_C_3e_"><text:span text:style-name="T3"/></text:span></text:p>
      <text:h text:style-name="P33" text:outline-level="3"><text:span text:style-name="_3c_C_3e_"><text:span text:style-name="T34">FUNCIONES</text:span></text:span></text:h>
      <text:p text:style-name="P13"><text:span text:style-name="_2f__2f_C"><text:span text:style-name="T47">Las funciones en Rust estan divididas entre las que no devuelven nada y las que s</text:span></text:span><text:span text:style-name="_2f__2f_C"><text:span text:style-name="T26">í</text:span></text:span><text:span text:style-name="_2f__2f_C"><text:span text:style-name="T47">. </text:span></text:span></text:p>
      <text:p text:style-name="P13"><text:span text:style-name="_2f__2f_C"><text:span text:style-name="T47">NO DEVUELVE:</text:span></text:span></text:p>
      <text:p text:style-name="P13"><text:span text:style-name="_3c_C_3e_"><text:span text:style-name="T3">fn funcion(num1: &amp;i32){</text:span></text:span><text:span text:style-name="_3c_C_3e_"><text:span text:style-name="T11"> </text:span></text:span><text:span text:style-name="_2f__2f_C"><text:span text:style-name="T11">//</text:span></text:span><text:span text:style-name="_2f__2f_C"><text:span text:style-name="T12">referenciada</text:span></text:span></text:p>
      <text:p text:style-name="P13"><text:span text:style-name="_3c_C_3e_"><text:span text:style-name="T3"><text:tab/>println!("El numero es: {}", num1</text:span></text:span><text:span text:style-name="_3c_C_3e_"><text:span text:style-name="T12">)</text:span></text:span><text:span text:style-name="_3c_C_3e_"><text:span text:style-name="T3">;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7">DEVUELVE:</text:span></text:span></text:p>
      <text:p text:style-name="P13"><text:span text:style-name="_3c_C_3e_"><text:span text:style-name="T3">fn<text:tab/>suma(num1: &amp;i32, num2: &amp;i32) </text:span></text:span><text:span text:style-name="_3c_C_2b__2b__3e_"><text:span text:style-name="T17">-&gt; i32</text:span></text:span><text:span text:style-name="_3c_C_3e_"><text:span text:style-name="T3">{</text:span></text:span><text:span text:style-name="_3c_C_3e_"><text:span text:style-name="T11"> </text:span></text:span><text:span text:style-name="_2f__2f_C"><text:span text:style-name="T11">//-&gt; lo que devuelve</text:span></text:span></text:p>
      <text:p text:style-name="P13"><text:span text:style-name="_3c_C_3e_"><text:span text:style-name="T3"><text:tab/></text:span></text:span><text:span text:style-name="_3c_C_3e_"><text:span text:style-name="T12">*</text:span></text:span><text:span text:style-name="_3c_C_3e_"><text:span text:style-name="T3">num1 + </text:span></text:span><text:span text:style-name="_3c_C_3e_"><text:span text:style-name="T12">*</text:span></text:span><text:span text:style-name="_3c_C_3e_"><text:span text:style-name="T3">num2 </text:span></text:span><text:span text:style-name="_2f__2f_C"><text:span text:style-name="T3">//es importante que no tenga ; ya que este es un return oculto, sin ese punto y coma.</text:span></text:span></text:p>
      <text:p text:style-name="P14"><text:span text:style-name="_2f__2f_C"><text:span text:style-name="T12"><text:tab/>//Hay que derreferenciar, ya que son referencias (direcciones de memoria)</text:span></text:span></text:p>
      <text:p text:style-name="P13"><text:soft-page-break/><text:span text:style-name="_3c_C_3e_"><text:span text:style-name="T3">}</text:span></text:span></text:p>
      <text:p text:style-name="P13"><text:span text:style-name="_2f__2f_C"><text:span text:style-name="T47">Para llamarlas:</text:span></text:span></text:p>
      <text:p text:style-name="P13"><text:span text:style-name="_3c_C_3e_"><text:span text:style-name="T3">funcion(&amp;n);</text:span></text:span></text:p>
      <text:p text:style-name="P13"><text:span text:style-name="_3c_C_3e_"><text:span text:style-name="T3">suma(&amp;x, &amp;y);</text:span></text:span></text:p>
      <text:p text:style-name="P13"><text:span text:style-name="_3c_C_3e_"><text:span text:style-name="T3"/></text:span></text:p>
      <text:p text:style-name="P14"><text:span text:style-name="_2f__2f_C"><text:span text:style-name="T47">Para </text:span></text:span><text:span text:style-name="_2f__2f_C"><text:span text:style-name="T48">cambiar el valor de un numero</text:span></text:span><text:span text:style-name="_2f__2f_C"><text:span text:style-name="T47">:</text:span></text:span></text:p>
      <text:p text:style-name="P14"><text:span text:style-name="_3c_C_3e_"><text:span text:style-name="T3">fn cambia(n: &amp;mut i32){</text:span></text:span></text:p>
      <text:p text:style-name="P14"><text:span text:style-name="_3c_C_3e_"><text:span text:style-name="T3"><text:tab/>*n = 42;</text:span></text:span></text:p>
      <text:p text:style-name="P14"><text:span text:style-name="_3c_C_3e_"><text:span text:style-name="T3">}</text:span></text:span></text:p>
      <text:p text:style-name="P14"><text:span text:style-name="_2f__2f_C"><text:span text:style-name="T48">y para llamarla:</text:span></text:span></text:p>
      <text:p text:style-name="P14"><text:span text:style-name="_3c_C_3e_"><text:span text:style-name="T3">cambia(&amp;mut x);</text:span></text:span></text:p>
      <text:p text:style-name="P14"><text:span text:style-name="_3c_C_3e_"><text:span text:style-name="T3"/></text:span></text:p>
      <text:h text:style-name="P37" text:outline-level="3"><text:span text:style-name="_3c_C_3e_"><text:span text:style-name="T35">SOBRECARGA DE OPERADORES</text:span></text:span></text:h>
      <text:p text:style-name="P44"><text:span text:style-name="_2f__2f_C"><text:span text:style-name="T56">Rust tiene sobrecarga de operadores, y la forma de declararlos es en el </text:span></text:span><text:span text:style-name="_3c_C_2b__2b__3e_"><text:span text:style-name="T17">impl</text:span></text:span><text:span text:style-name="_2f__2f_C"><text:span text:style-name="T56"> de tal forma:</text:span></text:span></text:p>
      <text:p text:style-name="P52"><text:span text:style-name="_3c_C_3e_"><text:span text:style-name="T3">use std::ops::Add;</text:span></text:span><text:span text:style-name="_2f__2f_C"><text:span text:style-name="T62"> </text:span></text:span><text:span text:style-name="_2f__2f_C"><text:span text:style-name="T16">//importa el trait (el operador) de Add. Si no no se puede usar</text:span></text:span></text:p>
      <text:p text:style-name="P44"><text:span text:style-name="_3c_C_3e_"><text:span text:style-name="T3">struct Vector3{...}</text:span></text:span></text:p>
      <text:p text:style-name="P44"><text:span text:style-name="_3c_C_2b__2b__3e_"><text:span text:style-name="T17">impl</text:span></text:span><text:span text:style-name="_3c_C_3e_"><text:span text:style-name="T3"><text:tab/></text:span></text:span><text:span text:style-name="_3c_C_2b__2b__3e_"><text:span text:style-name="T17">Add</text:span></text:span><text:span text:style-name="_3c_C_3e_"><text:span text:style-name="T3"> for Vector3{</text:span></text:span></text:p>
      <text:p text:style-name="P44"><text:span text:style-name="_3c_C_3e_"><text:span text:style-name="T3"><text:tab/>type Output = Vect</text:span></text:span><text:span text:style-name="_3c_C_3e_"><text:span text:style-name="T16">or</text:span></text:span><text:span text:style-name="_3c_C_3e_"><text:span text:style-name="T3">3; </text:span></text:span><text:span text:style-name="_2f__2f_C"><text:span text:style-name="T3">//el resultado de la operacion v1 + v2 sera un Vect3</text:span></text:span></text:p>
      <text:p text:style-name="P44"><text:span text:style-name="_3c_C_3e_"><text:span text:style-name="T3"><text:tab/>fn </text:span></text:span><text:span text:style-name="_3c_C_2b__2b__3e_"><text:span text:style-name="T17">add</text:span></text:span><text:span text:style-name="_3c_C_3e_"><text:span text:style-name="T3">(self, other: Vect</text:span></text:span><text:span text:style-name="_3c_C_3e_"><text:span text:style-name="T16">or</text:span></text:span><text:span text:style-name="_3c_C_3e_"><text:span text:style-name="T3">3) -&gt; Vect</text:span></text:span><text:span text:style-name="_3c_C_3e_"><text:span text:style-name="T16">or</text:span></text:span><text:span text:style-name="_3c_C_3e_"><text:span text:style-name="T3">3{...}</text:span></text:span></text:p>
      <text:p text:style-name="P45"><text:span text:style-name="_2f__2f_C"><text:span text:style-name="T57">La sobrecarga es con nombre may</text:span></text:span><text:span text:style-name="_2f__2f_C"><text:span text:style-name="T28">ú</text:span></text:span><text:span text:style-name="_2f__2f_C"><text:span text:style-name="T57">scula, y la funci</text:span></text:span><text:span text:style-name="_2f__2f_C"><text:span text:style-name="T28">ón</text:span></text:span><text:span text:style-name="_2f__2f_C"><text:span text:style-name="T57"> en min</text:span></text:span><text:span text:style-name="_2f__2f_C"><text:span text:style-name="T28">ú</text:span></text:span><text:span text:style-name="_2f__2f_C"><text:span text:style-name="T57">scula pero llamada igual. La lista es la siguiente para las sobrecargas (entre par</text:span></text:span><text:span text:style-name="_2f__2f_C"><text:span text:style-name="T28">éntesis el nombre a la función)</text:span></text:span><text:span text:style-name="_2f__2f_C"><text:span text:style-name="T57">:</text:span></text:span></text:p>
      <text:p text:style-name="P46"><text:span text:style-name="_2f__2f_C"><text:span text:style-name="T91">+<text:tab/>-&gt; <text:tab/>Add (add)<text:tab/><text:tab/><text:tab/><text:tab/></text:span></text:span><text:span text:style-name="_2f__2f_C"><text:span text:style-name="T92"><text:tab/><text:tab/><text:tab/><text:tab/></text:span></text:span><text:span text:style-name="_2f__2f_C"><text:span text:style-name="T91">+=<text:tab/>-&gt;<text:tab/><text:tab/>AddAssign (add</text:span></text:span><text:span text:style-name="_2f__2f_C"><text:span text:style-name="T93">_</text:span></text:span><text:span text:style-name="_2f__2f_C"><text:span text:style-name="T91">assign)<text:tab/><text:tab/><text:tab/><text:tab/><text:tab/></text:span></text:span></text:p>
      <text:p text:style-name="P46"><text:span text:style-name="_2f__2f_C"><text:span text:style-name="T91">-<text:tab/>-&gt;<text:tab/></text:span></text:span><text:span text:style-name="_2f__2f_C"><text:span text:style-name="T93"><text:tab/></text:span></text:span><text:span text:style-name="_2f__2f_C"><text:span text:style-name="T91">Sub (sub)</text:span></text:span><text:span text:style-name="_2f__2f_C"><text:span text:style-name="T93"><text:tab/><text:tab/><text:tab/><text:tab/></text:span></text:span><text:span text:style-name="_2f__2f_C"><text:span text:style-name="T92"><text:tab/><text:tab/><text:tab/><text:tab/></text:span></text:span><text:span text:style-name="_2f__2f_C"><text:span text:style-name="T93">-=<text:tab/><text:tab/>-&gt;<text:tab/><text:tab/>SubAssign (sub_assign)</text:span></text:span></text:p>
      <text:p text:style-name="P47"><text:span text:style-name="_2f__2f_C"><text:span text:style-name="T91">*<text:tab/>-&gt;<text:tab/><text:tab/>Mul (mul)</text:span></text:span><text:span text:style-name="_2f__2f_C"><text:span text:style-name="T93"><text:tab/><text:tab/><text:tab/><text:tab/></text:span></text:span><text:span text:style-name="_2f__2f_C"><text:span text:style-name="T92"><text:tab/><text:tab/><text:tab/><text:tab/></text:span></text:span><text:span text:style-name="_2f__2f_C"><text:span text:style-name="T93">*=<text:tab/><text:tab/>-&gt;<text:tab/><text:tab/>MulAssign (mul_assign)</text:span></text:span></text:p>
      <text:p text:style-name="P47"><text:span text:style-name="_2f__2f_C"><text:span text:style-name="T93">/</text:span></text:span><text:span text:style-name="_2f__2f_C"><text:span text:style-name="T94"><text:tab/></text:span></text:span><text:span text:style-name="_2f__2f_C"><text:span text:style-name="T93">-&gt;<text:tab/><text:tab/>Div (div)<text:tab/><text:tab/><text:tab/><text:tab/><text:tab/></text:span></text:span><text:span text:style-name="_2f__2f_C"><text:span text:style-name="T92"><text:tab/><text:tab/><text:tab/><text:tab/></text:span></text:span><text:span text:style-name="_2f__2f_C"><text:span text:style-name="T93">/=<text:tab/><text:tab/>-&gt;<text:tab/><text:tab/>DivAssign<text:tab/>(div_assign)</text:span></text:span></text:p>
      <text:p text:style-name="P47"><text:span text:style-name="_2f__2f_C"><text:span text:style-name="T93">%</text:span></text:span><text:span text:style-name="_2f__2f_C"><text:span text:style-name="T94"> </text:span></text:span><text:span text:style-name="_2f__2f_C"><text:span text:style-name="T93"><text:tab/>-&gt;<text:tab/>Rem </text:span></text:span><text:span text:style-name="_2f__2f_C"><text:span text:style-name="T91">(rem</text:span></text:span><text:span text:style-name="_2f__2f_C"><text:span text:style-name="T93">)</text:span></text:span><text:span text:style-name="_2f__2f_C"><text:span text:style-name="T91"><text:tab/></text:span></text:span><text:span text:style-name="_2f__2f_C"><text:span text:style-name="T93"><text:tab/><text:tab/><text:tab/></text:span></text:span><text:span text:style-name="_2f__2f_C"><text:span text:style-name="T92"><text:tab/><text:tab/><text:tab/><text:tab/></text:span></text:span><text:span text:style-name="_2f__2f_C"><text:span text:style-name="T93">%=<text:tab/>-&gt;<text:tab/><text:tab/>RemAssign (rem_assign)</text:span></text:span></text:p>
      <text:p text:style-name="P48"><text:span text:style-name="_2f__2f_C"><text:span text:style-name="T91">==<text:tab/>-&gt; PartialEq</text:span></text:span><text:span text:style-name="_2f__2f_C"><text:span text:style-name="T92"> (eq)</text:span></text:span><text:span text:style-name="_2f__2f_C"><text:span text:style-name="T91"><text:tab/><text:tab/></text:span></text:span><text:span text:style-name="_2f__2f_C"><text:span text:style-name="T90"><text:tab/><text:tab/><text:tab/></text:span></text:span><text:span text:style-name="_2f__2f_C"><text:span text:style-name="T91"><text:tab/></text:span></text:span><text:span text:style-name="_2f__2f_C"><text:span text:style-name="T92">!=<text:tab/><text:tab/>-&gt;<text:tab/><text:tab/>PartialEq (</text:span></text:span><text:span text:style-name="_2f__2f_C"><text:span text:style-name="T95">ne</text:span></text:span><text:span text:style-name="_2f__2f_C"><text:span text:style-name="T92">)</text:span></text:span></text:p>
      <text:p text:style-name="P49"><text:span text:style-name="_2f__2f_C"><text:span text:style-name="T91">[ ]</text:span></text:span><text:span text:style-name="_2f__2f_C"><text:span text:style-name="T92"><text:tab/><text:tab/>-&gt;</text:span></text:span><text:span text:style-name="_2f__2f_C"><text:span text:style-name="T94"> </text:span></text:span><text:span text:style-name="_2f__2f_C"><text:span text:style-name="T92">Index (index)</text:span></text:span><text:span text:style-name="_2f__2f_C"><text:span text:style-name="T94"><text:tab/></text:span></text:span><text:span text:style-name="_2f__2f_C"><text:span text:style-name="T91"><text:tab/><text:tab/></text:span></text:span><text:span text:style-name="_2f__2f_C"><text:span text:style-name="T92"><text:tab/><text:tab/><text:tab/><text:tab/>[ ] =<text:tab/>-&gt;<text:tab/><text:tab/>IndexMut (index_mut)</text:span></text:span></text:p>
      <text:p text:style-name="P49"><text:span text:style-name="_2f__2f_C"><text:span text:style-name="T94">-x<text:tab/><text:tab/>-&gt; Neg (neg)<text:tab/><text:tab/><text:tab/><text:tab/><text:tab/><text:tab/><text:tab/><text:tab/>!x = -&gt;<text:tab/><text:tab/>Not (not)</text:span></text:span></text:p>
      <text:p text:style-name="P50"><text:span text:style-name="_2f__2f_C"><text:span text:style-name="T94">&amp;<text:tab/><text:tab/>-&gt; BitAnd (bitand)<text:tab/><text:tab/><text:tab/><text:tab/><text:tab/></text:span></text:span><text:span text:style-name="_2f__2f_C"><text:span text:style-name="T96"><text:tab/></text:span></text:span><text:span text:style-name="_2f__2f_C"><text:span text:style-name="T90">&amp;=</text:span></text:span><text:span text:style-name="_2f__2f_C"><text:span text:style-name="T94"><text:tab/>-&gt;<text:tab/><text:tab/></text:span></text:span><text:span text:style-name="_2f__2f_C"><text:span text:style-name="T90">BitAndAssign (bit_and_assign)</text:span></text:span></text:p>
      <text:p text:style-name="P50"><text:span text:style-name="_2f__2f_C"><text:span text:style-name="T90">|<text:tab/><text:tab/>-&gt; BitOr (bitor)<text:tab/><text:tab/><text:tab/><text:tab/><text:tab/><text:tab/><text:tab/>|=<text:tab/><text:tab/>-&gt;<text:tab/><text:tab/>BitOrAssign (bit_or_assign)</text:span></text:span></text:p>
      <text:p text:style-name="P50"><text:soft-page-break/><text:span text:style-name="_2f__2f_C"><text:span text:style-name="T90">^<text:tab/><text:tab/>-&gt;<text:tab/>BitXor (bitxor)<text:tab/><text:tab/><text:tab/><text:tab/><text:tab/><text:tab/>^=<text:tab/>-&gt;<text:tab/><text:tab/>BitXorAssign (bit_xor_assign)</text:span></text:span></text:p>
      <text:p text:style-name="P50"><text:span text:style-name="_2f__2f_C"><text:span text:style-name="T90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50"><text:span text:style-name="_2f__2f_C"><text:span text:style-name="T90">&gt;&gt;<text:tab/>-&gt;<text:tab/>Shr<text:tab/>(shr)<text:tab/><text:tab/><text:tab/><text:tab/><text:tab/><text:tab/><text:tab/><text:tab/>&gt;&gt;=<text:tab/>-&gt;<text:tab/><text:tab/>ShrAssign (shr_assign)</text:span></text:span></text:p>
      <text:p text:style-name="P50"><text:span text:style-name="_2f__2f_C"><text:span text:style-name="T90">*x<text:tab/><text:tab/>-&gt;<text:tab/>Deref (deref)<text:tab/><text:tab/><text:tab/><text:tab/><text:tab/><text:tab/><text:tab/>*x=<text:tab/>-&gt;<text:tab/><text:tab/>DerefMut (deref_mut)</text:span></text:span></text:p>
      <text:p text:style-name="P50"><text:span text:style-name="_2f__2f_C"><text:span text:style-name="T90">x..y<text:tab/>-&gt;<text:tab/>Range </text:span></text:span><text:span text:style-name="_2f__2f_C"><text:span text:style-name="T95">(no hay</text:span></text:span><text:span text:style-name="_2f__2f_C"><text:span text:style-name="T90">)<text:tab/><text:tab/><text:tab/></text:span></text:span><text:span text:style-name="_2f__2f_C"><text:span text:style-name="T95"><text:tab/><text:tab/></text:span></text:span><text:span text:style-name="_2f__2f_C"><text:span text:style-name="T90"><text:tab/>()<text:tab/>-&gt;<text:tab/><text:tab/>Fn, FnMut, FnOnce (</text:span></text:span><text:span text:style-name="_2f__2f_C"><text:span text:style-name="T95">call</text:span></text:span><text:span text:style-name="_2f__2f_C"><text:span text:style-name="T90">)</text:span></text:span></text:p>
      <text:p text:style-name="P51"><text:span text:style-name="_2f__2f_C"><text:span text:style-name="T57"><text:tab/></text:span></text:span><text:span text:style-name="_2f__2f_C"><text:span text:style-name="T90"><text:tab/><text:tab/><text:tab/></text:span></text:span><text:span text:style-name="_2f__2f_C"><text:span text:style-name="T91">&lt;, &lt;=, &gt;, &gt;=<text:tab/>-&gt; PartialOrd (partial_cm</text:span></text:span><text:span text:style-name="_2f__2f_C"><text:span text:style-name="T95">p</text:span></text:span><text:span text:style-name="_2f__2f_C"><text:span text:style-name="T92">)</text:span></text:span><text:span text:style-name="_2f__2f_C"><text:span text:style-name="T91"><text:tab/><text:tab/></text:span></text:span></text:p>
      <text:p text:style-name="P51"><text:span text:style-name="_2f__2f_C"><text:span text:style-name="T91"/></text:span></text:p>
      <text:p text:style-name="P51"><text:span text:style-name="_2f__2f_C"><text:span text:style-name="T57"><text:tab/><text:tab/></text:span></text:span></text:p>
      <text:p text:style-name="P45"><text:span text:style-name="_3c_C_3e_"><text:span text:style-name="T3"/></text:span></text:p>
      <text:h text:style-name="P34" text:outline-level="3"><text:span text:style-name="_3c_C_3e_"><text:span text:style-name="T37">WHILE</text:span></text:span></text:h>
      <text:p text:style-name="P15"><text:span text:style-name="_2f__2f_C"><text:span text:style-name="T49">El bucle while es:</text:span></text:span></text:p>
      <text:p text:style-name="P15"><text:span text:style-name="_3c_C_3e_"><text:span text:style-name="T3">let mut i: u32 = 1;<text:line-break/></text:span></text:span><text:span text:style-name="_3c_C_2b__2b__3e_"><text:span text:style-name="T17">while i &lt; 10 &amp;&amp; i &gt; 0</text:span></text:span><text:span text:style-name="_3c_C_3e_"><text:span text:style-name="T3">{</text:span></text:span></text:p>
      <text:p text:style-name="P15"><text:span text:style-name="_3c_C_3e_"><text:span text:style-name="T3"><text:tab/>....</text:span></text:span></text:p>
      <text:p text:style-name="P15"><text:span text:style-name="_3c_C_3e_"><text:span text:style-name="T3"><text:tab/>i += 1;</text:span></text:span></text:p>
      <text:p text:style-name="P15"><text:span text:style-name="_3c_C_3e_"><text:span text:style-name="T3">}</text:span></text:span></text:p>
      <text:p text:style-name="P16"><text:span text:style-name="_2f__2f_C"><text:span text:style-name="T50">La condici</text:span></text:span><text:span text:style-name="_2f__2f_C"><text:span text:style-name="T27">ón</text:span></text:span><text:span text:style-name="_2f__2f_C"><text:span text:style-name="T50"> nunca va entre par</text:span></text:span><text:span text:style-name="_2f__2f_C"><text:span text:style-name="T27">é</text:span></text:span><text:span text:style-name="_2f__2f_C"><text:span text:style-name="T50">ntesis para evitar la confusi</text:span></text:span><text:span text:style-name="_2f__2f_C"><text:span text:style-name="T27">ón</text:span></text:span><text:span text:style-name="_2f__2f_C"><text:span text:style-name="T50"> de C ya que en rust la condici</text:span></text:span><text:span text:style-name="_2f__2f_C"><text:span text:style-name="T27">ón</text:span></text:span><text:span text:style-name="_2f__2f_C"><text:span text:style-name="T50"> es una expresi</text:span></text:span><text:span text:style-name="_2f__2f_C"><text:span text:style-name="T27">ón</text:span></text:span><text:span text:style-name="_2f__2f_C"><text:span text:style-name="T50"> booleana. Esto es un error:</text:span></text:span></text:p>
      <text:p text:style-name="P16"><text:span text:style-name="_3c_C_3e_"><text:span text:style-name="T3">while 5</text:span></text:span><text:span text:style-name="_2f__2f_C"><text:span text:style-name="T50"> o </text:span></text:span><text:span text:style-name="_3c_C_3e_"><text:span text:style-name="T3">while (5)</text:span></text:span></text:p>
      <text:h text:style-name="P34" text:outline-level="3"><text:span text:style-name="_3c_C_3e_"><text:span text:style-name="T66"/></text:span></text:h>
      <text:h text:style-name="P34" text:outline-level="3"><text:span text:style-name="_3c_C_3e_"><text:span text:style-name="T66"/></text:span></text:h>
      <text:h text:style-name="P34" text:outline-level="3"><text:span text:style-name="_3c_C_3e_"><text:span text:style-name="T37">LOOP</text:span></text:span></text:h>
      <text:p text:style-name="P15"><text:span text:style-name="_2f__2f_C"><text:span text:style-name="T49">loop es infinito a no ser que se saque</text:span></text:span></text:p>
      <text:p text:style-name="P15"><text:span text:style-name="_3c_C_2b__2b__3e_"><text:span text:style-name="T17">loop</text:span></text:span><text:span text:style-name="_3c_C_3e_"><text:span text:style-name="T3"> {</text:span></text:span></text:p>
      <text:p text:style-name="P15"><text:span text:style-name="_3c_C_3e_"><text:span text:style-name="T3"><text:tab/>codigo();</text:span></text:span></text:p>
      <text:p text:style-name="P15"><text:span text:style-name="_3c_C_3e_"><text:span text:style-name="T3"><text:tab/>if !condicion {</text:span></text:span></text:p>
      <text:p text:style-name="P15"><text:span text:style-name="_3c_C_3e_"><text:span text:style-name="T3"><text:tab/><text:tab/>break; </text:span></text:span><text:span text:style-name="_2f__2f_C"><text:span text:style-name="T3">// asi sale</text:span></text:span></text:p>
      <text:p text:style-name="P15"><text:span text:style-name="_3c_C_3e_"><text:span text:style-name="T3"><text:tab/>}</text:span></text:span></text:p>
      <text:p text:style-name="P15"><text:span text:style-name="_3c_C_3e_"><text:span text:style-name="T3">}</text:span></text:span></text:p>
      <text:p text:style-name="P15"><text:span text:style-name="_3c_C_3e_"><text:span text:style-name="T3"/></text:span></text:p>
      <text:h text:style-name="P35" text:outline-level="3"><text:span text:style-name="_3c_C_3e_"><text:span text:style-name="T38">FOR</text:span></text:span></text:h>
      <text:p text:style-name="P16"><text:span text:style-name="_2f__2f_C"><text:span text:style-name="T50">El for en Rust es bajo iteradores</text:span></text:span></text:p>
      <text:p text:style-name="P16"><text:soft-page-break/><text:span text:style-name="_3c_C_2b__2b__3e_"><text:span text:style-name="T17">for elemento in iterable {...}</text:span></text:span></text:p>
      <text:p text:style-name="P16"><text:span text:style-name="_2f__2f_C"><text:span text:style-name="T50">Por ejemplo:</text:span></text:span></text:p>
      <text:p text:style-name="P16"><text:span text:style-name="_3c_C_2b__2b__3e_"><text:span text:style-name="T17">for i in 0..10{</text:span></text:span><text:span text:style-name="_3c_C_3e_"><text:span text:style-name="T3"> ... }</text:span></text:span><text:span text:style-name="_3c_C_2b__2b__3e_"><text:span text:style-name="T17"> </text:span></text:span><text:span text:style-name="_2f__2f_C"><text:span text:style-name="T17">//i va de 0 a 9</text:span></text:span></text:p>
      <text:p text:style-name="P16"><text:span text:style-name="_2f__2f_C"><text:span text:style-name="T50">o con matrices:</text:span></text:span></text:p>
      <text:p text:style-name="P16"><text:span text:style-name="_3c_C_3e_"><text:span text:style-name="T3">let v = [1, 2, 3];</text:span></text:span></text:p>
      <text:p text:style-name="P16"><text:span text:style-name="_3c_C_2b__2b__3e_"><text:span text:style-name="T17">for i in v</text:span></text:span><text:span text:style-name="_3c_C_3e_"><text:span text:style-name="T3">{ ... }</text:span></text:span></text:p>
      <text:p text:style-name="P16"><text:span text:style-name="_3c_C_3e_"><text:span text:style-name="T3"/></text:span></text:p>
      <text:p text:style-name="P16"><text:span text:style-name="_3c_C_3e_"><text:span text:style-name="T3"/></text:span></text:p>
      <text:h text:style-name="P36" text:outline-level="3"><text:span text:style-name="_3c_C_3e_"><text:span text:style-name="T36">COLLECTIONS (contenedores)</text:span></text:span></text:h>
      <text:p text:style-name="P17"><text:span text:style-name="_2f__2f_C"><text:span text:style-name="T51">Como en C++ tenemos contenedores:</text:span></text:span></text:p>
      <text:p text:style-name="P17"><text:span text:style-name="_2f__2f_C"><text:span text:style-name="T51"/></text:span></text:p>
      <text:p text:style-name="P18"><text:span text:style-name="_2f__2f_C"><text:span text:style-name="T63">1. VECTOR DINAMICO:</text:span></text:span></text:p>
      <text:p text:style-name="P18"><text:span text:style-name="_3c_C_3e_"><text:span text:style-name="T3">let mut v = </text:span></text:span><text:span text:style-name="_3c_C_2b__2b__3e_"><text:span text:style-name="T17">Vec::new();</text:span></text:span></text:p>
      <text:p text:style-name="P18"><text:span text:style-name="_3c_C_3e_"><text:span text:style-name="T3">v.push(1);</text:span></text:span><text:span text:style-name="_3c_C_3e_"><text:span text:style-name="T13"> </text:span></text:span><text:span text:style-name="_2f__2f_C"><text:span text:style-name="T13">//mete el 1</text:span></text:span></text:p>
      <text:p text:style-name="P18"><text:span text:style-name="_3c_C_3e_"><text:span text:style-name="T3">v.push(2);</text:span></text:span><text:span text:style-name="_3c_C_3e_"><text:span text:style-name="T13"> </text:span></text:span><text:span text:style-name="_2f__2f_C"><text:span text:style-name="T13">//mete el 2 detrás del 1.</text:span></text:span></text:p>
      <text:p text:style-name="P19"><text:span text:style-name="_3c_C_3e_"><text:span text:style-name="T3">v.pop(); </text:span></text:span><text:span text:style-name="_2f__2f_C"><text:span text:style-name="T3">// quita el 2 (el ultimo)</text:span></text:span><text:span text:style-name="_2f__2f_C"><text:span text:style-name="T13"> Devuelve un Option&lt;T&gt;</text:span></text:span></text:p>
      <text:p text:style-name="P19"><text:span text:style-name="_2f__2f_C"><text:span text:style-name="T53">Para acceder a los datos se puede usar:</text:span></text:span></text:p>
      <text:p text:style-name="P19"><text:span text:style-name="_3c_C_3e_"><text:span text:style-name="T3">v[i]; </text:span></text:span><text:span text:style-name="_2f__2f_C"><text:span text:style-name="T3">//puede ser panic</text:span></text:span></text:p>
      <text:p text:style-name="P19"><text:span text:style-name="_3c_C_3e_"><text:span text:style-name="T3">v.get(i);</text:span></text:span><text:span text:style-name="_2f__2f_C"><text:span text:style-name="T3"> //seguro.</text:span></text:span></text:p>
      <text:p text:style-name="P19"><text:span text:style-name="_2f__2f_C"><text:span text:style-name="T53">El tamaño es con:</text:span></text:span></text:p>
      <text:p text:style-name="P19"><text:span text:style-name="_3c_C_3e_"><text:span text:style-name="T3">v.len();</text:span></text:span></text:p>
      <text:p text:style-name="P20"><text:span text:style-name="_2f__2f_C"><text:span text:style-name="T54">Se puede usar iteradores:</text:span></text:span></text:p>
      <text:p text:style-name="P20"><text:span text:style-name="_3c_C_3e_"><text:span text:style-name="T3">let mut it = v</text:span></text:span><text:span text:style-name="_3c_C_2b__2b__3e_"><text:span text:style-name="T17">.iter();</text:span></text:span></text:p>
      <text:p text:style-name="P20"><text:span text:style-name="_3c_C_2b__2b__3e_"><text:span text:style-name="T17">it.next();</text:span></text:span><text:span text:style-name="_3c_C_3e_"><text:span text:style-name="T3"> //es el siguiente.</text:span></text:span></text:p>
      <text:p text:style-name="P20"><text:span text:style-name="_3c_C_2b__2b__3e_"><text:span text:style-name="T17">it.next_back()</text:span></text:span><text:span text:style-name="_3c_C_3e_"><text:span text:style-name="T3">; es el anterior.</text:span></text:span></text:p>
      <text:p text:style-name="P20"><text:span text:style-name="_2f__2f_C"><text:span text:style-name="T54">Los dos devuelven Option&lt;&amp;T&gt;</text:span></text:span><text:span text:style-name="_2f__2f_C"><text:span text:style-name="T55"> por lo tanto para usarlos:</text:span></text:span></text:p>
      <text:p text:style-name="P21"><text:span text:style-name="_3c_C_3e_"><text:span text:style-name="T3">if let Some(x) = it.next(){...}</text:span></text:span></text:p>
      <text:p text:style-name="P20"><text:span text:style-name="_2f__2f_C"><text:span text:style-name="T54"/></text:span></text:p>
      <text:p text:style-name="P18"><text:span text:style-name="_3c_C_3e_"><text:span text:style-name="T3"/></text:span></text:p>
      <text:p text:style-name="P18"><text:span text:style-name="_3c_C_3e_"><text:span text:style-name="T3"/></text:span></text:p>
      <text:p text:style-name="P18"><text:span text:style-name="_2f__2f_C"><text:span text:style-name="T52">2. ARRAYS</text:span></text:span></text:p>
      <text:p text:style-name="P18"><text:span text:style-name="_2f__2f_C"><text:span text:style-name="T52"/></text:span></text:p>
      <text:p text:style-name="P18"><text:span text:style-name="_2f__2f_C"><text:span text:style-name="T52">3. STRING</text:span></text:span></text:p>
      <text:p text:style-name="P18"><text:soft-page-break/><text:span text:style-name="_2f__2f_C"><text:span text:style-name="T52"/></text:span></text:p>
      <text:p text:style-name="P18"><text:span text:style-name="_2f__2f_C"><text:span text:style-name="T52">4. HASHMAP</text:span></text:span></text:p>
      <text:p text:style-name="P18"><text:span text:style-name="_2f__2f_C"><text:span text:style-name="T52"/></text:span></text:p>
      <text:p text:style-name="P18"><text:span text:style-name="_2f__2f_C"><text:span text:style-name="T52">5. VECDEQUE</text:span></text:span></text:p>
      <text:p text:style-name="P18"><text:span text:style-name="_2f__2f_C"><text:span text:style-name="T52"/></text:span></text:p>
      <text:p text:style-name="P18"><text:span text:style-name="_2f__2f_C"><text:span text:style-name="T52">6. HASHSET</text:span></text:span></text:p>
      <text:p text:style-name="P18"><text:span text:style-name="_2f__2f_C"><text:span text:style-name="T52"/></text:span></text:p>
      <text:p text:style-name="P18"><text:span text:style-name="_2f__2f_C"><text:span text:style-name="T52">7. BTREEMA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4T12:15:48.657521456</dc:date>
    <meta:editing-duration>P3DT3H37M57S</meta:editing-duration>
    <meta:editing-cycles>455</meta:editing-cycles>
    <meta:generator>LibreOffice/7.3.7.2$Linux_X86_64 LibreOffice_project/30$Build-2</meta:generator>
    <meta:print-date>2025-01-04T16:07:11.302000000</meta:print-date>
    <meta:printed-by>Archivos PDF</meta:printed-by>
    <meta:document-statistic meta:table-count="0" meta:image-count="0" meta:object-count="0" meta:page-count="8" meta:paragraph-count="182" meta:word-count="1216" meta:character-count="6858" meta:non-whitespace-character-count="5590"/>
  </office:meta>
</office:document-meta>
</file>