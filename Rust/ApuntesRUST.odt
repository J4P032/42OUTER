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0"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2"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3"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4"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5"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6"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7"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8"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9" style:family="paragraph" style:parent-style-name="Text_20_body">
      <style:paragraph-properties fo:line-height="100%"/>
      <style:text-properties fo:color="#ffffff" loext:opacity="100%" style:font-name="Arial1" style:text-underline-style="none" officeooo:rsid="0216a37b" officeooo:paragraph-rsid="0216a37b"/>
    </style:style>
    <style:style style:name="P20" style:family="paragraph" style:parent-style-name="Text_20_body">
      <style:paragraph-properties fo:line-height="100%"/>
      <style:text-properties officeooo:rsid="0216a37b" officeooo:paragraph-rsid="0216a37b"/>
    </style:style>
    <style:style style:name="P21" style:family="paragraph" style:parent-style-name="Text_20_body">
      <style:paragraph-properties fo:line-height="100%"/>
      <style:text-properties officeooo:rsid="0216a37b" officeooo:paragraph-rsid="0216c522"/>
    </style:style>
    <style:style style:name="P22" style:family="paragraph" style:parent-style-name="Text_20_body">
      <style:paragraph-properties fo:line-height="100%"/>
      <style:text-properties officeooo:rsid="0216a37b" officeooo:paragraph-rsid="02171d48"/>
    </style:style>
    <style:style style:name="P23" style:family="paragraph" style:parent-style-name="Heading_20_3">
      <style:paragraph-properties fo:line-height="100%"/>
      <style:text-properties style:text-underline-style="none" officeooo:rsid="0216a37b" officeooo:paragraph-rsid="0216a37b" fo:background-color="#bf0041"/>
    </style:style>
    <style:style style:name="P24"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5" style:family="paragraph" style:parent-style-name="Text_20_body">
      <style:paragraph-properties fo:line-height="100%"/>
      <style:text-properties fo:color="#00a933" loext:opacity="100%" style:font-name="Arial1" officeooo:rsid="0017c700" officeooo:paragraph-rsid="023aa484"/>
    </style:style>
    <style:style style:name="P26"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7" style:family="paragraph" style:parent-style-name="Text_20_body">
      <style:paragraph-properties fo:line-height="100%"/>
      <style:text-properties fo:color="#00a933" loext:opacity="100%" style:font-name="Arial1" officeooo:rsid="0017c700" officeooo:paragraph-rsid="023c909b"/>
    </style:style>
    <style:style style:name="P28" style:family="paragraph" style:parent-style-name="Text_20_body">
      <style:paragraph-properties fo:line-height="100%"/>
      <style:text-properties fo:color="#00a933" loext:opacity="100%" style:font-name="Arial1" officeooo:rsid="0017c700" officeooo:paragraph-rsid="023d09dc"/>
    </style:style>
    <style:style style:name="P29" style:family="paragraph" style:parent-style-name="Text_20_body">
      <style:paragraph-properties fo:line-height="100%"/>
      <style:text-properties fo:color="#00a933" loext:opacity="100%" style:font-name="Arial1" officeooo:rsid="0017c700" officeooo:paragraph-rsid="023ee483"/>
    </style:style>
    <style:style style:name="P30" style:family="paragraph" style:parent-style-name="Text_20_body">
      <style:paragraph-properties fo:line-height="100%"/>
      <style:text-properties fo:color="#00a933" loext:opacity="100%" style:font-name="Arial1" officeooo:rsid="0017c700" officeooo:paragraph-rsid="0240b662"/>
    </style:style>
    <style:style style:name="P31" style:family="paragraph" style:parent-style-name="Text_20_body">
      <style:paragraph-properties fo:line-height="100%"/>
      <style:text-properties fo:color="#00a933" loext:opacity="100%" style:font-name="Arial1" officeooo:rsid="0017c700" officeooo:paragraph-rsid="024209b0"/>
    </style:style>
    <style:style style:name="P32" style:family="paragraph" style:parent-style-name="Text_20_body">
      <style:paragraph-properties fo:line-height="100%"/>
      <style:text-properties fo:color="#00a933" loext:opacity="100%" style:font-name="Arial1" officeooo:rsid="0017c700" officeooo:paragraph-rsid="02425b33"/>
    </style:style>
    <style:style style:name="P33" style:family="paragraph" style:parent-style-name="Heading_20_3">
      <style:paragraph-properties fo:line-height="100%"/>
      <style:text-properties style:text-underline-style="none" officeooo:rsid="020908b2" officeooo:paragraph-rsid="020908b2" fo:background-color="#bf0041"/>
    </style:style>
    <style:style style:name="P34" style:family="paragraph" style:parent-style-name="Text_20_body">
      <style:paragraph-properties fo:line-height="100%"/>
      <style:text-properties fo:color="#00a933" loext:opacity="100%" style:font-name="Arial1" officeooo:rsid="0017c700" officeooo:paragraph-rsid="020d2357"/>
    </style:style>
    <style:style style:name="P35" style:family="paragraph" style:parent-style-name="Text_20_body">
      <style:paragraph-properties fo:line-height="100%"/>
      <style:text-properties fo:color="#00a933" loext:opacity="100%" style:font-name="Arial1" officeooo:rsid="0017c700" officeooo:paragraph-rsid="02113cfb"/>
    </style:style>
    <style:style style:name="P36" style:family="paragraph" style:parent-style-name="Text_20_body">
      <style:paragraph-properties fo:line-height="100%"/>
      <style:text-properties fo:color="#00a933" loext:opacity="100%" style:font-name="Arial1" officeooo:rsid="0017c700" officeooo:paragraph-rsid="02171d48"/>
    </style:style>
    <style:style style:name="P37" style:family="paragraph" style:parent-style-name="Text_20_body">
      <style:paragraph-properties fo:line-height="100%"/>
      <style:text-properties fo:color="#00a933" loext:opacity="100%" style:font-name="Arial1" officeooo:rsid="0017c700" officeooo:paragraph-rsid="02120630"/>
    </style:style>
    <style:style style:name="P38" style:family="paragraph" style:parent-style-name="Text_20_body">
      <style:paragraph-properties fo:line-height="100%"/>
      <style:text-properties fo:color="#00a933" loext:opacity="100%" style:font-name="Arial1" officeooo:rsid="0017c700" officeooo:paragraph-rsid="021770f8"/>
    </style:style>
    <style:style style:name="P39" style:family="paragraph" style:parent-style-name="Text_20_body">
      <style:paragraph-properties fo:line-height="100%"/>
      <style:text-properties fo:color="#00a933" loext:opacity="100%" style:font-name="Arial1" officeooo:rsid="0017c700" officeooo:paragraph-rsid="0256b2db"/>
    </style:style>
    <style:style style:name="P40"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41" style:family="paragraph" style:parent-style-name="Text_20_body">
      <style:paragraph-properties fo:line-height="100%"/>
      <style:text-properties fo:color="#00a933" loext:opacity="100%" style:font-name="Arial1" officeooo:rsid="0017c700" officeooo:paragraph-rsid="021d5bcc"/>
    </style:style>
    <style:style style:name="P42" style:family="paragraph" style:parent-style-name="Text_20_body">
      <style:paragraph-properties fo:line-height="100%"/>
      <style:text-properties fo:color="#00a933" loext:opacity="100%" style:font-name="Arial1" officeooo:rsid="0017c700" officeooo:paragraph-rsid="021fa2ef"/>
    </style:style>
    <style:style style:name="P43"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4" style:family="paragraph" style:parent-style-name="Text_20_body">
      <style:paragraph-properties fo:line-height="100%"/>
      <style:text-properties fo:color="#00a933" loext:opacity="100%" style:font-name="Arial1" officeooo:rsid="0017c700" officeooo:paragraph-rsid="0257f2af"/>
    </style:style>
    <style:style style:name="P45" style:family="paragraph" style:parent-style-name="Text_20_body">
      <style:paragraph-properties fo:line-height="100%"/>
      <style:text-properties fo:color="#00a933" loext:opacity="100%" style:font-name="Arial1" officeooo:rsid="0017c700" officeooo:paragraph-rsid="025964c2"/>
    </style:style>
    <style:style style:name="P46"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7" style:family="paragraph" style:parent-style-name="Text_20_body">
      <style:paragraph-properties fo:line-height="100%"/>
      <style:text-properties fo:color="#00a933" loext:opacity="100%" style:font-name="Arial1" officeooo:rsid="0017c700" officeooo:paragraph-rsid="025c4710"/>
    </style:style>
    <style:style style:name="P48" style:family="paragraph" style:parent-style-name="Text_20_body">
      <style:paragraph-properties fo:line-height="100%"/>
      <style:text-properties fo:color="#00a933" loext:opacity="100%" style:font-name="Arial1" officeooo:rsid="0017c700" officeooo:paragraph-rsid="025e5682"/>
    </style:style>
    <style:style style:name="P49"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50" style:family="paragraph" style:parent-style-name="Text_20_body">
      <style:paragraph-properties fo:line-height="100%"/>
      <style:text-properties fo:color="#00a933" loext:opacity="100%" style:font-name="Arial1" officeooo:rsid="0017c700" officeooo:paragraph-rsid="026e980c"/>
    </style:style>
    <style:style style:name="P51" style:family="paragraph" style:parent-style-name="Text_20_body">
      <style:paragraph-properties fo:line-height="100%"/>
      <style:text-properties fo:color="#00a933" loext:opacity="100%" style:font-name="Arial1" officeooo:rsid="0017c700" officeooo:paragraph-rsid="026f46d2"/>
    </style:style>
    <style:style style:name="P52" style:family="paragraph" style:parent-style-name="Text_20_body">
      <style:paragraph-properties fo:line-height="100%"/>
      <style:text-properties fo:color="#00a933" loext:opacity="100%" style:font-name="Arial1" officeooo:rsid="0017c700" officeooo:paragraph-rsid="026fe807"/>
    </style:style>
    <style:style style:name="P53" style:family="paragraph" style:parent-style-name="Text_20_body">
      <style:paragraph-properties fo:line-height="100%"/>
      <style:text-properties fo:color="#00a933" loext:opacity="100%" style:font-name="Arial1" officeooo:paragraph-rsid="026fe807"/>
    </style:style>
    <style:style style:name="P54"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55" style:family="paragraph" style:parent-style-name="Text_20_body">
      <style:paragraph-properties fo:line-height="100%"/>
      <style:text-properties fo:color="#00a933" loext:opacity="100%" style:font-name="Arial1" officeooo:rsid="0017c700" officeooo:paragraph-rsid="0234a03a"/>
    </style:style>
    <style:style style:name="P56"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57"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8" style:family="paragraph" style:parent-style-name="Text_20_body">
      <style:paragraph-properties fo:line-height="100%"/>
      <style:text-properties fo:color="#00a933" loext:opacity="100%" style:font-name="Arial1" officeooo:rsid="0017c700" officeooo:paragraph-rsid="022b8b4d"/>
    </style:style>
    <style:style style:name="P59" style:family="paragraph" style:parent-style-name="Text_20_body">
      <style:paragraph-properties fo:line-height="100%"/>
      <style:text-properties fo:color="#00a933" loext:opacity="100%" style:font-name="Arial1" officeooo:rsid="0017c700" officeooo:paragraph-rsid="02300a0c"/>
    </style:style>
    <style:style style:name="P60" style:family="paragraph" style:parent-style-name="Standard">
      <style:paragraph-properties fo:line-height="100%"/>
      <style:text-properties fo:color="#00a933" loext:opacity="100%" style:font-name="Arial1" officeooo:rsid="0017c700" officeooo:paragraph-rsid="02300a0c"/>
    </style:style>
    <style:style style:name="P61" style:family="paragraph" style:parent-style-name="Text_20_body">
      <style:paragraph-properties fo:line-height="100%"/>
      <style:text-properties fo:color="#00a933" loext:opacity="100%" style:font-name="Arial1" officeooo:rsid="0017c700" officeooo:paragraph-rsid="02463c3d"/>
    </style:style>
    <style:style style:name="P62" style:family="paragraph" style:parent-style-name="Text_20_body">
      <style:paragraph-properties fo:line-height="100%"/>
      <style:text-properties fo:color="#00a933" loext:opacity="100%" style:font-name="Arial1" officeooo:rsid="0017c700" officeooo:paragraph-rsid="022bdc6a"/>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64"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65"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67"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68"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70"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71"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72"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73"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74"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75"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76"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77"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78"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79"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80"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81"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82"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83"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84" style:family="paragraph" style:parent-style-name="Text_20_body">
      <style:paragraph-properties fo:line-height="100%"/>
      <style:text-properties officeooo:paragraph-rsid="024defaf"/>
    </style:style>
    <style:style style:name="P85" style:family="paragraph" style:parent-style-name="Text_20_body">
      <style:paragraph-properties fo:line-height="100%"/>
      <style:text-properties fo:color="#00a933" loext:opacity="100%" style:font-name="Arial1" officeooo:rsid="0017c700" officeooo:paragraph-rsid="02212731"/>
    </style:style>
    <style:style style:name="P86" style:family="paragraph" style:parent-style-name="Text_20_body">
      <style:paragraph-properties fo:line-height="100%"/>
      <style:text-properties fo:color="#00a933" loext:opacity="100%" style:font-name="Arial1" officeooo:rsid="0017c700" officeooo:paragraph-rsid="022317e8"/>
    </style:style>
    <style:style style:name="P87"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88" style:family="paragraph" style:parent-style-name="Text_20_body">
      <style:paragraph-properties fo:line-height="100%"/>
      <style:text-properties fo:color="#00a933" loext:opacity="100%" style:font-name="Arial1" officeooo:rsid="0017c700" officeooo:paragraph-rsid="023943ac"/>
    </style:style>
    <style:style style:name="P89" style:family="paragraph" style:parent-style-name="Text_20_body">
      <style:paragraph-properties fo:line-height="100%"/>
      <style:text-properties fo:color="#00a933" loext:opacity="100%" style:font-name="Arial1" officeooo:rsid="0017c700" officeooo:paragraph-rsid="0236e83a"/>
    </style:style>
    <style:style style:name="P90"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91" style:family="paragraph" style:parent-style-name="Text_20_body">
      <style:paragraph-properties fo:line-height="100%"/>
      <style:text-properties fo:color="#00a933" loext:opacity="100%" style:font-name="Arial1" officeooo:rsid="0017c700" officeooo:paragraph-rsid="0227dcad"/>
    </style:style>
    <style:style style:name="P92" style:family="paragraph" style:parent-style-name="Text_20_body">
      <style:paragraph-properties fo:line-height="100%"/>
      <style:text-properties fo:color="#00a933" loext:opacity="100%" style:font-name="Arial1" officeooo:rsid="0017c700" officeooo:paragraph-rsid="0228c36d"/>
    </style:style>
    <style:style style:name="P93" style:family="paragraph" style:parent-style-name="Text_20_body">
      <style:paragraph-properties fo:line-height="100%"/>
      <style:text-properties fo:color="#00a933" loext:opacity="100%" style:font-name="Arial1" officeooo:rsid="0017c700" officeooo:paragraph-rsid="0229133e"/>
    </style:style>
    <style:style style:name="P94" style:family="paragraph" style:parent-style-name="Text_20_body">
      <style:paragraph-properties fo:line-height="100%"/>
      <style:text-properties fo:color="#00a933" loext:opacity="100%" style:font-name="Arial1" officeooo:rsid="0017c700" officeooo:paragraph-rsid="0229172e"/>
    </style:style>
    <style:style style:name="P95" style:family="paragraph" style:parent-style-name="Text_20_body">
      <style:paragraph-properties fo:line-height="100%"/>
      <style:text-properties fo:color="#00a933" loext:opacity="100%" style:font-name="Arial1" officeooo:rsid="0017c700" officeooo:paragraph-rsid="0229bac5"/>
    </style:style>
    <style:style style:name="P96"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97" style:family="paragraph" style:parent-style-name="Text_20_body">
      <style:paragraph-properties fo:line-height="100%"/>
      <style:text-properties fo:color="#00a933" loext:opacity="100%" style:font-name="Arial1" officeooo:rsid="0017c700" officeooo:paragraph-rsid="0243785a"/>
    </style:style>
    <style:style style:name="P98" style:family="paragraph" style:parent-style-name="Text_20_body">
      <style:paragraph-properties fo:line-height="100%"/>
      <style:text-properties fo:color="#00a933" loext:opacity="100%" style:font-name="Arial1" officeooo:rsid="0017c700" officeooo:paragraph-rsid="0244af53"/>
    </style:style>
    <style:style style:name="P99"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00" style:family="paragraph" style:parent-style-name="Text_20_body">
      <style:paragraph-properties fo:line-height="100%"/>
      <style:text-properties fo:color="#00a933" loext:opacity="100%" style:font-name="Arial1" officeooo:rsid="0017c700" officeooo:paragraph-rsid="026010dc"/>
    </style:style>
    <style:style style:name="P101" style:family="paragraph" style:parent-style-name="Text_20_body">
      <style:paragraph-properties fo:line-height="100%"/>
      <style:text-properties fo:color="#00a933" loext:opacity="100%" style:font-name="Arial1" officeooo:rsid="0017c700" officeooo:paragraph-rsid="02611b1c"/>
    </style:style>
    <style:style style:name="P102" style:family="paragraph" style:parent-style-name="Text_20_body">
      <style:paragraph-properties fo:line-height="100%"/>
      <style:text-properties fo:color="#00a933" loext:opacity="100%" style:font-name="Arial1" officeooo:rsid="0017c700" officeooo:paragraph-rsid="0262cfc4"/>
    </style:style>
    <style:style style:name="P103" style:family="paragraph" style:parent-style-name="Text_20_body">
      <style:paragraph-properties fo:line-height="100%"/>
      <style:text-properties fo:color="#00a933" loext:opacity="100%" style:font-name="Arial1" officeooo:rsid="0017c700" officeooo:paragraph-rsid="0263ef18"/>
    </style:style>
    <style:style style:name="P104" style:family="paragraph" style:parent-style-name="Text_20_body">
      <style:paragraph-properties fo:line-height="100%"/>
      <style:text-properties fo:color="#00a933" loext:opacity="100%" style:font-name="Arial1" officeooo:rsid="0017c700" officeooo:paragraph-rsid="02655e58"/>
    </style:style>
    <style:style style:name="P105" style:family="paragraph" style:parent-style-name="Text_20_body">
      <style:paragraph-properties fo:line-height="100%"/>
      <style:text-properties fo:color="#00a933" loext:opacity="100%" style:font-name="Arial1" officeooo:rsid="0017c700" officeooo:paragraph-rsid="0267ea92"/>
    </style:style>
    <style:style style:name="P106" style:family="paragraph" style:parent-style-name="Text_20_body">
      <style:paragraph-properties fo:line-height="100%"/>
      <style:text-properties fo:color="#00a933" loext:opacity="100%" style:font-name="Arial1" officeooo:rsid="0017c700" officeooo:paragraph-rsid="0265f0df"/>
    </style:style>
    <style:style style:name="P107" style:family="paragraph" style:parent-style-name="Text_20_body">
      <style:paragraph-properties fo:line-height="100%"/>
      <style:text-properties fo:color="#00a933" loext:opacity="100%" style:font-name="Arial1" officeooo:rsid="0017c700" officeooo:paragraph-rsid="026b6d9d"/>
    </style:style>
    <style:style style:name="P108" style:family="paragraph" style:parent-style-name="Text_20_body">
      <style:paragraph-properties fo:line-height="100%"/>
      <style:text-properties fo:color="#00a933" loext:opacity="100%" style:font-name="Arial1" officeooo:rsid="0017c700" officeooo:paragraph-rsid="026cad15"/>
    </style:style>
    <style:style style:name="P109" style:family="paragraph" style:parent-style-name="Text_20_body">
      <style:paragraph-properties fo:line-height="100%"/>
      <style:text-properties fo:color="#00a933" loext:opacity="100%" style:font-name="Arial1" officeooo:rsid="0017c700" officeooo:paragraph-rsid="026ce633"/>
    </style:style>
    <style:style style:name="P110"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11" style:family="paragraph" style:parent-style-name="Text_20_body">
      <style:paragraph-properties fo:line-height="100%"/>
      <style:text-properties fo:color="#00a933" loext:opacity="100%" style:font-name="Arial1" officeooo:rsid="0017c700" officeooo:paragraph-rsid="0273bc6d"/>
    </style:style>
    <style:style style:name="P112" style:family="paragraph" style:parent-style-name="Text_20_body">
      <style:paragraph-properties fo:line-height="100%"/>
      <style:text-properties fo:color="#00a933" loext:opacity="100%" style:font-name="Arial1" officeooo:rsid="0017c700" officeooo:paragraph-rsid="0275a1db"/>
    </style:style>
    <style:style style:name="P113" style:family="paragraph" style:parent-style-name="Text_20_body">
      <style:paragraph-properties fo:line-height="100%"/>
      <style:text-properties fo:color="#00a933" loext:opacity="100%" style:font-name="Arial1" officeooo:paragraph-rsid="0275a1db"/>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a7074b" loext:opacity="100%" fo:font-size="14pt" style:text-underline-style="none" fo:font-weight="normal" officeooo:rsid="025e5682" fo:background-color="#ffbf00" loext:char-shading-value="0" style:font-size-asian="14pt" style:font-size-complex="14pt"/>
    </style:style>
    <style:style style:name="T81"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2" style:family="text">
      <style:text-properties style:text-underline-style="none" fo:font-weight="normal" officeooo:rsid="025e5682" fo:background-color="transparent" loext:char-shading-value="0"/>
    </style:style>
    <style:style style:name="T83" style:family="text">
      <style:text-properties fo:color="#ffffff" loext:opacity="100%" fo:font-size="14pt" fo:font-weight="normal" officeooo:rsid="026e980c" fo:background-color="transparent" loext:char-shading-value="0" style:font-size-asian="14pt" style:font-size-complex="14pt"/>
    </style:style>
    <style:style style:name="T84" style:family="text">
      <style:text-properties fo:color="#ffffff" loext:opacity="100%" fo:font-size="14pt" fo:font-weight="normal" officeooo:rsid="026f46d2" fo:background-color="transparent" loext:char-shading-value="0" style:font-size-asian="14pt" style:font-size-complex="14pt"/>
    </style:style>
    <style:style style:name="T85" style:family="text">
      <style:text-properties fo:color="#ffffff" loext:opacity="100%" fo:font-size="14pt" fo:font-weight="normal" officeooo:rsid="026fe807" fo:background-color="transparent" loext:char-shading-value="0" style:font-size-asian="14pt" style:font-size-complex="14pt"/>
    </style:style>
    <style:style style:name="T86" style:family="text">
      <style:text-properties fo:font-weight="normal" officeooo:rsid="026fe807" fo:background-color="transparent" loext:char-shading-value="0"/>
    </style:style>
    <style:style style:name="T87" style:family="text">
      <style:text-properties fo:color="#ffffff" loext:opacity="100%" fo:font-size="14pt" fo:font-weight="normal" officeooo:rsid="026eb8ab" style:font-size-asian="14pt" style:font-size-complex="14pt"/>
    </style:style>
    <style:style style:name="T88" style:family="text">
      <style:text-properties fo:color="#ffffff" loext:opacity="100%" fo:font-size="14pt" fo:font-weight="normal" officeooo:rsid="0234a03a" style:font-size-asian="14pt" style:font-size-complex="14pt"/>
    </style:style>
    <style:style style:name="T89"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90" style:family="text">
      <style:text-properties style:text-underline-style="none" officeooo:rsid="0234a03a" fo:background-color="transparent" loext:char-shading-value="0"/>
    </style:style>
    <style:style style:name="T91" style:family="text">
      <style:text-properties style:text-underline-style="none" fo:font-weight="normal" officeooo:rsid="0234a03a" fo:background-color="transparent" loext:char-shading-value="0"/>
    </style:style>
    <style:style style:name="T92" style:family="text">
      <style:text-properties fo:color="#ffffff" loext:opacity="100%" fo:font-size="20pt" fo:font-weight="normal" officeooo:rsid="026fe807" style:font-size-asian="20pt" style:font-size-complex="20pt"/>
    </style:style>
    <style:style style:name="T93" style:family="text">
      <style:text-properties fo:color="#ffffff" loext:opacity="100%" fo:font-size="14pt" fo:font-weight="normal" officeooo:rsid="022b8b4d" style:font-size-asian="14pt" style:font-size-complex="14pt"/>
    </style:style>
    <style:style style:name="T94"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95"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6" style:family="text">
      <style:text-properties style:text-underline-style="none" fo:font-weight="normal" officeooo:rsid="02300a0c" fo:background-color="transparent" loext:char-shading-value="0"/>
    </style:style>
    <style:style style:name="T97" style:family="text">
      <style:text-properties style:text-underline-style="none" fo:font-weight="normal" officeooo:rsid="02463c3d" fo:background-color="transparent" loext:char-shading-value="0"/>
    </style:style>
    <style:style style:name="T98" style:family="text">
      <style:text-properties fo:color="#ff7b72" loext:opacity="100%" fo:font-family="'Droid Sans Mono', monospace" fo:font-size="10.5pt" style:text-underline-style="none" fo:font-weight="normal" officeooo:rsid="02463c3d" fo:background-color="#121314" loext:char-shading-value="0"/>
    </style:style>
    <style:style style:name="T99" style:family="text">
      <style:text-properties fo:color="#bbbebf" loext:opacity="100%" fo:font-family="'Droid Sans Mono', monospace" fo:font-size="10.5pt" style:text-underline-style="none" fo:font-weight="normal" officeooo:rsid="02463c3d" fo:background-color="#121314" loext:char-shading-value="0"/>
    </style:style>
    <style:style style:name="T100" style:family="text">
      <style:text-properties fo:color="#4ec9b0" loext:opacity="100%" fo:font-family="'Droid Sans Mono', monospace" fo:font-size="10.5pt" style:text-underline-style="none" fo:font-weight="normal" officeooo:rsid="02463c3d" fo:background-color="#121314" loext:char-shading-value="0"/>
    </style:style>
    <style:style style:name="T101" style:family="text">
      <style:text-properties fo:color="#d4d4d4" loext:opacity="100%" fo:font-family="'Droid Sans Mono', monospace" fo:font-size="10.5pt" style:text-underline-style="none" fo:font-weight="normal" officeooo:rsid="02463c3d" fo:background-color="#121314" loext:char-shading-value="0"/>
    </style:style>
    <style:style style:name="T102"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103"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04"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05"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6"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07"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08"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9"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10"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11"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12"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14" style:family="text">
      <style:text-properties style:text-underline-style="none" fo:font-weight="normal" officeooo:rsid="024defaf" fo:background-color="transparent" loext:char-shading-value="0"/>
    </style:style>
    <style:style style:name="T115"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6" style:family="text">
      <style:text-properties style:text-underline-style="none" fo:font-weight="normal" officeooo:rsid="024fdc8c" fo:background-color="transparent" loext:char-shading-value="0"/>
    </style:style>
    <style:style style:name="T117" style:family="text">
      <style:text-properties fo:color="#ffffff" loext:opacity="100%" fo:font-size="14pt" fo:font-weight="normal" officeooo:rsid="024fdc8c" style:font-size-asian="14pt" style:font-size-complex="14pt"/>
    </style:style>
    <style:style style:name="T118"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9" style:family="text">
      <style:text-properties style:text-underline-style="none" fo:font-weight="normal" officeooo:rsid="02483f67" fo:background-color="transparent" loext:char-shading-value="0"/>
    </style:style>
    <style:style style:name="T120" style:family="text">
      <style:text-properties fo:color="#ffffff" loext:opacity="100%" fo:font-size="14pt" fo:font-weight="normal" officeooo:rsid="02212731" fo:background-color="#b47804" loext:char-shading-value="0" style:font-size-asian="14pt" style:font-size-complex="14pt"/>
    </style:style>
    <style:style style:name="T121" style:family="text">
      <style:text-properties fo:color="#ffffff" loext:opacity="100%" fo:font-size="14pt" fo:font-weight="normal" officeooo:rsid="024aceee" fo:background-color="#00a933" loext:char-shading-value="0" style:font-size-asian="14pt" style:font-size-complex="14pt"/>
    </style:style>
    <style:style style:name="T122" style:family="text">
      <style:text-properties fo:color="#ffffff" loext:opacity="100%" fo:font-size="14pt" fo:font-weight="normal" officeooo:rsid="024defaf" fo:background-color="#00a933" loext:char-shading-value="0" style:font-size-asian="14pt" style:font-size-complex="14pt"/>
    </style:style>
    <style:style style:name="T12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24" style:family="text">
      <style:text-properties style:text-underline-style="none" officeooo:rsid="024c2621" fo:background-color="transparent" loext:char-shading-value="0"/>
    </style:style>
    <style:style style:name="T125"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26" style:family="text">
      <style:text-properties fo:color="#ffffff" loext:opacity="100%" fo:font-size="14pt" fo:font-weight="normal" officeooo:rsid="0254b429" fo:background-color="#00a933" loext:char-shading-value="0" style:font-size-asian="14pt" style:font-size-complex="14pt"/>
    </style:style>
    <style:style style:name="T12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0" style:family="text">
      <style:text-properties style:text-underline-style="none" fo:font-weight="normal" officeooo:rsid="02530e64" fo:background-color="transparent" loext:char-shading-value="0"/>
    </style:style>
    <style:style style:name="T131" style:family="text">
      <style:text-properties style:text-underline-style="none" fo:font-weight="normal" officeooo:rsid="025162a0" fo:background-color="transparent" loext:char-shading-value="0"/>
    </style:style>
    <style:style style:name="T132" style:family="text">
      <style:text-properties style:text-underline-style="none" officeooo:rsid="02530e64" fo:background-color="transparent" loext:char-shading-value="0"/>
    </style:style>
    <style:style style:name="T133" style:family="text">
      <style:text-properties fo:color="#ffffff" loext:opacity="100%" fo:font-size="14pt" style:text-underline-style="none" fo:font-weight="normal" officeooo:rsid="024defaf" fo:background-color="#00a933" loext:char-shading-value="0" style:font-size-asian="14pt" style:font-size-complex="14pt"/>
    </style:style>
    <style:style style:name="T134"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6"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37" style:family="text">
      <style:text-properties fo:color="#ffffff" loext:opacity="100%" fo:font-weight="normal" officeooo:rsid="02212731"/>
    </style:style>
    <style:style style:name="T138" style:family="text">
      <style:text-properties fo:color="#ffffff" loext:opacity="100%" fo:font-size="14pt" fo:font-weight="normal" officeooo:rsid="022317e8" fo:background-color="#b47804" loext:char-shading-value="0" style:font-size-asian="14pt" style:font-size-complex="14pt"/>
    </style:style>
    <style:style style:name="T139" style:family="text">
      <style:text-properties style:text-underline-style="none" officeooo:rsid="023943ac" fo:background-color="transparent" loext:char-shading-value="0"/>
    </style:style>
    <style:style style:name="T140"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1" style:family="text">
      <style:text-properties style:text-underline-style="none" officeooo:rsid="0236e83a" fo:background-color="transparent" loext:char-shading-value="0"/>
    </style:style>
    <style:style style:name="T142" style:family="text">
      <style:text-properties style:text-underline-style="none" fo:font-weight="normal" officeooo:rsid="0236e83a" fo:background-color="transparent" loext:char-shading-value="0"/>
    </style:style>
    <style:style style:name="T143" style:family="text">
      <style:text-properties style:text-underline-style="none" fo:font-weight="normal" officeooo:rsid="023943ac" fo:background-color="transparent" loext:char-shading-value="0"/>
    </style:style>
    <style:style style:name="T144" style:family="text">
      <style:text-properties fo:color="#ffffff" loext:opacity="100%" fo:font-size="14pt" fo:font-weight="normal" officeooo:rsid="0227dcad" fo:background-color="#069a2e" loext:char-shading-value="0" style:font-size-asian="14pt" style:font-size-complex="14pt"/>
    </style:style>
    <style:style style:name="T145"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7" style:family="text">
      <style:text-properties style:text-underline-style="none" fo:font-weight="normal" officeooo:rsid="0229133e" fo:background-color="transparent" loext:char-shading-value="0"/>
    </style:style>
    <style:style style:name="T148"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52" style:family="text">
      <style:text-properties fo:color="#ff0000" loext:opacity="100%" fo:font-size="14pt" fo:font-weight="normal" officeooo:rsid="0243785a" fo:background-color="#ffff00" loext:char-shading-value="0" style:font-size-asian="14pt" style:font-size-complex="14pt"/>
    </style:style>
    <style:style style:name="T153"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54" style:family="text">
      <style:text-properties style:text-underline-style="none" fo:font-weight="normal" officeooo:rsid="0243785a" fo:background-color="transparent" loext:char-shading-value="0"/>
    </style:style>
    <style:style style:name="T155"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56" style:family="text">
      <style:text-properties style:text-underline-style="none" officeooo:rsid="0244af53" fo:background-color="transparent" loext:char-shading-value="0"/>
    </style:style>
    <style:style style:name="T157"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58"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59" style:family="text">
      <style:text-properties style:text-underline-style="none" fo:font-weight="normal" fo:background-color="transparent" loext:char-shading-value="0" style:font-weight-asian="bold" style:font-weight-complex="bold"/>
    </style:style>
    <style:style style:name="T160"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61" style:family="text">
      <style:text-properties style:text-underline-style="none" fo:font-weight="normal" officeooo:rsid="0262cfc4" fo:background-color="transparent" loext:char-shading-value="0" style:font-weight-asian="bold" style:font-weight-complex="bold"/>
    </style:style>
    <style:style style:name="T162"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63"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64" style:family="text">
      <style:text-properties style:text-underline-style="none" fo:font-weight="normal" officeooo:rsid="0263ef18" fo:background-color="transparent" loext:char-shading-value="0" style:font-weight-asian="bold" style:font-weight-complex="bold"/>
    </style:style>
    <style:style style:name="T165"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66" style:family="text">
      <style:text-properties style:text-underline-style="none" fo:font-weight="normal" officeooo:rsid="02655e58" fo:background-color="transparent" loext:char-shading-value="0"/>
    </style:style>
    <style:style style:name="T167" style:family="text">
      <style:text-properties style:text-underline-style="none" officeooo:rsid="02655e58" fo:background-color="transparent" loext:char-shading-value="0"/>
    </style:style>
    <style:style style:name="T168" style:family="text">
      <style:text-properties style:text-underline-style="none" fo:font-weight="normal" officeooo:rsid="025c4710" fo:background-color="transparent" loext:char-shading-value="0" style:font-weight-asian="bold" style:font-weight-complex="bold"/>
    </style:style>
    <style:style style:name="T169" style:family="text">
      <style:text-properties style:text-underline-style="none" fo:font-weight="normal" officeooo:rsid="0267ea92" fo:background-color="transparent" loext:char-shading-value="0" style:font-weight-asian="bold" style:font-weight-complex="bold"/>
    </style:style>
    <style:style style:name="T170" style:family="text">
      <style:text-properties style:text-underline-style="none" fo:font-weight="normal" officeooo:rsid="0269a241" fo:background-color="transparent" loext:char-shading-value="0" style:font-weight-asian="bold" style:font-weight-complex="bold"/>
    </style:style>
    <style:style style:name="T171"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2"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3" style:family="text">
      <style:text-properties style:text-underline-style="none" fo:font-weight="normal" officeooo:rsid="026b6d9d" fo:background-color="transparent" loext:char-shading-value="0" style:font-weight-asian="bold" style:font-weight-complex="bold"/>
    </style:style>
    <style:style style:name="T174"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75"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76" style:family="text">
      <style:text-properties style:text-underline-style="none" fo:font-weight="normal" officeooo:rsid="026ce633" fo:background-color="transparent" loext:char-shading-value="0" style:font-weight-asian="bold" style:font-weight-complex="bold"/>
    </style:style>
    <style:style style:name="T177"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178"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179" style:family="text">
      <style:text-properties style:text-underline-style="none" fo:font-weight="normal" officeooo:rsid="0273bc6d" fo:background-color="transparent" loext:char-shading-value="0" style:font-weight-asian="bold" style:font-weight-complex="bold"/>
    </style:style>
    <style:style style:name="T180"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h text:style-name="P9" text:outline-level="3">VARIABLES DUPLAS</text:h>
      <text:p text:style-name="P10">Rust puede almacenar varias variables en duplas que pueden tener dos o más tipos de datos. Por ejemplo:</text:p>
      <text:p text:style-name="P10"><text:span text:style-name="_3c_C_3e_">let dupla1: </text:span><text:span text:style-name="_3c_C_2b__2b__3e_">(i32, i32) = (32, 42)</text:span><text:span text:style-name="_3c_C_3e_">;</text:span></text:p>
      <text:p text:style-name="P10"><text:span text:style-name="_3c_C_3e_">let dupla2: </text:span><text:span text:style-name="_3c_C_2b__2b__3e_">(i32, bool, &amp;str) = (32, true, "hola")</text:span><text:span text:style-name="_3c_C_3e_">;</text:span></text:p>
      <text:p text:style-name="P11">De tal forma que si queremos acceder a sus elementos seria:</text:p>
      <text:p text:style-name="P11"><text:span text:style-name="_3c_C_3e_">if dupla2</text:span><text:span text:style-name="_3c_C_2b__2b__3e_">.2</text:span><text:span text:style-name="_3c_C_3e_"> == "hola" {...}</text:span></text:p>
      <text:p text:style-name="P12"/>
      <text:h text:style-name="P13" text:outline-level="3">MATRICES</text:h>
      <text:p text:style-name="P14">Podemos usar matrices como en C:<text:line-break/></text:p>
      <text:p text:style-name="P14"><text:span text:style-name="_3c_C_2b__2b__3e_">let x: </text:span><text:span text:style-name="_3c_C_2b__2b__3e_"><text:span text:style-name="T24">[i32; 3]</text:span></text:span><text:span text:style-name="_3c_C_2b__2b__3e_"> = [1, 2 , 3];</text:span></text:p>
      <text:p text:style-name="P15"><text:span text:style-name="_2f__2f_C"><text:span text:style-name="T24">//let x = [1, 2, 3]; puede ser asi tambien y el deduciria el tipo.</text:span></text:span></text:p>
      <text:p text:style-name="P14"><text:span text:style-name="_3c_C_3e_">println!("{}", x[1]); </text:span><text:span text:style-name="_2f__2f_C">//imprimiría 2, pero es arriesgado</text:span></text:p>
      <text:p text:style-name="P14"><text:span text:style-name="_3c_C_3e_"><text:span text:style-name="T25">println!("{}", x[7]);</text:span></text:span><text:span text:style-name="_2f__2f_C"> //Entraría en modo "panic" que saldría de forma segura. No soltaria basura</text:span></text:p>
      <text:p text:style-name="P14"><text:span text:style-name="_2f__2f_C"/></text:p>
      <text:p text:style-name="P16">Para hacerlo de forma segura se puede usar </text:p>
      <text:p text:style-name="P16"><text:span text:style-name="_3c_C_2b__2b__3e_">x.get(1)</text:span><text:span text:style-name="_3c_C_3e_">; </text:span><text:span text:style-name="_2f__2f_C">//devolveria "Some(2)" en mayusculas la S</text:span></text:p>
      <text:p text:style-name="P16"><text:span text:style-name="_3c_C_3e_">x.get(7);</text:span><text:span text:style-name="_2f__2f_C"> //devolveria "None" en mayusculas la N</text:span></text:p>
      <text:p text:style-name="P16">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6"><text:span text:style-name="_3c_C_3e_"><text:tab/>println!("{}", </text:span><text:span text:style-name="_3c_C_3e_"><text:span text:style-name="T26">i</text:span></text:span><text:span text:style-name="_3c_C_3e_"><text:span text:style-name="T24">)</text:span></text:span><text:span text:style-name="_3c_C_3e_">;</text:span></text:p>
      <text:p text:style-name="P16"><text:span text:style-name="_3c_C_3e_">}</text:span><text:span text:style-name="_3c_C_3e_"><text:span text:style-name="T24"> </text:span></text:span><text:span text:style-name="_3c_C_3e_">else {</text:span></text:p>
      <text:p text:style-name="P16"><text:span text:style-name="_3c_C_3e_"><text:tab/>println!("no existe");</text:span></text:p>
      <text:p text:style-name="P16"><text:span text:style-name="_3c_C_3e_">}</text:span></text:p>
      <text:p text:style-name="P16">O en formáto Rust:</text:p>
      <text:p text:style-name="P16"/>
      <text:p text:style-name="P17"><text:span text:style-name="_3c_C_2b__2b__3e_">match x.get(2) {</text:span></text:p>
      <text:p text:style-name="P17"><text:span text:style-name="_3c_C_2b__2b__3e_"><text:tab/>Some(i) =&gt; println!("{}", i),</text:span></text:p>
      <text:p text:style-name="P17"><text:span text:style-name="_3c_C_2b__2b__3e_"><text:tab/>None<text:tab/>=&gt;<text:tab/> println!("No existe"),</text:span></text:p>
      <text:p text:style-name="P17"><text:span text:style-name="_3c_C_2b__2b__3e_">}</text:span></text:p>
      <text:p text:style-name="P10">El <text:span text:style-name="_3c_C_2b__2b__3e_">.get</text:span> lo que hace es devolver un <text:span text:style-name="_3c_C_2b__2b__3e_">OPTION</text:span> que puede ser un <text:span text:style-name="_3c_C_2b__2b__3e_">Some(T)</text:span> es decir algo, o <text:span text:style-name="_3c_C_2b__2b__3e_">None</text:span>.. es decir nada. Explicado más abajo en la parte de memorias.</text:p>
      <text:p text:style-name="P10"><text:soft-page-break/></text:p>
      <text:h text:style-name="P18" text:outline-level="3">VARIABLES GLOBALES</text:h>
      <text:p text:style-name="P19">El tener una variable global en Rust es <text:s/>un problema, ya que puede haber dataraces para modificarla asi que tiene que estar protegida.. si no no deja. </text:p>
      <text:p text:style-name="P19">La forma clásica es:<text:line-break/></text:p>
      <text:p text:style-name="P20"><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20"><text:span text:style-name="_3c_C_3e_"><text:span text:style-name="T28">fn main(){</text:span></text:span></text:p>
      <text:p text:style-name="P20"><text:span text:style-name="_3c_C_3e_"><text:span text:style-name="T28"><text:tab/>if true{</text:span></text:span></text:p>
      <text:p text:style-name="P20"><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20"><text:span text:style-name="_3c_C_3e_"><text:span text:style-name="T28"><text:tab/>}</text:span></text:span></text:p>
      <text:p text:style-name="P20"><text:span text:style-name="_3c_C_3e_"><text:span text:style-name="T28">}</text:span></text:span></text:p>
      <text:p text:style-name="P20"><text:span text:style-name="_3c_C_3e_"/></text:p>
      <text:p text:style-name="P21"><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21"><text:span text:style-name="_3c_C_2b__2b__3e_">use std::sync::atomic::{AtomicI32, ordering}</text:span></text:p>
      <text:p text:style-name="P21"><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2"><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2"><text:span text:style-name="_2f__2f_C"><text:span text:style-name="T31">me importa modificar el valor, no el orden del tiempo en que se haga.</text:span></text:span><text:span text:style-name="_3c_C_3e_"><text:line-break/> }<text:line-break/>}</text:span></text:p>
      <text:h text:style-name="P23" text:outline-level="3"/>
      <text:h text:style-name="P24" text:outline-level="3">PANIC!()</text:h>
      <text:p text:style-name="P25"><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5"><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5"><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5"><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5"><text:span text:style-name="_3c_C_3e_"><text:span text:style-name="T23"><text:tab/>self.title = title</text:span></text:span></text:p>
      <text:p text:style-name="P25"><text:span text:style-name="_3c_C_3e_"><text:span text:style-name="T23">}</text:span></text:span></text:p>
      <text:h text:style-name="P26" text:outline-level="3"><text:soft-page-break/><text:span text:style-name="_3c_C_3e_"><text:span text:style-name="T36">ExitCode</text:span></text:span></text:h>
      <text:p text:style-name="P27"><text:span text:style-name="_2f__2f_C"><text:span text:style-name="T37">Como en C, podemos retornar un valor de restorno 1 o 0 del programa. Para ello usamos el ExitCode de esta manera:</text:span></text:span></text:p>
      <text:p text:style-name="P27"><text:span text:style-name="_3c_C_2b__2b__3e_"><text:span text:style-name="T6">use std::process::ExitCode;</text:span></text:span></text:p>
      <text:p text:style-name="P27"><text:span text:style-name="_3c_C_3e_"><text:span text:style-name="T6">fn main() -</text:span></text:span><text:span text:style-name="_3c_C_2b__2b__3e_"><text:span text:style-name="T6"> &gt; ExitCode</text:span></text:span><text:span text:style-name="_3c_C_3e_"><text:span text:style-name="T6">{</text:span></text:span></text:p>
      <text:p text:style-name="P27"><text:span text:style-name="_3c_C_3e_"><text:span text:style-name="T6"><text:tab/>…</text:span></text:span></text:p>
      <text:p text:style-name="P27"><text:span text:style-name="_3c_C_3e_"><text:span text:style-name="T6"><text:tab/></text:span></text:span><text:span text:style-name="_3c_C_2b__2b__3e_"><text:span text:style-name="T6">ExitCode::from(0)</text:span></text:span></text:p>
      <text:p text:style-name="P27"><text:span text:style-name="_3c_C_3e_"><text:span text:style-name="T6">}</text:span></text:span></text:p>
      <text:p text:style-name="P27"><text:span text:style-name="_3c_C_3e_"><text:span text:style-name="T6"/></text:span></text:p>
      <text:h text:style-name="P26" text:outline-level="3"><text:span text:style-name="_3c_C_3e_"><text:span text:style-name="T38">Result()</text:span></text:span></text:h>
      <text:p text:style-name="P27"><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8"><text:span text:style-name="_2f__2f_C"><text:span text:style-name="T41">// Devuelve un Ok con el resultado (f32) O un Err con un texto (&amp;'static str)</text:span></text:span><text:span text:style-name="T42"/></text:p>
      <text:p text:style-name="P28"><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8"><text:span text:style-name="_3c_C_3e_"><text:span text:style-name="T41">if divisor == 0.0 {</text:span></text:span></text:p>
      <text:p text:style-name="P28"><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8"><text:span text:style-name="_3c_C_3e_"><text:span text:style-name="T41">}</text:span></text:span></text:p>
      <text:p text:style-name="P28"><text:span text:style-name="_3c_C_2b__2b__3e_"><text:span text:style-name="T43">Ok(dividendo / divisor)</text:span></text:span><text:span text:style-name="_3c_C_3e_"><text:span text:style-name="T41"> // Todo salió bien }</text:span></text:span></text:p>
      <text:p text:style-name="P28"><text:span text:style-name="_3c_C_3e_"><text:span text:style-name="T41">fn main() {</text:span></text:span></text:p>
      <text:p text:style-name="P28"><text:span text:style-name="_3c_C_3e_"><text:span text:style-name="T41"><text:tab/>// Cómo usar el resultado con un 'match' limpio</text:span></text:span></text:p>
      <text:p text:style-name="P28"><text:span text:style-name="_3c_C_3e_"><text:span text:style-name="T41"><text:tab/></text:span></text:span><text:span text:style-name="_3c_C_2b__2b__3e_"><text:span text:style-name="T43">match</text:span></text:span><text:span text:style-name="_3c_C_3e_"><text:span text:style-name="T41"> dividir(10.0, 2.0) {</text:span></text:span></text:p>
      <text:p text:style-name="P28"><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8"><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8"><text:span text:style-name="_3c_C_3e_"><text:span text:style-name="T41"><text:tab/>} </text:span></text:span></text:p>
      <text:p text:style-name="P29"><text:span text:style-name="_3c_C_3e_"><text:span text:style-name="T41">}</text:span></text:span></text:p>
      <text:p text:style-name="P29"><text:span text:style-name="_2f__2f_C"><text:span text:style-name="T44">Vamos a verlo con una forma más compleja. Abriendo un archivo que puede dar errores:</text:span></text:span></text:p>
      <text:p text:style-name="P29"><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30"><text:span text:style-name="_3c_C_3e_"><text:span text:style-name="T45"><text:tab/><text:tab/>let _reader = BufReader::new(input_file);</text:span></text:span></text:p>
      <text:p text:style-name="P30"><text:span text:style-name="_3c_C_3e_"><text:span text:style-name="T45"><text:tab/><text:tab/>for line in _reader.lines(){</text:span></text:span></text:p>
      <text:p text:style-name="P31"><text:span text:style-name="_3c_C_3e_"><text:span text:style-name="T45"><text:tab/><text:tab/><text:tab/></text:span></text:span><text:span text:style-name="_3c_C_2b__2b__3e_"><text:span text:style-name="T6">let line = match line{</text:span></text:span></text:p>
      <text:p text:style-name="P31"><text:span text:style-name="_3c_C_2b__2b__3e_"><text:span text:style-name="T6"><text:tab/><text:tab/><text:tab/><text:tab/>Ok(value) =&gt; value,</text:span></text:span></text:p>
      <text:p text:style-name="P31"><text:span text:style-name="_3c_C_2b__2b__3e_"><text:span text:style-name="T6"><text:tab/><text:tab/><text:tab/><text:tab/>Err(e) =&gt; return Err(“Error: Error leyendo el archivo\n”),</text:span></text:span></text:p>
      <text:p text:style-name="P31"><text:span text:style-name="_3c_C_3e_"><text:span text:style-name="T48"><text:tab/><text:tab/><text:tab/></text:span></text:span><text:span text:style-name="_3c_C_2b__2b__3e_"><text:span text:style-name="T6">};</text:span></text:span></text:p>
      <text:p text:style-name="P30"><text:soft-page-break/><text:span text:style-name="_3c_C_3e_"><text:span text:style-name="T45"><text:tab/><text:tab/>}</text:span></text:span></text:p>
      <text:p text:style-name="P30"><text:span text:style-name="_3c_C_2b__2b__3e_"><text:span text:style-name="T6">return Ok(());</text:span></text:span></text:p>
      <text:p text:style-name="P31"><text:span text:style-name="_3c_C_3e_"><text:span text:style-name="T48">} else {</text:span></text:span></text:p>
      <text:p text:style-name="P31"><text:span text:style-name="_3c_C_3e_"><text:span text:style-name="T48"><text:tab/></text:span></text:span><text:span text:style-name="_3c_C_2b__2b__3e_"><text:span text:style-name="T6">return Err(“Error: No puede abrir el fichero\n”);</text:span></text:span></text:p>
      <text:p text:style-name="P31"><text:span text:style-name="_3c_C_3e_"><text:span text:style-name="T48">}</text:span></text:span></text:p>
      <text:p text:style-name="P31"><text:span text:style-name="_3c_C_3e_"><text:span text:style-name="T48">}</text:span></text:span></text:p>
      <text:p text:style-name="P31"><text:span text:style-name="_2f__2f_C"><text:span text:style-name="T49">En este caso _reader.lines() devuelve un ITERADOR line y cada uno de ellos devuelve un Result&lt;String, error&gt; para averiguarlo hemos usado el match.. pero se puede hacer más pa linea:</text:span></text:span></text:p>
      <text:p text:style-name="P31"><text:span text:style-name="_3c_C_2b__2b__3e_"><text:span text:style-name="T6">let line = line?;</text:span></text:span></text:p>
      <text:p text:style-name="P32"><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2"><text:span text:style-name="_3c_C_2b__2b__3e_"><text:span text:style-name="T6">let line = line.map_err(|_|, “Error: Error leyendo el archivo\n”)?;</text:span></text:span></text:p>
      <text:h text:style-name="P33" text:outline-level="3"/>
      <text:h text:style-name="P33"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4"><text:span text:style-name="_2f__2f_C"><text:span text:style-name="T55">(</text:span></text:span><text:span text:style-name="_3c_C_3e_"><text:span text:style-name="T23">fichero.rs</text:span></text:span><text:span text:style-name="_2f__2f_C"><text:span text:style-name="T55">)</text:span></text:span></text:p>
      <text:p text:style-name="P34"><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4"><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4"><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4"><text:span text:style-name="_3c_C_3e_"><text:span text:style-name="T23">}</text:span></text:span></text:p>
      <text:p text:style-name="P34"><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5"><text:span text:style-name="_2f__2f_C"><text:span text:style-name="T58">(fichero: main.rs)</text:span></text:span></text:p>
      <text:p text:style-name="P34"><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4"><text:span text:style-name="_3c_C_3e_"><text:span text:style-name="T23">fn main(){</text:span></text:span></text:p>
      <text:p text:style-name="P34"><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4"><text:span text:style-name="_3c_C_3e_"><text:span text:style-name="T23">} </text:span></text:span></text:p>
      <text:p text:style-name="P34"><text:span text:style-name="_3c_C_3e_"><text:span text:style-name="T23"/></text:span></text:p>
      <text:p text:style-name="P35"><text:span text:style-name="_2f__2f_C"><text:span text:style-name="T59">Ahora imaginemos que tenemos un archivo.rs que tiene esto:</text:span></text:span></text:p>
      <text:p text:style-name="P35"><text:span text:style-name="_2f__2f_C"><text:span text:style-name="T59">(</text:span></text:span><text:span text:style-name="_3c_C_3e_"><text:span text:style-name="T12">fichero.rs</text:span></text:span><text:span text:style-name="_2f__2f_C"><text:span text:style-name="T59">)</text:span></text:span></text:p>
      <text:p text:style-name="P35"><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5"><text:soft-page-break/><text:span text:style-name="_3c_C_3e_"><text:span text:style-name="T12"><text:tab/>x: i32,</text:span></text:span></text:p>
      <text:p text:style-name="P35"><text:span text:style-name="_3c_C_3e_"><text:span text:style-name="T12">}</text:span></text:span></text:p>
      <text:p text:style-name="P35"><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5"><text:span text:style-name="_3c_C_3e_"><text:span text:style-name="T61"><text:tab/></text:span></text:span><text:span text:style-name="_3c_C_3e_"><text:span text:style-name="T12">Prueba {x: 56}</text:span></text:span></text:p>
      <text:p text:style-name="P35"><text:span text:style-name="_3c_C_3e_"><text:span text:style-name="T12">}</text:span></text:span></text:p>
      <text:p text:style-name="P35"><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5"><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6"><text:span text:style-name="_2f__2f_C"><text:span text:style-name="T63"><text:tab/>//&amp;self es como los objetos.. o this en c++ va implicito</text:span></text:span></text:p>
      <text:p text:style-name="P36"><text:span text:style-name="_2f__2f_C"><text:span text:style-name="T63"><text:tab/><text:tab/>(self) lo moveria el valor</text:span></text:span></text:p>
      <text:p text:style-name="P36"><text:span text:style-name="_2f__2f_C"><text:span text:style-name="T63"><text:tab/><text:tab/>(&amp;self) es inmutable</text:span></text:span></text:p>
      <text:p text:style-name="P36"><text:span text:style-name="_2f__2f_C"><text:span text:style-name="T63"><text:tab/><text:tab/>(&amp;mut self) lo podria cambiar.</text:span></text:span></text:p>
      <text:p text:style-name="P35"><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5"><text:span text:style-name="_3c_C_3e_"><text:span text:style-name="T12"><text:tab/>}</text:span></text:span></text:p>
      <text:p text:style-name="P35"><text:span text:style-name="_3c_C_3e_"><text:span text:style-name="T12">}</text:span></text:span></text:p>
      <text:p text:style-name="P37"><text:span text:style-name="_2f__2f_C"><text:span text:style-name="T65">En el main.rs:<text:line-break/></text:span></text:span></text:p>
      <text:p text:style-name="P37"><text:span text:style-name="_3c_C_3e_"><text:span text:style-name="T12">mod fichero;</text:span></text:span></text:p>
      <text:p text:style-name="P37"><text:span text:style-name="_3c_C_3e_"><text:span text:style-name="T12">fn main (){</text:span></text:span></text:p>
      <text:p text:style-name="P38"><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8"><text:span text:style-name="_3c_C_3e_"><text:span text:style-name="T61"><text:tab/></text:span></text:span><text:span text:style-name="_3c_C_3e_"><text:span text:style-name="T12">println!("{}", a.get_x());</text:span></text:span></text:p>
      <text:p text:style-name="P37"><text:span text:style-name="_3c_C_3e_"><text:span text:style-name="T12">}</text:span></text:span></text:p>
      <text:p text:style-name="P37"><text:span text:style-name="_3c_C_3e_"><text:span text:style-name="T12"/></text:span></text:p>
      <text:p text:style-name="P39"><text:span text:style-name="_2f__2f_C"><text:span text:style-name="T66">También se puede definir una estructura como:</text:span></text:span></text:p>
      <text:p text:style-name="P39"><text:span text:style-name="_3c_C_2b__2b__3e_"><text:span text:style-name="T15">struct St1(i32);</text:span></text:span></text:p>
      <text:p text:style-name="P39"><text:span text:style-name="_3c_C_2b__2b__3e_"><text:span text:style-name="T15">struct St2(f32, String, bool);</text:span></text:span></text:p>
      <text:p text:style-name="P39"><text:span text:style-name="_2f__2f_C"><text:span text:style-name="T66">En donde para tomar variables y usarlo sería:</text:span></text:span></text:p>
      <text:p text:style-name="P39"><text:span text:style-name="_3c_C_3e_"><text:span text:style-name="T12">let st1 = St1(42);</text:span></text:span></text:p>
      <text:p text:style-name="P39"><text:span text:style-name="_3c_C_3e_"><text:span text:style-name="T12">let st2 = St2(3.2, "hola".into(), true);</text:span></text:span></text:p>
      <text:p text:style-name="P39"><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9"><text:span text:style-name="_3c_C_3e_"><text:span text:style-name="T12">println!("{}", st2.1); </text:span></text:span><text:span text:style-name="_2f__2f_C"><text:span text:style-name="T12">//imprimiria "hola"</text:span></text:span></text:p>
      <text:p text:style-name="P37"><text:span text:style-name="_3c_C_3e_"><text:span text:style-name="T12"/></text:span></text:p>
      <text:h text:style-name="P40" text:outline-level="3"><text:soft-page-break/><text:span text:style-name="_3c_C_3e_"><text:span text:style-name="T67">FUNCIONES</text:span></text:span></text:h>
      <text:p text:style-name="P41"><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41"><text:span text:style-name="_2f__2f_C"><text:span text:style-name="T68">NO DEVUELVE:</text:span></text:span></text:p>
      <text:p text:style-name="P41"><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41"><text:span text:style-name="_3c_C_3e_"><text:span text:style-name="T12"><text:tab/>println!("El numero es: {}", num1</text:span></text:span><text:span text:style-name="_3c_C_3e_"><text:span text:style-name="T71">)</text:span></text:span><text:span text:style-name="_3c_C_3e_"><text:span text:style-name="T12">;</text:span></text:span></text:p>
      <text:p text:style-name="P41"><text:span text:style-name="_3c_C_3e_"><text:span text:style-name="T12">}</text:span></text:span></text:p>
      <text:p text:style-name="P41"><text:span text:style-name="_2f__2f_C"><text:span text:style-name="T68">DEVUELVE:</text:span></text:span></text:p>
      <text:p text:style-name="P41"><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41"><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2"><text:span text:style-name="_2f__2f_C"><text:span text:style-name="T71"><text:tab/>//Hay que derreferenciar, ya que son referencias (direcciones de memoria)</text:span></text:span></text:p>
      <text:p text:style-name="P41"><text:span text:style-name="_3c_C_3e_"><text:span text:style-name="T12">}</text:span></text:span></text:p>
      <text:p text:style-name="P41"><text:span text:style-name="_2f__2f_C"><text:span text:style-name="T68">Para llamarlas:</text:span></text:span></text:p>
      <text:p text:style-name="P41"><text:span text:style-name="_3c_C_3e_"><text:span text:style-name="T12">funcion(&amp;n);</text:span></text:span></text:p>
      <text:p text:style-name="P41"><text:span text:style-name="_3c_C_3e_"><text:span text:style-name="T12">suma(&amp;x, &amp;y);</text:span></text:span></text:p>
      <text:p text:style-name="P41"><text:span text:style-name="_3c_C_3e_"><text:span text:style-name="T12"/></text:span></text:p>
      <text:p text:style-name="P42"><text:span text:style-name="_2f__2f_C"><text:span text:style-name="T68">Para </text:span></text:span><text:span text:style-name="_2f__2f_C"><text:span text:style-name="T72">cambiar el valor de un numero</text:span></text:span><text:span text:style-name="_2f__2f_C"><text:span text:style-name="T68">:</text:span></text:span></text:p>
      <text:p text:style-name="P42"><text:span text:style-name="_3c_C_3e_"><text:span text:style-name="T12">fn cambia(n: &amp;mut i32){</text:span></text:span></text:p>
      <text:p text:style-name="P42"><text:span text:style-name="_3c_C_3e_"><text:span text:style-name="T12"><text:tab/>*n = 42;</text:span></text:span></text:p>
      <text:p text:style-name="P42"><text:span text:style-name="_3c_C_3e_"><text:span text:style-name="T12">}</text:span></text:span></text:p>
      <text:p text:style-name="P42"><text:span text:style-name="_2f__2f_C"><text:span text:style-name="T72">y para llamarla:</text:span></text:span></text:p>
      <text:p text:style-name="P42"><text:span text:style-name="_3c_C_3e_"><text:span text:style-name="T12">cambia(&amp;mut x);</text:span></text:span></text:p>
      <text:p text:style-name="P42"><text:span text:style-name="_3c_C_3e_"><text:span text:style-name="T12"/></text:span></text:p>
      <text:h text:style-name="P43" text:outline-level="3"><text:span text:style-name="_3c_C_3e_"><text:span text:style-name="T73">ENUMS</text:span></text:span></text:h>
      <text:p text:style-name="P44"><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4"><text:span text:style-name="_3c_C_2b__2b__3e_"><text:span text:style-name="T15">enum Animales</text:span></text:span><text:span text:style-name="_3c_C_3e_"><text:span text:style-name="T12">{</text:span></text:span></text:p>
      <text:p text:style-name="P44"><text:span text:style-name="_3c_C_3e_"><text:span text:style-name="T12"><text:tab/>Gato,</text:span></text:span></text:p>
      <text:p text:style-name="P44"><text:span text:style-name="_3c_C_3e_"><text:span text:style-name="T12"><text:tab/>Perro,</text:span></text:span></text:p>
      <text:p text:style-name="P44"><text:span text:style-name="_3c_C_3e_"><text:span text:style-name="T12"><text:tab/>Mosca,</text:span></text:span></text:p>
      <text:p text:style-name="P44"><text:span text:style-name="_3c_C_3e_"><text:span text:style-name="T12"><text:tab/>Ballena,</text:span></text:span></text:p>
      <text:p text:style-name="P44"><text:span text:style-name="_3c_C_3e_"><text:span text:style-name="T12">}</text:span></text:span></text:p>
      <text:p text:style-name="P44"><text:span text:style-name="_2f__2f_C"><text:span text:style-name="T74">De tal forma que para darle un valor se puede hacer:</text:span></text:span></text:p>
      <text:p text:style-name="P44"><text:span text:style-name="_3c_C_3e_"><text:span text:style-name="T12">let animal: Animales = </text:span></text:span><text:span text:style-name="_3c_C_2b__2b__3e_"><text:span text:style-name="T15">Animales::Mosca;</text:span></text:span></text:p>
      <text:p text:style-name="P44"><text:soft-page-break/><text:span text:style-name="_2f__2f_C"><text:span text:style-name="T74"/></text:span></text:p>
      <text:p text:style-name="P44"><text:span text:style-name="_2f__2f_C"><text:span text:style-name="T74">Podríamos crear funciones propias como:</text:span></text:span></text:p>
      <text:p text:style-name="P44"><text:span text:style-name="_3c_C_2b__2b__3e_"><text:span text:style-name="T15">impl Animales</text:span></text:span><text:span text:style-name="_3c_C_3e_"><text:span text:style-name="T12">{</text:span></text:span></text:p>
      <text:p text:style-name="P44"><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4"><text:span text:style-name="_3c_C_3e_"><text:span text:style-name="T12"><text:tab/><text:tab/></text:span></text:span><text:span text:style-name="_3c_C_2b__2b__3e_"><text:span text:style-name="T15">match self</text:span></text:span><text:span text:style-name="_3c_C_3e_"><text:span text:style-name="T12"> {</text:span></text:span></text:p>
      <text:p text:style-name="P44"><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4"><text:span text:style-name="_3c_C_3e_"><text:span text:style-name="T12"><text:tab/><text:tab/><text:tab/></text:span></text:span><text:span text:style-name="_3c_C_2b__2b__3e_"><text:span text:style-name="T15">Animales::Mosca =&gt; false</text:span></text:span></text:p>
      <text:p text:style-name="P44"><text:span text:style-name="_3c_C_3e_"><text:span text:style-name="T12"><text:tab/><text:tab/>}</text:span></text:span></text:p>
      <text:p text:style-name="P44"><text:span text:style-name="_3c_C_3e_"><text:span text:style-name="T12"><text:tab/>}</text:span></text:span></text:p>
      <text:p text:style-name="P44"><text:span text:style-name="_3c_C_3e_"><text:span text:style-name="T12">}</text:span></text:span></text:p>
      <text:p text:style-name="P44"><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4"><text:span text:style-name="_3c_C_3e_"><text:span text:style-name="T15">impl Animales{</text:span></text:span></text:p>
      <text:p text:style-name="P44"><text:span text:style-name="_3c_C_3e_"><text:span text:style-name="T15"><text:tab/>fn es_mamifero(&amp;self) -&gt; bool{</text:span></text:span></text:p>
      <text:p text:style-name="P44"><text:span text:style-name="_3c_C_3e_"><text:span text:style-name="T15"><text:tab/><text:tab/>match self {</text:span></text:span></text:p>
      <text:p text:style-name="P44"><text:span text:style-name="_3c_C_3e_"><text:span text:style-name="T15"><text:tab/><text:tab/><text:tab/>Animales::Mosca =&gt; false,</text:span></text:span></text:p>
      <text:p text:style-name="P44"><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4"><text:span text:style-name="_3c_C_3e_"><text:span text:style-name="T15"><text:tab/><text:tab/>}</text:span></text:span></text:p>
      <text:p text:style-name="P44"><text:span text:style-name="_3c_C_3e_"><text:span text:style-name="T15"><text:tab/>}</text:span></text:span></text:p>
      <text:p text:style-name="P44"><text:span text:style-name="_3c_C_3e_"><text:span text:style-name="T15">}</text:span></text:span></text:p>
      <text:p text:style-name="P45"><text:span text:style-name="_2f__2f_C"><text:span text:style-name="T76">Y para acceder a ese método es como un objeto:</text:span></text:span></text:p>
      <text:p text:style-name="P45"><text:span text:style-name="_3c_C_3e_"><text:span text:style-name="T12">let kk = Animales::Gato;</text:span></text:span></text:p>
      <text:p text:style-name="P45"><text:span text:style-name="_3c_C_3e_"><text:span text:style-name="T12">if kk</text:span></text:span><text:span text:style-name="_3c_C_2b__2b__3e_"><text:span text:style-name="T15">.es_mamifero() </text:span></text:span><text:span text:style-name="_3c_C_3e_"><text:span text:style-name="T12">{...}</text:span></text:span></text:p>
      <text:p text:style-name="P45"><text:span text:style-name="_3c_C_3e_"><text:span text:style-name="T12"/></text:span></text:p>
      <text:h text:style-name="P46" text:outline-level="3"><text:span text:style-name="_3c_C_3e_"><text:span text:style-name="T73">ENUMS</text:span></text:span><text:span text:style-name="_3c_C_3e_"><text:span text:style-name="T77"> con variables extra</text:span></text:span></text:h>
      <text:p text:style-name="P47"><text:span text:style-name="_2f__2f_C"><text:span text:style-name="T78">Los Enums en Rust son como los de C, C++, Java, pero tienen algo único. Se les pueden añadir variables a cada uno de los datos incluidos:</text:span></text:span></text:p>
      <text:p text:style-name="P47"><text:span text:style-name="_3c_C_3e_"><text:span text:style-name="T12">enum Status{</text:span></text:span></text:p>
      <text:p text:style-name="P47"><text:span text:style-name="_3c_C_3e_"><text:span text:style-name="T12"><text:tab/>PorHacer,</text:span></text:span></text:p>
      <text:p text:style-name="P47"><text:span text:style-name="_3c_C_3e_"><text:span text:style-name="T12"><text:tab/>EnProgreso</text:span></text:span><text:span text:style-name="_3c_C_2b__2b__3e_"><text:span text:style-name="T15">{</text:span></text:span></text:p>
      <text:p text:style-name="P47"><text:span text:style-name="_3c_C_2b__2b__3e_"><text:span text:style-name="T15"><text:tab/><text:tab/>asignado_a: String,</text:span></text:span></text:p>
      <text:p text:style-name="P47"><text:span text:style-name="_3c_C_2b__2b__3e_"><text:span text:style-name="T15"><text:tab/>},</text:span></text:span></text:p>
      <text:p text:style-name="P47"><text:soft-page-break/><text:span text:style-name="_3c_C_3e_"><text:span text:style-name="T12"><text:tab/>Hecho,</text:span></text:span></text:p>
      <text:p text:style-name="P47"><text:span text:style-name="_3c_C_3e_"><text:span text:style-name="T12">}</text:span></text:span></text:p>
      <text:p text:style-name="P47"><text:span text:style-name="_2f__2f_C"><text:span text:style-name="T78">Y la forma de acceder a ello no es mediante un </text:span></text:span></text:p>
      <text:p text:style-name="P47"><text:span text:style-name="_2f__2f_C"><text:span text:style-name="T78"/></text:span></text:p>
      <text:p text:style-name="P47"><text:span text:style-name="_3c_C_3e_"><text:span text:style-name="T12">let estado = Status::EnProgreso;</text:span></text:span></text:p>
      <text:p text:style-name="P47"><text:span text:style-name="_3c_C_3e_"><text:span text:style-name="T12">estado.asignado_a; </text:span></text:span><text:span text:style-name="_3c_C_2b__2b__3e_"><text:span text:style-name="T15">//error de compilación</text:span></text:span></text:p>
      <text:p text:style-name="P47"><text:span text:style-name="_2f__2f_C"><text:span text:style-name="T78"/></text:span></text:p>
      <text:p text:style-name="P47"><text:span text:style-name="_2f__2f_C"><text:span text:style-name="T78">Sino con un bloque match:<text:line-break/></text:span></text:span><text:span text:style-name="_3c_C_3e_"><text:span text:style-name="T12">match Status{</text:span></text:span></text:p>
      <text:p text:style-name="P47"><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7"><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8"><text:span text:style-name="_2f__2f_C"><text:span text:style-name="T80">PERO CUIDADO!!!!</text:span></text:span><text:span text:style-name="_2f__2f_C"><text:span text:style-name="T81"> Si hacemos eso destruimos la variable instanciada de Status, por que el Ownership pasaría en el bloque </text:span></text:span><text:span text:style-name="_3c_C_3e_"><text:span text:style-name="T12">{println!...}</text:span></text:span><text:span text:style-name="_3c_C_3e_"><text:span text:style-name="T82"> </text:span></text:span><text:span text:style-name="_2f__2f_C"><text:span text:style-name="T81">al </text:span></text:span><text:span text:style-name="_3c_C_3e_"><text:span text:style-name="T12">match</text:span></text:span><text:span text:style-name="_2f__2f_C"><text:span text:style-name="T81"> y por lo tanto al querer usar el </text:span></text:span><text:span text:style-name="_3c_C_3e_"><text:span text:style-name="T12">Status</text:span></text:span><text:span text:style-name="_2f__2f_C"><text:span text:style-name="T81"> de la instancia después daría error de compilación. Para ello es mejor hacer:</text:span></text:span></text:p>
      <text:p text:style-name="P48"><text:span text:style-name="_3c_C_3e_"><text:span text:style-name="T12">match </text:span></text:span><text:span text:style-name="_3c_C_2b__2b__3e_"><text:span text:style-name="T15">&amp;</text:span></text:span><text:span text:style-name="_3c_C_3e_"><text:span text:style-name="T12">Status{ </text:span></text:span><text:span text:style-name="_2f__2f_C"><text:span text:style-name="T12">//mismo código</text:span></text:span><text:span text:style-name="_3c_C_3e_"><text:span text:style-name="T12">}</text:span></text:span><text:span text:style-name="_2f__2f_C"><text:span text:style-name="T81"> y ahí se podria usar sin problemas después.</text:span></text:span></text:p>
      <text:h text:style-name="P49" text:outline-level="3"><text:span text:style-name="_3c_C_3e_"><text:span text:style-name="T67"/></text:span></text:h>
      <text:p text:style-name="P50"><text:span text:style-name="_2f__2f_C"><text:span text:style-name="T83">También se puede hacer el acceso con el if let. </text:span></text:span></text:p>
      <text:p text:style-name="P50"><text:span text:style-name="_3c_C_3e_"><text:span text:style-name="T23">impl Ticket{</text:span></text:span></text:p>
      <text:p text:style-name="P50"><text:span text:style-name="_3c_C_3e_"><text:span text:style-name="T23"><text:tab/>pub fn assigned_to(&amp;self) -&gt; &amp;str{</text:span></text:span></text:p>
      <text:p text:style-name="P50"><text:span text:style-name="_3c_C_3e_"><text:span text:style-name="T23"><text:tab/><text:tab/>if let Status::EnProgreso { asignado_a : kk } = &amp;self.status { kk }</text:span></text:span></text:p>
      <text:p text:style-name="P50"><text:span text:style-name="_3c_C_3e_"><text:span text:style-name="T23"><text:tab/><text:tab/>else { panic!();}</text:span></text:span></text:p>
      <text:p text:style-name="P50"><text:span text:style-name="_3c_C_3e_"><text:span text:style-name="T23"><text:tab/>}</text:span></text:span></text:p>
      <text:p text:style-name="P50"><text:span text:style-name="_3c_C_3e_"><text:span text:style-name="T23">}</text:span></text:span></text:p>
      <text:p text:style-name="P50"><text:span text:style-name="_2f__2f_C"><text:span text:style-name="T83">Es complicado de entender pero ahi va:</text:span></text:span></text:p>
      <text:p text:style-name="P50"><text:span text:style-name="_2f__2f_C"><text:span text:style-name="T83">cuando hay un un let siempre es una asignación a una variable. pero podemos hacerlo dentro de un if. La forma de leer esto es de derecha a izquierda, por que como se puede ver hay una = no ==. entonces esto se estructura asi:<text:line-break/></text:span></text:span></text:p>
      <text:p text:style-name="P50"><text:span text:style-name="_3c_C_2b__2b__3e_"><text:span text:style-name="T6">if let PLANTILLA (nueva variable) = algo que existe o no.</text:span></text:span></text:p>
      <text:p text:style-name="P50"><text:span text:style-name="_2f__2f_C"><text:span text:style-name="T83"/></text:span></text:p>
      <text:p text:style-name="P50"><text:span text:style-name="_2f__2f_C"><text:span text:style-name="T83">asi que se leería, que si esto: </text:span></text:span><text:span text:style-name="_3c_C_2b__2b__3e_"><text:span text:style-name="T6">self.status</text:span></text:span><text:span text:style-name="_2f__2f_C"><text:span text:style-name="T83"> existe y se adapta a que sea un </text:span></text:span><text:span text:style-name="_3c_C_3e_"><text:span text:style-name="T23">Status::EnProgreso { asignado_a },</text:span></text:span><text:span text:style-name="_2f__2f_C"><text:span text:style-name="T83"> entonces mete ese </text:span></text:span><text:span text:style-name="_3c_C_3e_"><text:span text:style-name="T23">asignado_a</text:span></text:span><text:span text:style-name="_2f__2f_C"><text:span text:style-name="T83"> dentro de la variable </text:span></text:span><text:span text:style-name="_3c_C_3e_"><text:span text:style-name="T23">kk</text:span></text:span><text:span text:style-name="_2f__2f_C"><text:span text:style-name="T83"> y devuelve ese </text:span></text:span><text:span text:style-name="_3c_C_3e_"><text:span text:style-name="T23">kk</text:span></text:span><text:span text:style-name="_2f__2f_C"><text:span text:style-name="T83"> de esta forma </text:span></text:span><text:span text:style-name="_3c_C_3e_"><text:span text:style-name="T23">{ kk }</text:span></text:span><text:span text:style-name="_2f__2f_C"><text:span text:style-name="T83">.</text:span></text:span><text:span text:style-name="_2f__2f_C"><text:span text:style-name="T84"> El meter ese valor, se llama DESTRUCTURACION. Sacar el valor de la caja y meterlo dentro.</text:span></text:span></text:p>
      <text:p text:style-name="P51"><text:soft-page-break/><text:span text:style-name="_2f__2f_C"><text:span text:style-name="T84">Por qué es necesario? por que quizá podríamos pensar hacer un:</text:span></text:span></text:p>
      <text:p text:style-name="P51"><text:span text:style-name="_3c_C_3e_"><text:span text:style-name="T23">if Status::EnProgreso.asignado_a == {asignado_a = paco}</text:span></text:span><text:span text:style-name="_2f__2f_C"><text:span text:style-name="T84"> pero primero no sabemos a quien está asignado, y segundo que pasaría si no existe ese </text:span></text:span><text:span text:style-name="_3c_C_3e_"><text:span text:style-name="T6">EnProgreso</text:span></text:span><text:span text:style-name="_2f__2f_C"><text:span text:style-name="T84"> y es un </text:span></text:span><text:span text:style-name="_3c_C_3e_"><text:span text:style-name="T23">Status::Hecho</text:span></text:span><text:span text:style-name="_2f__2f_C"><text:span text:style-name="T84">? no existiría el </text:span></text:span><text:span text:style-name="_3c_C_3e_"><text:span text:style-name="T23">.asignado_a</text:span></text:span><text:span text:style-name="_2f__2f_C"><text:span text:style-name="T84">, y por lo tanto daría un </text:span></text:span><text:span text:style-name="_3c_C_2b__2b__3e_"><text:span text:style-name="T6">segfaul</text:span></text:span><text:span text:style-name="_2f__2f_C"><text:span text:style-name="T84">.</text:span></text:span></text:p>
      <text:p text:style-name="P50"><text:span text:style-name="_2f__2f_C"><text:span text:style-name="T83">Todo se podría haber resumido asi:</text:span></text:span></text:p>
      <text:p text:style-name="P50"><text:span text:style-name="_3c_C_3e_"><text:span text:style-name="T23">if let Status::EnProgreso { </text:span></text:span><text:span text:style-name="_3c_C_2b__2b__3e_"><text:span text:style-name="T6">asignado_a</text:span></text:span><text:span text:style-name="_3c_C_3e_"><text:span text:style-name="T23"> } = &amp;self.status { </text:span></text:span><text:span text:style-name="_3c_C_2b__2b__3e_"><text:span text:style-name="T6">asignado_a</text:span></text:span><text:span text:style-name="_3c_C_3e_"><text:span text:style-name="T23"> } else....</text:span></text:span></text:p>
      <text:p text:style-name="P52"><text:span text:style-name="_2f__2f_C"><text:span text:style-name="T83"/></text:span></text:p>
      <text:p text:style-name="P52"><text:span text:style-name="_2f__2f_C"><text:span text:style-name="T85">Pero importante. Fijarse lo que devuelve: </text:span></text:span></text:p>
      <text:p text:style-name="P52"><text:span text:style-name="_3c_C_3e_"><text:span text:style-name="T23">pub fn assigned_to(&amp;self) -&gt; &amp;str{</text:span></text:span></text:p>
      <text:p text:style-name="P52"><text:span text:style-name="_2f__2f_C"><text:span text:style-name="T85">Es decir una dirección de memoria (</text:span></text:span><text:span text:style-name="_3c_C_3e_"><text:span text:style-name="T23">char*</text:span></text:span><text:span text:style-name="_2f__2f_C"><text:span text:style-name="T85">) por lo tanto el segundo </text:span></text:span><text:span text:style-name="_3c_C_3e_"><text:span text:style-name="T23">asignado_a</text:span></text:span><text:span text:style-name="_2f__2f_C"><text:span text:style-name="T85"> o el </text:span></text:span><text:span text:style-name="_3c_C_3e_"><text:span text:style-name="T23">{kk}</text:span></text:span><text:span text:style-name="_2f__2f_C"><text:span text:style-name="T85"> primero, son direcciones de memoria y está bien. Si devolviéramos valores, entonces tendría que ir como </text:span></text:span><text:span text:style-name="_3c_C_2b__2b__3e_"><text:span text:style-name="T6">*asignado_a</text:span></text:span><text:span text:style-name="_2f__2f_C"><text:span text:style-name="T85">.</text:span></text:span></text:p>
      <text:p text:style-name="P52"><text:span text:style-name="_3c_C_3e_"><text:span text:style-name="T23">enum Shape{</text:span></text:span></text:p>
      <text:p text:style-name="P52"><text:span text:style-name="_3c_C_3e_"><text:span text:style-name="T23"><text:tab/>Circle { radius: f64}, Square { border: f64 }, Rectangle { width: f64 }, </text:span></text:span></text:p>
      <text:p text:style-name="P52"><text:span text:style-name="_3c_C_3e_"><text:span text:style-name="T23">}</text:span></text:span></text:p>
      <text:p text:style-name="P52"><text:span text:style-name="_3c_C_3e_"><text:span text:style-name="T23">impl Shape {</text:span></text:span></text:p>
      <text:p text:style-name="P52"><text:span text:style-name="_3c_C_3e_"><text:span text:style-name="T23"><text:tab/>pub fn radius(&amp;self) -&gt; </text:span></text:span><text:span text:style-name="_3c_C_2b__2b__3e_"><text:span text:style-name="T6">f64</text:span></text:span><text:span text:style-name="_3c_C_3e_"><text:span text:style-name="T23">{</text:span></text:span></text:p>
      <text:p text:style-name="P52"><text:span text:style-name="_3c_C_3e_"><text:span text:style-name="T23"><text:tab/><text:tab/>if let Shape::Circle { radius } = </text:span></text:span><text:span text:style-name="_3c_C_2b__2b__3e_"><text:span text:style-name="T6">&amp;</text:span></text:span><text:span text:style-name="_3c_C_3e_"><text:span text:style-name="T23">self { </text:span></text:span><text:span text:style-name="_3c_C_2b__2b__3e_"><text:span text:style-name="T6">*radius</text:span></text:span><text:span text:style-name="_3c_C_3e_"><text:span text:style-name="T23"> } </text:span></text:span><text:span text:style-name="_2f__2f_C"><text:span text:style-name="T23">//derreferencia por ser </text:span></text:span><text:span text:style-name="_2f__2f_C"><text:span text:style-name="T86">&amp;self</text:span></text:span></text:p>
      <text:p text:style-name="P52"><text:span text:style-name="_3c_C_3e_"><text:span text:style-name="T23"><text:tab/><text:tab/>else { panic!(); }</text:span></text:span></text:p>
      <text:p text:style-name="P52"><text:span text:style-name="_3c_C_3e_"><text:span text:style-name="T23"><text:tab/>}</text:span></text:span></text:p>
      <text:p text:style-name="P53"><text:span text:style-name="_3c_C_3e_"><text:span text:style-name="T23">}</text:span></text:span></text:p>
      <text:p text:style-name="P54"><text:span text:style-name="_3c_C_3e_"><text:span text:style-name="T87"/></text:span></text:p>
      <text:h text:style-name="P49" text:outline-level="3"><text:span text:style-name="_3c_C_3e_"><text:span text:style-name="T67">FUNCIONES</text:span></text:span><text:span text:style-name="_3c_C_3e_"><text:span text:style-name="T88"> CLOSURE |parametros|</text:span></text:span></text:h>
      <text:p text:style-name="P55"><text:span text:style-name="_2f__2f_C"><text:span text:style-name="T89">Hay veces que queremos pasar una funcion mas limpiamente o mas corta. Se puede definir la normal como:<text:line-break/></text:span></text:span></text:p>
      <text:p text:style-name="P55"><text:span text:style-name="_3c_C_3e_"><text:span text:style-name="T12">fn sumar (x: i32, y: i32) -&gt; i32{</text:span></text:span></text:p>
      <text:p text:style-name="P55"><text:span text:style-name="_3c_C_3e_"><text:span text:style-name="T12"><text:tab/>x + y</text:span></text:span></text:p>
      <text:p text:style-name="P55"><text:span text:style-name="_3c_C_3e_"><text:span text:style-name="T12">}</text:span></text:span></text:p>
      <text:p text:style-name="P55"><text:span text:style-name="_2f__2f_C"><text:span text:style-name="T89">Pero podemos hacerla Closure:</text:span></text:span></text:p>
      <text:p text:style-name="P55"><text:span text:style-name="_3c_C_2b__2b__3e_"><text:span text:style-name="T15">let sumar = |x</text:span></text:span><text:span text:style-name="_3c_C_2b__2b__3e_"><text:span text:style-name="T90">,</text:span></text:span><text:span text:style-name="_3c_C_2b__2b__3e_"><text:span text:style-name="T15"> y| x + y;</text:span></text:span></text:p>
      <text:p text:style-name="P55"><text:span text:style-name="_2f__2f_C"><text:span text:style-name="T89">y se la llama como:</text:span></text:span></text:p>
      <text:p text:style-name="P55"><text:span text:style-name="_3c_C_3e_"><text:span text:style-name="T91">let resultado = </text:span></text:span><text:span text:style-name="_3c_C_3e_"><text:span text:style-name="T12">sumar(2, 3);</text:span></text:span></text:p>
      <text:p text:style-name="P55"><text:span text:style-name="_2f__2f_C"><text:span text:style-name="T89">esto mismo se puede hacer en una unica linea asi:</text:span></text:span></text:p>
      <text:p text:style-name="P55"><text:soft-page-break/><text:span text:style-name="_3c_C_2b__2b__3e_"><text:span text:style-name="T15">let sumar = </text:span></text:span><text:span text:style-name="_3c_C_2b__2b__3e_"><text:span text:style-name="T90">(</text:span></text:span><text:span text:style-name="_3c_C_2b__2b__3e_"><text:span text:style-name="T15">|x</text:span></text:span><text:span text:style-name="_3c_C_2b__2b__3e_"><text:span text:style-name="T90">,</text:span></text:span><text:span text:style-name="_3c_C_2b__2b__3e_"><text:span text:style-name="T15"> y| x + y</text:span></text:span><text:span text:style-name="_3c_C_2b__2b__3e_"><text:span text:style-name="T90">)(2, 3);</text:span></text:span></text:p>
      <text:p text:style-name="P55"><text:span text:style-name="_2f__2f_C"><text:span text:style-name="T89"/></text:span></text:p>
      <text:h text:style-name="P56" text:outline-level="3"><text:span text:style-name="_3c_C_3e_"><text:span text:style-name="T92">TRAITS</text:span></text:span></text:h>
      <text:h text:style-name="P57" text:outline-level="3"><text:span text:style-name="_3c_C_3e_"><text:span text:style-name="T93">SOBRECARGA DE OPERADORES</text:span></text:span></text:h>
      <text:p text:style-name="P58"><text:span text:style-name="_2f__2f_C"><text:span text:style-name="T94">Rust tiene sobrecarga de operadores, y la forma de declararlos es en el </text:span></text:span><text:span text:style-name="_3c_C_2b__2b__3e_"><text:span text:style-name="T15">impl</text:span></text:span><text:span text:style-name="_2f__2f_C"><text:span text:style-name="T94"> de tal forma:</text:span></text:span></text:p>
      <text:p text:style-name="P59"><text:span text:style-name="_3c_C_3e_"><text:span text:style-name="T12">use std::ops::Add;</text:span></text:span><text:span text:style-name="_2f__2f_C"><text:span text:style-name="T95"> </text:span></text:span><text:span text:style-name="_2f__2f_C"><text:span text:style-name="T96">//importa el trait (el operador) de Add. Si no no se puede usar. </text:span></text:span><text:span text:style-name="_2f__2f_C"><text:span text:style-name="T97">Para implementar muchos poner:</text:span></text:span></text:p>
      <text:p text:style-name="P60"><text:span text:style-name="_2f__2f_C"><text:span text:style-name="T98">use</text:span></text:span><text:span text:style-name="_2f__2f_C"><text:span text:style-name="T99"> </text:span></text:span><text:span text:style-name="_2f__2f_C"><text:span text:style-name="T100">std</text:span></text:span><text:span text:style-name="_2f__2f_C"><text:span text:style-name="T101">::</text:span></text:span><text:span text:style-name="_2f__2f_C"><text:span text:style-name="T100">ops</text:span></text:span><text:span text:style-name="_2f__2f_C"><text:span text:style-name="T101">::</text:span></text:span><text:span text:style-name="_2f__2f_C"><text:span text:style-name="T99">{</text:span></text:span><text:span text:style-name="_2f__2f_C"><text:span text:style-name="T100">Add</text:span></text:span><text:span text:style-name="_2f__2f_C"><text:span text:style-name="T99">, </text:span></text:span><text:span text:style-name="_2f__2f_C"><text:span text:style-name="T100">AddAssign</text:span></text:span><text:span text:style-name="_2f__2f_C"><text:span text:style-name="T99">, </text:span></text:span><text:span text:style-name="_2f__2f_C"><text:span text:style-name="T100">Sub</text:span></text:span><text:span text:style-name="_2f__2f_C"><text:span text:style-name="T99">, </text:span></text:span><text:span text:style-name="_2f__2f_C"><text:span text:style-name="T100">SubAssign</text:span></text:span><text:span text:style-name="_2f__2f_C"><text:span text:style-name="T99">, </text:span></text:span><text:span text:style-name="_2f__2f_C"><text:span text:style-name="T100">Mul</text:span></text:span><text:span text:style-name="_2f__2f_C"><text:span text:style-name="T99">, </text:span></text:span><text:span text:style-name="_2f__2f_C"><text:span text:style-name="T100">MulAssign</text:span></text:span><text:span text:style-name="_2f__2f_C"><text:span text:style-name="T99">, </text:span></text:span><text:span text:style-name="_2f__2f_C"><text:span text:style-name="T100">Div</text:span></text:span><text:span text:style-name="_2f__2f_C"><text:span text:style-name="T99">, </text:span></text:span><text:span text:style-name="_2f__2f_C"><text:span text:style-name="T100">DivAssign</text:span></text:span><text:span text:style-name="_2f__2f_C"><text:span text:style-name="T99">};</text:span></text:span></text:p>
      <text:p text:style-name="P59"><text:span text:style-name="_2f__2f_C"><text:span text:style-name="T97"/></text:span></text:p>
      <text:p text:style-name="P61"><text:span text:style-name="_2f__2f_C"><text:span text:style-name="T41">// Es muy útil derivar Copy y Clone para tipos matemáticos simples </text:span></text:span><text:span text:style-name="_2f__2f_C"><text:span text:style-name="T102">hay que hacerlo copy por que sino será un clone que pierde su propiedad y no se puede usar al pasarlo a dicha función.</text:span></text:span></text:p>
      <text:p text:style-name="P61"><text:span text:style-name="_3c_C_2b__2b__3e_"><text:span text:style-name="T43">#[derive(Debug, Clone, Copy)]</text:span></text:span></text:p>
      <text:p text:style-name="P58"><text:span text:style-name="_3c_C_3e_"><text:span text:style-name="T12">struct Vector3{...}</text:span></text:span></text:p>
      <text:p text:style-name="P58"><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58"><text:span text:style-name="_3c_C_3e_"><text:span text:style-name="T12"><text:tab/>type Output = Vect</text:span></text:span><text:span text:style-name="_3c_C_3e_"><text:span text:style-name="T96">or</text:span></text:span><text:span text:style-name="_3c_C_3e_"><text:span text:style-name="T12">3; </text:span></text:span><text:span text:style-name="_2f__2f_C"><text:span text:style-name="T12">//el resultado de la operacion v1 + v2 sera un Vect3</text:span></text:span></text:p>
      <text:p text:style-name="P58"><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96">or</text:span></text:span><text:span text:style-name="_3c_C_3e_"><text:span text:style-name="T12">3) -&gt; Vect</text:span></text:span><text:span text:style-name="_3c_C_3e_"><text:span text:style-name="T96">or</text:span></text:span><text:span text:style-name="_3c_C_3e_"><text:span text:style-name="T12">3{…}</text:span></text:span></text:p>
      <text:p text:style-name="P61"><text:span text:style-name="_2f__2f_C"><text:span text:style-name="T103">Como se ve, necesita el tipo de output, es decir lo <text:s/>que va a devolver, por que podría ser cualquier otra cosa. Pero en los de asignación no hay que ponerlo:</text:span></text:span></text:p>
      <text:p text:style-name="P61"><text:span text:style-name="_3c_C_3e_"><text:span text:style-name="T12">impl </text:span></text:span><text:span text:style-name="_3c_C_2b__2b__3e_"><text:span text:style-name="T15">AddAssign</text:span></text:span><text:span text:style-name="_3c_C_3e_"><text:span text:style-name="T12"> for Vector3{</text:span></text:span></text:p>
      <text:p text:style-name="P61"><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61"><text:span text:style-name="_3c_C_3e_"><text:span text:style-name="T12"><text:tab/><text:tab/>self.x += other.x;</text:span></text:span></text:p>
      <text:p text:style-name="P61"><text:span text:style-name="_3c_C_3e_"><text:span text:style-name="T12"><text:tab/><text:tab/>self.y += other.y;</text:span></text:span></text:p>
      <text:p text:style-name="P61"><text:span text:style-name="_3c_C_3e_"><text:span text:style-name="T12"><text:tab/><text:tab/>self.z += other.z;</text:span></text:span></text:p>
      <text:p text:style-name="P61"><text:span text:style-name="_3c_C_3e_"><text:span text:style-name="T12"><text:tab/>}</text:span></text:span></text:p>
      <text:p text:style-name="P61"><text:span text:style-name="_3c_C_3e_"><text:span text:style-name="T12">}</text:span></text:span></text:p>
      <text:p text:style-name="P58"><text:span text:style-name="_3c_C_3e_"><text:span text:style-name="T12"/></text:span></text:p>
      <text:p text:style-name="P62"><text:span text:style-name="_2f__2f_C"><text:span text:style-name="T104">La sobrecarga es con nombre may</text:span></text:span><text:span text:style-name="_2f__2f_C"><text:span text:style-name="T105">ú</text:span></text:span><text:span text:style-name="_2f__2f_C"><text:span text:style-name="T104">scula, y la funci</text:span></text:span><text:span text:style-name="_2f__2f_C"><text:span text:style-name="T105">ón</text:span></text:span><text:span text:style-name="_2f__2f_C"><text:span text:style-name="T104"> en min</text:span></text:span><text:span text:style-name="_2f__2f_C"><text:span text:style-name="T105">ú</text:span></text:span><text:span text:style-name="_2f__2f_C"><text:span text:style-name="T104">scula pero llamada igual. La lista es la siguiente para las sobrecargas (entre par</text:span></text:span><text:span text:style-name="_2f__2f_C"><text:span text:style-name="T105">éntesis el nombre a la función)</text:span></text:span><text:span text:style-name="_2f__2f_C"><text:span text:style-name="T104">:</text:span></text:span></text:p>
      <text:p text:style-name="P63"><text:span text:style-name="_2f__2f_C"><text:span text:style-name="T106">+<text:tab/>-&gt; <text:tab/>Add (add)<text:tab/><text:tab/><text:tab/><text:tab/></text:span></text:span><text:span text:style-name="_2f__2f_C"><text:span text:style-name="T107"><text:tab/><text:tab/><text:tab/><text:tab/></text:span></text:span><text:span text:style-name="_2f__2f_C"><text:span text:style-name="T106">+=<text:tab/>-&gt;<text:tab/><text:tab/>AddAssign (add</text:span></text:span><text:span text:style-name="_2f__2f_C"><text:span text:style-name="T108">_</text:span></text:span><text:span text:style-name="_2f__2f_C"><text:span text:style-name="T106">assign)<text:tab/><text:tab/><text:tab/><text:tab/><text:tab/></text:span></text:span></text:p>
      <text:p text:style-name="P63"><text:span text:style-name="_2f__2f_C"><text:span text:style-name="T106">-<text:tab/>-&gt;<text:tab/></text:span></text:span><text:span text:style-name="_2f__2f_C"><text:span text:style-name="T108"><text:tab/></text:span></text:span><text:span text:style-name="_2f__2f_C"><text:span text:style-name="T106">Sub (sub)</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SubAssign (sub_assign)</text:span></text:span></text:p>
      <text:p text:style-name="P64"><text:span text:style-name="_2f__2f_C"><text:span text:style-name="T106">*<text:tab/>-&gt;<text:tab/><text:tab/>Mul (mul)</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MulAssign (mul_assign)</text:span></text:span></text:p>
      <text:p text:style-name="P64"><text:span text:style-name="_2f__2f_C"><text:span text:style-name="T108">/</text:span></text:span><text:span text:style-name="_2f__2f_C"><text:span text:style-name="T109"><text:tab/></text:span></text:span><text:span text:style-name="_2f__2f_C"><text:span text:style-name="T108">-&gt;<text:tab/><text:tab/>Div (div)<text:tab/><text:tab/><text:tab/><text:tab/><text:tab/></text:span></text:span><text:span text:style-name="_2f__2f_C"><text:span text:style-name="T107"><text:tab/><text:tab/><text:tab/><text:tab/></text:span></text:span><text:span text:style-name="_2f__2f_C"><text:span text:style-name="T108">/=<text:tab/><text:tab/>-&gt;<text:tab/><text:tab/>DivAssign<text:tab/>(div_assign)</text:span></text:span></text:p>
      <text:p text:style-name="P64"><text:soft-page-break/><text:span text:style-name="_2f__2f_C"><text:span text:style-name="T108">%</text:span></text:span><text:span text:style-name="_2f__2f_C"><text:span text:style-name="T109"> </text:span></text:span><text:span text:style-name="_2f__2f_C"><text:span text:style-name="T108"><text:tab/>-&gt;<text:tab/>Rem </text:span></text:span><text:span text:style-name="_2f__2f_C"><text:span text:style-name="T106">(rem</text:span></text:span><text:span text:style-name="_2f__2f_C"><text:span text:style-name="T108">)</text:span></text:span><text:span text:style-name="_2f__2f_C"><text:span text:style-name="T106"><text:tab/></text:span></text:span><text:span text:style-name="_2f__2f_C"><text:span text:style-name="T108"><text:tab/><text:tab/><text:tab/></text:span></text:span><text:span text:style-name="_2f__2f_C"><text:span text:style-name="T107"><text:tab/><text:tab/><text:tab/><text:tab/></text:span></text:span><text:span text:style-name="_2f__2f_C"><text:span text:style-name="T108">%=<text:tab/>-&gt;<text:tab/><text:tab/>RemAssign (rem_assign)</text:span></text:span></text:p>
      <text:p text:style-name="P65"><text:span text:style-name="_2f__2f_C"><text:span text:style-name="T106">==<text:tab/>-&gt; PartialEq</text:span></text:span><text:span text:style-name="_2f__2f_C"><text:span text:style-name="T107"> (eq)</text:span></text:span><text:span text:style-name="_2f__2f_C"><text:span text:style-name="T106"><text:tab/><text:tab/></text:span></text:span><text:span text:style-name="_2f__2f_C"><text:span text:style-name="T110"><text:tab/><text:tab/><text:tab/></text:span></text:span><text:span text:style-name="_2f__2f_C"><text:span text:style-name="T106"><text:tab/></text:span></text:span><text:span text:style-name="_2f__2f_C"><text:span text:style-name="T107">!=<text:tab/><text:tab/>-&gt;<text:tab/><text:tab/>PartialEq (</text:span></text:span><text:span text:style-name="_2f__2f_C"><text:span text:style-name="T111">ne</text:span></text:span><text:span text:style-name="_2f__2f_C"><text:span text:style-name="T107">)</text:span></text:span></text:p>
      <text:p text:style-name="P66"><text:span text:style-name="_2f__2f_C"><text:span text:style-name="T106">[ ]</text:span></text:span><text:span text:style-name="_2f__2f_C"><text:span text:style-name="T107"><text:tab/><text:tab/>-&gt;</text:span></text:span><text:span text:style-name="_2f__2f_C"><text:span text:style-name="T109"> </text:span></text:span><text:span text:style-name="_2f__2f_C"><text:span text:style-name="T107">Index (index)</text:span></text:span><text:span text:style-name="_2f__2f_C"><text:span text:style-name="T109"><text:tab/></text:span></text:span><text:span text:style-name="_2f__2f_C"><text:span text:style-name="T106"><text:tab/><text:tab/></text:span></text:span><text:span text:style-name="_2f__2f_C"><text:span text:style-name="T107"><text:tab/><text:tab/><text:tab/><text:tab/>[ ] =<text:tab/>-&gt;<text:tab/><text:tab/>IndexMut (index_mut)</text:span></text:span></text:p>
      <text:p text:style-name="P66"><text:span text:style-name="_2f__2f_C"><text:span text:style-name="T109">-x<text:tab/><text:tab/>-&gt; Neg (neg)<text:tab/><text:tab/><text:tab/><text:tab/><text:tab/><text:tab/><text:tab/><text:tab/>!x = -&gt;<text:tab/><text:tab/>Not (not)</text:span></text:span></text:p>
      <text:p text:style-name="P67"><text:span text:style-name="_2f__2f_C"><text:span text:style-name="T109">&amp;<text:tab/><text:tab/>-&gt; BitAnd (bitand)<text:tab/><text:tab/><text:tab/><text:tab/><text:tab/></text:span></text:span><text:span text:style-name="_2f__2f_C"><text:span text:style-name="T112"><text:tab/></text:span></text:span><text:span text:style-name="_2f__2f_C"><text:span text:style-name="T110">&amp;=</text:span></text:span><text:span text:style-name="_2f__2f_C"><text:span text:style-name="T109"><text:tab/>-&gt;<text:tab/><text:tab/></text:span></text:span><text:span text:style-name="_2f__2f_C"><text:span text:style-name="T110">BitAndAssign (bit_and_assign)</text:span></text:span></text:p>
      <text:p text:style-name="P67"><text:span text:style-name="_2f__2f_C"><text:span text:style-name="T110">|<text:tab/><text:tab/>-&gt; BitOr (bitor)<text:tab/><text:tab/><text:tab/><text:tab/><text:tab/><text:tab/><text:tab/>|=<text:tab/><text:tab/>-&gt;<text:tab/><text:tab/>BitOrAssign (bit_or_assign)</text:span></text:span></text:p>
      <text:p text:style-name="P67"><text:span text:style-name="_2f__2f_C"><text:span text:style-name="T110">^<text:tab/><text:tab/>-&gt;<text:tab/>BitXor (bitxor)<text:tab/><text:tab/><text:tab/><text:tab/><text:tab/><text:tab/>^=<text:tab/>-&gt;<text:tab/><text:tab/>BitXorAssign (bit_xor_assign)</text:span></text:span></text:p>
      <text:p text:style-name="P67"><text:span text:style-name="_2f__2f_C"><text:span text:style-name="T110">&lt;&lt;<text:tab/>-&gt;<text:tab/>Shl<text:tab/>(shl)<text:tab/><text:tab/><text:tab/><text:tab/><text:tab/><text:tab/><text:tab/><text:tab/><text:tab/>&lt;&lt;=<text:tab/>-&gt;<text:tab/><text:tab/>ShlAssign (shl_assign)</text:span></text:span></text:p>
      <text:p text:style-name="P67"><text:span text:style-name="_2f__2f_C"><text:span text:style-name="T110">&gt;&gt;<text:tab/>-&gt;<text:tab/>Shr<text:tab/>(shr)<text:tab/><text:tab/><text:tab/><text:tab/><text:tab/><text:tab/><text:tab/><text:tab/>&gt;&gt;=<text:tab/>-&gt;<text:tab/><text:tab/>ShrAssign (shr_assign)</text:span></text:span></text:p>
      <text:p text:style-name="P67"><text:span text:style-name="_2f__2f_C"><text:span text:style-name="T110">*x<text:tab/><text:tab/>-&gt;<text:tab/>Deref (deref)<text:tab/><text:tab/><text:tab/><text:tab/><text:tab/><text:tab/><text:tab/>*x=<text:tab/>-&gt;<text:tab/><text:tab/>DerefMut (deref_mut)</text:span></text:span></text:p>
      <text:p text:style-name="P67"><text:span text:style-name="_2f__2f_C"><text:span text:style-name="T110">x..y<text:tab/>-&gt;<text:tab/>Range </text:span></text:span><text:span text:style-name="_2f__2f_C"><text:span text:style-name="T111">(no hay</text:span></text:span><text:span text:style-name="_2f__2f_C"><text:span text:style-name="T110">)<text:tab/><text:tab/><text:tab/></text:span></text:span><text:span text:style-name="_2f__2f_C"><text:span text:style-name="T111"><text:tab/><text:tab/></text:span></text:span><text:span text:style-name="_2f__2f_C"><text:span text:style-name="T110"><text:tab/>()<text:tab/>-&gt;<text:tab/><text:tab/>Fn, FnMut, FnOnce (</text:span></text:span><text:span text:style-name="_2f__2f_C"><text:span text:style-name="T111">call</text:span></text:span><text:span text:style-name="_2f__2f_C"><text:span text:style-name="T110">)</text:span></text:span></text:p>
      <text:p text:style-name="P68"><text:span text:style-name="_2f__2f_C"><text:span text:style-name="T104"><text:tab/></text:span></text:span><text:span text:style-name="_2f__2f_C"><text:span text:style-name="T110"><text:tab/><text:tab/><text:tab/></text:span></text:span><text:span text:style-name="_2f__2f_C"><text:span text:style-name="T106">&lt;, &lt;=, &gt;, &gt;=<text:tab/>-&gt; PartialOrd (partial_cm</text:span></text:span><text:span text:style-name="_2f__2f_C"><text:span text:style-name="T111">p</text:span></text:span><text:span text:style-name="_2f__2f_C"><text:span text:style-name="T107">)</text:span></text:span><text:span text:style-name="_2f__2f_C"><text:span text:style-name="T106"><text:tab/><text:tab/></text:span></text:span></text:p>
      <text:p text:style-name="P68"><text:span text:style-name="_2f__2f_C"><text:span text:style-name="T106"/></text:span></text:p>
      <text:p text:style-name="P69"><text:span text:style-name="_2f__2f_C"><text:span text:style-name="T113">Para alterar el orden por ejemplo en una multiplicacion de un Vector3 por ejemplo seria:<text:line-break/><text:line-break/>2 * v1</text:span></text:span></text:p>
      <text:p text:style-name="P70"><text:span text:style-name="_2f__2f_C"><text:span text:style-name="T114">//como se ve el int va a la izda, pero aquí se cruza a la dcha del for por lo que el self, se refiere al tipo int, y por eso no es self.x o self.y.</text:span></text:span></text:p>
      <text:p text:style-name="P69"><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14"> </text:span></text:span></text:p>
      <text:p text:style-name="P69"><text:span text:style-name="_3c_C_3e_"><text:span text:style-name="T12"><text:tab/>type Output = Vect3</text:span></text:span></text:p>
      <text:p text:style-name="P69"><text:span text:style-name="_3c_C_3e_"><text:span text:style-name="T12"><text:tab/>fn mul(self, other: Vect3) -&gt; Vect3{</text:span></text:span></text:p>
      <text:p text:style-name="P69"><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9"><text:span text:style-name="_3c_C_3e_"><text:span text:style-name="T12"><text:tab/>}</text:span></text:span></text:p>
      <text:p text:style-name="P69"><text:span text:style-name="_3c_C_3e_"><text:span text:style-name="T12">}</text:span></text:span></text:p>
      <text:p text:style-name="P71"><text:span text:style-name="_2f__2f_C"><text:span text:style-name="T115">v1 * 2</text:span></text:span></text:p>
      <text:p text:style-name="P70"><text:span text:style-name="_2f__2f_C"><text:span text:style-name="T114">//aquí el numero está a la derecha, por lo que se cruza y va a la izquierda, y en este caso el for es del Vect3 por lo que el self será self.x, self.y o self.z</text:span></text:span></text:p>
      <text:p text:style-name="P71"><text:span text:style-name="_3c_C_3e_"><text:span text:style-name="T12">impl Mul</text:span></text:span><text:span text:style-name="_3c_C_2b__2b__3e_"><text:span text:style-name="T15">&lt;i32&gt;</text:span></text:span><text:span text:style-name="_3c_C_3e_"><text:span text:style-name="T12"> for Vect3{</text:span></text:span></text:p>
      <text:p text:style-name="P71"><text:span text:style-name="_3c_C_3e_"><text:span text:style-name="T12"><text:tab/>type Output = Vect3;</text:span></text:span></text:p>
      <text:p text:style-name="P71"><text:span text:style-name="_3c_C_3e_"><text:span text:style-name="T12"><text:tab/>fn mul(self, n: i32) -&gt; Vect3{</text:span></text:span></text:p>
      <text:p text:style-name="P71"><text:span text:style-name="_3c_C_3e_"><text:span text:style-name="T12"><text:tab/><text:tab/>Vect3 {x: </text:span></text:span><text:span text:style-name="_3c_C_3e_"><text:span text:style-name="T116">s</text:span></text:span><text:span text:style-name="_3c_C_3e_"><text:span text:style-name="T12">elf.x * n , y: </text:span></text:span><text:span text:style-name="_3c_C_3e_"><text:span text:style-name="T116">s</text:span></text:span><text:span text:style-name="_3c_C_3e_"><text:span text:style-name="T12">elf.y * n, z: </text:span></text:span><text:span text:style-name="_3c_C_3e_"><text:span text:style-name="T116">s</text:span></text:span><text:span text:style-name="_3c_C_3e_"><text:span text:style-name="T12">elf.z * n} </text:span></text:span><text:span text:style-name="_2f__2f_C"><text:span text:style-name="T12">//no hay return no hay ;</text:span></text:span><text:span text:style-name="_2f__2f_C"><text:span text:style-name="T116"> El self tiene que ser en minúsculas si se devuelve el valor como aquí.. Podriamos haber puesto:</text:span></text:span></text:p>
      <text:p text:style-name="P72"><text:span text:style-name="_2f__2f_C"><text:span text:style-name="T116">ft mul(self, n: i32) -&gt; Self{. Donde ahí si que va en Mayúsculas por que es un tipo.</text:span></text:span></text:p>
      <text:p text:style-name="P71"><text:span text:style-name="_3c_C_3e_"><text:span text:style-name="T12"><text:tab/>}</text:span></text:span></text:p>
      <text:p text:style-name="P71"><text:soft-page-break/><text:span text:style-name="_3c_C_3e_"><text:span text:style-name="T12">}</text:span></text:span></text:p>
      <text:p text:style-name="P71"><text:span text:style-name="_2f__2f_C"><text:span text:style-name="T115">El formato es:<text:line-break/></text:span></text:span></text:p>
      <text:p text:style-name="P71"><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71"><text:span text:style-name="_2f__2f_C"><text:span text:style-name="T115">entonces el self es del tipo del LeftHandElement</text:span></text:span></text:p>
      <text:p text:style-name="P69"><text:span text:style-name="_2f__2f_C"><text:span text:style-name="T113"/></text:span></text:p>
      <text:h text:style-name="P73" text:outline-level="3"><text:span text:style-name="_3c_C_3e_"><text:span text:style-name="T93">SOBRECARGA DE OPERADORES </text:span></text:span><text:span text:style-name="_3c_C_3e_"><text:span text:style-name="T117">por instancia</text:span></text:span></text:h>
      <text:p text:style-name="P74"><text:span text:style-name="_2f__2f_C"><text:span text:style-name="T118">En la sobrecarga hemos visto que teniamos que hacer un:</text:span></text:span></text:p>
      <text:p text:style-name="P74"><text:span text:style-name="_3c_C_2b__2b__3e_"><text:span text:style-name="T15">#[derive(Debug, Clone, Copy)] </text:span></text:span><text:span text:style-name="_2f__2f_C"><text:span text:style-name="T118">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74"><text:span text:style-name="_3c_C_3e_"><text:span text:style-name="T12">use::std::ops::Add;</text:span></text:span></text:p>
      <text:p text:style-name="P74"><text:span text:style-name="_3c_C_3e_"><text:span text:style-name="T12">struct Vect3{ todo lo de x y z pero sin ser pub f32,}</text:span></text:span></text:p>
      <text:p text:style-name="P74"><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14"> </text:span></text:span><text:span text:style-name="_2f__2f_C"><text:span text:style-name="T114">//&lt;' le indica que será un lifetime, es decir que vivirá el tiempo suficiente mientras que esté la función aplicada de Suma. Después de</text:span></text:span></text:p>
      <text:p text:style-name="P70"><text:span text:style-name="_2f__2f_C"><text:span text:style-name="T114">impl lo declaramos y luego despueś lo usamos. en &amp;'a y &amp;'b. Es por motivos de onwership.</text:span></text:span></text:p>
      <text:p text:style-name="P74"><text:span text:style-name="_3c_C_3e_"><text:span text:style-name="T12"><text:tab/>type Output = Vect3;</text:span></text:span></text:p>
      <text:p text:style-name="P74"><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74"><text:span text:style-name="_3c_C_3e_"><text:span text:style-name="T12"><text:tab/><text:tab/>x: self.x + other.x, ….</text:span></text:span></text:p>
      <text:p text:style-name="P74"><text:span text:style-name="_3c_C_3e_"><text:span text:style-name="T12"><text:tab/>}</text:span></text:span></text:p>
      <text:p text:style-name="P74"><text:span text:style-name="_3c_C_3e_"><text:span text:style-name="T12">}</text:span></text:span></text:p>
      <text:p text:style-name="P74"><text:span text:style-name="_2f__2f_C"><text:span text:style-name="T118">y para usarlo sería :</text:span></text:span></text:p>
      <text:p text:style-name="P74"><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74"><text:span text:style-name="_3c_C_3e_"><text:span text:style-name="T12">println!(“{}”, v1.</text:span></text:span><text:span text:style-name="_3c_C_3e_"><text:span text:style-name="T119">x</text:span></text:span><text:span text:style-name="_3c_C_3e_"><text:span text:style-name="T12">); </text:span></text:span><text:span text:style-name="_2f__2f_C"><text:span text:style-name="T12">//aquí ya no daría error el compilador por que todavía existe.</text:span></text:span></text:p>
      <text:h text:style-name="P75" text:outline-level="3"><text:span text:style-name="_3c_C_3e_"><text:span text:style-name="T120"/></text:span></text:h>
      <text:h text:style-name="P76" text:outline-level="3"><text:span text:style-name="_3c_C_3e_"><text:span text:style-name="T121">TRAITS</text:span></text:span><text:span text:style-name="_3c_C_3e_"><text:span text:style-name="T122">. Añadir un nuevo método a un tipo</text:span></text:span></text:h>
      <text:p text:style-name="P77"><text:span text:style-name="_2f__2f_C"><text:span text:style-name="T123">Como hemos visto, podemos hacer sobrecarga de operadores para un nuevo tipo de variable que tengamos. Para ello usábamos unos traits ya definidos que los cargábamos con:</text:span></text:span></text:p>
      <text:p text:style-name="P77"><text:span text:style-name="_3c_C_2b__2b__3e_"><text:span text:style-name="T15">use std::ops::{Add, Sub, …};</text:span></text:span></text:p>
      <text:p text:style-name="P77"><text:span text:style-name="_2f__2f_C"><text:span text:style-name="T123">Pero y si quisieramos construir nuestros propios métodos a dichos tipos nuevos O A LOS YA STANDARD?</text:span></text:span></text:p>
      <text:p text:style-name="P77"><text:span text:style-name="_3c_C_2b__2b__3e_"><text:span text:style-name="T15">trait &lt;nuevo_trait&gt; {fn &lt;método&gt; (parametros)</text:span></text:span><text:span text:style-name="_3c_C_2b__2b__3e_"><text:span text:style-name="T124">;</text:span></text:span><text:span text:style-name="_3c_C_2b__2b__3e_"><text:span text:style-name="T15">}</text:span></text:span></text:p>
      <text:p text:style-name="P77"><text:span text:style-name="_2f__2f_C"><text:span text:style-name="T123">de tal forma que quedaría para saber si un numero i32 es par:</text:span></text:span></text:p>
      <text:p text:style-name="P77"><text:soft-page-break/><text:span text:style-name="_3c_C_2b__2b__3e_"><text:span text:style-name="T15">trait </text:span></text:span><text:span text:style-name="_3c_C_2b__2b__3e_"><text:span text:style-name="T124">E</text:span></text:span><text:span text:style-name="_3c_C_2b__2b__3e_"><text:span text:style-name="T15">sPar{ fn es_par(self) -&gt; bool;}</text:span></text:span></text:p>
      <text:p text:style-name="P77"><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77"><text:span text:style-name="_3c_C_3e_"><text:span text:style-name="T12"><text:tab/>fn </text:span></text:span><text:span text:style-name="_3c_C_2b__2b__3e_"><text:span text:style-name="T15">es_par</text:span></text:span><text:span text:style-name="_3c_C_3e_"><text:span text:style-name="T12">(self) -&gt; bool{</text:span></text:span></text:p>
      <text:p text:style-name="P77"><text:span text:style-name="_3c_C_3e_"><text:span text:style-name="T12"><text:tab/><text:tab/>self % 2 == 0 </text:span></text:span><text:span text:style-name="_2f__2f_C"><text:span text:style-name="T12">//devolvera true o false.</text:span></text:span></text:p>
      <text:p text:style-name="P77"><text:span text:style-name="_3c_C_3e_"><text:span text:style-name="T12"><text:tab/>}</text:span></text:span></text:p>
      <text:p text:style-name="P77"><text:span text:style-name="_3c_C_3e_"><text:span text:style-name="T12">}</text:span></text:span></text:p>
      <text:p text:style-name="P77"><text:span text:style-name="_2f__2f_C"><text:span text:style-name="T123">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77"><text:span text:style-name="_3c_C_3e_"><text:span text:style-name="T12"/></text:span></text:p>
      <text:p text:style-name="P78"><text:span text:style-name="_2f__2f_C"><text:span text:style-name="T125">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25"> en otro archivo paralelo al main.rs que se llama "</text:span></text:span><text:span text:style-name="_3c_C_2b__2b__3e_"><text:span text:style-name="T15">tools</text:span></text:span><text:span text:style-name="_2f__2f_C"><text:span text:style-name="T125">" pues en main tendríamos que poner:</text:span></text:span></text:p>
      <text:p text:style-name="P78"><text:span text:style-name="_3c_C_2b__2b__3e_"><text:span text:style-name="T15">mod tools;</text:span></text:span></text:p>
      <text:p text:style-name="P78"><text:span text:style-name="_3c_C_2b__2b__3e_"><text:span text:style-name="T15">use tools::EsPar;</text:span></text:span></text:p>
      <text:p text:style-name="P78"><text:span text:style-name="_2f__2f_C"><text:span text:style-name="T125">y ahí ya sí que sería visto.</text:span></text:span></text:p>
      <text:p text:style-name="P78"><text:span text:style-name="_2f__2f_C"><text:span text:style-name="T125">si hicieramos un:</text:span></text:span></text:p>
      <text:p text:style-name="P78"><text:span text:style-name="_3c_C_2b__2b__3e_"><text:span text:style-name="T15">trait....</text:span></text:span></text:p>
      <text:p text:style-name="P78"><text:span text:style-name="_3c_C_2b__2b__3e_"><text:span text:style-name="T15">impl EsPar</text:span></text:span></text:p>
      <text:p text:style-name="P78"><text:span text:style-name="_3c_C_3e_"><text:span text:style-name="T12">mod OtroCodigo{</text:span></text:span></text:p>
      <text:p text:style-name="P78"><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9" text:outline-level="3"><text:span text:style-name="_3c_C_3e_"><text:span text:style-name="T121">TRAITS</text:span></text:span><text:span text:style-name="_3c_C_3e_"><text:span text:style-name="T122">. </text:span></text:span><text:span text:style-name="_3c_C_3e_"><text:span text:style-name="T126">Implementar el from e into a un tipo nuevo</text:span></text:span></text:h>
      <text:p text:style-name="P80"><text:span text:style-name="_2f__2f_C"><text:span text:style-name="T127">Para que se pueda usar el método into y from que son duales, por lo tanto al implementar el From, queda implementado el Into, no tenemos que hacer un </text:span></text:span></text:p>
      <text:p text:style-name="P80"><text:span text:style-name="_3c_C_3e_"><text:span text:style-name="T12">trait From</text:span></text:span><text:span text:style-name="_2f__2f_C"><text:span text:style-name="T127">... ya que ya está incluido en el "prelude" de Rust, es decir las herramientas básicas de Rust. Por lo tanto no tenemos que usar siquiera un:</text:span></text:span></text:p>
      <text:p text:style-name="P80"><text:span text:style-name="_3c_C_3e_"><text:span text:style-name="T12">use std::convert:From</text:span></text:span></text:p>
      <text:p text:style-name="P80"><text:span text:style-name="_2f__2f_C"><text:span text:style-name="T127">Recordemos que para convertir de un &amp;str a String habia que hacer:</text:span></text:span></text:p>
      <text:p text:style-name="P80"><text:span text:style-name="_3c_C_3e_"><text:span text:style-name="T15">let s = "hola"</text:span></text:span><text:span text:style-name="_3c_C_2b__2b__3e_"><text:span text:style-name="T15">.into()</text:span></text:span><text:span text:style-name="_3c_C_3e_"><text:span text:style-name="T15">;</text:span></text:span></text:p>
      <text:p text:style-name="P80"><text:span text:style-name="_2f__2f_C"><text:span text:style-name="T127">o </text:span></text:span></text:p>
      <text:p text:style-name="P80"><text:span text:style-name="_3c_C_3e_"><text:span text:style-name="T12">let s = String::</text:span></text:span><text:span text:style-name="_3c_C_2b__2b__3e_"><text:span text:style-name="T15">from</text:span></text:span><text:span text:style-name="_3c_C_3e_"><text:span text:style-name="T12">("hola");</text:span></text:span></text:p>
      <text:p text:style-name="P80"><text:span text:style-name="_2f__2f_C"><text:span text:style-name="T127">Ahora para implementarlo para un nuevo tipo:</text:span></text:span></text:p>
      <text:p text:style-name="P80"><text:span text:style-name="_3c_C_3e_"><text:span text:style-name="T12">pub struct WrappingU32{</text:span></text:span></text:p>
      <text:p text:style-name="P80"><text:span text:style-name="_3c_C_3e_"><text:span text:style-name="T12"><text:tab/>value: u32;</text:span></text:span></text:p>
      <text:p text:style-name="P80"><text:soft-page-break/><text:span text:style-name="_3c_C_3e_"><text:span text:style-name="T12">}</text:span></text:span></text:p>
      <text:p text:style-name="P80"><text:span text:style-name="_2f__2f_C"><text:span text:style-name="T127">hemos de hacer esto:</text:span></text:span></text:p>
      <text:p text:style-name="P80"><text:span text:style-name="_3c_C_2b__2b__3e_"><text:span text:style-name="T15">impl From&lt;u32&gt; for WrappingU32</text:span></text:span><text:span text:style-name="_3c_C_3e_"><text:span text:style-name="T12">{</text:span></text:span></text:p>
      <text:p text:style-name="P80"><text:span text:style-name="_3c_C_3e_"><text:span text:style-name="T12"><text:tab/>fn from(num: u32) -&gt; Self{</text:span></text:span></text:p>
      <text:p text:style-name="P80"><text:span text:style-name="_3c_C_3e_"><text:span text:style-name="T12"><text:tab/><text:tab/>Self{value: num}</text:span></text:span></text:p>
      <text:p text:style-name="P80"><text:span text:style-name="_3c_C_3e_"><text:span text:style-name="T12"><text:tab/>}</text:span></text:span></text:p>
      <text:p text:style-name="P80"><text:span text:style-name="_3c_C_3e_"><text:span text:style-name="T12">}</text:span></text:span></text:p>
      <text:p text:style-name="P80"><text:span text:style-name="_2f__2f_C"><text:span text:style-name="T127">y con eso ya podremos hacer cosas como:</text:span></text:span></text:p>
      <text:p text:style-name="P80"><text:span text:style-name="_3c_C_3e_"><text:span text:style-name="T12">let kk: WrappingU32 = 42</text:span></text:span><text:span text:style-name="_3c_C_2b__2b__3e_"><text:span text:style-name="T15">.into()</text:span></text:span><text:span text:style-name="_3c_C_3e_"><text:span text:style-name="T12">;</text:span></text:span></text:p>
      <text:p text:style-name="P80"><text:span text:style-name="_3c_C_3e_"><text:span text:style-name="T12">let kk = WrappingU32::</text:span></text:span><text:span text:style-name="_3c_C_2b__2b__3e_"><text:span text:style-name="T15">from(42)</text:span></text:span><text:span text:style-name="_3c_C_3e_"><text:span text:style-name="T12">;</text:span></text:span></text:p>
      <text:p text:style-name="P80"><text:span text:style-name="_3c_C_3e_"><text:span text:style-name="T12"/></text:span></text:p>
      <text:h text:style-name="P81" text:outline-level="3"><text:span text:style-name="_3c_C_3e_"><text:span text:style-name="T121">TRAITS</text:span></text:span><text:span text:style-name="_3c_C_3e_"><text:span text:style-name="T122">. Para el uso de Templates en sobrecarga operadores</text:span></text:span></text:h>
      <text:p text:style-name="P70"><text:span text:style-name="_2f__2f_C"><text:span text:style-name="T128">Hemos visto que se puede hacer la sobrecarga de operadores de la multiplicación</text:span></text:span><text:span text:style-name="_2f__2f_C"><text:span text:style-name="T129"> por un número. Pero y si queremos que pueda ser de cualquier tipo que sean números. Usamos los templates como en C++:<text:line-break/></text:span></text:span></text:p>
      <text:p text:style-name="P82"><text:span text:style-name="_2f__2f_C"><text:span text:style-name="T12">//Hay que añadir la dependencia de "num-traits" en el Cargo.toml</text:span></text:span><text:span text:style-name="_2f__2f_C"><text:span text:style-name="T130">. Debajo de [Dependencies] poner</text:span></text:span></text:p>
      <text:p text:style-name="P83"><text:span text:style-name="_2f__2f_C"><text:span text:style-name="T130">//num-traits = "0.2"</text:span></text:span></text:p>
      <text:p text:style-name="P82"><text:span text:style-name="_3c_C_3e_"><text:span text:style-name="T12">use std::ops:Mul;</text:span></text:span></text:p>
      <text:p text:style-name="P82"><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82"><text:span text:style-name="_2f__2f_C"><text:span text:style-name="T131">//</text:span></text:span><text:span text:style-name="_2f__2f_C"><text:span text:style-name="T12">1. Hacemos que el struct acepte cualquier tipo T que sea un número:</text:span></text:span></text:p>
      <text:p text:style-name="P82"><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82"><text:span text:style-name="_2f__2f_C"><text:span text:style-name="T131">//</text:span></text:span><text:span text:style-name="_2f__2f_C"><text:span text:style-name="T12">2. implementamos la multiplicación para cualquier número T</text:span></text:span></text:p>
      <text:p text:style-name="P82"><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82"><text:span text:style-name="_3c_C_2b__2b__3e_"><text:span text:style-name="T15">where</text:span></text:span></text:p>
      <text:p text:style-name="P82"><text:span text:style-name="_3c_C_3e_"><text:span text:style-name="T12"><text:tab/></text:span></text:span><text:span text:style-name="_2f__2f_C"><text:span text:style-name="T15">//esto es la condición y nos dice que T tiene que ser un número y poder copiarse</text:span></text:span></text:p>
      <text:p text:style-name="P82"><text:span text:style-name="_3c_C_3e_"><text:span text:style-name="T12"><text:tab/></text:span></text:span><text:span text:style-name="_3c_C_2b__2b__3e_"><text:span text:style-name="T15">T: Num + Copy</text:span></text:span><text:span text:style-name="_3c_C_2b__2b__3e_"><text:span text:style-name="T132">, </text:span></text:span><text:span text:style-name="_2f__2f_C"><text:span text:style-name="T132">//fijarse que es , no ; el + inica "and"</text:span></text:span></text:p>
      <text:p text:style-name="P83"><text:span text:style-name="_2f__2f_C"><text:span text:style-name="T132">//si hubieramos querido hacerlo con un solo tipo, podriamos heberlo metido, pero también asi:</text:span></text:span></text:p>
      <text:p text:style-name="P83"><text:span text:style-name="_2f__2f_C"><text:span text:style-name="T132">//T: Mul&lt;f32, Output = T&gt; + Copy //Cuantas más lineas como esta más restrictivo. Mul&lt;f32&gt; es que se pueda multiplicar por un float. y Output = T indica que el resultado sea uno de Tipo T.</text:span></text:span></text:p>
      <text:p text:style-name="P82"><text:span text:style-name="_3c_C_3e_"><text:span text:style-name="T12">{</text:span></text:span></text:p>
      <text:p text:style-name="P82"><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82"><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83"><text:span text:style-name="_3c_C_3e_"><text:span text:style-name="T130"><text:tab/><text:tab/>Vect3{</text:span></text:span></text:p>
      <text:p text:style-name="P82"><text:span text:style-name="_3c_C_3e_"><text:span text:style-name="T12"><text:tab/><text:tab/></text:span></text:span><text:span text:style-name="_3c_C_3e_"><text:span text:style-name="T130"><text:tab/></text:span></text:span><text:span text:style-name="_3c_C_3e_"><text:span text:style-name="T12">x: self.x * n</text:span></text:span><text:span text:style-name="_3c_C_3e_"><text:span text:style-name="T130">,</text:span></text:span><text:span text:style-name="_3c_C_3e_"><text:span text:style-name="T12"> </text:span></text:span><text:span text:style-name="_2f__2f_C"><text:span text:style-name="T12">//Rust ya sabe que se puede multiplicar por que es un Num</text:span></text:span></text:p>
      <text:p text:style-name="P82"><text:soft-page-break/><text:span text:style-name="_3c_C_3e_"><text:span text:style-name="T12"><text:tab/><text:tab/></text:span></text:span><text:span text:style-name="_3c_C_3e_"><text:span text:style-name="T130"><text:tab/></text:span></text:span><text:span text:style-name="_3c_C_3e_"><text:span text:style-name="T12">y: self.y * n</text:span></text:span><text:span text:style-name="_3c_C_3e_"><text:span text:style-name="T130">,</text:span></text:span><text:span text:style-name="_3c_C_3e_"><text:span text:style-name="T12"> </text:span></text:span><text:span text:style-name="_3c_C_3e_"><text:span text:style-name="T131">//</text:span></text:span><text:span text:style-name="_2f__2f_C"><text:span text:style-name="T12">etc....</text:span></text:span></text:p>
      <text:p text:style-name="P83"><text:span text:style-name="_3c_C_3e_"><text:span text:style-name="T12"><text:tab/></text:span></text:span><text:span text:style-name="_3c_C_3e_"><text:span text:style-name="T130"><text:tab/>}</text:span></text:span></text:p>
      <text:p text:style-name="P83"><text:span text:style-name="_3c_C_3e_"><text:span text:style-name="T130"><text:tab/></text:span></text:span><text:span text:style-name="_3c_C_3e_"><text:span text:style-name="T12">}</text:span></text:span></text:p>
      <text:p text:style-name="P82"><text:span text:style-name="_3c_C_3e_"><text:span text:style-name="T12">}</text:span></text:span></text:p>
      <text:p text:style-name="P82"><text:span text:style-name="_2f__2f_C"><text:span text:style-name="T129"/></text:span></text:p>
      <text:p text:style-name="P84"><text:span text:style-name="_3c_C_3e_"><text:span text:style-name="T133"/></text:span></text:p>
      <text:h text:style-name="P75" text:outline-level="3"><text:span text:style-name="_3c_C_3e_"><text:span text:style-name="T120">WHILE</text:span></text:span></text:h>
      <text:p text:style-name="P85"><text:span text:style-name="_2f__2f_C"><text:span text:style-name="T134">El bucle while es:</text:span></text:span></text:p>
      <text:p text:style-name="P85"><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85"><text:span text:style-name="_3c_C_3e_"><text:span text:style-name="T12"><text:tab/>....</text:span></text:span></text:p>
      <text:p text:style-name="P85"><text:span text:style-name="_3c_C_3e_"><text:span text:style-name="T12"><text:tab/>i += 1;</text:span></text:span></text:p>
      <text:p text:style-name="P85"><text:span text:style-name="_3c_C_3e_"><text:span text:style-name="T12">}</text:span></text:span></text:p>
      <text:p text:style-name="P86"><text:span text:style-name="_2f__2f_C"><text:span text:style-name="T135">La condici</text:span></text:span><text:span text:style-name="_2f__2f_C"><text:span text:style-name="T136">ón</text:span></text:span><text:span text:style-name="_2f__2f_C"><text:span text:style-name="T135"> nunca va entre par</text:span></text:span><text:span text:style-name="_2f__2f_C"><text:span text:style-name="T136">é</text:span></text:span><text:span text:style-name="_2f__2f_C"><text:span text:style-name="T135">ntesis para evitar la confusi</text:span></text:span><text:span text:style-name="_2f__2f_C"><text:span text:style-name="T136">ón</text:span></text:span><text:span text:style-name="_2f__2f_C"><text:span text:style-name="T135"> de C ya que en rust la condici</text:span></text:span><text:span text:style-name="_2f__2f_C"><text:span text:style-name="T136">ón</text:span></text:span><text:span text:style-name="_2f__2f_C"><text:span text:style-name="T135"> es una expresi</text:span></text:span><text:span text:style-name="_2f__2f_C"><text:span text:style-name="T136">ón</text:span></text:span><text:span text:style-name="_2f__2f_C"><text:span text:style-name="T135"> booleana. Esto es un error:</text:span></text:span></text:p>
      <text:p text:style-name="P86"><text:span text:style-name="_3c_C_3e_"><text:span text:style-name="T12">while 5</text:span></text:span><text:span text:style-name="_2f__2f_C"><text:span text:style-name="T135"> o </text:span></text:span><text:span text:style-name="_3c_C_3e_"><text:span text:style-name="T12">while (5)</text:span></text:span></text:p>
      <text:h text:style-name="P75" text:outline-level="3"><text:span text:style-name="_3c_C_3e_"><text:span text:style-name="T137"/></text:span></text:h>
      <text:h text:style-name="P75" text:outline-level="3"><text:span text:style-name="_3c_C_3e_"><text:span text:style-name="T137"/></text:span></text:h>
      <text:h text:style-name="P75" text:outline-level="3"><text:span text:style-name="_3c_C_3e_"><text:span text:style-name="T120">LOOP</text:span></text:span></text:h>
      <text:p text:style-name="P85"><text:span text:style-name="_2f__2f_C"><text:span text:style-name="T134">loop es infinito a no ser que se saque</text:span></text:span></text:p>
      <text:p text:style-name="P85"><text:span text:style-name="_3c_C_2b__2b__3e_"><text:span text:style-name="T15">loop</text:span></text:span><text:span text:style-name="_3c_C_3e_"><text:span text:style-name="T12"> {</text:span></text:span></text:p>
      <text:p text:style-name="P85"><text:span text:style-name="_3c_C_3e_"><text:span text:style-name="T12"><text:tab/>codigo();</text:span></text:span></text:p>
      <text:p text:style-name="P85"><text:span text:style-name="_3c_C_3e_"><text:span text:style-name="T12"><text:tab/>if !condicion {</text:span></text:span></text:p>
      <text:p text:style-name="P85"><text:span text:style-name="_3c_C_3e_"><text:span text:style-name="T12"><text:tab/><text:tab/>break; </text:span></text:span><text:span text:style-name="_2f__2f_C"><text:span text:style-name="T12">// asi sale</text:span></text:span></text:p>
      <text:p text:style-name="P85"><text:span text:style-name="_3c_C_3e_"><text:span text:style-name="T12"><text:tab/>}</text:span></text:span></text:p>
      <text:p text:style-name="P85"><text:span text:style-name="_3c_C_3e_"><text:span text:style-name="T12">}</text:span></text:span></text:p>
      <text:p text:style-name="P85"><text:span text:style-name="_3c_C_3e_"><text:span text:style-name="T12"/></text:span></text:p>
      <text:h text:style-name="P87" text:outline-level="3"><text:span text:style-name="_3c_C_3e_"><text:span text:style-name="T138">FOR</text:span></text:span></text:h>
      <text:p text:style-name="P86"><text:span text:style-name="_2f__2f_C"><text:span text:style-name="T135">El for en Rust es bajo iteradores</text:span></text:span></text:p>
      <text:p text:style-name="P86"><text:span text:style-name="_3c_C_2b__2b__3e_"><text:span text:style-name="T15">for elemento in iterable {...}</text:span></text:span></text:p>
      <text:p text:style-name="P86"><text:span text:style-name="_2f__2f_C"><text:span text:style-name="T135">Por ejemplo:</text:span></text:span></text:p>
      <text:p text:style-name="P86"><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88"><text:soft-page-break/><text:span text:style-name="_3c_C_2b__2b__3e_"><text:span text:style-name="T15">for i in 0..</text:span></text:span><text:span text:style-name="_3c_C_2b__2b__3e_"><text:span text:style-name="T139">=</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9">10</text:span></text:span></text:p>
      <text:p text:style-name="P86"><text:span text:style-name="_2f__2f_C"><text:span text:style-name="T135">o con matrices:</text:span></text:span></text:p>
      <text:p text:style-name="P86"><text:span text:style-name="_3c_C_3e_"><text:span text:style-name="T12">let v = [1, 2, 3];</text:span></text:span></text:p>
      <text:p text:style-name="P86"><text:span text:style-name="_3c_C_2b__2b__3e_"><text:span text:style-name="T15">for i in v</text:span></text:span><text:span text:style-name="_3c_C_3e_"><text:span text:style-name="T12">{ ... }</text:span></text:span></text:p>
      <text:p text:style-name="P89"><text:span text:style-name="_2f__2f_C"><text:span text:style-name="T140">Si queremos ir en inversa debemos aplicar el método .rev()</text:span></text:span><text:span text:style-name="_2f__2f_C"><text:span text:style-name="T135">:</text:span></text:span></text:p>
      <text:p text:style-name="P89"><text:span text:style-name="_3c_C_2b__2b__3e_"><text:span text:style-name="T15">for i in </text:span></text:span><text:span text:style-name="_3c_C_2b__2b__3e_"><text:span text:style-name="T141">(</text:span></text:span><text:span text:style-name="_3c_C_2b__2b__3e_"><text:span text:style-name="T15">0..10</text:span></text:span><text:span text:style-name="_3c_C_2b__2b__3e_"><text:span text:style-name="T141">).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42">9 a 0. </text:span></text:span><text:span text:style-name="_2f__2f_C"><text:span text:style-name="T143">Tiene que ponerse los paréntesis para que se forme el grupo primero.</text:span></text:span></text:p>
      <text:p text:style-name="P86"><text:span text:style-name="_3c_C_3e_"><text:span text:style-name="T12"/></text:span></text:p>
      <text:h text:style-name="P90" text:outline-level="3"><text:span text:style-name="_3c_C_3e_"><text:span text:style-name="T144">COLLECTIONS (contenedores)</text:span></text:span></text:h>
      <text:p text:style-name="P91"><text:span text:style-name="_2f__2f_C"><text:span text:style-name="T145">Como en C++ tenemos contenedores:</text:span></text:span></text:p>
      <text:p text:style-name="P91"><text:span text:style-name="_2f__2f_C"><text:span text:style-name="T145"/></text:span></text:p>
      <text:p text:style-name="P92"><text:span text:style-name="_2f__2f_C"><text:span text:style-name="T146">1. VECTOR DINAMICO:</text:span></text:span></text:p>
      <text:p text:style-name="P92"><text:span text:style-name="_3c_C_3e_"><text:span text:style-name="T12">let mut v = </text:span></text:span><text:span text:style-name="_3c_C_2b__2b__3e_"><text:span text:style-name="T15">Vec::new();</text:span></text:span></text:p>
      <text:p text:style-name="P92"><text:span text:style-name="_3c_C_3e_"><text:span text:style-name="T12">v.push(1);</text:span></text:span><text:span text:style-name="_3c_C_3e_"><text:span text:style-name="T147"> </text:span></text:span><text:span text:style-name="_2f__2f_C"><text:span text:style-name="T147">//mete el 1</text:span></text:span></text:p>
      <text:p text:style-name="P92"><text:span text:style-name="_3c_C_3e_"><text:span text:style-name="T12">v.push(2);</text:span></text:span><text:span text:style-name="_3c_C_3e_"><text:span text:style-name="T147"> </text:span></text:span><text:span text:style-name="_2f__2f_C"><text:span text:style-name="T147">//mete el 2 detrás del 1.</text:span></text:span></text:p>
      <text:p text:style-name="P93"><text:span text:style-name="_3c_C_3e_"><text:span text:style-name="T12">v.pop(); </text:span></text:span><text:span text:style-name="_2f__2f_C"><text:span text:style-name="T12">// quita el 2 (el ultimo)</text:span></text:span><text:span text:style-name="_2f__2f_C"><text:span text:style-name="T147"> Devuelve un Option&lt;T&gt;</text:span></text:span></text:p>
      <text:p text:style-name="P93"><text:span text:style-name="_2f__2f_C"><text:span text:style-name="T148">Para acceder a los datos se puede usar:</text:span></text:span></text:p>
      <text:p text:style-name="P93"><text:span text:style-name="_3c_C_3e_"><text:span text:style-name="T12">v[i]; </text:span></text:span><text:span text:style-name="_2f__2f_C"><text:span text:style-name="T12">//puede ser panic</text:span></text:span></text:p>
      <text:p text:style-name="P93"><text:span text:style-name="_3c_C_3e_"><text:span text:style-name="T12">v.get(i);</text:span></text:span><text:span text:style-name="_2f__2f_C"><text:span text:style-name="T12"> //seguro.</text:span></text:span></text:p>
      <text:p text:style-name="P93"><text:span text:style-name="_2f__2f_C"><text:span text:style-name="T148">El tamaño es con:</text:span></text:span></text:p>
      <text:p text:style-name="P93"><text:span text:style-name="_3c_C_3e_"><text:span text:style-name="T12">v.len();</text:span></text:span></text:p>
      <text:p text:style-name="P94"><text:span text:style-name="_2f__2f_C"><text:span text:style-name="T149">Se puede usar iteradores:</text:span></text:span></text:p>
      <text:p text:style-name="P94"><text:span text:style-name="_3c_C_3e_"><text:span text:style-name="T12">let mut it = v</text:span></text:span><text:span text:style-name="_3c_C_2b__2b__3e_"><text:span text:style-name="T15">.iter();</text:span></text:span></text:p>
      <text:p text:style-name="P94"><text:span text:style-name="_3c_C_2b__2b__3e_"><text:span text:style-name="T15">it.next();</text:span></text:span><text:span text:style-name="_3c_C_3e_"><text:span text:style-name="T12"> //es el siguiente.</text:span></text:span></text:p>
      <text:p text:style-name="P94"><text:span text:style-name="_3c_C_2b__2b__3e_"><text:span text:style-name="T15">it.next_back()</text:span></text:span><text:span text:style-name="_3c_C_3e_"><text:span text:style-name="T12">; es el anterior.</text:span></text:span></text:p>
      <text:p text:style-name="P94"><text:span text:style-name="_2f__2f_C"><text:span text:style-name="T149">Los dos devuelven Option&lt;&amp;T&gt;</text:span></text:span><text:span text:style-name="_2f__2f_C"><text:span text:style-name="T150"> por lo tanto para usarlos:</text:span></text:span></text:p>
      <text:p text:style-name="P95"><text:span text:style-name="_3c_C_3e_"><text:span text:style-name="T12">if let Some(x) = it.next(){...}</text:span></text:span></text:p>
      <text:p text:style-name="P94"><text:span text:style-name="_2f__2f_C"><text:span text:style-name="T149"/></text:span></text:p>
      <text:p text:style-name="P92"><text:span text:style-name="_3c_C_3e_"><text:span text:style-name="T12"/></text:span></text:p>
      <text:p text:style-name="P92"><text:span text:style-name="_3c_C_3e_"><text:span text:style-name="T12"/></text:span></text:p>
      <text:p text:style-name="P92"><text:span text:style-name="_2f__2f_C"><text:span text:style-name="T151">2. ARRAYS</text:span></text:span></text:p>
      <text:p text:style-name="P92"><text:span text:style-name="_2f__2f_C"><text:span text:style-name="T151"/></text:span></text:p>
      <text:p text:style-name="P92"><text:span text:style-name="_2f__2f_C"><text:span text:style-name="T151">3. STRING</text:span></text:span></text:p>
      <text:p text:style-name="P92"><text:soft-page-break/><text:span text:style-name="_2f__2f_C"><text:span text:style-name="T151"/></text:span></text:p>
      <text:p text:style-name="P92"><text:span text:style-name="_2f__2f_C"><text:span text:style-name="T151">4. HASHMAP</text:span></text:span></text:p>
      <text:p text:style-name="P92"><text:span text:style-name="_2f__2f_C"><text:span text:style-name="T151"/></text:span></text:p>
      <text:p text:style-name="P92"><text:span text:style-name="_2f__2f_C"><text:span text:style-name="T151">5. VECDEQUE</text:span></text:span></text:p>
      <text:p text:style-name="P92"><text:span text:style-name="_2f__2f_C"><text:span text:style-name="T151"/></text:span></text:p>
      <text:p text:style-name="P92"><text:span text:style-name="_2f__2f_C"><text:span text:style-name="T151">6. HASHSET</text:span></text:span></text:p>
      <text:p text:style-name="P92"><text:span text:style-name="_2f__2f_C"><text:span text:style-name="T151"/></text:span></text:p>
      <text:p text:style-name="P92"><text:span text:style-name="_2f__2f_C"><text:span text:style-name="T151">7. BTREEMAP</text:span></text:span></text:p>
      <text:p text:style-name="P92"><text:span text:style-name="_2f__2f_C"><text:span text:style-name="T151"/></text:span></text:p>
      <text:h text:style-name="P96" text:outline-level="3"><text:span text:style-name="_3c_C_3e_"><text:span text:style-name="T152">RESERVA DE MEMORIA EN EL HEAP</text:span></text:span></text:h>
      <text:p text:style-name="P97"><text:span text:style-name="_2f__2f_C"><text:span text:style-name="T153">No se puede. Rust lo prohibe. De hecho esa es la protección de Rust frente a las fugas de memoria, punteros colgantes etc. Cuando nosotros hacemos una estructura como:</text:span></text:span></text:p>
      <text:p text:style-name="P97"><text:span text:style-name="_3c_C_3e_"><text:span text:style-name="T12">pub struct Estructura{</text:span></text:span></text:p>
      <text:p text:style-name="P97"><text:span text:style-name="_3c_C_3e_"><text:span text:style-name="T12"><text:tab/>dato1: u32,</text:span></text:span></text:p>
      <text:p text:style-name="P97"><text:span text:style-name="_3c_C_3e_"><text:span text:style-name="T12"><text:tab/>dato2: String,</text:span></text:span></text:p>
      <text:p text:style-name="P97"><text:span text:style-name="_3c_C_3e_"><text:span text:style-name="T12">}</text:span></text:span></text:p>
      <text:p text:style-name="P97"><text:span text:style-name="_3c_C_3e_"><text:span text:style-name="T12"/></text:span></text:p>
      <text:p text:style-name="P97"><text:span text:style-name="_3c_C_3e_"><text:span text:style-name="T12">fn main ()</text:span></text:span><text:span text:style-name="_3c_C_2b__2b__3e_"><text:span text:style-name="T15">{</text:span></text:span></text:p>
      <text:p text:style-name="P97"><text:span text:style-name="_3c_C_3e_"><text:span text:style-name="T12"><text:tab/></text:span></text:span><text:span text:style-name="_2f__2f_C"><text:span text:style-name="T12">//Rust no deja hacer esto:</text:span></text:span></text:p>
      <text:p text:style-name="P97"><text:span text:style-name="_2f__2f_C"><text:span text:style-name="T12"><text:tab/>//let mi_estructura: Estructura; por que contendría valores basura. Algo prohibido en Rust.</text:span></text:span></text:p>
      <text:p text:style-name="P97"><text:span text:style-name="_2f__2f_C"><text:span text:style-name="T12"><text:tab/>//Sino que hay que inicializarla de esta manera:</text:span></text:span></text:p>
      <text:p text:style-name="P97"><text:span text:style-name="_3c_C_3e_"><text:span text:style-name="T12"><text:tab/></text:span></text:span><text:span text:style-name="_3c_C_2b__2b__3e_"><text:span text:style-name="T15">let mi_estructura = Estructura{</text:span></text:span></text:p>
      <text:p text:style-name="P97"><text:span text:style-name="_3c_C_2b__2b__3e_"><text:span text:style-name="T15"><text:tab/><text:tab/>dato1: 32, </text:span></text:span><text:span text:style-name="_2f__2f_C"><text:span text:style-name="T15">//se asigna 4 bytes en el STACK ya que sabe cuanto son y es más rapido.</text:span></text:span></text:p>
      <text:p text:style-name="P97"><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97"><text:span text:style-name="_3c_C_3e_"><text:span text:style-name="T12"><text:tab/>}</text:span></text:span></text:p>
      <text:p text:style-name="P97"><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54">P y el STACK</text:span></text:span></text:p>
      <text:p text:style-name="P97"><text:span text:style-name="_2f__2f_C"><text:span text:style-name="T153"/></text:span></text:p>
      <text:p text:style-name="P97"><text:span text:style-name="_2f__2f_C"><text:span text:style-name="T153">Para elementos que no sabemos cuanto van a ser de grandes, como String o Vector, se hace esto:</text:span></text:span></text:p>
      <text:p text:style-name="P97"><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54">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98"><text:span text:style-name="_2f__2f_C"><text:span text:style-name="T153">Pa</text:span></text:span><text:span text:style-name="_2f__2f_C"><text:span text:style-name="T155">ra los vectores, por ejemplo capacidad para 5 numeros enteros:</text:span></text:span></text:p>
      <text:p text:style-name="P98"><text:soft-page-break/><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98"><text:span text:style-name="_3c_C_3e_"><text:span text:style-name="T12">v.push(12); </text:span></text:span><text:span text:style-name="_2f__2f_C"><text:span text:style-name="T12">//la longitud pasa a ser 1 y la capacidad sigue siendo 5.</text:span></text:span></text:p>
      <text:p text:style-name="P98"><text:span text:style-name="_2f__2f_C"><text:span text:style-name="T12"/></text:span></text:p>
      <text:p text:style-name="P98"><text:span text:style-name="_2f__2f_C"><text:span text:style-name="T155">En ambos como en el caso de la estructura, al salir de su scope {}, se hace el free automatico.. pero se podría forzar un free con esta instrucción antes de terminar las llaves:</text:span></text:span></text:p>
      <text:p text:style-name="P98"><text:span text:style-name="_3c_C_2b__2b__3e_"><text:span text:style-name="T156">drop(v);</text:span></text:span></text:p>
      <text:p text:style-name="P98"><text:span text:style-name="_3c_C_2b__2b__3e_"><text:span text:style-name="T15">drop(</text:span></text:span><text:span text:style-name="_3c_C_2b__2b__3e_"><text:span text:style-name="T156">s</text:span></text:span><text:span text:style-name="_3c_C_2b__2b__3e_"><text:span text:style-name="T15">);</text:span></text:span></text:p>
      <text:p text:style-name="P98"><text:span text:style-name="_3c_C_2b__2b__3e_"><text:span text:style-name="T15"/></text:span></text:p>
      <text:h text:style-name="P99" text:outline-level="3"><text:span text:style-name="_3c_C_3e_"><text:span text:style-name="T157">TIEMPO DE VIDA. LIFETIME. OWNERSHIP!!!</text:span></text:span></text:h>
      <text:p text:style-name="P100"><text:span text:style-name="_2f__2f_C"><text:span text:style-name="T158">Rust para preservar la memoria, tiene un método que es el </text:span></text:span><text:span text:style-name="_3c_C_2b__2b__3e_"><text:span text:style-name="T15">ownership</text:span></text:span><text:span text:style-name="_2f__2f_C"><text:span text:style-name="T158">. Si por ejemplo hacemos esto:</text:span></text:span></text:p>
      <text:p text:style-name="P100"><text:span text:style-name="_3c_C_3e_"><text:span text:style-name="T159">let num = 32;</text:span></text:span></text:p>
      <text:p text:style-name="P100"><text:span text:style-name="_3c_C_3e_"><text:span text:style-name="T159">ft_funcion(num);</text:span></text:span></text:p>
      <text:p text:style-name="P100"><text:span text:style-name="_3c_C_3e_"><text:span text:style-name="T159">println!("{}", num); </text:span></text:span></text:p>
      <text:p text:style-name="P100"><text:span text:style-name="_2f__2f_C"><text:span text:style-name="T158">No hay problema por que los tipos básicos, tienen implementando </text:span></text:span><text:span text:style-name="_3c_C_2b__2b__3e_"><text:span text:style-name="T15">Trait</text:span></text:span><text:span text:style-name="_2f__2f_C"><text:span text:style-name="T160"> </text:span></text:span><text:span text:style-name="_2f__2f_C"><text:span text:style-name="T158">el </text:span></text:span><text:span text:style-name="_3c_C_2b__2b__3e_"><text:span text:style-name="T15">Copy</text:span></text:span><text:span text:style-name="_2f__2f_C"><text:span text:style-name="T158"> o </text:span></text:span><text:span text:style-name="_3c_C_2b__2b__3e_"><text:span text:style-name="T15">Clone</text:span></text:span><text:span text:style-name="_2f__2f_C"><text:span text:style-name="T158"> de los mismos y por lo tanto el compilador no dará problema.</text:span></text:span></text:p>
      <text:p text:style-name="P100"><text:span text:style-name="_2f__2f_C"><text:span text:style-name="T158">Pero si tenemos un:</text:span></text:span></text:p>
      <text:p text:style-name="P100"><text:span text:style-name="_3c_C_3e_"><text:span text:style-name="T159">struct MiStruct{ dato: i32</text:span></text:span><text:span text:style-name="_3c_C_3e_"><text:span text:style-name="T161"> </text:span></text:span><text:span text:style-name="_3c_C_3e_"><text:span text:style-name="T159">};</text:span></text:span></text:p>
      <text:p text:style-name="P100"><text:span text:style-name="_3c_C_3e_"><text:span text:style-name="T159">let kk = MiStruct {dato: 42</text:span></text:span><text:span text:style-name="_3c_C_3e_"><text:span text:style-name="T161"> </text:span></text:span><text:span text:style-name="_3c_C_3e_"><text:span text:style-name="T159">};</text:span></text:span></text:p>
      <text:p text:style-name="P100"><text:span text:style-name="_3c_C_2b__2b__3e_"><text:span text:style-name="T15">ft_funcion(kk); </text:span></text:span><text:span text:style-name="_2f__2f_C"><text:span text:style-name="T159">//hemos perdido el ownership aqui. Ya no es dueña kk de los datos. Se han transferido a la función</text:span></text:span></text:p>
      <text:p text:style-name="P100"><text:span text:style-name="_3c_C_3e_"><text:span text:style-name="T159">println!("{}", kk.dato); </text:span></text:span><text:span text:style-name="_2f__2f_C"><text:span text:style-name="T159">//da error aqui por que no tiene el ownership ya.</text:span></text:span></text:p>
      <text:p text:style-name="P100"><text:span text:style-name="_2f__2f_C"><text:span text:style-name="T158"/></text:span></text:p>
      <text:p text:style-name="P100"><text:span text:style-name="_2f__2f_C"><text:span text:style-name="T158">Esto se puede arreglar con una sola linea y es implementando el </text:span></text:span><text:span text:style-name="_3c_C_2b__2b__3e_"><text:span text:style-name="T15">Trait</text:span></text:span><text:span text:style-name="_2f__2f_C"><text:span text:style-name="T158"> de </text:span></text:span><text:span text:style-name="_3c_C_2b__2b__3e_"><text:span text:style-name="T15">Copy Clone</text:span></text:span><text:span text:style-name="_2f__2f_C"><text:span text:style-name="T158"> para la estructura.. y se tiene que hacer arriba de ella:</text:span></text:span></text:p>
      <text:p text:style-name="P100"><text:span text:style-name="_3c_C_2b__2b__3e_"><text:span text:style-name="T15">#[derive(Copy, Clone)]</text:span></text:span></text:p>
      <text:p text:style-name="P101"><text:span text:style-name="_3c_C_3e_"><text:span text:style-name="T159">struct MiStruct{ dato: i32, };</text:span></text:span></text:p>
      <text:p text:style-name="P101"><text:span text:style-name="_3c_C_3e_"><text:span text:style-name="T159">.... </text:span></text:span><text:span text:style-name="_2f__2f_C"><text:span text:style-name="T159">//el resto del código.</text:span></text:span><text:span text:style-name="_3c_C_3e_"><text:span text:style-name="T159"> </text:span></text:span></text:p>
      <text:p text:style-name="P101"><text:span text:style-name="_2f__2f_C"><text:span text:style-name="T160">Ahora no daría error de compilación ya que la estructura al llamarse a la función, se copiaría. </text:span></text:span></text:p>
      <text:p text:style-name="P101"><text:span text:style-name="_2f__2f_C"><text:span text:style-name="T160">Si la estructura tuviera un String dentro, el Copy no se puede hacer ya que parte de los datos del String se almacenan en el Heap, y por lo tanto hay que aplicar un </text:span></text:span><text:span text:style-name="_3c_C_2b__2b__3e_"><text:span text:style-name="T15">.clone()</text:span></text:span><text:span text:style-name="_2f__2f_C"><text:span text:style-name="T160">:</text:span></text:span></text:p>
      <text:p text:style-name="P101"><text:span text:style-name="_3c_C_2b__2b__3e_"><text:span text:style-name="T15">#[derive(Clone)]</text:span></text:span></text:p>
      <text:p text:style-name="P101"><text:span text:style-name="_3c_C_3e_"><text:span text:style-name="T159">struct MiStruct{ dato: </text:span></text:span><text:span text:style-name="_3c_C_2b__2b__3e_"><text:span text:style-name="T15">String</text:span></text:span><text:span text:style-name="_3c_C_3e_"><text:span text:style-name="T159"> };</text:span></text:span></text:p>
      <text:p text:style-name="P101"><text:span text:style-name="_3c_C_3e_"><text:span text:style-name="T159">let kk = MiStruct {dato: "hola mundo".into(),};</text:span></text:span></text:p>
      <text:p text:style-name="P101"><text:soft-page-break/><text:span text:style-name="_3c_C_3e_"><text:span text:style-name="T159">ft_funcion(</text:span></text:span><text:span text:style-name="_3c_C_2b__2b__3e_"><text:span text:style-name="T15">kk.clone()</text:span></text:span><text:span text:style-name="_3c_C_3e_"><text:span text:style-name="T159">); </text:span></text:span><text:span text:style-name="_2f__2f_C"><text:span text:style-name="T159">//y ahí pasamos un clone y no se pierde.</text:span></text:span></text:p>
      <text:p text:style-name="P101"><text:span text:style-name="_2f__2f_C"><text:span text:style-name="T160"/></text:span></text:p>
      <text:p text:style-name="P102"><text:span text:style-name="_2f__2f_C"><text:span text:style-name="T162">Esto mismo pasaría si en vez de a una función se le pasa a un match, o cualquier cosa que esté entre llaves {}.<text:line-break/></text:span></text:span><text:span text:style-name="_2f__2f_C"><text:span text:style-name="T163">Para no hacer copia se puede pasar la referencia como en C++:</text:span></text:span></text:p>
      <text:p text:style-name="P103"><text:span text:style-name="_3c_C_3e_"><text:span text:style-name="T159">struct MiStruct{ dato: i32</text:span></text:span><text:span text:style-name="_3c_C_3e_"><text:span text:style-name="T161"> </text:span></text:span><text:span text:style-name="_3c_C_3e_"><text:span text:style-name="T159">};</text:span></text:span></text:p>
      <text:p text:style-name="P103"><text:span text:style-name="_3c_C_3e_"><text:span text:style-name="T159">let kk = MiStruct {dato: 42</text:span></text:span><text:span text:style-name="_3c_C_3e_"><text:span text:style-name="T161"> </text:span></text:span><text:span text:style-name="_3c_C_3e_"><text:span text:style-name="T159">};</text:span></text:span></text:p>
      <text:p text:style-name="P103"><text:span text:style-name="_3c_C_3e_"><text:span text:style-name="T15">ft_funcion(</text:span></text:span><text:span text:style-name="_3c_C_2b__2b__3e_"><text:span text:style-name="T15">&amp;</text:span></text:span><text:span text:style-name="_3c_C_3e_"><text:span text:style-name="T15">kk);</text:span></text:span><text:span text:style-name="_3c_C_2b__2b__3e_"><text:span text:style-name="T15"> </text:span></text:span><text:span text:style-name="_2f__2f_C"><text:span text:style-name="T159">//</text:span></text:span><text:span text:style-name="_2f__2f_C"><text:span text:style-name="T164">donde la funcion recibe un &amp; tambien como fn ft_funcion(kk: &amp;MiStruct);</text:span></text:span></text:p>
      <text:p text:style-name="P103"><text:span text:style-name="_3c_C_3e_"><text:span text:style-name="T159">println!("{}", kk.dato); </text:span></text:span><text:span text:style-name="_2f__2f_C"><text:span text:style-name="T159">//</text:span></text:span><text:span text:style-name="_2f__2f_C"><text:span text:style-name="T164">ya no da error.</text:span></text:span></text:p>
      <text:p text:style-name="P104"><text:span text:style-name="_2f__2f_C"><text:span text:style-name="T165">Y lo mismo pasándolo a un match:</text:span></text:span></text:p>
      <text:p text:style-name="P104"><text:span text:style-name="_3c_C_3e_"><text:span text:style-name="T12">enum Status{</text:span></text:span><text:span text:style-name="_3c_C_3e_"><text:span text:style-name="T166"> </text:span></text:span><text:span text:style-name="_3c_C_3e_"><text:span text:style-name="T12">PorHacer,</text:span></text:span><text:span text:style-name="_3c_C_3e_"><text:span text:style-name="T166"> </text:span></text:span><text:span text:style-name="_3c_C_3e_"><text:span text:style-name="T12">EnProgreso</text:span></text:span><text:span text:style-name="_3c_C_2b__2b__3e_"><text:span text:style-name="T15">{</text:span></text:span><text:span text:style-name="_3c_C_2b__2b__3e_"><text:span text:style-name="T167"> </text:span></text:span><text:span text:style-name="_3c_C_2b__2b__3e_"><text:span text:style-name="T15">asignado_a: String,},</text:span></text:span><text:span text:style-name="_3c_C_3e_"><text:span text:style-name="T12"><text:tab/>Hecho,}</text:span></text:span></text:p>
      <text:p text:style-name="P104"><text:span text:style-name="_3c_C_3e_"><text:span text:style-name="T12">match </text:span></text:span><text:span text:style-name="_3c_C_2b__2b__3e_"><text:span text:style-name="T15">&amp;</text:span></text:span><text:span text:style-name="_3c_C_3e_"><text:span text:style-name="T12">Status{</text:span></text:span><text:span text:style-name="_3c_C_3e_"><text:span text:style-name="T166"> </text:span></text:span><text:span text:style-name="_2f__2f_C"><text:span text:style-name="T166">//si no pusiera el &amp; en el =&gt; { println!...., asignado_a perdería el ownership</text:span></text:span></text:p>
      <text:p text:style-name="P104"><text:span text:style-name="_3c_C_3e_"><text:span text:style-name="T12"><text:tab/>Status::EnProgreso</text:span></text:span><text:span text:style-name="_3c_C_3e_"><text:span text:style-name="T15">{ asignado_a }</text:span></text:span><text:span text:style-name="_3c_C_3e_"><text:span text:style-name="T12"> =&gt; { println! "Lo hace: {}",</text:span></text:span><text:span text:style-name="_3c_C_3e_"><text:span text:style-name="T15"> asignado_a</text:span></text:span><text:span text:style-name="_3c_C_3e_"><text:span text:style-name="T12">; },</text:span></text:span></text:p>
      <text:p text:style-name="P104"><text:span text:style-name="_3c_C_3e_"><text:span text:style-name="T159"><text:tab/>_ =&gt; {} </text:span></text:span><text:span text:style-name="_2f__2f_C"><text:span text:style-name="T159">//si no queremos que haga nada, pues doble llave.</text:span></text:span><text:span text:style-name="_3c_C_3e_"><text:span text:style-name="T168">}</text:span></text:span></text:p>
      <text:p text:style-name="P104"><text:span text:style-name="_3c_C_3e_"><text:span text:style-name="T168"/></text:span></text:p>
      <text:p text:style-name="P104"><text:span text:style-name="_2f__2f_C"><text:span text:style-name="T165">Pero ¿qué está haciendo el compilador por debajo? está dándole una vida a la referencia en el bloque de la llamada a la función de tal forma que cuando hago un </text:span></text:span><text:span text:style-name="_3c_C_3e_"><text:span text:style-name="T159">ft_funcion(&amp;kk);</text:span></text:span><text:span text:style-name="_2f__2f_C"><text:span text:style-name="T165"> la estructura kk va asegurarse a vivir durante TODO el tiempo de la función, aunque luego se haga llamada a otras funciones:</text:span></text:span></text:p>
      <text:p text:style-name="P104"><text:span text:style-name="_2f__2f_C"><text:span text:style-name="T165"/></text:span></text:p>
      <text:p text:style-name="P105"><text:span text:style-name="_3c_C_3e_"><text:span text:style-name="T159">struct ST {dato: String}; </text:span></text:span><text:span text:style-name="_2f__2f_C"><text:span text:style-name="T159">//debe estar fuera para ser reconocida por funcion1 y funcion2</text:span></text:span></text:p>
      <text:p text:style-name="P104"><text:span text:style-name="_3c_C_3e_"><text:span text:style-name="T159">fn main(){</text:span></text:span></text:p>
      <text:p text:style-name="P104"><text:span text:style-name="_3c_C_3e_"><text:span text:style-name="T159"><text:tab/>let st = ST { dato: "hola".into() };</text:span></text:span></text:p>
      <text:p text:style-name="P106"><text:span text:style-name="_3c_C_3e_"><text:span text:style-name="T159"><text:tab/>funcion1(</text:span></text:span><text:span text:style-name="_3c_C_2b__2b__3e_"><text:span text:style-name="T15">&amp;</text:span></text:span><text:span text:style-name="_3c_C_3e_"><text:span text:style-name="T159">st); </text:span></text:span><text:span text:style-name="_2f__2f_C"><text:span text:style-name="T159">//no pierde el ownership</text:span></text:span><text:span text:style-name="_2f__2f_C"><text:span text:style-name="T169">. Sigue perteneciendo st a main.</text:span></text:span></text:p>
      <text:p text:style-name="P106"><text:span text:style-name="_3c_C_3e_"><text:span text:style-name="T159"><text:tab/>println!("{}", st.dato); </text:span></text:span><text:span text:style-name="_2f__2f_C"><text:span text:style-name="T159">//compila sin problema por que no perdió el ownership.<text:tab/></text:span></text:span></text:p>
      <text:p text:style-name="P104"><text:span text:style-name="_3c_C_3e_"><text:span text:style-name="T159">}</text:span></text:span></text:p>
      <text:p text:style-name="P106"><text:span text:style-name="_2f__2f_C"><text:span text:style-name="T159">//En Rust no hace falta declarar las funciones antes de usarlas.</text:span></text:span></text:p>
      <text:p text:style-name="P106"><text:span text:style-name="_3c_C_3e_"><text:span text:style-name="T159">fn funcion1(</text:span></text:span><text:span text:style-name="_3c_C_2b__2b__3e_"><text:span text:style-name="T15">st: &amp;ST</text:span></text:span><text:span text:style-name="_3c_C_3e_"><text:span text:style-name="T159">){ </text:span></text:span></text:p>
      <text:p text:style-name="P105"><text:span text:style-name="_3c_C_3e_"><text:span text:style-name="T159"><text:tab/></text:span></text:span><text:span text:style-name="_2f__2f_C"><text:span text:style-name="T159">//al loro con esto!! ahora st es una direccion de memoria asi que no se pasa como <text:tab/>funcion2(&amp;st) que </text:span></text:span><text:span text:style-name="_2f__2f_C"><text:span text:style-name="T170"><text:tab/></text:span></text:span><text:span text:style-name="_2f__2f_C"><text:span text:style-name="T159">daría un error de compilación.<text:tab/></text:span></text:span></text:p>
      <text:p text:style-name="P105"><text:span text:style-name="_3c_C_3e_"><text:span text:style-name="T159"><text:tab/>funcion2(</text:span></text:span><text:span text:style-name="_3c_C_2b__2b__3e_"><text:span text:style-name="T15">st</text:span></text:span><text:span text:style-name="_3c_C_3e_"><text:span text:style-name="T159">); </text:span></text:span></text:p>
      <text:p text:style-name="P106"><text:span text:style-name="_3c_C_3e_"><text:span text:style-name="T159"><text:tab/>println!("{}", st.dato); </text:span></text:span><text:span text:style-name="_2f__2f_C"><text:span text:style-name="T159">//compila</text:span></text:span></text:p>
      <text:p text:style-name="P106"><text:span text:style-name="_3c_C_3e_"><text:span text:style-name="T159">}</text:span></text:span></text:p>
      <text:p text:style-name="P106"><text:span text:style-name="_3c_C_3e_"><text:span text:style-name="T159">fn funcion2(</text:span></text:span><text:span text:style-name="_3c_C_2b__2b__3e_"><text:span text:style-name="T15">st: &amp;ST</text:span></text:span><text:span text:style-name="_3c_C_3e_"><text:span text:style-name="T159">){</text:span></text:span></text:p>
      <text:p text:style-name="P106"><text:span text:style-name="_3c_C_3e_"><text:span text:style-name="T159"><text:tab/>... </text:span></text:span><text:span text:style-name="_2f__2f_C"><text:span text:style-name="T159">//dentro de la primera llamada en el main al hacer &amp; Rust hace que st viva hasta aquí y después de cada linea de la función.</text:span></text:span></text:p>
      <text:p text:style-name="P106"><text:span text:style-name="_3c_C_3e_"><text:span text:style-name="T159">}</text:span></text:span></text:p>
      <text:p text:style-name="P106"><text:soft-page-break/><text:span text:style-name="_3c_C_3e_"><text:span text:style-name="T159"/></text:span></text:p>
      <text:p text:style-name="P107"><text:span text:style-name="_2f__2f_C"><text:span text:style-name="T171">LIFETIMES!!</text:span></text:span></text:p>
      <text:p text:style-name="P107"><text:span text:style-name="_2f__2f_C"><text:span text:style-name="T172">Cuando es obligatorio usar LIFETIMES? (</text:span></text:span><text:span text:style-name="_3c_C_3e_"><text:span text:style-name="T159">&lt;'loquesea&gt;</text:span></text:span><text:span text:style-name="_2f__2f_C"><text:span text:style-name="T172">) con una referencia </text:span></text:span><text:span text:style-name="_3c_C_2b__2b__3e_"><text:span text:style-name="T15">&amp;</text:span></text:span><text:span text:style-name="_2f__2f_C"><text:span text:style-name="T172">?</text:span></text:span></text:p>
      <text:p text:style-name="P107"><text:span text:style-name="_2f__2f_C"><text:span text:style-name="T172">1. Cuando guardamos una referencia en un STRUCT o ENUM:</text:span></text:span></text:p>
      <text:p text:style-name="P107"><text:span text:style-name="_3c_C_3e_"><text:span text:style-name="T173"><text:tab/></text:span></text:span><text:span text:style-name="_3c_C_3e_"><text:span text:style-name="T159">struct ST { texto: </text:span></text:span><text:span text:style-name="_3c_C_2b__2b__3e_"><text:span text:style-name="T15">&amp;str</text:span></text:span><text:span text:style-name="_3c_C_3e_"><text:span text:style-name="T159">}</text:span></text:span><text:span text:style-name="_2f__2f_C"><text:span text:style-name="T172"> </text:span></text:span><text:span text:style-name="_2f__2f_C"><text:span text:style-name="T15">//&amp;str es como un char*. pero ERROR!! Rust no sabe cuanto vive</text:span></text:span></text:p>
      <text:p text:style-name="P107"><text:span text:style-name="_2f__2f_C"><text:span text:style-name="T172"><text:tab/>Para Solucionarlo:</text:span></text:span></text:p>
      <text:p text:style-name="P108"><text:span text:style-name="_2f__2f_C"><text:span text:style-name="T174"><text:tab/></text:span></text:span><text:span text:style-name="_2f__2f_C"><text:span text:style-name="T15">//primero se define el lifetime y luego se aplica. el ST&lt;'a&gt; va a tener un str que vive 'a y no menos.</text:span></text:span></text:p>
      <text:p text:style-name="P107"><text:span text:style-name="_3c_C_3e_"><text:span text:style-name="T15"><text:tab/>struct ST</text:span></text:span><text:span text:style-name="_3c_C_2b__2b__3e_"><text:span text:style-name="T15">&lt;'a&gt; </text:span></text:span><text:span text:style-name="_3c_C_3e_"><text:span text:style-name="T15">{texto: </text:span></text:span><text:span text:style-name="_3c_C_2b__2b__3e_"><text:span text:style-name="T15">&amp;'a</text:span></text:span><text:span text:style-name="_3c_C_3e_"><text:span text:style-name="T15"> str, } /</text:span></text:span><text:span text:style-name="_2f__2f_C"><text:span text:style-name="T15">/Significa que ST no puede vivir más que el texto str, por <text:tab/>que si no tendríamos un puntero basura.</text:span></text:span></text:p>
      <text:p text:style-name="P107"><text:span text:style-name="_2f__2f_C"><text:span text:style-name="T15"/></text:span></text:p>
      <text:p text:style-name="P109"><text:span text:style-name="_2f__2f_C"><text:span text:style-name="T175">2</text:span></text:span><text:span text:style-name="_2f__2f_C"><text:span text:style-name="T172">. Cuando </text:span></text:span><text:span text:style-name="_2f__2f_C"><text:span text:style-name="T175">pasamos varias referencias que devuelve una de ellas. Si una función recibe dos o más referencias y devuelve otra referencia, el compilador se confunde y no sabe cual de los parámetros proviene del dato resuelto.</text:span></text:span></text:p>
      <text:p text:style-name="P109"><text:span text:style-name="_2f__2f_C"><text:span text:style-name="T175"><text:tab/></text:span></text:span><text:span text:style-name="_2f__2f_C"><text:span text:style-name="T159">//Rust no sabe si el &amp;str viene de x o y</text:span></text:span><text:span text:style-name="_2f__2f_C"><text:span text:style-name="T176">, po r lo que una podria vivir menos que otra y contendria basura.</text:span></text:span></text:p>
      <text:p text:style-name="P109"><text:span text:style-name="_3c_C_3e_"><text:span text:style-name="T159"><text:tab/>fn el_mas_largo(x: &amp;str, y: &amp;str) -&gt; &amp;str</text:span></text:span><text:span text:style-name="_3c_C_3e_"><text:span text:style-name="T176"> /</text:span></text:span><text:span text:style-name="_2f__2f_C"><text:span text:style-name="T176">/error de compilación</text:span></text:span></text:p>
      <text:p text:style-name="P109"><text:span text:style-name="_2f__2f_C"><text:span text:style-name="T175"><text:tab/></text:span></text:span><text:span text:style-name="_2f__2f_C"><text:span text:style-name="T172">Para</text:span></text:span><text:span text:style-name="_2f__2f_C"><text:span text:style-name="T175"> solucionarlo:</text:span></text:span></text:p>
      <text:p text:style-name="P109"><text:span text:style-name="_2f__2f_C"><text:span text:style-name="T175"><text:tab/></text:span></text:span><text:span text:style-name="_3c_C_3e_"><text:span text:style-name="T159">fn el_mas_largo</text:span></text:span><text:span text:style-name="_3c_C_2b__2b__3e_"><text:span text:style-name="T15">&lt;'a&gt;</text:span></text:span><text:span text:style-name="_3c_C_3e_"><text:span text:style-name="T159">(x: </text:span></text:span><text:span text:style-name="_3c_C_2b__2b__3e_"><text:span text:style-name="T15">&amp;'a</text:span></text:span><text:span text:style-name="_3c_C_3e_"><text:span text:style-name="T159"> str, y: </text:span></text:span><text:span text:style-name="_3c_C_2b__2b__3e_"><text:span text:style-name="T15">&amp;'a</text:span></text:span><text:span text:style-name="_3c_C_3e_"><text:span text:style-name="T159"> str) -&gt; </text:span></text:span><text:span text:style-name="_3c_C_2b__2b__3e_"><text:span text:style-name="T15">&amp;'a</text:span></text:span><text:span text:style-name="_3c_C_3e_"><text:span text:style-name="T159"> str{</text:span></text:span></text:p>
      <text:p text:style-name="P109"><text:span text:style-name="_3c_C_3e_"><text:span text:style-name="T159"><text:tab/><text:tab/>if x.len() &gt; y.len() { x } else { y } </text:span></text:span><text:span text:style-name="_2f__2f_C"><text:span text:style-name="T159">//la referencia devuelta vivirá tanto como la menor.</text:span></text:span></text:p>
      <text:p text:style-name="P109"><text:span text:style-name="_3c_C_3e_"><text:span text:style-name="T159"><text:tab/>}</text:span></text:span></text:p>
      <text:p text:style-name="P109"><text:span text:style-name="_3c_C_3e_"><text:span text:style-name="T159"/></text:span></text:p>
      <text:h text:style-name="P110" text:outline-level="3"><text:span text:style-name="_3c_C_3e_"><text:span text:style-name="T177">OPTION</text:span></text:span></text:h>
      <text:p text:style-name="P111"><text:span text:style-name="_2f__2f_C"><text:span text:style-name="T178">Qué pasa en C cuando tenemos un </text:span></text:span><text:span text:style-name="_3c_C_3e_"><text:span text:style-name="T159">Char* str = NULL</text:span></text:span><text:span text:style-name="_2f__2f_C"><text:span text:style-name="T178">, y le hacemos un </text:span></text:span><text:span text:style-name="_3c_C_3e_"><text:span text:style-name="T159">str[0]</text:span></text:span><text:span text:style-name="_2f__2f_C"><text:span text:style-name="T178">, pues que se produce un Segfaul y para evitarlo hacemos un </text:span></text:span><text:span text:style-name="_3c_C_3e_"><text:span text:style-name="T159">if (str) {</text:span></text:span><text:span text:style-name="_3c_C_3e_"><text:span text:style-name="T179">y ahora sí podemos acceder a </text:span></text:span><text:span text:style-name="_3c_C_3e_"><text:span text:style-name="T159">str[0]...}</text:span></text:span></text:p>
      <text:p text:style-name="P111"><text:span text:style-name="_2f__2f_C"><text:span text:style-name="T178">Es decir, si no checkeamos que primero existe </text:span></text:span><text:span text:style-name="_3c_C_3e_"><text:span text:style-name="T159">str</text:span></text:span><text:span text:style-name="_2f__2f_C"><text:span text:style-name="T178">, entonces se puede producir el crash. </text:span></text:span></text:p>
      <text:p text:style-name="P111"><text:span text:style-name="_2f__2f_C"><text:span text:style-name="T178">Rust evita esto, devolviendo en muchos casos y métodos un tipo llamado </text:span></text:span><text:span text:style-name="_3c_C_2b__2b__3e_"><text:span text:style-name="T15">OPTION</text:span></text:span><text:span text:style-name="_2f__2f_C"><text:span text:style-name="T178">, que en sí es un enum:</text:span></text:span></text:p>
      <text:p text:style-name="P111"><text:span text:style-name="_2f__2f_C"><text:span text:style-name="T178"/></text:span></text:p>
      <text:p text:style-name="P111"><text:span text:style-name="_3c_C_2b__2b__3e_"><text:span text:style-name="T15">enum Option&lt;T&gt;{</text:span></text:span></text:p>
      <text:p text:style-name="P111"><text:span text:style-name="_3c_C_2b__2b__3e_"><text:span text:style-name="T15"><text:tab/>Some(T),</text:span></text:span></text:p>
      <text:p text:style-name="P111"><text:span text:style-name="_3c_C_2b__2b__3e_"><text:span text:style-name="T15"><text:tab/>None,</text:span></text:span></text:p>
      <text:p text:style-name="P111"><text:span text:style-name="_3c_C_2b__2b__3e_"><text:span text:style-name="T15">}</text:span></text:span></text:p>
      <text:p text:style-name="P111"><text:span text:style-name="_2f__2f_C"><text:span text:style-name="T178"/></text:span></text:p>
      <text:p text:style-name="P111"><text:span text:style-name="_2f__2f_C"><text:span text:style-name="T178">Es decir devuelve una Tupla de valores. Un </text:span></text:span><text:span text:style-name="_3c_C_2b__2b__3e_"><text:span text:style-name="T15">Some(T)</text:span></text:span><text:span text:style-name="_2f__2f_C"><text:span text:style-name="T178"> si devuelve "algo" (y </text:span></text:span><text:span text:style-name="_3c_C_3e_"><text:span text:style-name="T159">Some</text:span></text:span><text:span text:style-name="_2f__2f_C"><text:span text:style-name="T178"> es palabra reservada para ello) o un </text:span></text:span><text:span text:style-name="_3c_C_2b__2b__3e_"><text:span text:style-name="T15">None</text:span></text:span><text:span text:style-name="_2f__2f_C"><text:span text:style-name="T178">, es decir nada. </text:span></text:span></text:p>
      <text:p text:style-name="P111"><text:span text:style-name="_2f__2f_C"><text:span text:style-name="T178">Esto puede ser un número o algo.. o una dirección de memoria o un </text:span></text:span><text:span text:style-name="_3c_C_3e_"><text:span text:style-name="T159">NULL</text:span></text:span><text:span text:style-name="_2f__2f_C"><text:span text:style-name="T178">. De esa manera siempre estamos protegidos.</text:span></text:span></text:p>
      <text:p text:style-name="P112"><text:soft-page-break/><text:span text:style-name="_2f__2f_C"><text:span text:style-name="T178">Para </text:span></text:span><text:span text:style-name="_2f__2f_C"><text:span text:style-name="T180">usarlo puede ser asi:</text:span></text:span></text:p>
      <text:p text:style-name="P112"><text:span text:style-name="_2f__2f_C"><text:span text:style-name="T180">Recordando la estructura </text:span></text:span><text:span text:style-name="_3c_C_3e_"><text:span text:style-name="T159">Ticket</text:span></text:span><text:span text:style-name="_2f__2f_C"><text:span text:style-name="T180"> que tenia un </text:span></text:span><text:span text:style-name="_3c_C_3e_"><text:span text:style-name="T159">status</text:span></text:span><text:span text:style-name="_2f__2f_C"><text:span text:style-name="T180"> de </text:span></text:span><text:span text:style-name="_3c_C_3e_"><text:span text:style-name="T159">enum Status</text:span></text:span><text:span text:style-name="_2f__2f_C"><text:span text:style-name="T180"> con </text:span></text:span><text:span text:style-name="_3c_C_3e_"><text:span text:style-name="T159">assigned_to</text:span></text:span><text:span text:style-name="_2f__2f_C"><text:span text:style-name="T180"> en el de </text:span></text:span><text:span text:style-name="_3c_C_3e_"><text:span text:style-name="T159">InProgress</text:span></text:span><text:span text:style-name="_2f__2f_C"><text:span text:style-name="T180">:</text:span></text:span></text:p>
      <text:p text:style-name="P112"><text:span text:style-name="_3c_C_3e_"><text:span text:style-name="T159">pub fn assigned_to(&amp;self) -&gt; </text:span></text:span><text:span text:style-name="_3c_C_2b__2b__3e_"><text:span text:style-name="T15">Option&lt;&amp;String&gt;</text:span></text:span><text:span text:style-name="_3c_C_3e_"><text:span text:style-name="T159">{ /</text:span></text:span><text:span text:style-name="_2f__2f_C"><text:span text:style-name="T159">/ya no tendremos que hacer panic ya que la otra opción seria un None (null).</text:span></text:span></text:p>
      <text:p text:style-name="P112"><text:span text:style-name="_3c_C_3e_"><text:span text:style-name="T159">if let Status::InProgress { assigned_to } = &amp;self.status { </text:span></text:span><text:span text:style-name="_3c_C_2b__2b__3e_"><text:span text:style-name="T15">Some(assigned_to)</text:span></text:span><text:span text:style-name="_3c_C_3e_"><text:span text:style-name="T159"> }</text:span></text:span></text:p>
      <text:p text:style-name="P113"><text:span text:style-name="_3c_C_3e_"><text:span text:style-name="T159">else { </text:span></text:span><text:span text:style-name="_3c_C_2b__2b__3e_"><text:span text:style-name="T15">None</text:span></text:span><text:span text:style-name="_3c_C_3e_"><text:span text:style-name="T159"> }</text:span></text:span></text:p>
      <text:p text:style-name="P111"><text:span text:style-name="_2f__2f_C"><text:span text:style-name="T180"/></text:span></text:p>
      <text:p text:style-name="P111"><text:span text:style-name="_2f__2f_C"><text:span text:style-name="T17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3T17:29:20.541462651</dc:date>
    <meta:editing-duration>P3DT7H37M38S</meta:editing-duration>
    <meta:editing-cycles>493</meta:editing-cycles>
    <meta:generator>LibreOffice/26.2.4.2$Linux_X86_64 LibreOffice_project/620$Build-2</meta:generator>
    <meta:print-date>2025-01-04T16:07:11.302000000</meta:print-date>
    <meta:printed-by>Archivos PDF</meta:printed-by>
    <meta:document-statistic meta:table-count="0" meta:image-count="0" meta:object-count="0" meta:page-count="22" meta:paragraph-count="547" meta:word-count="4780" meta:character-count="26879" meta:non-whitespace-character-count="22215"/>
  </office:meta>
</office:document-meta>
</file>