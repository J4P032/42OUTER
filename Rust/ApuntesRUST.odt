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0908b2"/>
    </style:style>
    <style:style style:name="P5" style:family="paragraph" style:parent-style-name="Text_20_body">
      <style:paragraph-properties fo:line-height="100%"/>
      <style:text-properties fo:color="#00a933" loext:opacity="100%" style:font-name="Arial1" officeooo:rsid="0017c700" officeooo:paragraph-rsid="020aa978"/>
    </style:style>
    <style:style style:name="P6" style:family="paragraph" style:parent-style-name="Text_20_body">
      <style:paragraph-properties fo:line-height="100%"/>
      <style:text-properties fo:color="#00a933" loext:opacity="100%" style:font-name="Arial1" officeooo:rsid="0017c700" officeooo:paragraph-rsid="020fde34"/>
    </style:style>
    <style:style style:name="P7" style:family="paragraph" style:parent-style-name="Text_20_body">
      <style:paragraph-properties fo:line-height="100%"/>
      <style:text-properties fo:color="#00a933" loext:opacity="100%" style:font-name="Arial1" officeooo:rsid="0017c700" officeooo:paragraph-rsid="0213cb13"/>
    </style:style>
    <style:style style:name="P8" style:family="paragraph" style:parent-style-name="Text_20_body">
      <style:paragraph-properties fo:line-height="100%"/>
      <style:text-properties fo:color="#00a933" loext:opacity="100%" style:font-name="Arial1" officeooo:rsid="0017c700" officeooo:paragraph-rsid="0235268e"/>
    </style:style>
    <style:style style:name="P9" style:family="paragraph" style:parent-style-name="Heading_20_3">
      <style:paragraph-properties fo:line-height="100%"/>
      <style:text-properties fo:color="#00a933" loext:opacity="100%" style:font-name="Arial1" style:text-underline-style="none" officeooo:rsid="0235268e" officeooo:paragraph-rsid="0235268e"/>
    </style:style>
    <style:style style:name="P10"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1" style:family="paragraph" style:parent-style-name="Heading_20_3">
      <style:paragraph-properties fo:line-height="100%"/>
      <style:text-properties fo:color="#ffffff" loext:opacity="100%" style:font-name="Arial1" style:text-underline-style="none" officeooo:rsid="022aeaa7" officeooo:paragraph-rsid="022aeaa7"/>
    </style:style>
    <style:style style:name="P12" style:family="paragraph" style:parent-style-name="Text_20_body">
      <style:paragraph-properties fo:line-height="100%"/>
      <style:text-properties fo:color="#ffffff" loext:opacity="100%" style:font-name="Arial1" style:text-underline-style="none" officeooo:rsid="02259ec8" officeooo:paragraph-rsid="02259ec8"/>
    </style:style>
    <style:style style:name="P13" style:family="paragraph" style:parent-style-name="Text_20_body">
      <style:paragraph-properties fo:line-height="100%"/>
      <style:text-properties fo:color="#ffffff" loext:opacity="100%" style:font-name="Arial1" style:text-underline-style="none" officeooo:rsid="02259ec8" officeooo:paragraph-rsid="0227dcad"/>
    </style:style>
    <style:style style:name="P14" style:family="paragraph" style:parent-style-name="Text_20_body">
      <style:paragraph-properties fo:line-height="100%"/>
      <style:text-properties fo:color="#ffffff" loext:opacity="100%" style:font-name="Arial1" style:text-underline-style="none" officeooo:rsid="0226a567" officeooo:paragraph-rsid="0226a567"/>
    </style:style>
    <style:style style:name="P15" style:family="paragraph" style:parent-style-name="Text_20_body">
      <style:paragraph-properties fo:line-height="100%"/>
      <style:text-properties fo:color="#00a933" loext:opacity="100%" style:font-name="Arial1" style:text-underline-style="none" officeooo:rsid="0226a567" officeooo:paragraph-rsid="0226a567"/>
    </style:style>
    <style:style style:name="P16"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7"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8" style:family="paragraph" style:parent-style-name="Text_20_body">
      <style:paragraph-properties fo:line-height="100%"/>
      <style:text-properties officeooo:rsid="0216a37b" officeooo:paragraph-rsid="0216a37b"/>
    </style:style>
    <style:style style:name="P19" style:family="paragraph" style:parent-style-name="Text_20_body">
      <style:paragraph-properties fo:line-height="100%"/>
      <style:text-properties officeooo:rsid="0216a37b" officeooo:paragraph-rsid="0216c522"/>
    </style:style>
    <style:style style:name="P20" style:family="paragraph" style:parent-style-name="Text_20_body">
      <style:paragraph-properties fo:line-height="100%"/>
      <style:text-properties officeooo:rsid="0216a37b" officeooo:paragraph-rsid="02171d48"/>
    </style:style>
    <style:style style:name="P21" style:family="paragraph" style:parent-style-name="Heading_20_3">
      <style:paragraph-properties fo:line-height="100%"/>
      <style:text-properties style:text-underline-style="none" officeooo:rsid="0216a37b" officeooo:paragraph-rsid="0216a37b" fo:background-color="#bf0041"/>
    </style:style>
    <style:style style:name="P2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23" style:family="paragraph" style:parent-style-name="Text_20_body">
      <style:paragraph-properties fo:line-height="100%"/>
      <style:text-properties fo:color="#00a933" loext:opacity="100%" style:font-name="Arial1" officeooo:rsid="0017c700" officeooo:paragraph-rsid="023aa484"/>
    </style:style>
    <style:style style:name="P24"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25" style:family="paragraph" style:parent-style-name="Text_20_body">
      <style:paragraph-properties fo:line-height="100%"/>
      <style:text-properties fo:color="#00a933" loext:opacity="100%" style:font-name="Arial1" officeooo:rsid="0017c700" officeooo:paragraph-rsid="023c909b"/>
    </style:style>
    <style:style style:name="P26" style:family="paragraph" style:parent-style-name="Text_20_body">
      <style:paragraph-properties fo:line-height="100%"/>
      <style:text-properties fo:color="#00a933" loext:opacity="100%" style:font-name="Arial1" officeooo:rsid="0017c700" officeooo:paragraph-rsid="023d09dc"/>
    </style:style>
    <style:style style:name="P27" style:family="paragraph" style:parent-style-name="Text_20_body">
      <style:paragraph-properties fo:line-height="100%"/>
      <style:text-properties fo:color="#00a933" loext:opacity="100%" style:font-name="Arial1" officeooo:rsid="0017c700" officeooo:paragraph-rsid="023ee483"/>
    </style:style>
    <style:style style:name="P28" style:family="paragraph" style:parent-style-name="Text_20_body">
      <style:paragraph-properties fo:line-height="100%"/>
      <style:text-properties fo:color="#00a933" loext:opacity="100%" style:font-name="Arial1" officeooo:rsid="0017c700" officeooo:paragraph-rsid="0240b662"/>
    </style:style>
    <style:style style:name="P29" style:family="paragraph" style:parent-style-name="Text_20_body">
      <style:paragraph-properties fo:line-height="100%"/>
      <style:text-properties fo:color="#00a933" loext:opacity="100%" style:font-name="Arial1" officeooo:rsid="0017c700" officeooo:paragraph-rsid="024209b0"/>
    </style:style>
    <style:style style:name="P30" style:family="paragraph" style:parent-style-name="Text_20_body">
      <style:paragraph-properties fo:line-height="100%"/>
      <style:text-properties fo:color="#00a933" loext:opacity="100%" style:font-name="Arial1" officeooo:rsid="0017c700" officeooo:paragraph-rsid="02425b33"/>
    </style:style>
    <style:style style:name="P31" style:family="paragraph" style:parent-style-name="Heading_20_3">
      <style:paragraph-properties fo:line-height="100%"/>
      <style:text-properties style:text-underline-style="none" officeooo:rsid="020908b2" officeooo:paragraph-rsid="020908b2" fo:background-color="#bf0041"/>
    </style:style>
    <style:style style:name="P32" style:family="paragraph" style:parent-style-name="Text_20_body">
      <style:paragraph-properties fo:line-height="100%"/>
      <style:text-properties fo:color="#00a933" loext:opacity="100%" style:font-name="Arial1" officeooo:rsid="0017c700" officeooo:paragraph-rsid="020d2357"/>
    </style:style>
    <style:style style:name="P33" style:family="paragraph" style:parent-style-name="Text_20_body">
      <style:paragraph-properties fo:line-height="100%"/>
      <style:text-properties fo:color="#00a933" loext:opacity="100%" style:font-name="Arial1" officeooo:rsid="0017c700" officeooo:paragraph-rsid="02113cfb"/>
    </style:style>
    <style:style style:name="P34" style:family="paragraph" style:parent-style-name="Text_20_body">
      <style:paragraph-properties fo:line-height="100%"/>
      <style:text-properties fo:color="#00a933" loext:opacity="100%" style:font-name="Arial1" officeooo:rsid="0017c700" officeooo:paragraph-rsid="02171d48"/>
    </style:style>
    <style:style style:name="P35" style:family="paragraph" style:parent-style-name="Text_20_body">
      <style:paragraph-properties fo:line-height="100%"/>
      <style:text-properties fo:color="#00a933" loext:opacity="100%" style:font-name="Arial1" officeooo:rsid="0017c700" officeooo:paragraph-rsid="02120630"/>
    </style:style>
    <style:style style:name="P36" style:family="paragraph" style:parent-style-name="Text_20_body">
      <style:paragraph-properties fo:line-height="100%"/>
      <style:text-properties fo:color="#00a933" loext:opacity="100%" style:font-name="Arial1" officeooo:rsid="0017c700" officeooo:paragraph-rsid="021770f8"/>
    </style:style>
    <style:style style:name="P37" style:family="paragraph" style:parent-style-name="Text_20_body">
      <style:paragraph-properties fo:line-height="100%"/>
      <style:text-properties fo:color="#00a933" loext:opacity="100%" style:font-name="Arial1" officeooo:rsid="0017c700" officeooo:paragraph-rsid="0256b2db"/>
    </style:style>
    <style:style style:name="P38"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39" style:family="paragraph" style:parent-style-name="Text_20_body">
      <style:paragraph-properties fo:line-height="100%"/>
      <style:text-properties fo:color="#00a933" loext:opacity="100%" style:font-name="Arial1" officeooo:rsid="0017c700" officeooo:paragraph-rsid="021d5bcc"/>
    </style:style>
    <style:style style:name="P40" style:family="paragraph" style:parent-style-name="Text_20_body">
      <style:paragraph-properties fo:line-height="100%"/>
      <style:text-properties fo:color="#00a933" loext:opacity="100%" style:font-name="Arial1" officeooo:rsid="0017c700" officeooo:paragraph-rsid="021fa2ef"/>
    </style:style>
    <style:style style:name="P41"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42" style:family="paragraph" style:parent-style-name="Text_20_body">
      <style:paragraph-properties fo:line-height="100%"/>
      <style:text-properties fo:color="#00a933" loext:opacity="100%" style:font-name="Arial1" officeooo:rsid="0017c700" officeooo:paragraph-rsid="0257f2af"/>
    </style:style>
    <style:style style:name="P43" style:family="paragraph" style:parent-style-name="Text_20_body">
      <style:paragraph-properties fo:line-height="100%"/>
      <style:text-properties fo:color="#00a933" loext:opacity="100%" style:font-name="Arial1" officeooo:rsid="0017c700" officeooo:paragraph-rsid="025964c2"/>
    </style:style>
    <style:style style:name="P44"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45" style:family="paragraph" style:parent-style-name="Text_20_body">
      <style:paragraph-properties fo:line-height="100%"/>
      <style:text-properties fo:color="#00a933" loext:opacity="100%" style:font-name="Arial1" officeooo:rsid="0017c700" officeooo:paragraph-rsid="025c4710"/>
    </style:style>
    <style:style style:name="P46" style:family="paragraph" style:parent-style-name="Text_20_body">
      <style:paragraph-properties fo:line-height="100%"/>
      <style:text-properties fo:color="#00a933" loext:opacity="100%" style:font-name="Arial1" officeooo:rsid="0017c700" officeooo:paragraph-rsid="025e5682"/>
    </style:style>
    <style:style style:name="P47"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48" style:family="paragraph" style:parent-style-name="Text_20_body">
      <style:paragraph-properties fo:line-height="100%"/>
      <style:text-properties fo:color="#00a933" loext:opacity="100%" style:font-name="Arial1" officeooo:rsid="0017c700" officeooo:paragraph-rsid="026e980c"/>
    </style:style>
    <style:style style:name="P49" style:family="paragraph" style:parent-style-name="Text_20_body">
      <style:paragraph-properties fo:line-height="100%"/>
      <style:text-properties fo:color="#00a933" loext:opacity="100%" style:font-name="Arial1" officeooo:rsid="0017c700" officeooo:paragraph-rsid="026f46d2"/>
    </style:style>
    <style:style style:name="P50" style:family="paragraph" style:parent-style-name="Heading_20_3">
      <style:paragraph-properties fo:line-height="100%"/>
      <style:text-properties fo:color="#00a933" loext:opacity="100%" style:font-name="Arial1" style:text-underline-style="none" officeooo:rsid="020908b2" officeooo:paragraph-rsid="026eb8ab" fo:background-color="#bf0041"/>
    </style:style>
    <style:style style:name="P51" style:family="paragraph" style:parent-style-name="Text_20_body">
      <style:paragraph-properties fo:line-height="100%"/>
      <style:text-properties fo:color="#00a933" loext:opacity="100%" style:font-name="Arial1" officeooo:rsid="0017c700" officeooo:paragraph-rsid="0234a03a"/>
    </style:style>
    <style:style style:name="P52"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53" style:family="paragraph" style:parent-style-name="Text_20_body">
      <style:paragraph-properties fo:line-height="100%"/>
      <style:text-properties fo:color="#00a933" loext:opacity="100%" style:font-name="Arial1" officeooo:rsid="0017c700" officeooo:paragraph-rsid="022b8b4d"/>
    </style:style>
    <style:style style:name="P54" style:family="paragraph" style:parent-style-name="Text_20_body">
      <style:paragraph-properties fo:line-height="100%"/>
      <style:text-properties fo:color="#00a933" loext:opacity="100%" style:font-name="Arial1" officeooo:rsid="0017c700" officeooo:paragraph-rsid="02300a0c"/>
    </style:style>
    <style:style style:name="P55" style:family="paragraph" style:parent-style-name="Standard">
      <style:paragraph-properties fo:line-height="100%"/>
      <style:text-properties fo:color="#00a933" loext:opacity="100%" style:font-name="Arial1" officeooo:rsid="0017c700" officeooo:paragraph-rsid="02300a0c"/>
    </style:style>
    <style:style style:name="P56" style:family="paragraph" style:parent-style-name="Text_20_body">
      <style:paragraph-properties fo:line-height="100%"/>
      <style:text-properties fo:color="#00a933" loext:opacity="100%" style:font-name="Arial1" officeooo:rsid="0017c700" officeooo:paragraph-rsid="02463c3d"/>
    </style:style>
    <style:style style:name="P57" style:family="paragraph" style:parent-style-name="Text_20_body">
      <style:paragraph-properties fo:line-height="100%"/>
      <style:text-properties fo:color="#00a933" loext:opacity="100%" style:font-name="Arial1" officeooo:rsid="0017c700" officeooo:paragraph-rsid="022bdc6a"/>
    </style:style>
    <style:style style:name="P58" style:family="paragraph" style:parent-style-name="Text_20_body">
      <style:paragraph-properties fo:line-height="100%" fo:text-align="left" style:justify-single-word="false"/>
      <style:text-properties fo:color="#00a933" loext:opacity="100%" style:font-name="Arial1" officeooo:rsid="0017c700" officeooo:paragraph-rsid="022bdc6a"/>
    </style:style>
    <style:style style:name="P59" style:family="paragraph" style:parent-style-name="Text_20_body">
      <style:paragraph-properties fo:line-height="100%" fo:text-align="left" style:justify-single-word="false"/>
      <style:text-properties fo:color="#00a933" loext:opacity="100%" style:font-name="Arial1" officeooo:rsid="0017c700" officeooo:paragraph-rsid="022ce022"/>
    </style:style>
    <style:style style:name="P60" style:family="paragraph" style:parent-style-name="Text_20_body">
      <style:paragraph-properties fo:line-height="100%" fo:text-align="left" style:justify-single-word="false"/>
      <style:text-properties fo:color="#00a933" loext:opacity="100%" style:font-name="Arial1" officeooo:rsid="0017c700" officeooo:paragraph-rsid="022e246b"/>
    </style:style>
    <style:style style:name="P61" style:family="paragraph" style:parent-style-name="Text_20_body">
      <style:paragraph-properties fo:line-height="100%" fo:text-align="left" style:justify-single-word="false"/>
      <style:text-properties fo:color="#00a933" loext:opacity="100%" style:font-name="Arial1" officeooo:rsid="0017c700" officeooo:paragraph-rsid="022f38c4"/>
    </style:style>
    <style:style style:name="P62" style:family="paragraph" style:parent-style-name="Text_20_body">
      <style:paragraph-properties fo:line-height="100%" fo:text-align="left" style:justify-single-word="false"/>
      <style:text-properties fo:color="#00a933" loext:opacity="100%" style:font-name="Arial1" officeooo:rsid="0017c700" officeooo:paragraph-rsid="022fb6a2"/>
    </style:style>
    <style:style style:name="P63" style:family="paragraph" style:parent-style-name="Text_20_body">
      <style:paragraph-properties fo:line-height="100%" fo:text-align="left" style:justify-single-word="false"/>
      <style:text-properties fo:color="#00a933" loext:opacity="100%" style:font-name="Arial1" officeooo:rsid="0017c700" officeooo:paragraph-rsid="02300a0c"/>
    </style:style>
    <style:style style:name="P64" style:family="paragraph" style:parent-style-name="Text_20_body">
      <style:paragraph-properties fo:line-height="100%" fo:text-align="left" style:justify-single-word="false"/>
      <style:text-properties fo:color="#00a933" loext:opacity="100%" style:font-name="Arial1" officeooo:rsid="0017c700" officeooo:paragraph-rsid="0231bbe3"/>
    </style:style>
    <style:style style:name="P65" style:family="paragraph" style:parent-style-name="Text_20_body">
      <style:paragraph-properties fo:line-height="100%" fo:text-align="left" style:justify-single-word="false"/>
      <style:text-properties fo:color="#00a933" loext:opacity="100%" style:font-name="Arial1" officeooo:rsid="0017c700" officeooo:paragraph-rsid="024defaf"/>
    </style:style>
    <style:style style:name="P66" style:family="paragraph" style:parent-style-name="Text_20_body">
      <style:paragraph-properties fo:line-height="100%" fo:text-align="left" style:justify-single-word="false"/>
      <style:text-properties fo:color="#00a933" loext:opacity="100%" style:font-name="Arial1" officeooo:rsid="0017c700" officeooo:paragraph-rsid="023299ec"/>
    </style:style>
    <style:style style:name="P67" style:family="paragraph" style:parent-style-name="Text_20_body">
      <style:paragraph-properties fo:line-height="100%" fo:text-align="left" style:justify-single-word="false"/>
      <style:text-properties fo:color="#00a933" loext:opacity="100%" style:font-name="Arial1" officeooo:rsid="0017c700" officeooo:paragraph-rsid="024fdc8c"/>
    </style:style>
    <style:style style:name="P68"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69" style:family="paragraph" style:parent-style-name="Text_20_body">
      <style:paragraph-properties fo:line-height="100%" fo:text-align="left" style:justify-single-word="false"/>
      <style:text-properties fo:color="#00a933" loext:opacity="100%" style:font-name="Arial1" officeooo:rsid="0017c700" officeooo:paragraph-rsid="02483f67"/>
    </style:style>
    <style:style style:name="P70"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71"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72" style:family="paragraph" style:parent-style-name="Text_20_body">
      <style:paragraph-properties fo:line-height="100%" fo:text-align="left" style:justify-single-word="false"/>
      <style:text-properties fo:color="#00a933" loext:opacity="100%" style:font-name="Arial1" officeooo:rsid="0017c700" officeooo:paragraph-rsid="024aceee"/>
    </style:style>
    <style:style style:name="P73" style:family="paragraph" style:parent-style-name="Text_20_body">
      <style:paragraph-properties fo:line-height="100%" fo:text-align="left" style:justify-single-word="false"/>
      <style:text-properties fo:color="#00a933" loext:opacity="100%" style:font-name="Arial1" officeooo:rsid="0017c700" officeooo:paragraph-rsid="024c2621"/>
    </style:style>
    <style:style style:name="P74"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75" style:family="paragraph" style:parent-style-name="Text_20_body">
      <style:paragraph-properties fo:line-height="100%" fo:text-align="left" style:justify-single-word="false"/>
      <style:text-properties fo:color="#00a933" loext:opacity="100%" style:font-name="Arial1" officeooo:rsid="0017c700" officeooo:paragraph-rsid="0254b429"/>
    </style:style>
    <style:style style:name="P76" style:family="paragraph" style:parent-style-name="Heading_20_3">
      <style:paragraph-properties fo:line-height="100%"/>
      <style:text-properties fo:color="#00a933" loext:opacity="100%" style:font-name="Arial1" style:text-underline-style="none" officeooo:rsid="020908b2" officeooo:paragraph-rsid="024defaf" fo:background-color="#bf0041"/>
    </style:style>
    <style:style style:name="P77" style:family="paragraph" style:parent-style-name="Text_20_body">
      <style:paragraph-properties fo:line-height="100%" fo:text-align="left" style:justify-single-word="false"/>
      <style:text-properties fo:color="#00a933" loext:opacity="100%" style:font-name="Arial1" officeooo:rsid="0017c700" officeooo:paragraph-rsid="0250ef8c"/>
    </style:style>
    <style:style style:name="P78" style:family="paragraph" style:parent-style-name="Text_20_body">
      <style:paragraph-properties fo:line-height="100%" fo:text-align="left" style:justify-single-word="false"/>
      <style:text-properties fo:color="#00a933" loext:opacity="100%" style:font-name="Arial1" officeooo:rsid="0017c700" officeooo:paragraph-rsid="02530e64"/>
    </style:style>
    <style:style style:name="P79" style:family="paragraph" style:parent-style-name="Text_20_body">
      <style:paragraph-properties fo:line-height="100%"/>
      <style:text-properties officeooo:paragraph-rsid="024defaf"/>
    </style:style>
    <style:style style:name="P80" style:family="paragraph" style:parent-style-name="Text_20_body">
      <style:paragraph-properties fo:line-height="100%"/>
      <style:text-properties fo:color="#00a933" loext:opacity="100%" style:font-name="Arial1" officeooo:rsid="0017c700" officeooo:paragraph-rsid="02212731"/>
    </style:style>
    <style:style style:name="P81" style:family="paragraph" style:parent-style-name="Text_20_body">
      <style:paragraph-properties fo:line-height="100%"/>
      <style:text-properties fo:color="#00a933" loext:opacity="100%" style:font-name="Arial1" officeooo:rsid="0017c700" officeooo:paragraph-rsid="022317e8"/>
    </style:style>
    <style:style style:name="P82"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83" style:family="paragraph" style:parent-style-name="Text_20_body">
      <style:paragraph-properties fo:line-height="100%"/>
      <style:text-properties fo:color="#00a933" loext:opacity="100%" style:font-name="Arial1" officeooo:rsid="0017c700" officeooo:paragraph-rsid="023943ac"/>
    </style:style>
    <style:style style:name="P84" style:family="paragraph" style:parent-style-name="Text_20_body">
      <style:paragraph-properties fo:line-height="100%"/>
      <style:text-properties fo:color="#00a933" loext:opacity="100%" style:font-name="Arial1" officeooo:rsid="0017c700" officeooo:paragraph-rsid="0236e83a"/>
    </style:style>
    <style:style style:name="P85" style:family="paragraph" style:parent-style-name="Heading_20_3">
      <style:paragraph-properties fo:line-height="100%"/>
      <style:text-properties fo:color="#00a933" loext:opacity="100%" style:font-name="Arial1" style:text-underline-style="none" officeooo:rsid="020908b2" officeooo:paragraph-rsid="0227dcad" fo:background-color="#bf0041"/>
    </style:style>
    <style:style style:name="P86" style:family="paragraph" style:parent-style-name="Text_20_body">
      <style:paragraph-properties fo:line-height="100%"/>
      <style:text-properties fo:color="#00a933" loext:opacity="100%" style:font-name="Arial1" officeooo:rsid="0017c700" officeooo:paragraph-rsid="0227dcad"/>
    </style:style>
    <style:style style:name="P87" style:family="paragraph" style:parent-style-name="Text_20_body">
      <style:paragraph-properties fo:line-height="100%"/>
      <style:text-properties fo:color="#00a933" loext:opacity="100%" style:font-name="Arial1" officeooo:rsid="0017c700" officeooo:paragraph-rsid="0228c36d"/>
    </style:style>
    <style:style style:name="P88" style:family="paragraph" style:parent-style-name="Text_20_body">
      <style:paragraph-properties fo:line-height="100%"/>
      <style:text-properties fo:color="#00a933" loext:opacity="100%" style:font-name="Arial1" officeooo:rsid="0017c700" officeooo:paragraph-rsid="0229133e"/>
    </style:style>
    <style:style style:name="P89" style:family="paragraph" style:parent-style-name="Text_20_body">
      <style:paragraph-properties fo:line-height="100%"/>
      <style:text-properties fo:color="#00a933" loext:opacity="100%" style:font-name="Arial1" officeooo:rsid="0017c700" officeooo:paragraph-rsid="0229172e"/>
    </style:style>
    <style:style style:name="P90" style:family="paragraph" style:parent-style-name="Text_20_body">
      <style:paragraph-properties fo:line-height="100%"/>
      <style:text-properties fo:color="#00a933" loext:opacity="100%" style:font-name="Arial1" officeooo:rsid="0017c700" officeooo:paragraph-rsid="0229bac5"/>
    </style:style>
    <style:style style:name="P91"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92" style:family="paragraph" style:parent-style-name="Text_20_body">
      <style:paragraph-properties fo:line-height="100%"/>
      <style:text-properties fo:color="#00a933" loext:opacity="100%" style:font-name="Arial1" officeooo:rsid="0017c700" officeooo:paragraph-rsid="0243785a"/>
    </style:style>
    <style:style style:name="P93" style:family="paragraph" style:parent-style-name="Text_20_body">
      <style:paragraph-properties fo:line-height="100%"/>
      <style:text-properties fo:color="#00a933" loext:opacity="100%" style:font-name="Arial1" officeooo:rsid="0017c700" officeooo:paragraph-rsid="0244af53"/>
    </style:style>
    <style:style style:name="P94"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95" style:family="paragraph" style:parent-style-name="Text_20_body">
      <style:paragraph-properties fo:line-height="100%"/>
      <style:text-properties fo:color="#00a933" loext:opacity="100%" style:font-name="Arial1" officeooo:rsid="0017c700" officeooo:paragraph-rsid="026010dc"/>
    </style:style>
    <style:style style:name="P96" style:family="paragraph" style:parent-style-name="Text_20_body">
      <style:paragraph-properties fo:line-height="100%"/>
      <style:text-properties fo:color="#00a933" loext:opacity="100%" style:font-name="Arial1" officeooo:rsid="0017c700" officeooo:paragraph-rsid="02611b1c"/>
    </style:style>
    <style:style style:name="P97" style:family="paragraph" style:parent-style-name="Text_20_body">
      <style:paragraph-properties fo:line-height="100%"/>
      <style:text-properties fo:color="#00a933" loext:opacity="100%" style:font-name="Arial1" officeooo:rsid="0017c700" officeooo:paragraph-rsid="0262cfc4"/>
    </style:style>
    <style:style style:name="P98" style:family="paragraph" style:parent-style-name="Text_20_body">
      <style:paragraph-properties fo:line-height="100%"/>
      <style:text-properties fo:color="#00a933" loext:opacity="100%" style:font-name="Arial1" officeooo:rsid="0017c700" officeooo:paragraph-rsid="0263ef18"/>
    </style:style>
    <style:style style:name="P99" style:family="paragraph" style:parent-style-name="Text_20_body">
      <style:paragraph-properties fo:line-height="100%"/>
      <style:text-properties fo:color="#00a933" loext:opacity="100%" style:font-name="Arial1" officeooo:rsid="0017c700" officeooo:paragraph-rsid="02655e58"/>
    </style:style>
    <style:style style:name="P100" style:family="paragraph" style:parent-style-name="Text_20_body">
      <style:paragraph-properties fo:line-height="100%"/>
      <style:text-properties fo:color="#00a933" loext:opacity="100%" style:font-name="Arial1" officeooo:rsid="0017c700" officeooo:paragraph-rsid="0267ea92"/>
    </style:style>
    <style:style style:name="P101" style:family="paragraph" style:parent-style-name="Text_20_body">
      <style:paragraph-properties fo:line-height="100%"/>
      <style:text-properties fo:color="#00a933" loext:opacity="100%" style:font-name="Arial1" officeooo:rsid="0017c700" officeooo:paragraph-rsid="0265f0df"/>
    </style:style>
    <style:style style:name="P102" style:family="paragraph" style:parent-style-name="Text_20_body">
      <style:paragraph-properties fo:line-height="100%"/>
      <style:text-properties fo:color="#00a933" loext:opacity="100%" style:font-name="Arial1" officeooo:rsid="0017c700" officeooo:paragraph-rsid="026b6d9d"/>
    </style:style>
    <style:style style:name="P103" style:family="paragraph" style:parent-style-name="Text_20_body">
      <style:paragraph-properties fo:line-height="100%"/>
      <style:text-properties fo:color="#00a933" loext:opacity="100%" style:font-name="Arial1" officeooo:rsid="0017c700" officeooo:paragraph-rsid="026cad15"/>
    </style:style>
    <style:style style:name="P104" style:family="paragraph" style:parent-style-name="Text_20_body">
      <style:paragraph-properties fo:line-height="100%"/>
      <style:text-properties fo:color="#00a933" loext:opacity="100%" style:font-name="Arial1" officeooo:rsid="0017c700" officeooo:paragraph-rsid="026ce633"/>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fo:color="#ffffff" loext:opacity="100%" fo:font-size="12pt" officeooo:rsid="0207f6ae" fo:background-color="transparent" loext:char-shading-value="0" style:font-size-asian="12pt" style:font-size-complex="12pt"/>
    </style:style>
    <style:style style:name="T5" style:family="text">
      <style:text-properties fo:color="#ffffff" loext:opacity="100%" style:font-name="Arial" fo:font-size="12pt" officeooo:rsid="0207f6ae" fo:background-color="transparent" loext:char-shading-value="0" style:font-size-asian="12pt" style:font-size-complex="12pt"/>
    </style:style>
    <style:style style:name="T6" style:family="text">
      <style:text-properties fo:background-color="transparent" loext:char-shading-value="0"/>
    </style:style>
    <style:style style:name="T7" style:family="text">
      <style:text-properties fo:color="#ffffff" loext:opacity="100%" fo:font-size="12pt" officeooo:rsid="0207f6ae" style:font-size-asian="12pt" style:font-size-complex="12pt"/>
    </style:style>
    <style:style style:name="T8" style:family="text">
      <style:text-properties fo:color="#ffffff" loext:opacity="100%" officeooo:rsid="0207f6ae"/>
    </style:style>
    <style:style style:name="T9" style:family="text">
      <style:text-properties officeooo:rsid="020908b2"/>
    </style:style>
    <style:style style:name="T10"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11"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 style:family="text">
      <style:text-properties style:text-underline-style="none" fo:font-weight="normal" fo:background-color="transparent" loext:char-shading-value="0"/>
    </style:style>
    <style:style style:name="T13" style:family="text">
      <style:text-properties style:text-underline-style="none" fo:font-weight="normal" officeooo:rsid="020aa978" fo:background-color="transparent" loext:char-shading-value="0"/>
    </style:style>
    <style:style style:name="T14"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5" style:family="text">
      <style:text-properties style:text-underline-style="none" fo:background-color="transparent" loext:char-shading-value="0"/>
    </style:style>
    <style:style style:name="T16"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7"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8"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9"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20" style:family="text">
      <style:text-properties style:text-underline-style="none" fo:font-weight="normal" officeooo:rsid="021593b3" fo:background-color="transparent" loext:char-shading-value="0"/>
    </style:style>
    <style:style style:name="T21" style:family="text">
      <style:text-properties style:text-underline-style="none" fo:font-weight="normal" officeooo:rsid="0213cb13" fo:background-color="transparent" loext:char-shading-value="0"/>
    </style:style>
    <style:style style:name="T22" style:family="text">
      <style:text-properties fo:color="#ffffff" loext:opacity="100%" fo:font-size="12pt" fo:font-weight="normal" officeooo:rsid="0235268e" fo:background-color="transparent" loext:char-shading-value="0" style:font-size-asian="12pt" style:font-size-complex="12pt"/>
    </style:style>
    <style:style style:name="T23" style:family="text">
      <style:text-properties fo:font-weight="normal" fo:background-color="transparent" loext:char-shading-value="0"/>
    </style:style>
    <style:style style:name="T24" style:family="text">
      <style:text-properties officeooo:rsid="0227dcad"/>
    </style:style>
    <style:style style:name="T25" style:family="text">
      <style:text-properties officeooo:rsid="02259ec8"/>
    </style:style>
    <style:style style:name="T26" style:family="text">
      <style:text-properties officeooo:rsid="0226a567"/>
    </style:style>
    <style:style style:name="T27" style:family="text">
      <style:text-properties style:text-underline-style="none" officeooo:rsid="0216a37b"/>
    </style:style>
    <style:style style:name="T28" style:family="text">
      <style:text-properties officeooo:rsid="0216a37b"/>
    </style:style>
    <style:style style:name="T29" style:family="text">
      <style:text-properties officeooo:rsid="0216c522"/>
    </style:style>
    <style:style style:name="T30" style:family="text">
      <style:text-properties fo:color="#ffffff" loext:opacity="100%" style:font-name="Arial1" style:text-underline-style="none" officeooo:rsid="0216c522"/>
    </style:style>
    <style:style style:name="T31" style:family="text">
      <style:text-properties officeooo:rsid="02171d48"/>
    </style:style>
    <style:style style:name="T32" style:family="text">
      <style:text-properties fo:color="#469df9" loext:opacity="100%" style:font-name="Arial" fo:font-size="10pt" officeooo:rsid="02171d48" style:font-size-asian="10pt" style:font-size-complex="10pt"/>
    </style:style>
    <style:style style:name="T33" style:family="text">
      <style:text-properties fo:color="#ffffff" loext:opacity="100%" fo:font-size="12pt" fo:font-weight="normal" officeooo:rsid="020908b2" fo:background-color="transparent" loext:char-shading-value="0" style:font-size-asian="12pt" style:font-size-complex="12pt"/>
    </style:style>
    <style:style style:name="T34" style:family="text">
      <style:text-properties fo:color="#ffffff" loext:opacity="100%" fo:font-size="12pt" fo:font-weight="normal" officeooo:rsid="023aa484" fo:background-color="transparent" loext:char-shading-value="0" style:font-size-asian="12pt" style:font-size-complex="12pt"/>
    </style:style>
    <style:style style:name="T35" style:family="text">
      <style:text-properties fo:font-weight="normal" officeooo:rsid="023c909b" fo:background-color="transparent" loext:char-shading-value="0"/>
    </style:style>
    <style:style style:name="T36" style:family="text">
      <style:text-properties fo:color="#c9211e" loext:opacity="100%" style:font-name="Arial1" fo:font-size="14pt" fo:font-weight="normal" officeooo:rsid="023aa484" style:font-size-asian="14pt" style:font-size-complex="14pt"/>
    </style:style>
    <style:style style:name="T37" style:family="text">
      <style:text-properties fo:color="#ffffff" loext:opacity="100%" fo:font-size="12pt" officeooo:rsid="023c909b" fo:background-color="transparent" loext:char-shading-value="0" style:font-size-asian="12pt" style:font-size-complex="12pt"/>
    </style:style>
    <style:style style:name="T38" style:family="text">
      <style:text-properties fo:color="#c9211e" loext:opacity="100%" style:font-name="Arial1" fo:font-size="14pt" officeooo:rsid="023c909b" style:font-size-asian="14pt" style:font-size-complex="14pt"/>
    </style:style>
    <style:style style:name="T39" style:family="text">
      <style:text-properties fo:color="#ffffff" loext:opacity="100%" fo:font-size="12pt" fo:font-weight="normal" officeooo:rsid="023c909b" fo:background-color="transparent" loext:char-shading-value="0" style:font-size-asian="12pt" style:font-size-complex="12pt"/>
    </style:style>
    <style:style style:name="T40" style:family="text">
      <style:text-properties fo:color="#ffffff" loext:opacity="100%" fo:font-size="12pt" fo:font-weight="normal" officeooo:rsid="023d09dc" fo:background-color="transparent" loext:char-shading-value="0" style:font-size-asian="12pt" style:font-size-complex="12pt"/>
    </style:style>
    <style:style style:name="T41"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42" style:family="text">
      <style:text-properties fo:color="#ffffff" loext:opacity="100%" style:text-line-through-style="none" style:text-line-through-type="none" fo:font-size="12pt" style:text-underline-style="none" fo:font-weight="normal" officeooo:rsid="023c909b" style:text-blinking="false" fo:background-color="transparent" loext:char-shading-value="0" style:font-size-asian="12pt" style:font-size-complex="12pt" loext:padding="0cm" loext:border="none"/>
    </style:style>
    <style:style style:name="T43" style:family="text">
      <style:text-properties style:text-line-through-style="none" style:text-line-through-type="none" style:text-underline-style="none" style:text-blinking="false" fo:background-color="transparent" loext:char-shading-value="0" loext:padding="0cm" loext:border="none"/>
    </style:style>
    <style:style style:name="T44" style:family="text">
      <style:text-properties fo:color="#ffffff" loext:opacity="100%" fo:font-size="12pt" fo:font-weight="normal" officeooo:rsid="023ee483" fo:background-color="transparent" loext:char-shading-value="0" style:font-size-asian="12pt" style:font-size-complex="12pt"/>
    </style:style>
    <style:style style:name="T45" style:family="text">
      <style:text-properties fo:font-weight="normal" officeooo:rsid="0240b662" fo:background-color="transparent" loext:char-shading-value="0"/>
    </style:style>
    <style:style style:name="T46" style:family="text">
      <style:text-properties fo:color="#a1467e" loext:opacity="100%" fo:font-weight="normal" fo:background-color="transparent" loext:char-shading-value="0"/>
    </style:style>
    <style:style style:name="T47" style:family="text">
      <style:text-properties fo:color="#00a933" loext:opacity="100%" fo:font-weight="normal" fo:background-color="transparent" loext:char-shading-value="0"/>
    </style:style>
    <style:style style:name="T48" style:family="text">
      <style:text-properties fo:font-weight="normal" officeooo:rsid="024209b0" fo:background-color="transparent" loext:char-shading-value="0"/>
    </style:style>
    <style:style style:name="T49" style:family="text">
      <style:text-properties fo:color="#ffffff" loext:opacity="100%" fo:font-size="12pt" fo:font-weight="normal" officeooo:rsid="024209b0" fo:background-color="transparent" loext:char-shading-value="0" style:font-size-asian="12pt" style:font-size-complex="12pt"/>
    </style:style>
    <style:style style:name="T50" style:family="text">
      <style:text-properties fo:font-weight="normal" officeooo:rsid="02425b33" fo:background-color="transparent" loext:char-shading-value="0"/>
    </style:style>
    <style:style style:name="T51" style:family="text">
      <style:text-properties fo:color="#ffffff" loext:opacity="100%" style:font-name="Arial" fo:font-size="12pt" fo:font-weight="normal" officeooo:rsid="020908b2" fo:background-color="transparent" loext:char-shading-value="0" style:font-size-asian="12pt" style:font-size-complex="12pt"/>
    </style:style>
    <style:style style:name="T52" style:family="text">
      <style:text-properties fo:color="#ffffff" loext:opacity="100%" fo:font-size="12pt" fo:font-weight="normal" officeooo:rsid="020bd315" fo:background-color="transparent" loext:char-shading-value="0" style:font-size-asian="12pt" style:font-size-complex="12pt"/>
    </style:style>
    <style:style style:name="T53" style:family="text">
      <style:text-properties fo:font-size="12pt" fo:background-color="transparent" loext:char-shading-value="0" style:font-size-asian="12pt" style:font-size-complex="12pt"/>
    </style:style>
    <style:style style:name="T54" style:family="text">
      <style:text-properties fo:color="#ffffff" loext:opacity="100%" fo:font-size="12pt" fo:font-weight="normal" officeooo:rsid="020d2357" fo:background-color="transparent" loext:char-shading-value="0" style:font-size-asian="12pt" style:font-size-complex="12pt"/>
    </style:style>
    <style:style style:name="T55" style:family="text">
      <style:text-properties fo:color="#ffffff" loext:opacity="100%" fo:font-size="14pt" fo:font-weight="normal" officeooo:rsid="020d2357" fo:background-color="transparent" loext:char-shading-value="0" style:font-size-asian="14pt" style:font-size-complex="14pt"/>
    </style:style>
    <style:style style:name="T56" style:family="text">
      <style:text-properties officeooo:rsid="020ebc40" fo:background-color="transparent" loext:char-shading-value="0"/>
    </style:style>
    <style:style style:name="T57" style:family="text">
      <style:text-properties fo:font-weight="normal" officeooo:rsid="020ebc40" fo:background-color="transparent" loext:char-shading-value="0"/>
    </style:style>
    <style:style style:name="T58" style:family="text">
      <style:text-properties fo:color="#ffffff" loext:opacity="100%" fo:font-size="14pt" fo:font-weight="normal" officeooo:rsid="02113cfb" fo:background-color="transparent" loext:char-shading-value="0" style:font-size-asian="14pt" style:font-size-complex="14pt"/>
    </style:style>
    <style:style style:name="T59"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60" style:family="text">
      <style:text-properties style:text-underline-style="none" fo:font-weight="normal" officeooo:rsid="02120630" fo:background-color="transparent" loext:char-shading-value="0"/>
    </style:style>
    <style:style style:name="T61" style:family="text">
      <style:text-properties style:text-underline-style="none" fo:font-weight="normal" officeooo:rsid="021770f8" fo:background-color="transparent" loext:char-shading-value="0"/>
    </style:style>
    <style:style style:name="T6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63" style:family="text">
      <style:text-properties style:text-underline-style="none" fo:font-weight="normal" officeooo:rsid="02171d48" fo:background-color="transparent" loext:char-shading-value="0"/>
    </style:style>
    <style:style style:name="T64" style:family="text">
      <style:text-properties style:text-underline-style="none" fo:font-weight="normal" officeooo:rsid="02191726" fo:background-color="transparent" loext:char-shading-value="0"/>
    </style:style>
    <style:style style:name="T65"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66"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67" style:family="text">
      <style:text-properties fo:color="#ffffff" loext:opacity="100%" fo:font-size="14pt" fo:font-weight="normal" officeooo:rsid="021c3799" style:font-size-asian="14pt" style:font-size-complex="14pt"/>
    </style:style>
    <style:style style:name="T68"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69"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70" style:family="text">
      <style:text-properties style:text-underline-style="none" fo:font-weight="normal" officeooo:rsid="021d5bcc" fo:background-color="transparent" loext:char-shading-value="0"/>
    </style:style>
    <style:style style:name="T71" style:family="text">
      <style:text-properties style:text-underline-style="none" fo:font-weight="normal" officeooo:rsid="021fa2ef" fo:background-color="transparent" loext:char-shading-value="0"/>
    </style:style>
    <style:style style:name="T72"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73" style:family="text">
      <style:text-properties fo:color="#ffffff" loext:opacity="100%" fo:font-size="14pt" fo:font-weight="normal" officeooo:rsid="0257f2af" style:font-size-asian="14pt" style:font-size-complex="14pt"/>
    </style:style>
    <style:style style:name="T74"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75"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76"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77" style:family="text">
      <style:text-properties fo:color="#ffffff" loext:opacity="100%" fo:font-size="14pt" fo:font-weight="normal" officeooo:rsid="025c4710" style:font-size-asian="14pt" style:font-size-complex="14pt"/>
    </style:style>
    <style:style style:name="T78"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79" style:family="text">
      <style:text-properties style:text-underline-style="none" fo:font-weight="normal" officeooo:rsid="025c4710" fo:background-color="transparent" loext:char-shading-value="0"/>
    </style:style>
    <style:style style:name="T80" style:family="text">
      <style:text-properties fo:color="#a7074b" loext:opacity="100%" fo:font-size="14pt" style:text-underline-style="none" fo:font-weight="normal" officeooo:rsid="025e5682" fo:background-color="#ffbf00" loext:char-shading-value="0" style:font-size-asian="14pt" style:font-size-complex="14pt"/>
    </style:style>
    <style:style style:name="T81"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82" style:family="text">
      <style:text-properties style:text-underline-style="none" fo:font-weight="normal" officeooo:rsid="025e5682" fo:background-color="transparent" loext:char-shading-value="0"/>
    </style:style>
    <style:style style:name="T83" style:family="text">
      <style:text-properties fo:color="#ffffff" loext:opacity="100%" fo:font-size="14pt" fo:font-weight="normal" officeooo:rsid="026e980c" fo:background-color="transparent" loext:char-shading-value="0" style:font-size-asian="14pt" style:font-size-complex="14pt"/>
    </style:style>
    <style:style style:name="T84" style:family="text">
      <style:text-properties fo:color="#ffffff" loext:opacity="100%" fo:font-size="14pt" fo:font-weight="normal" officeooo:rsid="026f46d2" fo:background-color="transparent" loext:char-shading-value="0" style:font-size-asian="14pt" style:font-size-complex="14pt"/>
    </style:style>
    <style:style style:name="T85" style:family="text">
      <style:text-properties fo:color="#ffffff" loext:opacity="100%" fo:font-size="14pt" fo:font-weight="normal" officeooo:rsid="026eb8ab" style:font-size-asian="14pt" style:font-size-complex="14pt"/>
    </style:style>
    <style:style style:name="T86" style:family="text">
      <style:text-properties fo:color="#ffffff" loext:opacity="100%" fo:font-size="14pt" fo:font-weight="normal" officeooo:rsid="0234a03a" style:font-size-asian="14pt" style:font-size-complex="14pt"/>
    </style:style>
    <style:style style:name="T87"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88" style:family="text">
      <style:text-properties style:text-underline-style="none" officeooo:rsid="0234a03a" fo:background-color="transparent" loext:char-shading-value="0"/>
    </style:style>
    <style:style style:name="T89" style:family="text">
      <style:text-properties style:text-underline-style="none" fo:font-weight="normal" officeooo:rsid="0234a03a" fo:background-color="transparent" loext:char-shading-value="0"/>
    </style:style>
    <style:style style:name="T90" style:family="text">
      <style:text-properties fo:color="#ffffff" loext:opacity="100%" fo:font-size="14pt" fo:font-weight="normal" officeooo:rsid="022b8b4d" style:font-size-asian="14pt" style:font-size-complex="14pt"/>
    </style:style>
    <style:style style:name="T91"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92"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93" style:family="text">
      <style:text-properties style:text-underline-style="none" fo:font-weight="normal" officeooo:rsid="02300a0c" fo:background-color="transparent" loext:char-shading-value="0"/>
    </style:style>
    <style:style style:name="T94" style:family="text">
      <style:text-properties style:text-underline-style="none" fo:font-weight="normal" officeooo:rsid="02463c3d" fo:background-color="transparent" loext:char-shading-value="0"/>
    </style:style>
    <style:style style:name="T95" style:family="text">
      <style:text-properties fo:color="#ff7b72" loext:opacity="100%" fo:font-family="'Droid Sans Mono', monospace" fo:font-size="10.5pt" style:text-underline-style="none" fo:font-weight="normal" officeooo:rsid="02463c3d" fo:background-color="#121314" loext:char-shading-value="0"/>
    </style:style>
    <style:style style:name="T96" style:family="text">
      <style:text-properties fo:color="#bbbebf" loext:opacity="100%" fo:font-family="'Droid Sans Mono', monospace" fo:font-size="10.5pt" style:text-underline-style="none" fo:font-weight="normal" officeooo:rsid="02463c3d" fo:background-color="#121314" loext:char-shading-value="0"/>
    </style:style>
    <style:style style:name="T97" style:family="text">
      <style:text-properties fo:color="#4ec9b0" loext:opacity="100%" fo:font-family="'Droid Sans Mono', monospace" fo:font-size="10.5pt" style:text-underline-style="none" fo:font-weight="normal" officeooo:rsid="02463c3d" fo:background-color="#121314" loext:char-shading-value="0"/>
    </style:style>
    <style:style style:name="T98" style:family="text">
      <style:text-properties fo:color="#d4d4d4" loext:opacity="100%" fo:font-family="'Droid Sans Mono', monospace" fo:font-size="10.5pt" style:text-underline-style="none" fo:font-weight="normal" officeooo:rsid="02463c3d" fo:background-color="#121314" loext:char-shading-value="0"/>
    </style:style>
    <style:style style:name="T99"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100"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01"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02"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03"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104"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105"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106"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107"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108"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109"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110"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11" style:family="text">
      <style:text-properties style:text-underline-style="none" fo:font-weight="normal" officeooo:rsid="024defaf" fo:background-color="transparent" loext:char-shading-value="0"/>
    </style:style>
    <style:style style:name="T112"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13" style:family="text">
      <style:text-properties style:text-underline-style="none" fo:font-weight="normal" officeooo:rsid="024fdc8c" fo:background-color="transparent" loext:char-shading-value="0"/>
    </style:style>
    <style:style style:name="T114" style:family="text">
      <style:text-properties fo:color="#ffffff" loext:opacity="100%" fo:font-size="14pt" fo:font-weight="normal" officeooo:rsid="024fdc8c" style:font-size-asian="14pt" style:font-size-complex="14pt"/>
    </style:style>
    <style:style style:name="T115"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16" style:family="text">
      <style:text-properties style:text-underline-style="none" fo:font-weight="normal" officeooo:rsid="02483f67" fo:background-color="transparent" loext:char-shading-value="0"/>
    </style:style>
    <style:style style:name="T117" style:family="text">
      <style:text-properties fo:color="#ffffff" loext:opacity="100%" fo:font-size="14pt" fo:font-weight="normal" officeooo:rsid="02212731" fo:background-color="#b47804" loext:char-shading-value="0" style:font-size-asian="14pt" style:font-size-complex="14pt"/>
    </style:style>
    <style:style style:name="T118" style:family="text">
      <style:text-properties fo:color="#ffffff" loext:opacity="100%" fo:font-size="14pt" fo:font-weight="normal" officeooo:rsid="024aceee" fo:background-color="#00a933" loext:char-shading-value="0" style:font-size-asian="14pt" style:font-size-complex="14pt"/>
    </style:style>
    <style:style style:name="T119" style:family="text">
      <style:text-properties fo:color="#ffffff" loext:opacity="100%" fo:font-size="14pt" fo:font-weight="normal" officeooo:rsid="024defaf" fo:background-color="#00a933" loext:char-shading-value="0" style:font-size-asian="14pt" style:font-size-complex="14pt"/>
    </style:style>
    <style:style style:name="T120"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21" style:family="text">
      <style:text-properties style:text-underline-style="none" officeooo:rsid="024c2621" fo:background-color="transparent" loext:char-shading-value="0"/>
    </style:style>
    <style:style style:name="T122"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23" style:family="text">
      <style:text-properties fo:color="#ffffff" loext:opacity="100%" fo:font-size="14pt" fo:font-weight="normal" officeooo:rsid="0254b429" fo:background-color="#00a933" loext:char-shading-value="0" style:font-size-asian="14pt" style:font-size-complex="14pt"/>
    </style:style>
    <style:style style:name="T124"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27" style:family="text">
      <style:text-properties style:text-underline-style="none" fo:font-weight="normal" officeooo:rsid="02530e64" fo:background-color="transparent" loext:char-shading-value="0"/>
    </style:style>
    <style:style style:name="T128" style:family="text">
      <style:text-properties style:text-underline-style="none" fo:font-weight="normal" officeooo:rsid="025162a0" fo:background-color="transparent" loext:char-shading-value="0"/>
    </style:style>
    <style:style style:name="T129" style:family="text">
      <style:text-properties style:text-underline-style="none" officeooo:rsid="02530e64" fo:background-color="transparent" loext:char-shading-value="0"/>
    </style:style>
    <style:style style:name="T130" style:family="text">
      <style:text-properties fo:color="#ffffff" loext:opacity="100%" fo:font-size="14pt" style:text-underline-style="none" fo:font-weight="normal" officeooo:rsid="024defaf" fo:background-color="#00a933" loext:char-shading-value="0" style:font-size-asian="14pt" style:font-size-complex="14pt"/>
    </style:style>
    <style:style style:name="T131"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33"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34" style:family="text">
      <style:text-properties fo:color="#ffffff" loext:opacity="100%" fo:font-weight="normal" officeooo:rsid="02212731"/>
    </style:style>
    <style:style style:name="T135" style:family="text">
      <style:text-properties fo:color="#ffffff" loext:opacity="100%" fo:font-size="14pt" fo:font-weight="normal" officeooo:rsid="022317e8" fo:background-color="#b47804" loext:char-shading-value="0" style:font-size-asian="14pt" style:font-size-complex="14pt"/>
    </style:style>
    <style:style style:name="T136" style:family="text">
      <style:text-properties style:text-underline-style="none" officeooo:rsid="023943ac" fo:background-color="transparent" loext:char-shading-value="0"/>
    </style:style>
    <style:style style:name="T137"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38" style:family="text">
      <style:text-properties style:text-underline-style="none" officeooo:rsid="0236e83a" fo:background-color="transparent" loext:char-shading-value="0"/>
    </style:style>
    <style:style style:name="T139" style:family="text">
      <style:text-properties style:text-underline-style="none" fo:font-weight="normal" officeooo:rsid="0236e83a" fo:background-color="transparent" loext:char-shading-value="0"/>
    </style:style>
    <style:style style:name="T140" style:family="text">
      <style:text-properties style:text-underline-style="none" fo:font-weight="normal" officeooo:rsid="023943ac" fo:background-color="transparent" loext:char-shading-value="0"/>
    </style:style>
    <style:style style:name="T141" style:family="text">
      <style:text-properties fo:color="#ffffff" loext:opacity="100%" fo:font-size="14pt" fo:font-weight="normal" officeooo:rsid="0227dcad" fo:background-color="#069a2e" loext:char-shading-value="0" style:font-size-asian="14pt" style:font-size-complex="14pt"/>
    </style:style>
    <style:style style:name="T142"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28c36d" fo:background-color="#069a2e" loext:char-shading-value="0" style:font-size-asian="14pt" style:font-size-complex="14pt"/>
    </style:style>
    <style:style style:name="T144" style:family="text">
      <style:text-properties style:text-underline-style="none" fo:font-weight="normal" officeooo:rsid="0229133e" fo:background-color="transparent" loext:char-shading-value="0"/>
    </style:style>
    <style:style style:name="T145"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49" style:family="text">
      <style:text-properties fo:color="#ff0000" loext:opacity="100%" fo:font-size="14pt" fo:font-weight="normal" officeooo:rsid="0243785a" fo:background-color="#ffff00" loext:char-shading-value="0" style:font-size-asian="14pt" style:font-size-complex="14pt"/>
    </style:style>
    <style:style style:name="T150"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151" style:family="text">
      <style:text-properties style:text-underline-style="none" fo:font-weight="normal" officeooo:rsid="0243785a" fo:background-color="transparent" loext:char-shading-value="0"/>
    </style:style>
    <style:style style:name="T152"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153" style:family="text">
      <style:text-properties style:text-underline-style="none" officeooo:rsid="0244af53" fo:background-color="transparent" loext:char-shading-value="0"/>
    </style:style>
    <style:style style:name="T154"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155"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156" style:family="text">
      <style:text-properties style:text-underline-style="none" fo:font-weight="normal" fo:background-color="transparent" loext:char-shading-value="0" style:font-weight-asian="bold" style:font-weight-complex="bold"/>
    </style:style>
    <style:style style:name="T157"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158" style:family="text">
      <style:text-properties style:text-underline-style="none" fo:font-weight="normal" officeooo:rsid="0262cfc4" fo:background-color="transparent" loext:char-shading-value="0" style:font-weight-asian="bold" style:font-weight-complex="bold"/>
    </style:style>
    <style:style style:name="T159"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160"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161" style:family="text">
      <style:text-properties style:text-underline-style="none" fo:font-weight="normal" officeooo:rsid="0263ef18" fo:background-color="transparent" loext:char-shading-value="0" style:font-weight-asian="bold" style:font-weight-complex="bold"/>
    </style:style>
    <style:style style:name="T162"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163" style:family="text">
      <style:text-properties style:text-underline-style="none" fo:font-weight="normal" officeooo:rsid="02655e58" fo:background-color="transparent" loext:char-shading-value="0"/>
    </style:style>
    <style:style style:name="T164" style:family="text">
      <style:text-properties style:text-underline-style="none" officeooo:rsid="02655e58" fo:background-color="transparent" loext:char-shading-value="0"/>
    </style:style>
    <style:style style:name="T165" style:family="text">
      <style:text-properties style:text-underline-style="none" fo:font-weight="normal" officeooo:rsid="025c4710" fo:background-color="transparent" loext:char-shading-value="0" style:font-weight-asian="bold" style:font-weight-complex="bold"/>
    </style:style>
    <style:style style:name="T166" style:family="text">
      <style:text-properties style:text-underline-style="none" fo:font-weight="normal" officeooo:rsid="0267ea92" fo:background-color="transparent" loext:char-shading-value="0" style:font-weight-asian="bold" style:font-weight-complex="bold"/>
    </style:style>
    <style:style style:name="T167" style:family="text">
      <style:text-properties style:text-underline-style="none" fo:font-weight="normal" officeooo:rsid="0269a241" fo:background-color="transparent" loext:char-shading-value="0" style:font-weight-asian="bold" style:font-weight-complex="bold"/>
    </style:style>
    <style:style style:name="T168"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69"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170" style:family="text">
      <style:text-properties style:text-underline-style="none" fo:font-weight="normal" officeooo:rsid="026b6d9d" fo:background-color="transparent" loext:char-shading-value="0" style:font-weight-asian="bold" style:font-weight-complex="bold"/>
    </style:style>
    <style:style style:name="T171"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172"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173" style:family="text">
      <style:text-properties style:text-underline-style="none" fo:font-weight="normal" officeooo:rsid="026ce633" fo:background-color="transparent"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p text:style-name="P2"/>
      <text:h text:style-name="Heading_20_3" text:outline-level="3"><text:span text:style-name="T2">DECLARACI</text:span><text:span text:style-name="T3">Ó</text:span><text:span text:style-name="T2">N DE VARIABLES</text:span></text:h>
      <text:p text:style-name="P3"><text:span text:style-name="_2f__2f_C"><text:span text:style-name="T4">La declaraci</text:span></text:span><text:span text:style-name="_2f__2f_C"><text:span text:style-name="T5">ón</text:span></text:span><text:span text:style-name="_2f__2f_C"><text:span text:style-name="T4"> de la variable es inversa a c:</text:span></text:span></text:p>
      <text:p text:style-name="P3"><text:span text:style-name="_3c_C_2b__2b__3e_"><text:span text:style-name="T6">Nombre_de_variable: tipo</text:span></text:span></text:p>
      <text:p text:style-name="P3"><text:span text:style-name="_3c_C_3e_">var1: f32</text:span></text:p>
      <text:p text:style-name="P3"><text:span text:style-name="_3c_C_3e_">var2: f64</text:span></text:p>
      <text:p text:style-name="P3"><text:span text:style-name="_3c_C_2b__2b__3e_"><text:span text:style-name="T7">Los tipos en comparativa:</text:span></text:span></text:p>
      <text:p text:style-name="P3"><text:span text:style-name="_3c_C_2b__2b__3e_"><text:span text:style-name="T8"/></text:span></text:p>
      <text:p text:style-name="P3"><text:span text:style-name="_3c_C_2b__2b__3e_"><text:span text:style-name="T1">int<text:tab/><text:tab/><text:tab/>-&gt; i32</text:span></text:span><text:span text:style-name="_3c_C_2b__2b__3e_"><text:span text:style-name="T9"><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9"><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9"><text:tab/><text:tab/><text:tab/><text:tab/><text:tab/>char*<text:tab/><text:tab/><text:tab/>-&gt; &amp;str</text:span></text:span></text:p>
      <text:p text:style-name="P3"><text:span text:style-name="_3c_C_2b__2b__3e_"><text:span text:style-name="T1">double<text:tab/>-&gt; f64</text:span></text:span><text:span text:style-name="_3c_C_2b__2b__3e_"><text:span text:style-name="T9"><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10">Para asignar un valor a una variable seria:</text:span></text:span><text:span text:style-name="_2f__2f_C"><text:span text:style-name="T11"><text:line-break/><text:line-break/></text:span></text:span><text:span text:style-name="_3c_C_3e_"><text:span text:style-name="T12">let a = 32;</text:span></text:span><text:span text:style-name="_3c_C_3e_"><text:span text:style-name="T13"> </text:span></text:span><text:span text:style-name="_2f__2f_C"><text:span text:style-name="T13">//no habría una declaracion previa tipo a: i32, y Rust deduce lo que es.\</text:span></text:span></text:p>
      <text:p text:style-name="P5"><text:span text:style-name="_3c_C_3e_"><text:span text:style-name="T12">let a = 32 as f32</text:span></text:span><text:span text:style-name="_2f__2f_C"><text:span text:style-name="T13"> //le indicamos que es un float</text:span></text:span></text:p>
      <text:p text:style-name="P5"><text:span text:style-name="_2f__2f_C"><text:span text:style-name="T14">o</text:span></text:span></text:p>
      <text:p text:style-name="P5"><text:span text:style-name="_3c_C_3e_"><text:span text:style-name="T12">let a: i32 = 42;</text:span></text:span></text:p>
      <text:p text:style-name="P5"><text:span text:style-name="_3c_C_3e_"><text:span text:style-name="T12"/></text:span></text:p>
      <text:p text:style-name="P6"><text:span text:style-name="_3c_C_2b__2b__3e_"><text:span text:style-name="T15">LET</text:span></text:span><text:span text:style-name="_2f__2f_C"><text:span text:style-name="T16"> es para hacer que no pueda variar</text:span></text:span><text:span text:style-name="_2f__2f_C"><text:span text:style-name="T17"> (NO PUEDE SER GLOBAL).</text:span></text:span><text:span text:style-name="_2f__2f_C"><text:span text:style-name="T18"> </text:span></text:span><text:span text:style-name="_3c_C_2b__2b__3e_"><text:span text:style-name="T15">LET</text:span></text:span><text:span text:style-name="_2f__2f_C"><text:span text:style-name="T17"> </text:span></text:span><text:span text:style-name="_3c_C_2b__2b__3e_"><text:span text:style-name="T15">MUT</text:span></text:span><text:span text:style-name="_2f__2f_C"><text:span text:style-name="T16"> para que varie</text:span></text:span><text:span text:style-name="_2f__2f_C"><text:span text:style-name="T17"> (Hay que poner </text:span></text:span><text:span text:style-name="_3c_C_2b__2b__3e_"><text:span text:style-name="T15">let</text:span></text:span><text:span text:style-name="_2f__2f_C"><text:span text:style-name="T17"> delante)</text:span></text:span><text:span text:style-name="_2f__2f_C"><text:span text:style-name="T16">, y </text:span></text:span><text:span text:style-name="_3c_C_2b__2b__3e_"><text:span text:style-name="T15">CONST</text:span></text:span><text:span text:style-name="_2f__2f_C"><text:span text:style-name="T16"> para constante</text:span></text:span><text:span text:style-name="_2f__2f_C"><text:span text:style-name="T17"> (si puede ser global)</text:span></text:span></text:p>
      <text:p text:style-name="P7"><text:span text:style-name="_2f__2f_C"><text:span text:style-name="T19"/></text:span></text:p>
      <text:p text:style-name="P7"><text:span text:style-name="_3c_C_2b__2b__3e_"><text:span text:style-name="T15">let mut</text:span></text:span><text:span text:style-name="_3c_C_3e_"><text:span text:style-name="T12"> i = 0; </text:span></text:span><text:span text:style-name="_2f__2f_C"><text:span text:style-name="T12">//tipico para hacer while ya que la i variará. No global</text:span></text:span><text:span text:style-name="_2f__2f_C"><text:span text:style-name="T20">. En runtime</text:span></text:span></text:p>
      <text:p text:style-name="P7"><text:span text:style-name="_3c_C_2b__2b__3e_"><text:span text:style-name="T15">const i: i32</text:span></text:span><text:span text:style-name="_3c_C_3e_"><text:span text:style-name="T12"> = 0; </text:span></text:span><text:span text:style-name="_2f__2f_C"><text:span text:style-name="T12">//no puede mutar NUNCA en compilacion y puede ser global</text:span></text:span><text:span text:style-name="_2f__2f_C"><text:span text:style-name="T21">. Necesita ser declarado el tipo.</text:span></text:span><text:span text:style-name="_2f__2f_C"><text:span text:style-name="T20"> y se crea en tiempo de compilación</text:span></text:span></text:p>
      <text:p text:style-name="P8"><text:span text:style-name="_2f__2f_C"><text:span text:style-name="T22">Si a una variable le ponemos '_’ delante, esta variable aunque no se use, el compilador no se quejará de ella:</text:span></text:span></text:p>
      <text:p text:style-name="P8"><text:span text:style-name="_3c_C_3e_"><text:span text:style-name="T23">let </text:span></text:span><text:span text:style-name="_3c_C_2b__2b__3e_"><text:span text:style-name="T6">_</text:span></text:span><text:span text:style-name="_3c_C_3e_"><text:span text:style-name="T23">num: f32 = 0.4; </text:span></text:span><text:span text:style-name="_2f__2f_C"><text:span text:style-name="T23">//aunque no la use el compilador no lanzara un warning</text:span></text:span></text:p>
      <text:h text:style-name="P9" text:outline-level="3"><text:soft-page-break/></text:h>
      <text:p text:style-name="P10"/>
      <text:h text:style-name="P11" text:outline-level="3">MATRICES</text:h>
      <text:p text:style-name="P12">Podemos usar matrices como en C:<text:line-break/></text:p>
      <text:p text:style-name="P12"><text:span text:style-name="_3c_C_2b__2b__3e_">let x: </text:span><text:span text:style-name="_3c_C_2b__2b__3e_"><text:span text:style-name="T24">[i32; 3]</text:span></text:span><text:span text:style-name="_3c_C_2b__2b__3e_"> = [1, 2 , 3];</text:span></text:p>
      <text:p text:style-name="P13"><text:span text:style-name="_2f__2f_C"><text:span text:style-name="T24">//let x = [1, 2, 3]; puede ser asi tambien y el deduciria el tipo.</text:span></text:span></text:p>
      <text:p text:style-name="P12"><text:span text:style-name="_3c_C_3e_">println!("{}", x[1]); </text:span><text:span text:style-name="_2f__2f_C">//imprimiría 2, pero es arriesgado</text:span></text:p>
      <text:p text:style-name="P12"><text:span text:style-name="_3c_C_3e_"><text:span text:style-name="T25">println!("{}", x[7]);</text:span></text:span><text:span text:style-name="_2f__2f_C"> //Entraría en modo "panic" que saldría de forma segura. No soltaria basura</text:span></text:p>
      <text:p text:style-name="P12"><text:span text:style-name="_2f__2f_C"/></text:p>
      <text:p text:style-name="P14">Para hacerlo de forma segura se puede usar </text:p>
      <text:p text:style-name="P14"><text:span text:style-name="_3c_C_2b__2b__3e_">x.get(1)</text:span><text:span text:style-name="_3c_C_3e_">; </text:span><text:span text:style-name="_2f__2f_C">//devolveria "Some(2)" en mayusculas la S</text:span></text:p>
      <text:p text:style-name="P14"><text:span text:style-name="_3c_C_3e_">x.get(7);</text:span><text:span text:style-name="_2f__2f_C"> //devolveria "None" en mayusculas la N</text:span></text:p>
      <text:p text:style-name="P14">Por lo tanto para usarlo por que un x.get(1) devolveria en pantalla un some(2) con un println! tenemos que hacer:<text:line-break/><text:line-break/><text:span text:style-name="_3c_C_2b__2b__3e_">if let Some(</text:span><text:span text:style-name="_3c_C_2b__2b__3e_"><text:span text:style-name="T26">i</text:span></text:span><text:span text:style-name="_3c_C_2b__2b__3e_">) = x.get(1) </text:span><text:span text:style-name="_3c_C_3e_">{</text:span></text:p>
      <text:p text:style-name="P14"><text:span text:style-name="_3c_C_3e_"><text:tab/>println!("{}", </text:span><text:span text:style-name="_3c_C_3e_"><text:span text:style-name="T26">i</text:span></text:span><text:span text:style-name="_3c_C_3e_"><text:span text:style-name="T24">)</text:span></text:span><text:span text:style-name="_3c_C_3e_">;</text:span></text:p>
      <text:p text:style-name="P14"><text:span text:style-name="_3c_C_3e_">}</text:span><text:span text:style-name="_3c_C_3e_"><text:span text:style-name="T24"> </text:span></text:span><text:span text:style-name="_3c_C_3e_">else {</text:span></text:p>
      <text:p text:style-name="P14"><text:span text:style-name="_3c_C_3e_"><text:tab/>println!("no existe");</text:span></text:p>
      <text:p text:style-name="P14"><text:span text:style-name="_3c_C_3e_">}</text:span></text:p>
      <text:p text:style-name="P14">O en formáto Rust:</text:p>
      <text:p text:style-name="P14"/>
      <text:p text:style-name="P15"><text:span text:style-name="_3c_C_2b__2b__3e_">match x.get(2) {</text:span></text:p>
      <text:p text:style-name="P15"><text:span text:style-name="_3c_C_2b__2b__3e_"><text:tab/>Some(i) =&gt; println!("{}", i),</text:span></text:p>
      <text:p text:style-name="P15"><text:span text:style-name="_3c_C_2b__2b__3e_"><text:tab/>None<text:tab/>=&gt;<text:tab/> println!("No existe"),</text:span></text:p>
      <text:p text:style-name="P15"><text:span text:style-name="_3c_C_2b__2b__3e_">}</text:span></text:p>
      <text:p text:style-name="P10"/>
      <text:h text:style-name="P16" text:outline-level="3">VARIABLES GLOBALES</text:h>
      <text:p text:style-name="P17">El tener una variable global en Rust es <text:s/>un problema, ya que puede haber dataraces para modificarla asi que tiene que estar protegida.. si no no deja. </text:p>
      <text:p text:style-name="P17">La forma clásica es:<text:line-break/></text:p>
      <text:p text:style-name="P18"><text:span text:style-name="_3c_C_2b__2b__3e_"><text:span text:style-name="T2">static mut </text:span></text:span><text:span text:style-name="_3c_C_3e_"><text:span text:style-name="T2">A: i32 = 0;</text:span></text:span><text:span text:style-name="_3c_C_3e_"><text:span text:style-name="T27"> </text:span></text:span><text:span text:style-name="_2f__2f_C"><text:span text:style-name="T2">//variable global</text:span></text:span></text:p>
      <text:p text:style-name="P18"><text:span text:style-name="_3c_C_3e_"><text:span text:style-name="T28">fn main(){</text:span></text:span></text:p>
      <text:p text:style-name="P18"><text:span text:style-name="_3c_C_3e_"><text:span text:style-name="T28"><text:tab/>if true{</text:span></text:span></text:p>
      <text:p text:style-name="P18"><text:soft-page-break/><text:span text:style-name="_3c_C_3e_"><text:span text:style-name="T28"><text:tab/><text:tab/></text:span></text:span><text:span text:style-name="_3c_C_2b__2b__3e_">unsafe{</text:span><text:span text:style-name="_3c_C_3e_"><text:span text:style-name="T28"> A = 10;</text:span></text:span><text:span text:style-name="_3c_C_2b__2b__3e_">}</text:span><text:span text:style-name="_3c_C_2b__2b__3e_"><text:span text:style-name="T28"> </text:span></text:span><text:span text:style-name="_2f__2f_C">//no se recomienda pero permitido</text:span><text:span text:style-name="_2f__2f_C"><text:span text:style-name="T29">. unsafe le dice el compilador que confie en el programador. </text:span></text:span></text:p>
      <text:p text:style-name="P18"><text:span text:style-name="_3c_C_3e_"><text:span text:style-name="T28"><text:tab/>}</text:span></text:span></text:p>
      <text:p text:style-name="P18"><text:span text:style-name="_3c_C_3e_"><text:span text:style-name="T28">}</text:span></text:span></text:p>
      <text:p text:style-name="P18"><text:span text:style-name="_3c_C_3e_"/></text:p>
      <text:p text:style-name="P19"><text:span text:style-name="_3c_C_2b__2b__3e_"><text:span text:style-name="T2">Unsafe</text:span></text:span><text:span text:style-name="_3c_C_3e_"><text:span text:style-name="T30"> es un peligro.. asi que usamos </text:span></text:span><text:span text:style-name="_3c_C_2b__2b__3e_"><text:span text:style-name="T2">atomic</text:span></text:span><text:span text:style-name="_3c_C_3e_"><text:span text:style-name="T30"> para no provocar dataraces:<text:line-break/></text:span></text:span></text:p>
      <text:p text:style-name="P19"><text:span text:style-name="_3c_C_2b__2b__3e_">use std::sync::atomic::{AtomicI32, ordering}</text:span></text:p>
      <text:p text:style-name="P19"><text:span text:style-name="_3c_C_3e_"><text:span text:style-name="T29">static A: </text:span></text:span><text:span text:style-name="_3c_C_2b__2b__3e_">AtomicI32</text:span><text:span text:style-name="_3c_C_3e_"><text:span text:style-name="T29"> = AtomicI32::new(0); </text:span></text:span><text:span text:style-name="_2f__2f_C"><text:span text:style-name="T29">//no hace reserva de memoria. Solo inicializa a cero</text:span></text:span></text:p>
      <text:p text:style-name="P20"><text:span text:style-name="_3c_C_3e_">fn main() {<text:line-break/></text:span><text:span text:style-name="_3c_C_3e_"><text:span text:style-name="T29"><text:tab/></text:span></text:span><text:span text:style-name="_3c_C_3e_">if true {<text:line-break/></text:span><text:span text:style-name="_3c_C_3e_"><text:span text:style-name="T29"><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31"> </text:span></text:span><text:span text:style-name="_2f__2f_C"><text:span text:style-name="T31">//Relaxed es el nivel más débil del ordenamiento at</text:span></text:span><text:span text:style-name="_2f__2f_C"><text:span text:style-name="T32">ó</text:span></text:span><text:span text:style-name="_2f__2f_C"><text:span text:style-name="T31">mico. solo </text:span></text:span></text:p>
      <text:p text:style-name="P20"><text:span text:style-name="_2f__2f_C"><text:span text:style-name="T31">me importa modificar el valor, no el orden del tiempo en que se haga.</text:span></text:span><text:span text:style-name="_3c_C_3e_"><text:line-break/> }<text:line-break/>}</text:span></text:p>
      <text:h text:style-name="P21" text:outline-level="3"/>
      <text:h text:style-name="P22" text:outline-level="3">PANIC!()</text:h>
      <text:p text:style-name="P23"><text:span text:style-name="_2f__2f_C"><text:span text:style-name="T33">R</text:span></text:span><text:span text:style-name="_2f__2f_C"><text:span text:style-name="T34">ust cuando encuentra un proceso que no puede solventar (por ejemplo dividir por cero) entra en </text:span></text:span><text:span text:style-name="_3c_C_2b__2b__3e_"><text:span text:style-name="T6">Panic</text:span></text:span><text:span text:style-name="_2f__2f_C"><text:span text:style-name="T34"> liberando toda la memoria y saliendo limpiamente. Para forzarlo se usa esto:</text:span></text:span></text:p>
      <text:p text:style-name="P23"><text:span text:style-name="_3c_C_3e_"><text:span text:style-name="T23">fn set_title(&amp;mut self, title: String){ </text:span></text:span><text:span text:style-name="_2f__2f_C"><text:span text:style-name="T23">//</text:span></text:span><text:span text:style-name="_2f__2f_C"><text:span text:style-name="T35">esto es un setter de una estructura por eso lleva el self</text:span></text:span></text:p>
      <text:p text:style-name="P23"><text:span text:style-name="_3c_C_3e_"><text:span text:style-name="T23"><text:tab/>if title.is_empty(){</text:span></text:span><text:span text:style-name="_3c_C_2b__2b__3e_"><text:span text:style-name="T6">panic!(“El título no puede ser vacio”);</text:span></text:span><text:span text:style-name="_3c_C_3e_"><text:span text:style-name="T23">} </text:span></text:span><text:span text:style-name="_2f__2f_C"><text:span text:style-name="T23">//</text:span></text:span><text:span text:style-name="_2f__2f_C"><text:span text:style-name="T35">panic hará salirse el programa</text:span></text:span></text:p>
      <text:p text:style-name="P23"><text:span text:style-name="_3c_C_3e_"><text:span text:style-name="T23"><text:tab/>if title.len() &gt; 50 {</text:span></text:span><text:span text:style-name="_3c_C_2b__2b__3e_"><text:span text:style-name="T6">panic!(</text:span></text:span><text:span text:style-name="_3c_C_3e_"><text:span text:style-name="T23">“El título es más largo de 50 bits”</text:span></text:span><text:span text:style-name="_3c_C_2b__2b__3e_"><text:span text:style-name="T6">)</text:span></text:span><text:span text:style-name="_3c_C_3e_"><text:span text:style-name="T23">;}</text:span></text:span></text:p>
      <text:p text:style-name="P23"><text:span text:style-name="_3c_C_3e_"><text:span text:style-name="T23"><text:tab/>self.title = title</text:span></text:span></text:p>
      <text:p text:style-name="P23"><text:span text:style-name="_3c_C_3e_"><text:span text:style-name="T23">}</text:span></text:span></text:p>
      <text:h text:style-name="P24" text:outline-level="3"><text:span text:style-name="_3c_C_3e_"><text:span text:style-name="T36">ExitCode</text:span></text:span></text:h>
      <text:p text:style-name="P25"><text:span text:style-name="_2f__2f_C"><text:span text:style-name="T37">Como en C, podemos retornar un valor de restorno 1 o 0 del programa. Para ello usamos el ExitCode de esta manera:</text:span></text:span></text:p>
      <text:p text:style-name="P25"><text:span text:style-name="_3c_C_2b__2b__3e_"><text:span text:style-name="T6">use std::process::ExitCode;</text:span></text:span></text:p>
      <text:p text:style-name="P25"><text:span text:style-name="_3c_C_3e_"><text:span text:style-name="T6">fn main() -</text:span></text:span><text:span text:style-name="_3c_C_2b__2b__3e_"><text:span text:style-name="T6"> &gt; ExitCode</text:span></text:span><text:span text:style-name="_3c_C_3e_"><text:span text:style-name="T6">{</text:span></text:span></text:p>
      <text:p text:style-name="P25"><text:span text:style-name="_3c_C_3e_"><text:span text:style-name="T6"><text:tab/>…</text:span></text:span></text:p>
      <text:p text:style-name="P25"><text:span text:style-name="_3c_C_3e_"><text:span text:style-name="T6"><text:tab/></text:span></text:span><text:span text:style-name="_3c_C_2b__2b__3e_"><text:span text:style-name="T6">ExitCode::from(0)</text:span></text:span></text:p>
      <text:p text:style-name="P25"><text:span text:style-name="_3c_C_3e_"><text:span text:style-name="T6">}</text:span></text:span></text:p>
      <text:p text:style-name="P25"><text:span text:style-name="_3c_C_3e_"><text:span text:style-name="T6"/></text:span></text:p>
      <text:h text:style-name="P24" text:outline-level="3"><text:soft-page-break/><text:span text:style-name="_3c_C_3e_"><text:span text:style-name="T38">Result()</text:span></text:span></text:h>
      <text:p text:style-name="P25"><text:span text:style-name="_2f__2f_C"><text:span text:style-name="T33">R</text:span></text:span><text:span text:style-name="_2f__2f_C"><text:span text:style-name="T34">ust </text:span></text:span><text:span text:style-name="_2f__2f_C"><text:span text:style-name="T39">la forma de devolver valores es muchas veces un Result(), que es una pareja donde el primero es un Ok</text:span></text:span><text:span text:style-name="_2f__2f_C"><text:span text:style-name="T40">(valor)</text:span></text:span><text:span text:style-name="_2f__2f_C"><text:span text:style-name="T39">, y el segundo un Err</text:span></text:span><text:span text:style-name="_2f__2f_C"><text:span text:style-name="T40">(error)</text:span></text:span><text:span text:style-name="_2f__2f_C"><text:span text:style-name="T39">. </text:span></text:span><text:span text:style-name="_2f__2f_C"><text:span text:style-name="T40">Es como un interruptor de dos posiciones</text:span></text:span></text:p>
      <text:p text:style-name="P26"><text:span text:style-name="_2f__2f_C"><text:span text:style-name="T41">// Devuelve un Ok con el resultado (f32) O un Err con un texto (&amp;'static str)</text:span></text:span><text:span text:style-name="T42"/></text:p>
      <text:p text:style-name="P26"><text:span text:style-name="_3c_C_3e_"><text:span text:style-name="T41">fn dividir(dividendo: f32, divisor: f32) -&gt; </text:span></text:span><text:span text:style-name="_3c_C_2b__2b__3e_"><text:span text:style-name="T43">Result&lt;f32, &amp;'static str&gt;</text:span></text:span><text:span text:style-name="_3c_C_3e_"><text:span text:style-name="T41"> {</text:span></text:span></text:p>
      <text:p text:style-name="P26"><text:span text:style-name="_3c_C_3e_"><text:span text:style-name="T41">if divisor == 0.0 {</text:span></text:span></text:p>
      <text:p text:style-name="P26"><text:span text:style-name="_3c_C_3e_"><text:span text:style-name="T41"><text:tab/></text:span></text:span><text:span text:style-name="_3c_C_2b__2b__3e_"><text:span text:style-name="T43">return Err(</text:span></text:span><text:span text:style-name="_3c_C_3e_"><text:span text:style-name="T41">"¡No se puede dividir entre cero!"); </text:span></text:span><text:span text:style-name="_2f__2f_C"><text:span text:style-name="T41">// Pasó algo malo</text:span></text:span></text:p>
      <text:p text:style-name="P26"><text:span text:style-name="_3c_C_3e_"><text:span text:style-name="T41">}</text:span></text:span></text:p>
      <text:p text:style-name="P26"><text:span text:style-name="_3c_C_2b__2b__3e_"><text:span text:style-name="T43">Ok(dividendo / divisor)</text:span></text:span><text:span text:style-name="_3c_C_3e_"><text:span text:style-name="T41"> // Todo salió bien }</text:span></text:span></text:p>
      <text:p text:style-name="P26"><text:span text:style-name="_3c_C_3e_"><text:span text:style-name="T41">fn main() {</text:span></text:span></text:p>
      <text:p text:style-name="P26"><text:span text:style-name="_3c_C_3e_"><text:span text:style-name="T41"><text:tab/>// Cómo usar el resultado con un 'match' limpio</text:span></text:span></text:p>
      <text:p text:style-name="P26"><text:span text:style-name="_3c_C_3e_"><text:span text:style-name="T41"><text:tab/></text:span></text:span><text:span text:style-name="_3c_C_2b__2b__3e_"><text:span text:style-name="T43">match</text:span></text:span><text:span text:style-name="_3c_C_3e_"><text:span text:style-name="T41"> dividir(10.0, 2.0) {</text:span></text:span></text:p>
      <text:p text:style-name="P26"><text:span text:style-name="_3c_C_3e_"><text:span text:style-name="T41"><text:tab/><text:tab/></text:span></text:span><text:span text:style-name="_3c_C_2b__2b__3e_"><text:span text:style-name="T43">Ok(resultado) =&gt;</text:span></text:span><text:span text:style-name="_3c_C_3e_"><text:span text:style-name="T41"> println!("El resultado es: {}", resultado),</text:span></text:span></text:p>
      <text:p text:style-name="P26"><text:span text:style-name="_3c_C_3e_"><text:span text:style-name="T41"><text:tab/><text:tab/></text:span></text:span><text:span text:style-name="_3c_C_2b__2b__3e_"><text:span text:style-name="T43">Err(mensaje) =&gt;</text:span></text:span><text:span text:style-name="_3c_C_3e_"><text:span text:style-name="T41"> println!("Error: {}", mensaje),</text:span></text:span></text:p>
      <text:p text:style-name="P26"><text:span text:style-name="_3c_C_3e_"><text:span text:style-name="T41"><text:tab/>} </text:span></text:span></text:p>
      <text:p text:style-name="P27"><text:span text:style-name="_3c_C_3e_"><text:span text:style-name="T41">}</text:span></text:span></text:p>
      <text:p text:style-name="P27"><text:span text:style-name="_2f__2f_C"><text:span text:style-name="T44">Vamos a verlo con una forma más compleja. Abriendo un archivo que puede dar errores:</text:span></text:span></text:p>
      <text:p text:style-name="P27"><text:span text:style-name="_3c_C_3e_"><text:span text:style-name="T23">fn process_file(str: &amp;str) - &gt; </text:span></text:span><text:span text:style-name="_3c_C_2b__2b__3e_"><text:span text:style-name="T6">Result &lt;(), &amp;’static str&gt;</text:span></text:span><text:span text:style-name="_3c_C_3e_"><text:span text:style-name="T23">{ </text:span></text:span><text:span text:style-name="_2f__2f_C"><text:span text:style-name="T23">//() no nos interesa el tipo devuelto. </text:span></text:span><text:span text:style-name="_2f__2f_C"><text:span text:style-name="T45">U</text:span></text:span><text:span text:style-name="_2f__2f_C"><text:span text:style-name="T23">n void.</text:span></text:span><text:span text:style-name="_3c_C_3e_"><text:span text:style-name="T23"><text:line-break/><text:tab/>If let Ok(input_file) = </text:span></text:span><text:a xlink:type="simple" xlink:href="../../../../../:open(str" text:style-name="Internet_20_link" text:visited-style-name="Visited_20_Internet_20_Link"><text:span text:style-name="_3c_C_3e_"><text:span text:style-name="T46">File::open(str</text:span></text:span></text:a><text:span text:style-name="_3c_C_3e_"><text:span text:style-name="T47">)</text:span></text:span><text:span text:style-name="_3c_C_3e_"><text:span text:style-name="T23">{</text:span></text:span><text:span text:style-name="_2f__2f_C"><text:span text:style-name="T45">//tras el open es un Result&lt;File, std::io:.error&gt;</text:span></text:span></text:p>
      <text:p text:style-name="P28"><text:span text:style-name="_3c_C_3e_"><text:span text:style-name="T45"><text:tab/><text:tab/>let _reader = BufReader::new(input_file);</text:span></text:span></text:p>
      <text:p text:style-name="P28"><text:span text:style-name="_3c_C_3e_"><text:span text:style-name="T45"><text:tab/><text:tab/>for line in _reader.lines(){</text:span></text:span></text:p>
      <text:p text:style-name="P29"><text:span text:style-name="_3c_C_3e_"><text:span text:style-name="T45"><text:tab/><text:tab/><text:tab/></text:span></text:span><text:span text:style-name="_3c_C_2b__2b__3e_"><text:span text:style-name="T6">let line = match line{</text:span></text:span></text:p>
      <text:p text:style-name="P29"><text:span text:style-name="_3c_C_2b__2b__3e_"><text:span text:style-name="T6"><text:tab/><text:tab/><text:tab/><text:tab/>Ok(value) =&gt; value,</text:span></text:span></text:p>
      <text:p text:style-name="P29"><text:span text:style-name="_3c_C_2b__2b__3e_"><text:span text:style-name="T6"><text:tab/><text:tab/><text:tab/><text:tab/>Err(e) =&gt; return Err(“Error: Error leyendo el archivo\n”),</text:span></text:span></text:p>
      <text:p text:style-name="P29"><text:span text:style-name="_3c_C_3e_"><text:span text:style-name="T48"><text:tab/><text:tab/><text:tab/></text:span></text:span><text:span text:style-name="_3c_C_2b__2b__3e_"><text:span text:style-name="T6">};</text:span></text:span></text:p>
      <text:p text:style-name="P28"><text:span text:style-name="_3c_C_3e_"><text:span text:style-name="T45"><text:tab/><text:tab/>}</text:span></text:span></text:p>
      <text:p text:style-name="P28"><text:span text:style-name="_3c_C_2b__2b__3e_"><text:span text:style-name="T6">return Ok(());</text:span></text:span></text:p>
      <text:p text:style-name="P29"><text:span text:style-name="_3c_C_3e_"><text:span text:style-name="T48">} else {</text:span></text:span></text:p>
      <text:p text:style-name="P29"><text:span text:style-name="_3c_C_3e_"><text:span text:style-name="T48"><text:tab/></text:span></text:span><text:span text:style-name="_3c_C_2b__2b__3e_"><text:span text:style-name="T6">return Err(“Error: No puede abrir el fichero\n”);</text:span></text:span></text:p>
      <text:p text:style-name="P29"><text:span text:style-name="_3c_C_3e_"><text:span text:style-name="T48">}</text:span></text:span></text:p>
      <text:p text:style-name="P29"><text:span text:style-name="_3c_C_3e_"><text:span text:style-name="T48">}</text:span></text:span></text:p>
      <text:p text:style-name="P29"><text:span text:style-name="_2f__2f_C"><text:span text:style-name="T49">En este caso _reader.lines() devuelve un ITERADOR line y cada uno de ellos devuelve un Result&lt;String, error&gt; para averiguarlo hemos usado el match.. pero se puede hacer más pa linea:</text:span></text:span></text:p>
      <text:p text:style-name="P29"><text:span text:style-name="_3c_C_2b__2b__3e_"><text:span text:style-name="T6">let line = line?;</text:span></text:span></text:p>
      <text:p text:style-name="P30"><text:soft-page-break/><text:span text:style-name="_2f__2f_C"><text:span text:style-name="T50">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30"><text:span text:style-name="_3c_C_2b__2b__3e_"><text:span text:style-name="T6">let line = line.map_err(|_|, “Error: Error leyendo el archivo\n”)?;</text:span></text:span></text:p>
      <text:h text:style-name="P31" text:outline-level="3"/>
      <text:h text:style-name="P31" text:outline-level="3">ESTRUCTURAS</text:h>
      <text:p text:style-name="P4"><text:span text:style-name="_2f__2f_C"><text:span text:style-name="T33">Rust no tiene objectos ni clases, pero s</text:span></text:span><text:span text:style-name="_2f__2f_C"><text:span text:style-name="T51">í </text:span></text:span><text:span text:style-name="_2f__2f_C"><text:span text:style-name="T33">que puede acercarse a ellos con las estructuras. En Rust todo es privado que se declare</text:span></text:span><text:span text:style-name="_2f__2f_C"><text:span text:style-name="T52">. Para hacerlo accesible hay que ponerle la palabra </text:span></text:span><text:span text:style-name="_3c_C_2b__2b__3e_"><text:span text:style-name="T53">pub</text:span></text:span><text:span text:style-name="_2f__2f_C"><text:span text:style-name="T52"> delante. No solo a la estructura</text:span></text:span><text:span text:style-name="_2f__2f_C"><text:span text:style-name="T54">.</text:span></text:span></text:p>
      <text:p text:style-name="P32"><text:span text:style-name="_2f__2f_C"><text:span text:style-name="T55">(</text:span></text:span><text:span text:style-name="_3c_C_3e_"><text:span text:style-name="T23">fichero.rs</text:span></text:span><text:span text:style-name="_2f__2f_C"><text:span text:style-name="T55">)</text:span></text:span></text:p>
      <text:p text:style-name="P32"><text:span text:style-name="_3c_C_2b__2b__3e_"><text:span text:style-name="T6">pub struct </text:span></text:span><text:span text:style-name="_3c_C_2b__2b__3e_"><text:span text:style-name="T56">P</text:span></text:span><text:span text:style-name="_3c_C_3e_"><text:span text:style-name="T23">rueba{</text:span></text:span><text:span text:style-name="_3c_C_3e_"><text:span text:style-name="T57"> </text:span></text:span><text:span text:style-name="_2f__2f_C"><text:span text:style-name="T57">//debe ser CamelCase P mayúscula</text:span></text:span></text:p>
      <text:p text:style-name="P32"><text:span text:style-name="_3c_C_3e_"><text:span text:style-name="T23"><text:tab/></text:span></text:span><text:span text:style-name="_3c_C_2b__2b__3e_"><text:span text:style-name="T6">pub</text:span></text:span><text:span text:style-name="_3c_C_3e_"><text:span text:style-name="T23"> var1: i32</text:span></text:span><text:span text:style-name="_3c_C_2b__2b__3e_"><text:span text:style-name="T6">,</text:span></text:span></text:p>
      <text:p text:style-name="P32"><text:span text:style-name="_3c_C_3e_"><text:span text:style-name="T23"><text:tab/></text:span></text:span><text:span text:style-name="_3c_C_2b__2b__3e_"><text:span text:style-name="T6">pub</text:span></text:span><text:span text:style-name="_3c_C_3e_"><text:span text:style-name="T23"> var2: char</text:span></text:span><text:span text:style-name="_3c_C_2b__2b__3e_"><text:span text:style-name="T6">,</text:span></text:span><text:span text:style-name="_3c_C_3e_"><text:span text:style-name="T57"> </text:span></text:span><text:span text:style-name="_2f__2f_C"><text:span text:style-name="T23">//si no son pub estas variables no se puede acceder a ellas</text:span></text:span></text:p>
      <text:p text:style-name="P32"><text:span text:style-name="_3c_C_3e_"><text:span text:style-name="T23">}</text:span></text:span></text:p>
      <text:p text:style-name="P32"><text:span text:style-name="_2f__2f_C"><text:span text:style-name="T55">Importando el </text:span></text:span><text:span text:style-name="_3c_C_3e_"><text:span text:style-name="T23">fichero.rs</text:span></text:span><text:span text:style-name="_2f__2f_C"><text:span text:style-name="T55"> como <text:line-break/></text:span></text:span></text:p>
      <text:p text:style-name="P33"><text:span text:style-name="_2f__2f_C"><text:span text:style-name="T58">(fichero: main.rs)</text:span></text:span></text:p>
      <text:p text:style-name="P32"><text:span text:style-name="_3c_C_2b__2b__3e_"><text:span text:style-name="T6">mod</text:span></text:span><text:span text:style-name="_3c_C_3e_"><text:span text:style-name="T23"> fichero;</text:span></text:span><text:span text:style-name="_3c_C_3e_"><text:span text:style-name="T57"> </text:span></text:span><text:span text:style-name="_2f__2f_C"><text:span text:style-name="T57">//importa el fichero fichero.rs</text:span></text:span></text:p>
      <text:p text:style-name="P32"><text:span text:style-name="_3c_C_3e_"><text:span text:style-name="T23">fn main(){</text:span></text:span></text:p>
      <text:p text:style-name="P32"><text:span text:style-name="_3c_C_3e_"><text:span text:style-name="T23"><text:tab/>let a = fichero::prueba { var1: 42, var2: 'a'</text:span></text:span><text:span text:style-name="_3c_C_3e_"><text:span text:style-name="T57">}</text:span></text:span><text:span text:style-name="_3c_C_3e_"><text:span text:style-name="T23">;</text:span></text:span></text:p>
      <text:p text:style-name="P32"><text:span text:style-name="_3c_C_3e_"><text:span text:style-name="T23">} </text:span></text:span></text:p>
      <text:p text:style-name="P32"><text:span text:style-name="_3c_C_3e_"><text:span text:style-name="T23"/></text:span></text:p>
      <text:p text:style-name="P33"><text:span text:style-name="_2f__2f_C"><text:span text:style-name="T59">Ahora imaginemos que tenemos un archivo.rs que tiene esto:</text:span></text:span></text:p>
      <text:p text:style-name="P33"><text:span text:style-name="_2f__2f_C"><text:span text:style-name="T59">(</text:span></text:span><text:span text:style-name="_3c_C_3e_"><text:span text:style-name="T12">fichero.rs</text:span></text:span><text:span text:style-name="_2f__2f_C"><text:span text:style-name="T59">)</text:span></text:span></text:p>
      <text:p text:style-name="P33"><text:span text:style-name="_3c_C_3e_"><text:span text:style-name="T60">pub </text:span></text:span><text:span text:style-name="_3c_C_3e_"><text:span text:style-name="T12">struct Prueba{</text:span></text:span><text:span text:style-name="_3c_C_3e_"><text:span text:style-name="T60"> //para implementar el getter tiene que ser la estructura pub</text:span></text:span></text:p>
      <text:p text:style-name="P33"><text:span text:style-name="_3c_C_3e_"><text:span text:style-name="T12"><text:tab/>x: i32,</text:span></text:span></text:p>
      <text:p text:style-name="P33"><text:span text:style-name="_3c_C_3e_"><text:span text:style-name="T12">}</text:span></text:span></text:p>
      <text:p text:style-name="P33"><text:span text:style-name="_3c_C_3e_"><text:span text:style-name="T21">pub </text:span></text:span><text:span text:style-name="_3c_C_3e_"><text:span text:style-name="T12">fn test()</text:span></text:span><text:span text:style-name="_3c_C_3e_"><text:span text:style-name="T61"> -&gt; Prueba</text:span></text:span><text:span text:style-name="_3c_C_3e_"><text:span text:style-name="T12">{</text:span></text:span><text:span text:style-name="_2f__2f_C"><text:span text:style-name="T61"> //-&gt; devuelve un tipo Prueba (estructura)</text:span></text:span></text:p>
      <text:p text:style-name="P33"><text:span text:style-name="_3c_C_3e_"><text:span text:style-name="T61"><text:tab/></text:span></text:span><text:span text:style-name="_3c_C_3e_"><text:span text:style-name="T12">Prueba {x: 56}</text:span></text:span></text:p>
      <text:p text:style-name="P33"><text:span text:style-name="_3c_C_3e_"><text:span text:style-name="T12">}</text:span></text:span></text:p>
      <text:p text:style-name="P33"><text:span text:style-name="_2f__2f_C"><text:span text:style-name="T59">No habr</text:span></text:span><text:span text:style-name="_2f__2f_C"><text:span text:style-name="T62">í</text:span></text:span><text:span text:style-name="_2f__2f_C"><text:span text:style-name="T59">a problema en darle valor dentro de fichero.rs PERO si queremos acceder a el, tendriamos que hacer un metodo de la estructura en el propio archivo fichero.rs:<text:line-break/><text:line-break/></text:span></text:span><text:span text:style-name="_3c_C_2b__2b__3e_"><text:span text:style-name="T15">impl</text:span></text:span><text:span text:style-name="_3c_C_3e_"><text:span text:style-name="T12"> Prueba{</text:span></text:span></text:p>
      <text:p text:style-name="P33"><text:soft-page-break/><text:span text:style-name="_3c_C_3e_"><text:span text:style-name="T12"><text:tab/></text:span></text:span><text:span text:style-name="_3c_C_3e_"><text:span text:style-name="T60">pub </text:span></text:span><text:span text:style-name="_3c_C_3e_"><text:span text:style-name="T12">fn get_x(&amp;self) -&gt; i32{</text:span></text:span><text:span text:style-name="_3c_C_3e_"><text:span text:style-name="T60"> </text:span></text:span><text:span text:style-name="_2f__2f_C"><text:span text:style-name="T60">//tiene que ser pub tambien</text:span></text:span><text:span text:style-name="_2f__2f_C"><text:span text:style-name="T61">. -&gt; i32 = devuelve un int.</text:span></text:span></text:p>
      <text:p text:style-name="P34"><text:span text:style-name="_2f__2f_C"><text:span text:style-name="T63"><text:tab/>//&amp;self es como los objetos.. o this en c++ va implicito</text:span></text:span></text:p>
      <text:p text:style-name="P34"><text:span text:style-name="_2f__2f_C"><text:span text:style-name="T63"><text:tab/><text:tab/>(self) lo moveria el valor</text:span></text:span></text:p>
      <text:p text:style-name="P34"><text:span text:style-name="_2f__2f_C"><text:span text:style-name="T63"><text:tab/><text:tab/>(&amp;self) es inmutable</text:span></text:span></text:p>
      <text:p text:style-name="P34"><text:span text:style-name="_2f__2f_C"><text:span text:style-name="T63"><text:tab/><text:tab/>(&amp;mut self) lo podria cambiar.</text:span></text:span></text:p>
      <text:p text:style-name="P33"><text:span text:style-name="_3c_C_3e_"><text:span text:style-name="T12"><text:tab/><text:tab/>self.</text:span></text:span><text:span text:style-name="_3c_C_3e_"><text:span text:style-name="T60">x</text:span></text:span><text:span text:style-name="_3c_C_3e_"><text:span text:style-name="T64"> </text:span></text:span><text:span text:style-name="_2f__2f_C"><text:span text:style-name="T64">//IMPORTANTE!!! SI NO TIENE ';' ES UN RETURN IMPLICITO!!!</text:span></text:span></text:p>
      <text:p text:style-name="P33"><text:span text:style-name="_3c_C_3e_"><text:span text:style-name="T12"><text:tab/>}</text:span></text:span></text:p>
      <text:p text:style-name="P33"><text:span text:style-name="_3c_C_3e_"><text:span text:style-name="T12">}</text:span></text:span></text:p>
      <text:p text:style-name="P35"><text:span text:style-name="_2f__2f_C"><text:span text:style-name="T65">En el main.rs:<text:line-break/></text:span></text:span></text:p>
      <text:p text:style-name="P35"><text:span text:style-name="_3c_C_3e_"><text:span text:style-name="T12">mod fichero;</text:span></text:span></text:p>
      <text:p text:style-name="P35"><text:span text:style-name="_3c_C_3e_"><text:span text:style-name="T12">fn main (){</text:span></text:span></text:p>
      <text:p text:style-name="P36"><text:span text:style-name="_3c_C_3e_"><text:span text:style-name="T61"><text:tab/>let a = fichero::test(); </text:span></text:span><text:span text:style-name="_2f__2f_C"><text:span text:style-name="T61">//llama a la funcion externa en fichero y le da el valor 56</text:span></text:span><text:span text:style-name="_3c_C_3e_"><text:span text:style-name="T12"><text:tab/></text:span></text:span></text:p>
      <text:p text:style-name="P36"><text:span text:style-name="_3c_C_3e_"><text:span text:style-name="T61"><text:tab/></text:span></text:span><text:span text:style-name="_3c_C_3e_"><text:span text:style-name="T12">println!("{}", a.get_x());</text:span></text:span></text:p>
      <text:p text:style-name="P35"><text:span text:style-name="_3c_C_3e_"><text:span text:style-name="T12">}</text:span></text:span></text:p>
      <text:p text:style-name="P35"><text:span text:style-name="_3c_C_3e_"><text:span text:style-name="T12"/></text:span></text:p>
      <text:p text:style-name="P37"><text:span text:style-name="_2f__2f_C"><text:span text:style-name="T66">También se puede definir una estructura como:</text:span></text:span></text:p>
      <text:p text:style-name="P37"><text:span text:style-name="_3c_C_2b__2b__3e_"><text:span text:style-name="T15">struct St1(i32);</text:span></text:span></text:p>
      <text:p text:style-name="P37"><text:span text:style-name="_3c_C_2b__2b__3e_"><text:span text:style-name="T15">struct St2(f32, String, bool);</text:span></text:span></text:p>
      <text:p text:style-name="P37"><text:span text:style-name="_2f__2f_C"><text:span text:style-name="T66">En donde para tomar variables y usarlo sería:</text:span></text:span></text:p>
      <text:p text:style-name="P37"><text:span text:style-name="_3c_C_3e_"><text:span text:style-name="T12">let st1 = St1(42);</text:span></text:span></text:p>
      <text:p text:style-name="P37"><text:span text:style-name="_3c_C_3e_"><text:span text:style-name="T12">let st2 = St2(3.2, "hola".into(), true);</text:span></text:span></text:p>
      <text:p text:style-name="P37"><text:span text:style-name="_2f__2f_C"><text:span text:style-name="T66">Y para acceder a sus campos sería con </text:span></text:span><text:span text:style-name="_3c_C_2b__2b__3e_"><text:span text:style-name="T15">.0</text:span></text:span><text:span text:style-name="_2f__2f_C"><text:span text:style-name="T66">, .</text:span></text:span><text:span text:style-name="_3c_C_2b__2b__3e_"><text:span text:style-name="T15">1</text:span></text:span><text:span text:style-name="_2f__2f_C"><text:span text:style-name="T66">, </text:span></text:span><text:span text:style-name="_3c_C_2b__2b__3e_"><text:span text:style-name="T15">.2</text:span></text:span><text:span text:style-name="_2f__2f_C"><text:span text:style-name="T66">, etc...</text:span></text:span></text:p>
      <text:p text:style-name="P37"><text:span text:style-name="_3c_C_3e_"><text:span text:style-name="T12">println!("{}", st2.1); </text:span></text:span><text:span text:style-name="_2f__2f_C"><text:span text:style-name="T12">//imprimiria "hola"</text:span></text:span></text:p>
      <text:p text:style-name="P35"><text:span text:style-name="_3c_C_3e_"><text:span text:style-name="T12"/></text:span></text:p>
      <text:h text:style-name="P38" text:outline-level="3"><text:span text:style-name="_3c_C_3e_"><text:span text:style-name="T67">FUNCIONES</text:span></text:span></text:h>
      <text:p text:style-name="P39"><text:span text:style-name="_2f__2f_C"><text:span text:style-name="T68">Las funciones en Rust estan divididas entre las que no devuelven nada y las que s</text:span></text:span><text:span text:style-name="_2f__2f_C"><text:span text:style-name="T69">í</text:span></text:span><text:span text:style-name="_2f__2f_C"><text:span text:style-name="T68">. </text:span></text:span></text:p>
      <text:p text:style-name="P39"><text:span text:style-name="_2f__2f_C"><text:span text:style-name="T68">NO DEVUELVE:</text:span></text:span></text:p>
      <text:p text:style-name="P39"><text:span text:style-name="_3c_C_3e_"><text:span text:style-name="T12">fn funcion(num1: &amp;i32){</text:span></text:span><text:span text:style-name="_3c_C_3e_"><text:span text:style-name="T70"> </text:span></text:span><text:span text:style-name="_2f__2f_C"><text:span text:style-name="T70">//</text:span></text:span><text:span text:style-name="_2f__2f_C"><text:span text:style-name="T71">referenciada</text:span></text:span></text:p>
      <text:p text:style-name="P39"><text:span text:style-name="_3c_C_3e_"><text:span text:style-name="T12"><text:tab/>println!("El numero es: {}", num1</text:span></text:span><text:span text:style-name="_3c_C_3e_"><text:span text:style-name="T71">)</text:span></text:span><text:span text:style-name="_3c_C_3e_"><text:span text:style-name="T12">;</text:span></text:span></text:p>
      <text:p text:style-name="P39"><text:span text:style-name="_3c_C_3e_"><text:span text:style-name="T12">}</text:span></text:span></text:p>
      <text:p text:style-name="P39"><text:span text:style-name="_2f__2f_C"><text:span text:style-name="T68">DEVUELVE:</text:span></text:span></text:p>
      <text:p text:style-name="P39"><text:span text:style-name="_3c_C_3e_"><text:span text:style-name="T12">fn<text:tab/>suma(num1: &amp;i32, num2: &amp;i32) </text:span></text:span><text:span text:style-name="_3c_C_2b__2b__3e_"><text:span text:style-name="T15">-&gt; i32</text:span></text:span><text:span text:style-name="_3c_C_3e_"><text:span text:style-name="T12">{</text:span></text:span><text:span text:style-name="_3c_C_3e_"><text:span text:style-name="T70"> </text:span></text:span><text:span text:style-name="_2f__2f_C"><text:span text:style-name="T70">//-&gt; lo que devuelve</text:span></text:span></text:p>
      <text:p text:style-name="P39"><text:span text:style-name="_3c_C_3e_"><text:span text:style-name="T12"><text:tab/></text:span></text:span><text:span text:style-name="_3c_C_3e_"><text:span text:style-name="T71">*</text:span></text:span><text:span text:style-name="_3c_C_3e_"><text:span text:style-name="T12">num1 + </text:span></text:span><text:span text:style-name="_3c_C_3e_"><text:span text:style-name="T71">*</text:span></text:span><text:span text:style-name="_3c_C_3e_"><text:span text:style-name="T12">num2 </text:span></text:span><text:span text:style-name="_2f__2f_C"><text:span text:style-name="T12">//es importante que no tenga ; ya que este es un return oculto, sin ese punto y coma.</text:span></text:span></text:p>
      <text:p text:style-name="P40"><text:soft-page-break/><text:span text:style-name="_2f__2f_C"><text:span text:style-name="T71"><text:tab/>//Hay que derreferenciar, ya que son referencias (direcciones de memoria)</text:span></text:span></text:p>
      <text:p text:style-name="P39"><text:span text:style-name="_3c_C_3e_"><text:span text:style-name="T12">}</text:span></text:span></text:p>
      <text:p text:style-name="P39"><text:span text:style-name="_2f__2f_C"><text:span text:style-name="T68">Para llamarlas:</text:span></text:span></text:p>
      <text:p text:style-name="P39"><text:span text:style-name="_3c_C_3e_"><text:span text:style-name="T12">funcion(&amp;n);</text:span></text:span></text:p>
      <text:p text:style-name="P39"><text:span text:style-name="_3c_C_3e_"><text:span text:style-name="T12">suma(&amp;x, &amp;y);</text:span></text:span></text:p>
      <text:p text:style-name="P39"><text:span text:style-name="_3c_C_3e_"><text:span text:style-name="T12"/></text:span></text:p>
      <text:p text:style-name="P40"><text:span text:style-name="_2f__2f_C"><text:span text:style-name="T68">Para </text:span></text:span><text:span text:style-name="_2f__2f_C"><text:span text:style-name="T72">cambiar el valor de un numero</text:span></text:span><text:span text:style-name="_2f__2f_C"><text:span text:style-name="T68">:</text:span></text:span></text:p>
      <text:p text:style-name="P40"><text:span text:style-name="_3c_C_3e_"><text:span text:style-name="T12">fn cambia(n: &amp;mut i32){</text:span></text:span></text:p>
      <text:p text:style-name="P40"><text:span text:style-name="_3c_C_3e_"><text:span text:style-name="T12"><text:tab/>*n = 42;</text:span></text:span></text:p>
      <text:p text:style-name="P40"><text:span text:style-name="_3c_C_3e_"><text:span text:style-name="T12">}</text:span></text:span></text:p>
      <text:p text:style-name="P40"><text:span text:style-name="_2f__2f_C"><text:span text:style-name="T72">y para llamarla:</text:span></text:span></text:p>
      <text:p text:style-name="P40"><text:span text:style-name="_3c_C_3e_"><text:span text:style-name="T12">cambia(&amp;mut x);</text:span></text:span></text:p>
      <text:p text:style-name="P40"><text:span text:style-name="_3c_C_3e_"><text:span text:style-name="T12"/></text:span></text:p>
      <text:h text:style-name="P41" text:outline-level="3"><text:span text:style-name="_3c_C_3e_"><text:span text:style-name="T73">ENUMS</text:span></text:span></text:h>
      <text:p text:style-name="P42"><text:span text:style-name="_2f__2f_C"><text:span text:style-name="T74">Los enums son tipos de variable como en C++11 y funcionan igual</text:span></text:span><text:span text:style-name="_2f__2f_C"><text:span text:style-name="T75"> salvo por los métodos que no se pueden hacer en C++</text:span></text:span><text:span text:style-name="_2f__2f_C"><text:span text:style-name="T74">:</text:span></text:span></text:p>
      <text:p text:style-name="P42"><text:span text:style-name="_3c_C_2b__2b__3e_"><text:span text:style-name="T15">enum Animales</text:span></text:span><text:span text:style-name="_3c_C_3e_"><text:span text:style-name="T12">{</text:span></text:span></text:p>
      <text:p text:style-name="P42"><text:span text:style-name="_3c_C_3e_"><text:span text:style-name="T12"><text:tab/>Gato,</text:span></text:span></text:p>
      <text:p text:style-name="P42"><text:span text:style-name="_3c_C_3e_"><text:span text:style-name="T12"><text:tab/>Perro,</text:span></text:span></text:p>
      <text:p text:style-name="P42"><text:span text:style-name="_3c_C_3e_"><text:span text:style-name="T12"><text:tab/>Mosca,</text:span></text:span></text:p>
      <text:p text:style-name="P42"><text:span text:style-name="_3c_C_3e_"><text:span text:style-name="T12"><text:tab/>Ballena,</text:span></text:span></text:p>
      <text:p text:style-name="P42"><text:span text:style-name="_3c_C_3e_"><text:span text:style-name="T12">}</text:span></text:span></text:p>
      <text:p text:style-name="P42"><text:span text:style-name="_2f__2f_C"><text:span text:style-name="T74">De tal forma que para darle un valor se puede hacer:</text:span></text:span></text:p>
      <text:p text:style-name="P42"><text:span text:style-name="_3c_C_3e_"><text:span text:style-name="T12">let animal: Animales = </text:span></text:span><text:span text:style-name="_3c_C_2b__2b__3e_"><text:span text:style-name="T15">Animales::Mosca;</text:span></text:span></text:p>
      <text:p text:style-name="P42"><text:span text:style-name="_2f__2f_C"><text:span text:style-name="T74"/></text:span></text:p>
      <text:p text:style-name="P42"><text:span text:style-name="_2f__2f_C"><text:span text:style-name="T74">Podríamos crear funciones propias como:</text:span></text:span></text:p>
      <text:p text:style-name="P42"><text:span text:style-name="_3c_C_2b__2b__3e_"><text:span text:style-name="T15">impl Animales</text:span></text:span><text:span text:style-name="_3c_C_3e_"><text:span text:style-name="T12">{</text:span></text:span></text:p>
      <text:p text:style-name="P42"><text:span text:style-name="_3c_C_3e_"><text:span text:style-name="T12"><text:tab/></text:span></text:span><text:span text:style-name="_3c_C_2b__2b__3e_"><text:span text:style-name="T15">fn es_mamifero(&amp;self) -&gt; bool</text:span></text:span><text:span text:style-name="_3c_C_3e_"><text:span text:style-name="T12">{</text:span></text:span></text:p>
      <text:p text:style-name="P42"><text:span text:style-name="_3c_C_3e_"><text:span text:style-name="T12"><text:tab/><text:tab/></text:span></text:span><text:span text:style-name="_3c_C_2b__2b__3e_"><text:span text:style-name="T15">match self</text:span></text:span><text:span text:style-name="_3c_C_3e_"><text:span text:style-name="T12"> {</text:span></text:span></text:p>
      <text:p text:style-name="P42"><text:span text:style-name="_3c_C_3e_"><text:span text:style-name="T12"><text:tab/><text:tab/><text:tab/></text:span></text:span><text:span text:style-name="_3c_C_2b__2b__3e_"><text:span text:style-name="T15">Animales::Gato | Animales::Perro | Animales::Ballena =&gt; true,</text:span></text:span><text:span text:style-name="_3c_C_3e_"><text:span text:style-name="T12"> </text:span></text:span><text:span text:style-name="_2f__2f_C"><text:span text:style-name="T12">//"|" = O</text:span></text:span></text:p>
      <text:p text:style-name="P42"><text:span text:style-name="_3c_C_3e_"><text:span text:style-name="T12"><text:tab/><text:tab/><text:tab/></text:span></text:span><text:span text:style-name="_3c_C_2b__2b__3e_"><text:span text:style-name="T15">Animales::Mosca =&gt; false</text:span></text:span></text:p>
      <text:p text:style-name="P42"><text:span text:style-name="_3c_C_3e_"><text:span text:style-name="T12"><text:tab/><text:tab/>}</text:span></text:span></text:p>
      <text:p text:style-name="P42"><text:span text:style-name="_3c_C_3e_"><text:span text:style-name="T12"><text:tab/>}</text:span></text:span></text:p>
      <text:p text:style-name="P42"><text:span text:style-name="_3c_C_3e_"><text:span text:style-name="T12">}</text:span></text:span></text:p>
      <text:p text:style-name="P42"><text:soft-page-break/><text:span text:style-name="_2f__2f_C"><text:span text:style-name="T74">Siempre habrá que definir cada uno de los Enums en los </text:span></text:span><text:span text:style-name="_3c_C_2b__2b__3e_"><text:span text:style-name="T15">match</text:span></text:span><text:span text:style-name="_2f__2f_C"><text:span text:style-name="T74">, por que si no el compilador dará error. A no ser que se utilize el </text:span></text:span><text:span text:style-name="_2f__2f_C"><text:span text:style-name="T75">comodín</text:span></text:span><text:span text:style-name="_2f__2f_C"><text:span text:style-name="T74"> "</text:span></text:span><text:span text:style-name="_3c_C_2b__2b__3e_"><text:span text:style-name="T15">_</text:span></text:span><text:span text:style-name="_2f__2f_C"><text:span text:style-name="T74">" </text:span></text:span><text:span text:style-name="_2f__2f_C"><text:span text:style-name="T75">que alberga a los restantes.</text:span></text:span><text:span text:style-name="_2f__2f_C"><text:span text:style-name="T74"><text:line-break/></text:span></text:span></text:p>
      <text:p text:style-name="P42"><text:span text:style-name="_3c_C_3e_"><text:span text:style-name="T15">impl Animales{</text:span></text:span></text:p>
      <text:p text:style-name="P42"><text:span text:style-name="_3c_C_3e_"><text:span text:style-name="T15"><text:tab/>fn es_mamifero(&amp;self) -&gt; bool{</text:span></text:span></text:p>
      <text:p text:style-name="P42"><text:span text:style-name="_3c_C_3e_"><text:span text:style-name="T15"><text:tab/><text:tab/>match self {</text:span></text:span></text:p>
      <text:p text:style-name="P42"><text:span text:style-name="_3c_C_3e_"><text:span text:style-name="T15"><text:tab/><text:tab/><text:tab/>Animales::Mosca =&gt; false,</text:span></text:span></text:p>
      <text:p text:style-name="P42"><text:span text:style-name="_3c_C_3e_"><text:span text:style-name="T15"><text:tab/><text:tab/><text:tab/></text:span></text:span><text:span text:style-name="_3c_C_2b__2b__3e_"><text:span text:style-name="T15">_ =&gt;</text:span></text:span><text:span text:style-name="_3c_C_3e_"><text:span text:style-name="T15"> true</text:span></text:span></text:p>
      <text:p text:style-name="P42"><text:span text:style-name="_3c_C_3e_"><text:span text:style-name="T15"><text:tab/><text:tab/>}</text:span></text:span></text:p>
      <text:p text:style-name="P42"><text:span text:style-name="_3c_C_3e_"><text:span text:style-name="T15"><text:tab/>}</text:span></text:span></text:p>
      <text:p text:style-name="P42"><text:span text:style-name="_3c_C_3e_"><text:span text:style-name="T15">}</text:span></text:span></text:p>
      <text:p text:style-name="P43"><text:span text:style-name="_2f__2f_C"><text:span text:style-name="T76">Y para acceder a ese método es como un objeto:</text:span></text:span></text:p>
      <text:p text:style-name="P43"><text:span text:style-name="_3c_C_3e_"><text:span text:style-name="T12">let kk = Animales::Gato;</text:span></text:span></text:p>
      <text:p text:style-name="P43"><text:span text:style-name="_3c_C_3e_"><text:span text:style-name="T12">if kk</text:span></text:span><text:span text:style-name="_3c_C_2b__2b__3e_"><text:span text:style-name="T15">.es_mamifero() </text:span></text:span><text:span text:style-name="_3c_C_3e_"><text:span text:style-name="T12">{...}</text:span></text:span></text:p>
      <text:p text:style-name="P43"><text:span text:style-name="_3c_C_3e_"><text:span text:style-name="T12"/></text:span></text:p>
      <text:h text:style-name="P44" text:outline-level="3"><text:span text:style-name="_3c_C_3e_"><text:span text:style-name="T73">ENUMS</text:span></text:span><text:span text:style-name="_3c_C_3e_"><text:span text:style-name="T77"> con variables extra</text:span></text:span></text:h>
      <text:p text:style-name="P45"><text:span text:style-name="_2f__2f_C"><text:span text:style-name="T78">Los Enums en Rust son como los de C, C++, Java, pero tienen algo único. Se les pueden añadir variables a cada uno de los datos incluidos:</text:span></text:span></text:p>
      <text:p text:style-name="P45"><text:span text:style-name="_3c_C_3e_"><text:span text:style-name="T12">enum Status{</text:span></text:span></text:p>
      <text:p text:style-name="P45"><text:span text:style-name="_3c_C_3e_"><text:span text:style-name="T12"><text:tab/>PorHacer,</text:span></text:span></text:p>
      <text:p text:style-name="P45"><text:span text:style-name="_3c_C_3e_"><text:span text:style-name="T12"><text:tab/>EnProgreso</text:span></text:span><text:span text:style-name="_3c_C_2b__2b__3e_"><text:span text:style-name="T15">{</text:span></text:span></text:p>
      <text:p text:style-name="P45"><text:span text:style-name="_3c_C_2b__2b__3e_"><text:span text:style-name="T15"><text:tab/><text:tab/>asignado_a: String,</text:span></text:span></text:p>
      <text:p text:style-name="P45"><text:span text:style-name="_3c_C_2b__2b__3e_"><text:span text:style-name="T15"><text:tab/>},</text:span></text:span></text:p>
      <text:p text:style-name="P45"><text:span text:style-name="_3c_C_3e_"><text:span text:style-name="T12"><text:tab/>Hecho,</text:span></text:span></text:p>
      <text:p text:style-name="P45"><text:span text:style-name="_3c_C_3e_"><text:span text:style-name="T12">}</text:span></text:span></text:p>
      <text:p text:style-name="P45"><text:span text:style-name="_2f__2f_C"><text:span text:style-name="T78">Y la forma de acceder a ello no es mediante un </text:span></text:span></text:p>
      <text:p text:style-name="P45"><text:span text:style-name="_2f__2f_C"><text:span text:style-name="T78"/></text:span></text:p>
      <text:p text:style-name="P45"><text:span text:style-name="_3c_C_3e_"><text:span text:style-name="T12">let estado = Status::EnProgreso;</text:span></text:span></text:p>
      <text:p text:style-name="P45"><text:span text:style-name="_3c_C_3e_"><text:span text:style-name="T12">estado.asignado_a; </text:span></text:span><text:span text:style-name="_3c_C_2b__2b__3e_"><text:span text:style-name="T15">//error de compilación</text:span></text:span></text:p>
      <text:p text:style-name="P45"><text:span text:style-name="_2f__2f_C"><text:span text:style-name="T78"/></text:span></text:p>
      <text:p text:style-name="P45"><text:span text:style-name="_2f__2f_C"><text:span text:style-name="T78">Sino con un bloque match:<text:line-break/></text:span></text:span><text:span text:style-name="_3c_C_3e_"><text:span text:style-name="T12">match Status{</text:span></text:span></text:p>
      <text:p text:style-name="P45"><text:span text:style-name="_3c_C_3e_"><text:span text:style-name="T12"><text:tab/>Status::EnProgreso</text:span></text:span><text:span text:style-name="_3c_C_2b__2b__3e_"><text:span text:style-name="T15">{ asignado_a }</text:span></text:span><text:span text:style-name="_3c_C_3e_"><text:span text:style-name="T12"> =&gt; { println! "Lo hace: {}",</text:span></text:span><text:span text:style-name="_3c_C_2b__2b__3e_"><text:span text:style-name="T15"> asignado_a</text:span></text:span><text:span text:style-name="_3c_C_3e_"><text:span text:style-name="T12">; },</text:span></text:span></text:p>
      <text:p text:style-name="P45"><text:span text:style-name="_3c_C_3e_"><text:span text:style-name="T12"><text:tab/>_ =&gt; {} </text:span></text:span><text:span text:style-name="_2f__2f_C"><text:span text:style-name="T12">//si no queremos que haga nada, pues doble llave.</text:span></text:span><text:span text:style-name="_3c_C_3e_"><text:span text:style-name="T79">}</text:span></text:span></text:p>
      <text:p text:style-name="P46"><text:soft-page-break/><text:span text:style-name="_2f__2f_C"><text:span text:style-name="T80">PERO CUIDADO!!!!</text:span></text:span><text:span text:style-name="_2f__2f_C"><text:span text:style-name="T81"> Si hacemos eso destruimos la variable instanciada de Status, por que el Ownership pasaría en el bloque </text:span></text:span><text:span text:style-name="_3c_C_3e_"><text:span text:style-name="T12">{println!...}</text:span></text:span><text:span text:style-name="_3c_C_3e_"><text:span text:style-name="T82"> </text:span></text:span><text:span text:style-name="_2f__2f_C"><text:span text:style-name="T81">al </text:span></text:span><text:span text:style-name="_3c_C_3e_"><text:span text:style-name="T12">match</text:span></text:span><text:span text:style-name="_2f__2f_C"><text:span text:style-name="T81"> y por lo tanto al querer usar el </text:span></text:span><text:span text:style-name="_3c_C_3e_"><text:span text:style-name="T12">Status</text:span></text:span><text:span text:style-name="_2f__2f_C"><text:span text:style-name="T81"> de la instancia después daría error de compilación. Para ello es mejor hacer:</text:span></text:span></text:p>
      <text:p text:style-name="P46"><text:span text:style-name="_3c_C_3e_"><text:span text:style-name="T12">match </text:span></text:span><text:span text:style-name="_3c_C_2b__2b__3e_"><text:span text:style-name="T15">&amp;</text:span></text:span><text:span text:style-name="_3c_C_3e_"><text:span text:style-name="T12">Status{ </text:span></text:span><text:span text:style-name="_2f__2f_C"><text:span text:style-name="T12">//mismo código</text:span></text:span><text:span text:style-name="_3c_C_3e_"><text:span text:style-name="T12">}</text:span></text:span><text:span text:style-name="_2f__2f_C"><text:span text:style-name="T81"> y ahí se podria usar sin problemas después.</text:span></text:span></text:p>
      <text:h text:style-name="P47" text:outline-level="3"><text:span text:style-name="_3c_C_3e_"><text:span text:style-name="T67"/></text:span></text:h>
      <text:p text:style-name="P48"><text:span text:style-name="_2f__2f_C"><text:span text:style-name="T83">También se puede hacer el acceso con el if let. </text:span></text:span></text:p>
      <text:p text:style-name="P48"><text:span text:style-name="_3c_C_3e_"><text:span text:style-name="T23">impl Ticket{</text:span></text:span></text:p>
      <text:p text:style-name="P48"><text:span text:style-name="_3c_C_3e_"><text:span text:style-name="T23"><text:tab/>pub fn assigned_to(&amp;self) -&gt; &amp;str{</text:span></text:span></text:p>
      <text:p text:style-name="P48"><text:span text:style-name="_3c_C_3e_"><text:span text:style-name="T23"><text:tab/><text:tab/>if let Status::EnProgreso { asignado_a : kk } = &amp;self.status { kk }</text:span></text:span></text:p>
      <text:p text:style-name="P48"><text:span text:style-name="_3c_C_3e_"><text:span text:style-name="T23"><text:tab/><text:tab/>else { panic!();}</text:span></text:span></text:p>
      <text:p text:style-name="P48"><text:span text:style-name="_3c_C_3e_"><text:span text:style-name="T23"><text:tab/>}</text:span></text:span></text:p>
      <text:p text:style-name="P48"><text:span text:style-name="_3c_C_3e_"><text:span text:style-name="T23">}</text:span></text:span></text:p>
      <text:p text:style-name="P48"><text:span text:style-name="_2f__2f_C"><text:span text:style-name="T83">Es complicado de entender pero ahi va:</text:span></text:span></text:p>
      <text:p text:style-name="P48"><text:span text:style-name="_2f__2f_C"><text:span text:style-name="T83">cuando hay un un let siempre es una asignación a una variable. pero podemos hacerlo dentro de un if. La forma de leer esto es de derecha a izquierda, por que como se puede ver hay una = no ==. entonces esto se estructura asi:<text:line-break/></text:span></text:span></text:p>
      <text:p text:style-name="P48"><text:span text:style-name="_3c_C_2b__2b__3e_"><text:span text:style-name="T6">if let PLANTILLA (nueva variable) = algo que existe o no.</text:span></text:span></text:p>
      <text:p text:style-name="P48"><text:span text:style-name="_2f__2f_C"><text:span text:style-name="T83"/></text:span></text:p>
      <text:p text:style-name="P48"><text:span text:style-name="_2f__2f_C"><text:span text:style-name="T83">asi que se leería, que si esto: </text:span></text:span><text:span text:style-name="_3c_C_2b__2b__3e_"><text:span text:style-name="T6">self.status</text:span></text:span><text:span text:style-name="_2f__2f_C"><text:span text:style-name="T83"> existe y se adapta a que sea un </text:span></text:span><text:span text:style-name="_3c_C_3e_"><text:span text:style-name="T23">Status::EnProgreso { asignado_a },</text:span></text:span><text:span text:style-name="_2f__2f_C"><text:span text:style-name="T83"> entonces mete ese </text:span></text:span><text:span text:style-name="_3c_C_3e_"><text:span text:style-name="T23">asignado_a</text:span></text:span><text:span text:style-name="_2f__2f_C"><text:span text:style-name="T83"> dentro de la variable </text:span></text:span><text:span text:style-name="_3c_C_3e_"><text:span text:style-name="T23">kk</text:span></text:span><text:span text:style-name="_2f__2f_C"><text:span text:style-name="T83"> y devuelve ese </text:span></text:span><text:span text:style-name="_3c_C_3e_"><text:span text:style-name="T23">kk</text:span></text:span><text:span text:style-name="_2f__2f_C"><text:span text:style-name="T83"> de esta forma </text:span></text:span><text:span text:style-name="_3c_C_3e_"><text:span text:style-name="T23">{ kk }</text:span></text:span><text:span text:style-name="_2f__2f_C"><text:span text:style-name="T83">.</text:span></text:span><text:span text:style-name="_2f__2f_C"><text:span text:style-name="T84"> El meter ese valor, se llama DESTRUCTURACION. Sacar el valor de la caja y meterlo dentro.</text:span></text:span></text:p>
      <text:p text:style-name="P49"><text:span text:style-name="_2f__2f_C"><text:span text:style-name="T84">Por qué es necesario? por que quizá podríamos pensar hacer un:</text:span></text:span></text:p>
      <text:p text:style-name="P49"><text:span text:style-name="_3c_C_3e_"><text:span text:style-name="T23">if Status::EnProgreso.asignado_a == {asignado_a = paco}</text:span></text:span><text:span text:style-name="_2f__2f_C"><text:span text:style-name="T84"> pero primero no sabemos a quien está asignado, y segundo que pasaría si no existe ese </text:span></text:span><text:span text:style-name="_3c_C_3e_"><text:span text:style-name="T6">EnProgreso</text:span></text:span><text:span text:style-name="_2f__2f_C"><text:span text:style-name="T84"> y es un </text:span></text:span><text:span text:style-name="_3c_C_3e_"><text:span text:style-name="T23">Status::Hecho</text:span></text:span><text:span text:style-name="_2f__2f_C"><text:span text:style-name="T84">? no existiría el </text:span></text:span><text:span text:style-name="_3c_C_3e_"><text:span text:style-name="T23">.asignado_a</text:span></text:span><text:span text:style-name="_2f__2f_C"><text:span text:style-name="T84">, y por lo tanto daría un </text:span></text:span><text:span text:style-name="_3c_C_2b__2b__3e_"><text:span text:style-name="T6">segfaul</text:span></text:span><text:span text:style-name="_2f__2f_C"><text:span text:style-name="T84">.</text:span></text:span></text:p>
      <text:p text:style-name="P48"><text:span text:style-name="_2f__2f_C"><text:span text:style-name="T83">Todo se podría haber resumido asi:</text:span></text:span></text:p>
      <text:p text:style-name="P48"><text:span text:style-name="_3c_C_3e_"><text:span text:style-name="T23">if let Status::EnProgreso { </text:span></text:span><text:span text:style-name="_3c_C_2b__2b__3e_"><text:span text:style-name="T6">asignado_a</text:span></text:span><text:span text:style-name="_3c_C_3e_"><text:span text:style-name="T23"> } = &amp;self.status { </text:span></text:span><text:span text:style-name="_3c_C_2b__2b__3e_"><text:span text:style-name="T6">asignado_a</text:span></text:span><text:span text:style-name="_3c_C_3e_"><text:span text:style-name="T23"> } else....</text:span></text:span></text:p>
      <text:h text:style-name="P50" text:outline-level="3" text:is-list-header="true"><text:span text:style-name="_3c_C_3e_"><text:span text:style-name="T85"/></text:span></text:h>
      <text:h text:style-name="P47" text:outline-level="3"><text:span text:style-name="_3c_C_3e_"><text:span text:style-name="T67">FUNCIONES</text:span></text:span><text:span text:style-name="_3c_C_3e_"><text:span text:style-name="T86"> CLOSURE |parametros|</text:span></text:span></text:h>
      <text:p text:style-name="P51"><text:span text:style-name="_2f__2f_C"><text:span text:style-name="T87">Hay veces que queremos pasar una funcion mas limpiamente o mas corta. Se puede definir la normal como:<text:line-break/></text:span></text:span></text:p>
      <text:p text:style-name="P51"><text:soft-page-break/><text:span text:style-name="_3c_C_3e_"><text:span text:style-name="T12">fn sumar (x: i32, y: i32) -&gt; i32{</text:span></text:span></text:p>
      <text:p text:style-name="P51"><text:span text:style-name="_3c_C_3e_"><text:span text:style-name="T12"><text:tab/>x + y</text:span></text:span></text:p>
      <text:p text:style-name="P51"><text:span text:style-name="_3c_C_3e_"><text:span text:style-name="T12">}</text:span></text:span></text:p>
      <text:p text:style-name="P51"><text:span text:style-name="_2f__2f_C"><text:span text:style-name="T87">Pero podemos hacerla Closure:</text:span></text:span></text:p>
      <text:p text:style-name="P51"><text:span text:style-name="_3c_C_2b__2b__3e_"><text:span text:style-name="T15">let sumar = |x</text:span></text:span><text:span text:style-name="_3c_C_2b__2b__3e_"><text:span text:style-name="T88">,</text:span></text:span><text:span text:style-name="_3c_C_2b__2b__3e_"><text:span text:style-name="T15"> y| x + y;</text:span></text:span></text:p>
      <text:p text:style-name="P51"><text:span text:style-name="_2f__2f_C"><text:span text:style-name="T87">y se la llama como:</text:span></text:span></text:p>
      <text:p text:style-name="P51"><text:span text:style-name="_3c_C_3e_"><text:span text:style-name="T89">let resultado = </text:span></text:span><text:span text:style-name="_3c_C_3e_"><text:span text:style-name="T12">sumar(2, 3);</text:span></text:span></text:p>
      <text:p text:style-name="P51"><text:span text:style-name="_2f__2f_C"><text:span text:style-name="T87">esto mismo se puede hacer en una unica linea asi:</text:span></text:span></text:p>
      <text:p text:style-name="P51"><text:span text:style-name="_3c_C_2b__2b__3e_"><text:span text:style-name="T15">let sumar = </text:span></text:span><text:span text:style-name="_3c_C_2b__2b__3e_"><text:span text:style-name="T88">(</text:span></text:span><text:span text:style-name="_3c_C_2b__2b__3e_"><text:span text:style-name="T15">|x</text:span></text:span><text:span text:style-name="_3c_C_2b__2b__3e_"><text:span text:style-name="T88">,</text:span></text:span><text:span text:style-name="_3c_C_2b__2b__3e_"><text:span text:style-name="T15"> y| x + y</text:span></text:span><text:span text:style-name="_3c_C_2b__2b__3e_"><text:span text:style-name="T88">)(2, 3);</text:span></text:span></text:p>
      <text:p text:style-name="P51"><text:span text:style-name="_2f__2f_C"><text:span text:style-name="T87"/></text:span></text:p>
      <text:p text:style-name="P51"><text:span text:style-name="_2f__2f_C"><text:span text:style-name="T87"/></text:span></text:p>
      <text:h text:style-name="P52" text:outline-level="3"><text:span text:style-name="_3c_C_3e_"><text:span text:style-name="T90">SOBRECARGA DE OPERADORES</text:span></text:span></text:h>
      <text:p text:style-name="P53"><text:span text:style-name="_2f__2f_C"><text:span text:style-name="T91">Rust tiene sobrecarga de operadores, y la forma de declararlos es en el </text:span></text:span><text:span text:style-name="_3c_C_2b__2b__3e_"><text:span text:style-name="T15">impl</text:span></text:span><text:span text:style-name="_2f__2f_C"><text:span text:style-name="T91"> de tal forma:</text:span></text:span></text:p>
      <text:p text:style-name="P54"><text:span text:style-name="_3c_C_3e_"><text:span text:style-name="T12">use std::ops::Add;</text:span></text:span><text:span text:style-name="_2f__2f_C"><text:span text:style-name="T92"> </text:span></text:span><text:span text:style-name="_2f__2f_C"><text:span text:style-name="T93">//importa el trait (el operador) de Add. Si no no se puede usar. </text:span></text:span><text:span text:style-name="_2f__2f_C"><text:span text:style-name="T94">Para implementar muchos poner:</text:span></text:span></text:p>
      <text:p text:style-name="P55"><text:span text:style-name="_2f__2f_C"><text:span text:style-name="T95">use</text:span></text:span><text:span text:style-name="_2f__2f_C"><text:span text:style-name="T96"> </text:span></text:span><text:span text:style-name="_2f__2f_C"><text:span text:style-name="T97">std</text:span></text:span><text:span text:style-name="_2f__2f_C"><text:span text:style-name="T98">::</text:span></text:span><text:span text:style-name="_2f__2f_C"><text:span text:style-name="T97">ops</text:span></text:span><text:span text:style-name="_2f__2f_C"><text:span text:style-name="T98">::</text:span></text:span><text:span text:style-name="_2f__2f_C"><text:span text:style-name="T96">{</text:span></text:span><text:span text:style-name="_2f__2f_C"><text:span text:style-name="T97">Add</text:span></text:span><text:span text:style-name="_2f__2f_C"><text:span text:style-name="T96">, </text:span></text:span><text:span text:style-name="_2f__2f_C"><text:span text:style-name="T97">AddAssign</text:span></text:span><text:span text:style-name="_2f__2f_C"><text:span text:style-name="T96">, </text:span></text:span><text:span text:style-name="_2f__2f_C"><text:span text:style-name="T97">Sub</text:span></text:span><text:span text:style-name="_2f__2f_C"><text:span text:style-name="T96">, </text:span></text:span><text:span text:style-name="_2f__2f_C"><text:span text:style-name="T97">SubAssign</text:span></text:span><text:span text:style-name="_2f__2f_C"><text:span text:style-name="T96">, </text:span></text:span><text:span text:style-name="_2f__2f_C"><text:span text:style-name="T97">Mul</text:span></text:span><text:span text:style-name="_2f__2f_C"><text:span text:style-name="T96">, </text:span></text:span><text:span text:style-name="_2f__2f_C"><text:span text:style-name="T97">MulAssign</text:span></text:span><text:span text:style-name="_2f__2f_C"><text:span text:style-name="T96">, </text:span></text:span><text:span text:style-name="_2f__2f_C"><text:span text:style-name="T97">Div</text:span></text:span><text:span text:style-name="_2f__2f_C"><text:span text:style-name="T96">, </text:span></text:span><text:span text:style-name="_2f__2f_C"><text:span text:style-name="T97">DivAssign</text:span></text:span><text:span text:style-name="_2f__2f_C"><text:span text:style-name="T96">};</text:span></text:span></text:p>
      <text:p text:style-name="P54"><text:span text:style-name="_2f__2f_C"><text:span text:style-name="T94"/></text:span></text:p>
      <text:p text:style-name="P56"><text:span text:style-name="_2f__2f_C"><text:span text:style-name="T41">// Es muy útil derivar Copy y Clone para tipos matemáticos simples </text:span></text:span><text:span text:style-name="_2f__2f_C"><text:span text:style-name="T99">hay que hacerlo copy por que sino será un clone que pierde su propiedad y no se puede usar al pasarlo a dicha función.</text:span></text:span></text:p>
      <text:p text:style-name="P56"><text:span text:style-name="_3c_C_2b__2b__3e_"><text:span text:style-name="T43">#[derive(Debug, Clone, Copy)]</text:span></text:span></text:p>
      <text:p text:style-name="P53"><text:span text:style-name="_3c_C_3e_"><text:span text:style-name="T12">struct Vector3{...}</text:span></text:span></text:p>
      <text:p text:style-name="P53"><text:span text:style-name="_3c_C_2b__2b__3e_"><text:span text:style-name="T15">impl</text:span></text:span><text:span text:style-name="_3c_C_3e_"><text:span text:style-name="T12"><text:tab/></text:span></text:span><text:span text:style-name="_3c_C_2b__2b__3e_"><text:span text:style-name="T15">Add</text:span></text:span><text:span text:style-name="_3c_C_3e_"><text:span text:style-name="T12"> for Vector3{</text:span></text:span></text:p>
      <text:p text:style-name="P53"><text:span text:style-name="_3c_C_3e_"><text:span text:style-name="T12"><text:tab/>type Output = Vect</text:span></text:span><text:span text:style-name="_3c_C_3e_"><text:span text:style-name="T93">or</text:span></text:span><text:span text:style-name="_3c_C_3e_"><text:span text:style-name="T12">3; </text:span></text:span><text:span text:style-name="_2f__2f_C"><text:span text:style-name="T12">//el resultado de la operacion v1 + v2 sera un Vect3</text:span></text:span></text:p>
      <text:p text:style-name="P53"><text:span text:style-name="_3c_C_3e_"><text:span text:style-name="T12"><text:tab/>fn </text:span></text:span><text:span text:style-name="_3c_C_2b__2b__3e_"><text:span text:style-name="T15">add</text:span></text:span><text:span text:style-name="_3c_C_3e_"><text:span text:style-name="T12">(self, other: Vect</text:span></text:span><text:span text:style-name="_3c_C_3e_"><text:span text:style-name="T93">or</text:span></text:span><text:span text:style-name="_3c_C_3e_"><text:span text:style-name="T12">3) -&gt; Vect</text:span></text:span><text:span text:style-name="_3c_C_3e_"><text:span text:style-name="T93">or</text:span></text:span><text:span text:style-name="_3c_C_3e_"><text:span text:style-name="T12">3{…}</text:span></text:span></text:p>
      <text:p text:style-name="P56"><text:span text:style-name="_2f__2f_C"><text:span text:style-name="T100">Como se ve, necesita el tipo de output, es decir lo <text:s/>que va a devolver, por que podría ser cualquier otra cosa. Pero en los de asignación no hay que ponerlo:</text:span></text:span></text:p>
      <text:p text:style-name="P56"><text:span text:style-name="_3c_C_3e_"><text:span text:style-name="T12">impl </text:span></text:span><text:span text:style-name="_3c_C_2b__2b__3e_"><text:span text:style-name="T15">AddAssign</text:span></text:span><text:span text:style-name="_3c_C_3e_"><text:span text:style-name="T12"> for Vector3{</text:span></text:span></text:p>
      <text:p text:style-name="P56"><text:span text:style-name="_3c_C_3e_"><text:span text:style-name="T12"><text:tab/>fn </text:span></text:span><text:span text:style-name="_3c_C_2b__2b__3e_"><text:span text:style-name="T15">add_assign</text:span></text:span><text:span text:style-name="_3c_C_3e_"><text:span text:style-name="T12">(</text:span></text:span><text:span text:style-name="_3c_C_2b__2b__3e_"><text:span text:style-name="T15">&amp;mut </text:span></text:span><text:span text:style-name="_3c_C_3e_"><text:span text:style-name="T12">self, other: Vector3){</text:span></text:span></text:p>
      <text:p text:style-name="P56"><text:span text:style-name="_3c_C_3e_"><text:span text:style-name="T12"><text:tab/><text:tab/>self.x += other.x;</text:span></text:span></text:p>
      <text:p text:style-name="P56"><text:span text:style-name="_3c_C_3e_"><text:span text:style-name="T12"><text:tab/><text:tab/>self.y += other.y;</text:span></text:span></text:p>
      <text:p text:style-name="P56"><text:span text:style-name="_3c_C_3e_"><text:span text:style-name="T12"><text:tab/><text:tab/>self.z += other.z;</text:span></text:span></text:p>
      <text:p text:style-name="P56"><text:span text:style-name="_3c_C_3e_"><text:span text:style-name="T12"><text:tab/>}</text:span></text:span></text:p>
      <text:p text:style-name="P56"><text:span text:style-name="_3c_C_3e_"><text:span text:style-name="T12">}</text:span></text:span></text:p>
      <text:p text:style-name="P53"><text:soft-page-break/><text:span text:style-name="_3c_C_3e_"><text:span text:style-name="T12"/></text:span></text:p>
      <text:p text:style-name="P57"><text:span text:style-name="_2f__2f_C"><text:span text:style-name="T101">La sobrecarga es con nombre may</text:span></text:span><text:span text:style-name="_2f__2f_C"><text:span text:style-name="T102">ú</text:span></text:span><text:span text:style-name="_2f__2f_C"><text:span text:style-name="T101">scula, y la funci</text:span></text:span><text:span text:style-name="_2f__2f_C"><text:span text:style-name="T102">ón</text:span></text:span><text:span text:style-name="_2f__2f_C"><text:span text:style-name="T101"> en min</text:span></text:span><text:span text:style-name="_2f__2f_C"><text:span text:style-name="T102">ú</text:span></text:span><text:span text:style-name="_2f__2f_C"><text:span text:style-name="T101">scula pero llamada igual. La lista es la siguiente para las sobrecargas (entre par</text:span></text:span><text:span text:style-name="_2f__2f_C"><text:span text:style-name="T102">éntesis el nombre a la función)</text:span></text:span><text:span text:style-name="_2f__2f_C"><text:span text:style-name="T101">:</text:span></text:span></text:p>
      <text:p text:style-name="P58"><text:span text:style-name="_2f__2f_C"><text:span text:style-name="T103">+<text:tab/>-&gt; <text:tab/>Add (add)<text:tab/><text:tab/><text:tab/><text:tab/></text:span></text:span><text:span text:style-name="_2f__2f_C"><text:span text:style-name="T104"><text:tab/><text:tab/><text:tab/><text:tab/></text:span></text:span><text:span text:style-name="_2f__2f_C"><text:span text:style-name="T103">+=<text:tab/>-&gt;<text:tab/><text:tab/>AddAssign (add</text:span></text:span><text:span text:style-name="_2f__2f_C"><text:span text:style-name="T105">_</text:span></text:span><text:span text:style-name="_2f__2f_C"><text:span text:style-name="T103">assign)<text:tab/><text:tab/><text:tab/><text:tab/><text:tab/></text:span></text:span></text:p>
      <text:p text:style-name="P58"><text:span text:style-name="_2f__2f_C"><text:span text:style-name="T103">-<text:tab/>-&gt;<text:tab/></text:span></text:span><text:span text:style-name="_2f__2f_C"><text:span text:style-name="T105"><text:tab/></text:span></text:span><text:span text:style-name="_2f__2f_C"><text:span text:style-name="T103">Sub (sub)</text:span></text:span><text:span text:style-name="_2f__2f_C"><text:span text:style-name="T105"><text:tab/><text:tab/><text:tab/><text:tab/></text:span></text:span><text:span text:style-name="_2f__2f_C"><text:span text:style-name="T104"><text:tab/><text:tab/><text:tab/><text:tab/></text:span></text:span><text:span text:style-name="_2f__2f_C"><text:span text:style-name="T105">-=<text:tab/><text:tab/>-&gt;<text:tab/><text:tab/>SubAssign (sub_assign)</text:span></text:span></text:p>
      <text:p text:style-name="P59"><text:span text:style-name="_2f__2f_C"><text:span text:style-name="T103">*<text:tab/>-&gt;<text:tab/><text:tab/>Mul (mul)</text:span></text:span><text:span text:style-name="_2f__2f_C"><text:span text:style-name="T105"><text:tab/><text:tab/><text:tab/><text:tab/></text:span></text:span><text:span text:style-name="_2f__2f_C"><text:span text:style-name="T104"><text:tab/><text:tab/><text:tab/><text:tab/></text:span></text:span><text:span text:style-name="_2f__2f_C"><text:span text:style-name="T105">*=<text:tab/><text:tab/>-&gt;<text:tab/><text:tab/>MulAssign (mul_assign)</text:span></text:span></text:p>
      <text:p text:style-name="P59"><text:span text:style-name="_2f__2f_C"><text:span text:style-name="T105">/</text:span></text:span><text:span text:style-name="_2f__2f_C"><text:span text:style-name="T106"><text:tab/></text:span></text:span><text:span text:style-name="_2f__2f_C"><text:span text:style-name="T105">-&gt;<text:tab/><text:tab/>Div (div)<text:tab/><text:tab/><text:tab/><text:tab/><text:tab/></text:span></text:span><text:span text:style-name="_2f__2f_C"><text:span text:style-name="T104"><text:tab/><text:tab/><text:tab/><text:tab/></text:span></text:span><text:span text:style-name="_2f__2f_C"><text:span text:style-name="T105">/=<text:tab/><text:tab/>-&gt;<text:tab/><text:tab/>DivAssign<text:tab/>(div_assign)</text:span></text:span></text:p>
      <text:p text:style-name="P59"><text:span text:style-name="_2f__2f_C"><text:span text:style-name="T105">%</text:span></text:span><text:span text:style-name="_2f__2f_C"><text:span text:style-name="T106"> </text:span></text:span><text:span text:style-name="_2f__2f_C"><text:span text:style-name="T105"><text:tab/>-&gt;<text:tab/>Rem </text:span></text:span><text:span text:style-name="_2f__2f_C"><text:span text:style-name="T103">(rem</text:span></text:span><text:span text:style-name="_2f__2f_C"><text:span text:style-name="T105">)</text:span></text:span><text:span text:style-name="_2f__2f_C"><text:span text:style-name="T103"><text:tab/></text:span></text:span><text:span text:style-name="_2f__2f_C"><text:span text:style-name="T105"><text:tab/><text:tab/><text:tab/></text:span></text:span><text:span text:style-name="_2f__2f_C"><text:span text:style-name="T104"><text:tab/><text:tab/><text:tab/><text:tab/></text:span></text:span><text:span text:style-name="_2f__2f_C"><text:span text:style-name="T105">%=<text:tab/>-&gt;<text:tab/><text:tab/>RemAssign (rem_assign)</text:span></text:span></text:p>
      <text:p text:style-name="P60"><text:span text:style-name="_2f__2f_C"><text:span text:style-name="T103">==<text:tab/>-&gt; PartialEq</text:span></text:span><text:span text:style-name="_2f__2f_C"><text:span text:style-name="T104"> (eq)</text:span></text:span><text:span text:style-name="_2f__2f_C"><text:span text:style-name="T103"><text:tab/><text:tab/></text:span></text:span><text:span text:style-name="_2f__2f_C"><text:span text:style-name="T107"><text:tab/><text:tab/><text:tab/></text:span></text:span><text:span text:style-name="_2f__2f_C"><text:span text:style-name="T103"><text:tab/></text:span></text:span><text:span text:style-name="_2f__2f_C"><text:span text:style-name="T104">!=<text:tab/><text:tab/>-&gt;<text:tab/><text:tab/>PartialEq (</text:span></text:span><text:span text:style-name="_2f__2f_C"><text:span text:style-name="T108">ne</text:span></text:span><text:span text:style-name="_2f__2f_C"><text:span text:style-name="T104">)</text:span></text:span></text:p>
      <text:p text:style-name="P61"><text:span text:style-name="_2f__2f_C"><text:span text:style-name="T103">[ ]</text:span></text:span><text:span text:style-name="_2f__2f_C"><text:span text:style-name="T104"><text:tab/><text:tab/>-&gt;</text:span></text:span><text:span text:style-name="_2f__2f_C"><text:span text:style-name="T106"> </text:span></text:span><text:span text:style-name="_2f__2f_C"><text:span text:style-name="T104">Index (index)</text:span></text:span><text:span text:style-name="_2f__2f_C"><text:span text:style-name="T106"><text:tab/></text:span></text:span><text:span text:style-name="_2f__2f_C"><text:span text:style-name="T103"><text:tab/><text:tab/></text:span></text:span><text:span text:style-name="_2f__2f_C"><text:span text:style-name="T104"><text:tab/><text:tab/><text:tab/><text:tab/>[ ] =<text:tab/>-&gt;<text:tab/><text:tab/>IndexMut (index_mut)</text:span></text:span></text:p>
      <text:p text:style-name="P61"><text:span text:style-name="_2f__2f_C"><text:span text:style-name="T106">-x<text:tab/><text:tab/>-&gt; Neg (neg)<text:tab/><text:tab/><text:tab/><text:tab/><text:tab/><text:tab/><text:tab/><text:tab/>!x = -&gt;<text:tab/><text:tab/>Not (not)</text:span></text:span></text:p>
      <text:p text:style-name="P62"><text:span text:style-name="_2f__2f_C"><text:span text:style-name="T106">&amp;<text:tab/><text:tab/>-&gt; BitAnd (bitand)<text:tab/><text:tab/><text:tab/><text:tab/><text:tab/></text:span></text:span><text:span text:style-name="_2f__2f_C"><text:span text:style-name="T109"><text:tab/></text:span></text:span><text:span text:style-name="_2f__2f_C"><text:span text:style-name="T107">&amp;=</text:span></text:span><text:span text:style-name="_2f__2f_C"><text:span text:style-name="T106"><text:tab/>-&gt;<text:tab/><text:tab/></text:span></text:span><text:span text:style-name="_2f__2f_C"><text:span text:style-name="T107">BitAndAssign (bit_and_assign)</text:span></text:span></text:p>
      <text:p text:style-name="P62"><text:span text:style-name="_2f__2f_C"><text:span text:style-name="T107">|<text:tab/><text:tab/>-&gt; BitOr (bitor)<text:tab/><text:tab/><text:tab/><text:tab/><text:tab/><text:tab/><text:tab/>|=<text:tab/><text:tab/>-&gt;<text:tab/><text:tab/>BitOrAssign (bit_or_assign)</text:span></text:span></text:p>
      <text:p text:style-name="P62"><text:span text:style-name="_2f__2f_C"><text:span text:style-name="T107">^<text:tab/><text:tab/>-&gt;<text:tab/>BitXor (bitxor)<text:tab/><text:tab/><text:tab/><text:tab/><text:tab/><text:tab/>^=<text:tab/>-&gt;<text:tab/><text:tab/>BitXorAssign (bit_xor_assign)</text:span></text:span></text:p>
      <text:p text:style-name="P62"><text:span text:style-name="_2f__2f_C"><text:span text:style-name="T107">&lt;&lt;<text:tab/>-&gt;<text:tab/>Shl<text:tab/>(shl)<text:tab/><text:tab/><text:tab/><text:tab/><text:tab/><text:tab/><text:tab/><text:tab/><text:tab/>&lt;&lt;=<text:tab/>-&gt;<text:tab/><text:tab/>ShlAssign (shl_assign)</text:span></text:span></text:p>
      <text:p text:style-name="P62"><text:span text:style-name="_2f__2f_C"><text:span text:style-name="T107">&gt;&gt;<text:tab/>-&gt;<text:tab/>Shr<text:tab/>(shr)<text:tab/><text:tab/><text:tab/><text:tab/><text:tab/><text:tab/><text:tab/><text:tab/>&gt;&gt;=<text:tab/>-&gt;<text:tab/><text:tab/>ShrAssign (shr_assign)</text:span></text:span></text:p>
      <text:p text:style-name="P62"><text:span text:style-name="_2f__2f_C"><text:span text:style-name="T107">*x<text:tab/><text:tab/>-&gt;<text:tab/>Deref (deref)<text:tab/><text:tab/><text:tab/><text:tab/><text:tab/><text:tab/><text:tab/>*x=<text:tab/>-&gt;<text:tab/><text:tab/>DerefMut (deref_mut)</text:span></text:span></text:p>
      <text:p text:style-name="P62"><text:span text:style-name="_2f__2f_C"><text:span text:style-name="T107">x..y<text:tab/>-&gt;<text:tab/>Range </text:span></text:span><text:span text:style-name="_2f__2f_C"><text:span text:style-name="T108">(no hay</text:span></text:span><text:span text:style-name="_2f__2f_C"><text:span text:style-name="T107">)<text:tab/><text:tab/><text:tab/></text:span></text:span><text:span text:style-name="_2f__2f_C"><text:span text:style-name="T108"><text:tab/><text:tab/></text:span></text:span><text:span text:style-name="_2f__2f_C"><text:span text:style-name="T107"><text:tab/>()<text:tab/>-&gt;<text:tab/><text:tab/>Fn, FnMut, FnOnce (</text:span></text:span><text:span text:style-name="_2f__2f_C"><text:span text:style-name="T108">call</text:span></text:span><text:span text:style-name="_2f__2f_C"><text:span text:style-name="T107">)</text:span></text:span></text:p>
      <text:p text:style-name="P63"><text:span text:style-name="_2f__2f_C"><text:span text:style-name="T101"><text:tab/></text:span></text:span><text:span text:style-name="_2f__2f_C"><text:span text:style-name="T107"><text:tab/><text:tab/><text:tab/></text:span></text:span><text:span text:style-name="_2f__2f_C"><text:span text:style-name="T103">&lt;, &lt;=, &gt;, &gt;=<text:tab/>-&gt; PartialOrd (partial_cm</text:span></text:span><text:span text:style-name="_2f__2f_C"><text:span text:style-name="T108">p</text:span></text:span><text:span text:style-name="_2f__2f_C"><text:span text:style-name="T104">)</text:span></text:span><text:span text:style-name="_2f__2f_C"><text:span text:style-name="T103"><text:tab/><text:tab/></text:span></text:span></text:p>
      <text:p text:style-name="P63"><text:span text:style-name="_2f__2f_C"><text:span text:style-name="T103"/></text:span></text:p>
      <text:p text:style-name="P64"><text:span text:style-name="_2f__2f_C"><text:span text:style-name="T110">Para alterar el orden por ejemplo en una multiplicacion de un Vector3 por ejemplo seria:<text:line-break/><text:line-break/>2 * v1</text:span></text:span></text:p>
      <text:p text:style-name="P65"><text:span text:style-name="_2f__2f_C"><text:span text:style-name="T111">//como se ve el int va a la izda, pero aquí se cruza a la dcha del for por lo que el self, se refiere al tipo int, y por eso no es self.x o self.y.</text:span></text:span></text:p>
      <text:p text:style-name="P64"><text:span text:style-name="_3c_C_3e_"><text:span text:style-name="T12">impl<text:tab/><text:tab/>Mul</text:span></text:span><text:span text:style-name="_3c_C_2b__2b__3e_"><text:span text:style-name="T15">&lt;Vect3&gt;</text:span></text:span><text:span text:style-name="_3c_C_3e_"><text:span text:style-name="T12"> for </text:span></text:span><text:span text:style-name="_3c_C_2b__2b__3e_"><text:span text:style-name="T15">i32</text:span></text:span><text:span text:style-name="_3c_C_3e_"><text:span text:style-name="T12">{</text:span></text:span><text:span text:style-name="_3c_C_3e_"><text:span text:style-name="T111"> </text:span></text:span></text:p>
      <text:p text:style-name="P64"><text:span text:style-name="_3c_C_3e_"><text:span text:style-name="T12"><text:tab/>type Output = Vect3</text:span></text:span></text:p>
      <text:p text:style-name="P64"><text:span text:style-name="_3c_C_3e_"><text:span text:style-name="T12"><text:tab/>fn mul(self, other: Vect3) -&gt; Vect3{</text:span></text:span></text:p>
      <text:p text:style-name="P64"><text:span text:style-name="_3c_C_3e_"><text:span text:style-name="T12"><text:tab/><text:tab/>return Vect3 {x: </text:span></text:span><text:span text:style-name="_3c_C_2b__2b__3e_"><text:span text:style-name="T15">self</text:span></text:span><text:span text:style-name="_3c_C_3e_"><text:span text:style-name="T12"> * other.x, y: </text:span></text:span><text:span text:style-name="_3c_C_2b__2b__3e_"><text:span text:style-name="T15">self</text:span></text:span><text:span text:style-name="_3c_C_3e_"><text:span text:style-name="T12"> * other.y, z: </text:span></text:span><text:span text:style-name="_3c_C_2b__2b__3e_"><text:span text:style-name="T15">self</text:span></text:span><text:span text:style-name="_3c_C_3e_"><text:span text:style-name="T12"> * other.z}; </text:span></text:span><text:span text:style-name="_2f__2f_C"><text:span text:style-name="T12">//hay return, entonces <text:s/>;</text:span></text:span></text:p>
      <text:p text:style-name="P64"><text:span text:style-name="_3c_C_3e_"><text:span text:style-name="T12"><text:tab/>}</text:span></text:span></text:p>
      <text:p text:style-name="P64"><text:span text:style-name="_3c_C_3e_"><text:span text:style-name="T12">}</text:span></text:span></text:p>
      <text:p text:style-name="P66"><text:span text:style-name="_2f__2f_C"><text:span text:style-name="T112">v1 * 2</text:span></text:span></text:p>
      <text:p text:style-name="P65"><text:soft-page-break/><text:span text:style-name="_2f__2f_C"><text:span text:style-name="T111">//aquí el numero está a la derecha, por lo que se cruza y va a la izquierda, y en este caso el for es del Vect3 por lo que el self será self.x, self.y o self.z</text:span></text:span></text:p>
      <text:p text:style-name="P66"><text:span text:style-name="_3c_C_3e_"><text:span text:style-name="T12">impl Mul</text:span></text:span><text:span text:style-name="_3c_C_2b__2b__3e_"><text:span text:style-name="T15">&lt;i32&gt;</text:span></text:span><text:span text:style-name="_3c_C_3e_"><text:span text:style-name="T12"> for Vect3{</text:span></text:span></text:p>
      <text:p text:style-name="P66"><text:span text:style-name="_3c_C_3e_"><text:span text:style-name="T12"><text:tab/>type Output = Vect3;</text:span></text:span></text:p>
      <text:p text:style-name="P66"><text:span text:style-name="_3c_C_3e_"><text:span text:style-name="T12"><text:tab/>fn mul(self, n: i32) -&gt; Vect3{</text:span></text:span></text:p>
      <text:p text:style-name="P66"><text:span text:style-name="_3c_C_3e_"><text:span text:style-name="T12"><text:tab/><text:tab/>Vect3 {x: </text:span></text:span><text:span text:style-name="_3c_C_3e_"><text:span text:style-name="T113">s</text:span></text:span><text:span text:style-name="_3c_C_3e_"><text:span text:style-name="T12">elf.x * n , y: </text:span></text:span><text:span text:style-name="_3c_C_3e_"><text:span text:style-name="T113">s</text:span></text:span><text:span text:style-name="_3c_C_3e_"><text:span text:style-name="T12">elf.y * n, z: </text:span></text:span><text:span text:style-name="_3c_C_3e_"><text:span text:style-name="T113">s</text:span></text:span><text:span text:style-name="_3c_C_3e_"><text:span text:style-name="T12">elf.z * n} </text:span></text:span><text:span text:style-name="_2f__2f_C"><text:span text:style-name="T12">//no hay return no hay ;</text:span></text:span><text:span text:style-name="_2f__2f_C"><text:span text:style-name="T113"> El self tiene que ser en minúsculas si se devuelve el valor como aquí.. Podriamos haber puesto:</text:span></text:span></text:p>
      <text:p text:style-name="P67"><text:span text:style-name="_2f__2f_C"><text:span text:style-name="T113">ft mul(self, n: i32) -&gt; Self{. Donde ahí si que va en Mayúsculas por que es un tipo.</text:span></text:span></text:p>
      <text:p text:style-name="P66"><text:span text:style-name="_3c_C_3e_"><text:span text:style-name="T12"><text:tab/>}</text:span></text:span></text:p>
      <text:p text:style-name="P66"><text:span text:style-name="_3c_C_3e_"><text:span text:style-name="T12">}</text:span></text:span></text:p>
      <text:p text:style-name="P66"><text:span text:style-name="_2f__2f_C"><text:span text:style-name="T112">El formato es:<text:line-break/></text:span></text:span></text:p>
      <text:p text:style-name="P66"><text:span text:style-name="_3c_C_3e_"><text:span text:style-name="T12">impl Trait</text:span></text:span><text:span text:style-name="_3c_C_2b__2b__3e_"><text:span text:style-name="T15">&lt;RightHandElement&gt;</text:span></text:span><text:span text:style-name="_3c_C_3e_"><text:span text:style-name="T12"> for </text:span></text:span><text:span text:style-name="_3c_C_2b__2b__3e_"><text:span text:style-name="T15">LeftHandElement</text:span></text:span></text:p>
      <text:p text:style-name="P66"><text:span text:style-name="_2f__2f_C"><text:span text:style-name="T112">entonces el self es del tipo del LeftHandElement</text:span></text:span></text:p>
      <text:p text:style-name="P64"><text:span text:style-name="_2f__2f_C"><text:span text:style-name="T110"/></text:span></text:p>
      <text:h text:style-name="P68" text:outline-level="3"><text:span text:style-name="_3c_C_3e_"><text:span text:style-name="T90">SOBRECARGA DE OPERADORES </text:span></text:span><text:span text:style-name="_3c_C_3e_"><text:span text:style-name="T114">por instancia</text:span></text:span></text:h>
      <text:p text:style-name="P69"><text:span text:style-name="_2f__2f_C"><text:span text:style-name="T115">En la sobrecarga hemos visto que teniamos que hacer un:</text:span></text:span></text:p>
      <text:p text:style-name="P69"><text:span text:style-name="_3c_C_2b__2b__3e_"><text:span text:style-name="T15">#[derive(Debug, Clone, Copy)] </text:span></text:span><text:span text:style-name="_2f__2f_C"><text:span text:style-name="T115">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69"><text:span text:style-name="_3c_C_3e_"><text:span text:style-name="T12">use::std::ops::Add;</text:span></text:span></text:p>
      <text:p text:style-name="P69"><text:span text:style-name="_3c_C_3e_"><text:span text:style-name="T12">struct Vect3{ todo lo de x y z pero sin ser pub f32,}</text:span></text:span></text:p>
      <text:p text:style-name="P69"><text:span text:style-name="_3c_C_3e_"><text:span text:style-name="T12">impl</text:span></text:span><text:span text:style-name="_3c_C_2b__2b__3e_"><text:span text:style-name="T15">&lt;’a, ‘b&gt;</text:span></text:span><text:span text:style-name="_3c_C_3e_"><text:span text:style-name="T12"> Add</text:span></text:span><text:span text:style-name="_3c_C_2b__2b__3e_"><text:span text:style-name="T15">&lt;&amp;’b Vect3&gt;</text:span></text:span><text:span text:style-name="_3c_C_3e_"><text:span text:style-name="T12"> for </text:span></text:span><text:span text:style-name="_3c_C_2b__2b__3e_"><text:span text:style-name="T15">&amp;’a</text:span></text:span><text:span text:style-name="_3c_C_3e_"><text:span text:style-name="T12"> Vect3{</text:span></text:span><text:span text:style-name="_3c_C_3e_"><text:span text:style-name="T111"> </text:span></text:span><text:span text:style-name="_2f__2f_C"><text:span text:style-name="T111">//&lt;' le indica que será un lifetime, es decir que vivirá el tiempo suficiente mientras que esté la función aplicada de Suma. Después de</text:span></text:span></text:p>
      <text:p text:style-name="P65"><text:span text:style-name="_2f__2f_C"><text:span text:style-name="T111">impl lo declaramos y luego despueś lo usamos. en &amp;'a y &amp;'b. Es por motivos de onwership.</text:span></text:span></text:p>
      <text:p text:style-name="P69"><text:span text:style-name="_3c_C_3e_"><text:span text:style-name="T12"><text:tab/>type Output = Vect3;</text:span></text:span></text:p>
      <text:p text:style-name="P69"><text:span text:style-name="_3c_C_3e_"><text:span text:style-name="T12"><text:tab/>fn add(self, other: </text:span></text:span><text:span text:style-name="_3c_C_2b__2b__3e_"><text:span text:style-name="T15">&amp;</text:span></text:span><text:span text:style-name="_3c_C_3e_"><text:span text:style-name="T12">Vect3) → Vect3{</text:span></text:span></text:p>
      <text:p text:style-name="P69"><text:span text:style-name="_3c_C_3e_"><text:span text:style-name="T12"><text:tab/><text:tab/>x: self.x + other.x, ….</text:span></text:span></text:p>
      <text:p text:style-name="P69"><text:span text:style-name="_3c_C_3e_"><text:span text:style-name="T12"><text:tab/>}</text:span></text:span></text:p>
      <text:p text:style-name="P69"><text:span text:style-name="_3c_C_3e_"><text:span text:style-name="T12">}</text:span></text:span></text:p>
      <text:p text:style-name="P69"><text:span text:style-name="_2f__2f_C"><text:span text:style-name="T115">y para usarlo sería :</text:span></text:span></text:p>
      <text:p text:style-name="P69"><text:span text:style-name="_3c_C_3e_"><text:span text:style-name="T12">let v3 = </text:span></text:span><text:span text:style-name="_3c_C_2b__2b__3e_"><text:span text:style-name="T15">&amp;</text:span></text:span><text:span text:style-name="_3c_C_3e_"><text:span text:style-name="T12">v1 + </text:span></text:span><text:span text:style-name="_3c_C_2b__2b__3e_"><text:span text:style-name="T15">&amp;</text:span></text:span><text:span text:style-name="_3c_C_3e_"><text:span text:style-name="T12">v2;</text:span></text:span></text:p>
      <text:p text:style-name="P69"><text:span text:style-name="_3c_C_3e_"><text:span text:style-name="T12">println!(“{}”, v1.</text:span></text:span><text:span text:style-name="_3c_C_3e_"><text:span text:style-name="T116">x</text:span></text:span><text:span text:style-name="_3c_C_3e_"><text:span text:style-name="T12">); </text:span></text:span><text:span text:style-name="_2f__2f_C"><text:span text:style-name="T12">//aquí ya no daría error el compilador por que todavía existe.</text:span></text:span></text:p>
      <text:h text:style-name="P70" text:outline-level="3"><text:soft-page-break/><text:span text:style-name="_3c_C_3e_"><text:span text:style-name="T117"/></text:span></text:h>
      <text:h text:style-name="P71" text:outline-level="3"><text:span text:style-name="_3c_C_3e_"><text:span text:style-name="T118">TRAITS</text:span></text:span><text:span text:style-name="_3c_C_3e_"><text:span text:style-name="T119">. Añadir un nuevo método a un tipo</text:span></text:span></text:h>
      <text:p text:style-name="P72"><text:span text:style-name="_2f__2f_C"><text:span text:style-name="T120">Como hemos visto, podemos hacer sobrecarga de operadores para un nuevo tipo de variable que tengamos. Para ello usábamos unos traits ya definidos que los cargábamos con:</text:span></text:span></text:p>
      <text:p text:style-name="P72"><text:span text:style-name="_3c_C_2b__2b__3e_"><text:span text:style-name="T15">use std::ops::{Add, Sub, …};</text:span></text:span></text:p>
      <text:p text:style-name="P72"><text:span text:style-name="_2f__2f_C"><text:span text:style-name="T120">Pero y si quisieramos construir nuestros propios métodos a dichos tipos nuevos O A LOS YA STANDARD?</text:span></text:span></text:p>
      <text:p text:style-name="P72"><text:span text:style-name="_3c_C_2b__2b__3e_"><text:span text:style-name="T15">trait &lt;nuevo_trait&gt; {fn &lt;método&gt; (parametros)</text:span></text:span><text:span text:style-name="_3c_C_2b__2b__3e_"><text:span text:style-name="T121">;</text:span></text:span><text:span text:style-name="_3c_C_2b__2b__3e_"><text:span text:style-name="T15">}</text:span></text:span></text:p>
      <text:p text:style-name="P72"><text:span text:style-name="_2f__2f_C"><text:span text:style-name="T120">de tal forma que quedaría para saber si un numero i32 es par:</text:span></text:span></text:p>
      <text:p text:style-name="P72"><text:span text:style-name="_3c_C_2b__2b__3e_"><text:span text:style-name="T15">trait </text:span></text:span><text:span text:style-name="_3c_C_2b__2b__3e_"><text:span text:style-name="T121">E</text:span></text:span><text:span text:style-name="_3c_C_2b__2b__3e_"><text:span text:style-name="T15">sPar{ fn es_par(self) -&gt; bool;}</text:span></text:span></text:p>
      <text:p text:style-name="P72"><text:span text:style-name="_3c_C_3e_"><text:span text:style-name="T12">impl </text:span></text:span><text:span text:style-name="_3c_C_2b__2b__3e_"><text:span text:style-name="T15">EsPar</text:span></text:span><text:span text:style-name="_3c_C_3e_"><text:span text:style-name="T12"> for </text:span></text:span><text:span text:style-name="_3c_C_2b__2b__3e_"><text:span text:style-name="T15">i32</text:span></text:span><text:span text:style-name="_3c_C_3e_"><text:span text:style-name="T12">{</text:span></text:span></text:p>
      <text:p text:style-name="P72"><text:span text:style-name="_3c_C_3e_"><text:span text:style-name="T12"><text:tab/>fn </text:span></text:span><text:span text:style-name="_3c_C_2b__2b__3e_"><text:span text:style-name="T15">es_par</text:span></text:span><text:span text:style-name="_3c_C_3e_"><text:span text:style-name="T12">(self) -&gt; bool{</text:span></text:span></text:p>
      <text:p text:style-name="P72"><text:span text:style-name="_3c_C_3e_"><text:span text:style-name="T12"><text:tab/><text:tab/>self % 2 == 0 </text:span></text:span><text:span text:style-name="_2f__2f_C"><text:span text:style-name="T12">//devolvera true o false.</text:span></text:span></text:p>
      <text:p text:style-name="P72"><text:span text:style-name="_3c_C_3e_"><text:span text:style-name="T12"><text:tab/>}</text:span></text:span></text:p>
      <text:p text:style-name="P72"><text:span text:style-name="_3c_C_3e_"><text:span text:style-name="T12">}</text:span></text:span></text:p>
      <text:p text:style-name="P72"><text:span text:style-name="_2f__2f_C"><text:span text:style-name="T120">Y ahora lo podriamos implementar como:<text:line-break/></text:span></text:span><text:span text:style-name="_3c_C_3e_"><text:span text:style-name="T12">if 42i32</text:span></text:span><text:span text:style-name="_3c_C_2b__2b__3e_"><text:span text:style-name="T15">.es_par()</text:span></text:span><text:span text:style-name="_3c_C_3e_"><text:span text:style-name="T12"> {...}</text:span></text:span></text:p>
      <text:p text:style-name="P72"><text:span text:style-name="_3c_C_3e_"><text:span text:style-name="T12"/></text:span></text:p>
      <text:p text:style-name="P73"><text:span text:style-name="_2f__2f_C"><text:span text:style-name="T122">Hay que tener en cuenta que esto solo lo puede ver si está dentro del mismo módulo (archivo o no dentro de un "mod") si no habría que usar use. Por ejemplo imaginemos que implementamos </text:span></text:span><text:span text:style-name="_3c_C_3e_"><text:span text:style-name="T12">es_par()</text:span></text:span><text:span text:style-name="_2f__2f_C"><text:span text:style-name="T122"> en otro archivo paralelo al main.rs que se llama "</text:span></text:span><text:span text:style-name="_3c_C_2b__2b__3e_"><text:span text:style-name="T15">tools</text:span></text:span><text:span text:style-name="_2f__2f_C"><text:span text:style-name="T122">" pues en main tendríamos que poner:</text:span></text:span></text:p>
      <text:p text:style-name="P73"><text:span text:style-name="_3c_C_2b__2b__3e_"><text:span text:style-name="T15">mod tools;</text:span></text:span></text:p>
      <text:p text:style-name="P73"><text:span text:style-name="_3c_C_2b__2b__3e_"><text:span text:style-name="T15">use tools::EsPar;</text:span></text:span></text:p>
      <text:p text:style-name="P73"><text:span text:style-name="_2f__2f_C"><text:span text:style-name="T122">y ahí ya sí que sería visto.</text:span></text:span></text:p>
      <text:p text:style-name="P73"><text:span text:style-name="_2f__2f_C"><text:span text:style-name="T122">si hicieramos un:</text:span></text:span></text:p>
      <text:p text:style-name="P73"><text:span text:style-name="_3c_C_2b__2b__3e_"><text:span text:style-name="T15">trait....</text:span></text:span></text:p>
      <text:p text:style-name="P73"><text:span text:style-name="_3c_C_2b__2b__3e_"><text:span text:style-name="T15">impl EsPar</text:span></text:span></text:p>
      <text:p text:style-name="P73"><text:span text:style-name="_3c_C_3e_"><text:span text:style-name="T12">mod OtroCodigo{</text:span></text:span></text:p>
      <text:p text:style-name="P73"><text:span text:style-name="_3c_C_3e_"><text:span text:style-name="T12"><text:tab/></text:span></text:span><text:span text:style-name="_3c_C_2b__2b__3e_"><text:span text:style-name="T15">use super::EsPar;</text:span></text:span><text:span text:style-name="_3c_C_3e_"><text:span text:style-name="T12"> </text:span></text:span><text:span text:style-name="_2f__2f_C"><text:span text:style-name="T12">//necesario ya que estamos en otro módulo.</text:span></text:span><text:span text:style-name="_3c_C_3e_"><text:span text:style-name="T12">}</text:span></text:span></text:p>
      <text:h text:style-name="P74" text:outline-level="3"><text:span text:style-name="_3c_C_3e_"><text:span text:style-name="T118">TRAITS</text:span></text:span><text:span text:style-name="_3c_C_3e_"><text:span text:style-name="T119">. </text:span></text:span><text:span text:style-name="_3c_C_3e_"><text:span text:style-name="T123">Implementar el from e into a un tipo nuevo</text:span></text:span></text:h>
      <text:p text:style-name="P75"><text:span text:style-name="_2f__2f_C"><text:span text:style-name="T124">Para que se pueda usar el método into y from que son duales, por lo tanto al implementar el From, queda implementado el Into, no tenemos que hacer un </text:span></text:span></text:p>
      <text:p text:style-name="P75"><text:soft-page-break/><text:span text:style-name="_3c_C_3e_"><text:span text:style-name="T12">trait From</text:span></text:span><text:span text:style-name="_2f__2f_C"><text:span text:style-name="T124">... ya que ya está incluido en el "prelude" de Rust, es decir las herramientas básicas de Rust. Por lo tanto no tenemos que usar siquiera un:</text:span></text:span></text:p>
      <text:p text:style-name="P75"><text:span text:style-name="_3c_C_3e_"><text:span text:style-name="T12">use std::convert:From</text:span></text:span></text:p>
      <text:p text:style-name="P75"><text:span text:style-name="_2f__2f_C"><text:span text:style-name="T124">Recordemos que para convertir de un &amp;str a String habia que hacer:</text:span></text:span></text:p>
      <text:p text:style-name="P75"><text:span text:style-name="_3c_C_3e_"><text:span text:style-name="T15">let s = "hola"</text:span></text:span><text:span text:style-name="_3c_C_2b__2b__3e_"><text:span text:style-name="T15">.into()</text:span></text:span><text:span text:style-name="_3c_C_3e_"><text:span text:style-name="T15">;</text:span></text:span></text:p>
      <text:p text:style-name="P75"><text:span text:style-name="_2f__2f_C"><text:span text:style-name="T124">o </text:span></text:span></text:p>
      <text:p text:style-name="P75"><text:span text:style-name="_3c_C_3e_"><text:span text:style-name="T12">let s = String::</text:span></text:span><text:span text:style-name="_3c_C_2b__2b__3e_"><text:span text:style-name="T15">from</text:span></text:span><text:span text:style-name="_3c_C_3e_"><text:span text:style-name="T12">("hola");</text:span></text:span></text:p>
      <text:p text:style-name="P75"><text:span text:style-name="_2f__2f_C"><text:span text:style-name="T124">Ahora para implementarlo para un nuevo tipo:</text:span></text:span></text:p>
      <text:p text:style-name="P75"><text:span text:style-name="_3c_C_3e_"><text:span text:style-name="T12">pub struct WrappingU32{</text:span></text:span></text:p>
      <text:p text:style-name="P75"><text:span text:style-name="_3c_C_3e_"><text:span text:style-name="T12"><text:tab/>value: u32;</text:span></text:span></text:p>
      <text:p text:style-name="P75"><text:span text:style-name="_3c_C_3e_"><text:span text:style-name="T12">}</text:span></text:span></text:p>
      <text:p text:style-name="P75"><text:span text:style-name="_2f__2f_C"><text:span text:style-name="T124">hemos de hacer esto:</text:span></text:span></text:p>
      <text:p text:style-name="P75"><text:span text:style-name="_3c_C_2b__2b__3e_"><text:span text:style-name="T15">impl From&lt;u32&gt; for WrappingU32</text:span></text:span><text:span text:style-name="_3c_C_3e_"><text:span text:style-name="T12">{</text:span></text:span></text:p>
      <text:p text:style-name="P75"><text:span text:style-name="_3c_C_3e_"><text:span text:style-name="T12"><text:tab/>fn from(num: u32) -&gt; Self{</text:span></text:span></text:p>
      <text:p text:style-name="P75"><text:span text:style-name="_3c_C_3e_"><text:span text:style-name="T12"><text:tab/><text:tab/>Self{value: num}</text:span></text:span></text:p>
      <text:p text:style-name="P75"><text:span text:style-name="_3c_C_3e_"><text:span text:style-name="T12"><text:tab/>}</text:span></text:span></text:p>
      <text:p text:style-name="P75"><text:span text:style-name="_3c_C_3e_"><text:span text:style-name="T12">}</text:span></text:span></text:p>
      <text:p text:style-name="P75"><text:span text:style-name="_2f__2f_C"><text:span text:style-name="T124">y con eso ya podremos hacer cosas como:</text:span></text:span></text:p>
      <text:p text:style-name="P75"><text:span text:style-name="_3c_C_3e_"><text:span text:style-name="T12">let kk: WrappingU32 = 42</text:span></text:span><text:span text:style-name="_3c_C_2b__2b__3e_"><text:span text:style-name="T15">.into()</text:span></text:span><text:span text:style-name="_3c_C_3e_"><text:span text:style-name="T12">;</text:span></text:span></text:p>
      <text:p text:style-name="P75"><text:span text:style-name="_3c_C_3e_"><text:span text:style-name="T12">let kk = WrappingU32::</text:span></text:span><text:span text:style-name="_3c_C_2b__2b__3e_"><text:span text:style-name="T15">from(42)</text:span></text:span><text:span text:style-name="_3c_C_3e_"><text:span text:style-name="T12">;</text:span></text:span></text:p>
      <text:p text:style-name="P75"><text:span text:style-name="_3c_C_3e_"><text:span text:style-name="T12"/></text:span></text:p>
      <text:h text:style-name="P76" text:outline-level="3"><text:span text:style-name="_3c_C_3e_"><text:span text:style-name="T118">TRAITS</text:span></text:span><text:span text:style-name="_3c_C_3e_"><text:span text:style-name="T119">. Para el uso de Templates en sobrecarga operadores</text:span></text:span></text:h>
      <text:p text:style-name="P65"><text:span text:style-name="_2f__2f_C"><text:span text:style-name="T125">Hemos visto que se puede hacer la sobrecarga de operadores de la multiplicación</text:span></text:span><text:span text:style-name="_2f__2f_C"><text:span text:style-name="T126"> por un número. Pero y si queremos que pueda ser de cualquier tipo que sean números. Usamos los templates como en C++:<text:line-break/></text:span></text:span></text:p>
      <text:p text:style-name="P77"><text:span text:style-name="_2f__2f_C"><text:span text:style-name="T12">//Hay que añadir la dependencia de "num-traits" en el Cargo.toml</text:span></text:span><text:span text:style-name="_2f__2f_C"><text:span text:style-name="T127">. Debajo de [Dependencies] poner</text:span></text:span></text:p>
      <text:p text:style-name="P78"><text:span text:style-name="_2f__2f_C"><text:span text:style-name="T127">//num-traits = "0.2"</text:span></text:span></text:p>
      <text:p text:style-name="P77"><text:span text:style-name="_3c_C_3e_"><text:span text:style-name="T12">use std::ops:Mul;</text:span></text:span></text:p>
      <text:p text:style-name="P77"><text:span text:style-name="_3c_C_2b__2b__3e_"><text:span text:style-name="T15">use num_traits::Num;</text:span></text:span><text:span text:style-name="_3c_C_3e_"><text:span text:style-name="T12"> </text:span></text:span><text:span text:style-name="_2f__2f_C"><text:span text:style-name="T12">//esto es un TRAIT e incluye cualquier número (i32, f64, u8, etc..)</text:span></text:span></text:p>
      <text:p text:style-name="P77"><text:span text:style-name="_2f__2f_C"><text:span text:style-name="T128">//</text:span></text:span><text:span text:style-name="_2f__2f_C"><text:span text:style-name="T12">1. Hacemos que el struct acepte cualquier tipo T que sea un número:</text:span></text:span></text:p>
      <text:p text:style-name="P77"><text:span text:style-name="_3c_C_3e_"><text:span text:style-name="T12">pub struct Vect3</text:span></text:span><text:span text:style-name="_3c_C_2b__2b__3e_"><text:span text:style-name="T15">&lt;T&gt;</text:span></text:span><text:span text:style-name="_3c_C_3e_"><text:span text:style-name="T12">{pub x: </text:span></text:span><text:span text:style-name="_3c_C_2b__2b__3e_"><text:span text:style-name="T15">T</text:span></text:span><text:span text:style-name="_3c_C_3e_"><text:span text:style-name="T12">, pub y: </text:span></text:span><text:span text:style-name="_3c_C_2b__2b__3e_"><text:span text:style-name="T15">T</text:span></text:span><text:span text:style-name="_3c_C_3e_"><text:span text:style-name="T12">, pub z: </text:span></text:span><text:span text:style-name="_3c_C_2b__2b__3e_"><text:span text:style-name="T15">T</text:span></text:span><text:span text:style-name="_3c_C_3e_"><text:span text:style-name="T12">,}</text:span></text:span></text:p>
      <text:p text:style-name="P77"><text:span text:style-name="_2f__2f_C"><text:span text:style-name="T128">//</text:span></text:span><text:span text:style-name="_2f__2f_C"><text:span text:style-name="T12">2. implementamos la multiplicación para cualquier número T</text:span></text:span></text:p>
      <text:p text:style-name="P77"><text:span text:style-name="_3c_C_3e_"><text:span text:style-name="T12">impl</text:span></text:span><text:span text:style-name="_3c_C_2b__2b__3e_"><text:span text:style-name="T15">&lt;T&gt;</text:span></text:span><text:span text:style-name="_3c_C_3e_"><text:span text:style-name="T12"> Mul</text:span></text:span><text:span text:style-name="_3c_C_2b__2b__3e_"><text:span text:style-name="T15">&lt;T&gt;</text:span></text:span><text:span text:style-name="_3c_C_3e_"><text:span text:style-name="T12"> for Vect3</text:span></text:span><text:span text:style-name="_3c_C_2b__2b__3e_"><text:span text:style-name="T15">&lt;T&gt;</text:span></text:span></text:p>
      <text:p text:style-name="P77"><text:span text:style-name="_3c_C_2b__2b__3e_"><text:span text:style-name="T15">where</text:span></text:span></text:p>
      <text:p text:style-name="P77"><text:soft-page-break/><text:span text:style-name="_3c_C_3e_"><text:span text:style-name="T12"><text:tab/></text:span></text:span><text:span text:style-name="_2f__2f_C"><text:span text:style-name="T15">//esto es la condición y nos dice que T tiene que ser un número y poder copiarse</text:span></text:span></text:p>
      <text:p text:style-name="P77"><text:span text:style-name="_3c_C_3e_"><text:span text:style-name="T12"><text:tab/></text:span></text:span><text:span text:style-name="_3c_C_2b__2b__3e_"><text:span text:style-name="T15">T: Num + Copy</text:span></text:span><text:span text:style-name="_3c_C_2b__2b__3e_"><text:span text:style-name="T129">, </text:span></text:span><text:span text:style-name="_2f__2f_C"><text:span text:style-name="T129">//fijarse que es , no ; el + inica "and"</text:span></text:span></text:p>
      <text:p text:style-name="P78"><text:span text:style-name="_2f__2f_C"><text:span text:style-name="T129">//si hubieramos querido hacerlo con un solo tipo, podriamos heberlo metido, pero también asi:</text:span></text:span></text:p>
      <text:p text:style-name="P78"><text:span text:style-name="_2f__2f_C"><text:span text:style-name="T129">//T: Mul&lt;f32, Output = T&gt; + Copy //Cuantas más lineas como esta más restrictivo. Mul&lt;f32&gt; es que se pueda multiplicar por un float. y Output = T indica que el resultado sea uno de Tipo T.</text:span></text:span></text:p>
      <text:p text:style-name="P77"><text:span text:style-name="_3c_C_3e_"><text:span text:style-name="T12">{</text:span></text:span></text:p>
      <text:p text:style-name="P77"><text:span text:style-name="_3c_C_3e_"><text:span text:style-name="T12"><text:tab/>type Output = Vect3</text:span></text:span><text:span text:style-name="_3c_C_2b__2b__3e_"><text:span text:style-name="T15">&lt;T&gt;</text:span></text:span><text:span text:style-name="_3c_C_3e_"><text:span text:style-name="T12">; </text:span></text:span><text:span text:style-name="_2f__2f_C"><text:span text:style-name="T12">//la salida tiene que ser un struct del mismo tipo</text:span></text:span></text:p>
      <text:p text:style-name="P77"><text:span text:style-name="_3c_C_3e_"><text:span text:style-name="T12"><text:s/><text:tab/>fn mul(self, n: </text:span></text:span><text:span text:style-name="_3c_C_2b__2b__3e_"><text:span text:style-name="T15">T</text:span></text:span><text:span text:style-name="_3c_C_3e_"><text:span text:style-name="T12">) -&gt; Vect3</text:span></text:span><text:span text:style-name="_3c_C_2b__2b__3e_"><text:span text:style-name="T15">&lt;T&gt;</text:span></text:span><text:span text:style-name="_3c_C_3e_"><text:span text:style-name="T12"> {</text:span></text:span></text:p>
      <text:p text:style-name="P78"><text:span text:style-name="_3c_C_3e_"><text:span text:style-name="T127"><text:tab/><text:tab/>Vect3{</text:span></text:span></text:p>
      <text:p text:style-name="P77"><text:span text:style-name="_3c_C_3e_"><text:span text:style-name="T12"><text:tab/><text:tab/></text:span></text:span><text:span text:style-name="_3c_C_3e_"><text:span text:style-name="T127"><text:tab/></text:span></text:span><text:span text:style-name="_3c_C_3e_"><text:span text:style-name="T12">x: self.x * n</text:span></text:span><text:span text:style-name="_3c_C_3e_"><text:span text:style-name="T127">,</text:span></text:span><text:span text:style-name="_3c_C_3e_"><text:span text:style-name="T12"> </text:span></text:span><text:span text:style-name="_2f__2f_C"><text:span text:style-name="T12">//Rust ya sabe que se puede multiplicar por que es un Num</text:span></text:span></text:p>
      <text:p text:style-name="P77"><text:span text:style-name="_3c_C_3e_"><text:span text:style-name="T12"><text:tab/><text:tab/></text:span></text:span><text:span text:style-name="_3c_C_3e_"><text:span text:style-name="T127"><text:tab/></text:span></text:span><text:span text:style-name="_3c_C_3e_"><text:span text:style-name="T12">y: self.y * n</text:span></text:span><text:span text:style-name="_3c_C_3e_"><text:span text:style-name="T127">,</text:span></text:span><text:span text:style-name="_3c_C_3e_"><text:span text:style-name="T12"> </text:span></text:span><text:span text:style-name="_3c_C_3e_"><text:span text:style-name="T128">//</text:span></text:span><text:span text:style-name="_2f__2f_C"><text:span text:style-name="T12">etc....</text:span></text:span></text:p>
      <text:p text:style-name="P78"><text:span text:style-name="_3c_C_3e_"><text:span text:style-name="T12"><text:tab/></text:span></text:span><text:span text:style-name="_3c_C_3e_"><text:span text:style-name="T127"><text:tab/>}</text:span></text:span></text:p>
      <text:p text:style-name="P78"><text:span text:style-name="_3c_C_3e_"><text:span text:style-name="T127"><text:tab/></text:span></text:span><text:span text:style-name="_3c_C_3e_"><text:span text:style-name="T12">}</text:span></text:span></text:p>
      <text:p text:style-name="P77"><text:span text:style-name="_3c_C_3e_"><text:span text:style-name="T12">}</text:span></text:span></text:p>
      <text:p text:style-name="P77"><text:span text:style-name="_2f__2f_C"><text:span text:style-name="T126"/></text:span></text:p>
      <text:p text:style-name="P79"><text:span text:style-name="_3c_C_3e_"><text:span text:style-name="T130"/></text:span></text:p>
      <text:h text:style-name="P70" text:outline-level="3"><text:span text:style-name="_3c_C_3e_"><text:span text:style-name="T117">WHILE</text:span></text:span></text:h>
      <text:p text:style-name="P80"><text:span text:style-name="_2f__2f_C"><text:span text:style-name="T131">El bucle while es:</text:span></text:span></text:p>
      <text:p text:style-name="P80"><text:span text:style-name="_3c_C_3e_"><text:span text:style-name="T12">let mut i: u32 = 1;<text:line-break/></text:span></text:span><text:span text:style-name="_3c_C_2b__2b__3e_"><text:span text:style-name="T15">while i &lt; 10 &amp;&amp; i &gt; 0</text:span></text:span><text:span text:style-name="_3c_C_3e_"><text:span text:style-name="T12">{</text:span></text:span></text:p>
      <text:p text:style-name="P80"><text:span text:style-name="_3c_C_3e_"><text:span text:style-name="T12"><text:tab/>....</text:span></text:span></text:p>
      <text:p text:style-name="P80"><text:span text:style-name="_3c_C_3e_"><text:span text:style-name="T12"><text:tab/>i += 1;</text:span></text:span></text:p>
      <text:p text:style-name="P80"><text:span text:style-name="_3c_C_3e_"><text:span text:style-name="T12">}</text:span></text:span></text:p>
      <text:p text:style-name="P81"><text:span text:style-name="_2f__2f_C"><text:span text:style-name="T132">La condici</text:span></text:span><text:span text:style-name="_2f__2f_C"><text:span text:style-name="T133">ón</text:span></text:span><text:span text:style-name="_2f__2f_C"><text:span text:style-name="T132"> nunca va entre par</text:span></text:span><text:span text:style-name="_2f__2f_C"><text:span text:style-name="T133">é</text:span></text:span><text:span text:style-name="_2f__2f_C"><text:span text:style-name="T132">ntesis para evitar la confusi</text:span></text:span><text:span text:style-name="_2f__2f_C"><text:span text:style-name="T133">ón</text:span></text:span><text:span text:style-name="_2f__2f_C"><text:span text:style-name="T132"> de C ya que en rust la condici</text:span></text:span><text:span text:style-name="_2f__2f_C"><text:span text:style-name="T133">ón</text:span></text:span><text:span text:style-name="_2f__2f_C"><text:span text:style-name="T132"> es una expresi</text:span></text:span><text:span text:style-name="_2f__2f_C"><text:span text:style-name="T133">ón</text:span></text:span><text:span text:style-name="_2f__2f_C"><text:span text:style-name="T132"> booleana. Esto es un error:</text:span></text:span></text:p>
      <text:p text:style-name="P81"><text:span text:style-name="_3c_C_3e_"><text:span text:style-name="T12">while 5</text:span></text:span><text:span text:style-name="_2f__2f_C"><text:span text:style-name="T132"> o </text:span></text:span><text:span text:style-name="_3c_C_3e_"><text:span text:style-name="T12">while (5)</text:span></text:span></text:p>
      <text:h text:style-name="P70" text:outline-level="3"><text:span text:style-name="_3c_C_3e_"><text:span text:style-name="T134"/></text:span></text:h>
      <text:h text:style-name="P70" text:outline-level="3"><text:span text:style-name="_3c_C_3e_"><text:span text:style-name="T134"/></text:span></text:h>
      <text:h text:style-name="P70" text:outline-level="3"><text:span text:style-name="_3c_C_3e_"><text:span text:style-name="T117">LOOP</text:span></text:span></text:h>
      <text:p text:style-name="P80"><text:span text:style-name="_2f__2f_C"><text:span text:style-name="T131">loop es infinito a no ser que se saque</text:span></text:span></text:p>
      <text:p text:style-name="P80"><text:span text:style-name="_3c_C_2b__2b__3e_"><text:span text:style-name="T15">loop</text:span></text:span><text:span text:style-name="_3c_C_3e_"><text:span text:style-name="T12"> {</text:span></text:span></text:p>
      <text:p text:style-name="P80"><text:span text:style-name="_3c_C_3e_"><text:span text:style-name="T12"><text:tab/>codigo();</text:span></text:span></text:p>
      <text:p text:style-name="P80"><text:span text:style-name="_3c_C_3e_"><text:span text:style-name="T12"><text:tab/>if !condicion {</text:span></text:span></text:p>
      <text:p text:style-name="P80"><text:span text:style-name="_3c_C_3e_"><text:span text:style-name="T12"><text:tab/><text:tab/>break; </text:span></text:span><text:span text:style-name="_2f__2f_C"><text:span text:style-name="T12">// asi sale</text:span></text:span></text:p>
      <text:p text:style-name="P80"><text:soft-page-break/><text:span text:style-name="_3c_C_3e_"><text:span text:style-name="T12"><text:tab/>}</text:span></text:span></text:p>
      <text:p text:style-name="P80"><text:span text:style-name="_3c_C_3e_"><text:span text:style-name="T12">}</text:span></text:span></text:p>
      <text:p text:style-name="P80"><text:span text:style-name="_3c_C_3e_"><text:span text:style-name="T12"/></text:span></text:p>
      <text:h text:style-name="P82" text:outline-level="3"><text:span text:style-name="_3c_C_3e_"><text:span text:style-name="T135">FOR</text:span></text:span></text:h>
      <text:p text:style-name="P81"><text:span text:style-name="_2f__2f_C"><text:span text:style-name="T132">El for en Rust es bajo iteradores</text:span></text:span></text:p>
      <text:p text:style-name="P81"><text:span text:style-name="_3c_C_2b__2b__3e_"><text:span text:style-name="T15">for elemento in iterable {...}</text:span></text:span></text:p>
      <text:p text:style-name="P81"><text:span text:style-name="_2f__2f_C"><text:span text:style-name="T132">Por ejemplo:</text:span></text:span></text:p>
      <text:p text:style-name="P81"><text:span text:style-name="_3c_C_2b__2b__3e_"><text:span text:style-name="T15">for i in 0..10{</text:span></text:span><text:span text:style-name="_3c_C_3e_"><text:span text:style-name="T12"> ... }</text:span></text:span><text:span text:style-name="_3c_C_2b__2b__3e_"><text:span text:style-name="T15"> </text:span></text:span><text:span text:style-name="_2f__2f_C"><text:span text:style-name="T15">//i va de 0 a 9</text:span></text:span></text:p>
      <text:p text:style-name="P83"><text:span text:style-name="_3c_C_2b__2b__3e_"><text:span text:style-name="T15">for i in 0..</text:span></text:span><text:span text:style-name="_3c_C_2b__2b__3e_"><text:span text:style-name="T136">=</text:span></text:span><text:span text:style-name="_3c_C_2b__2b__3e_"><text:span text:style-name="T15">10{</text:span></text:span><text:span text:style-name="_3c_C_3e_"><text:span text:style-name="T12"> ... }</text:span></text:span><text:span text:style-name="_3c_C_2b__2b__3e_"><text:span text:style-name="T15"> </text:span></text:span><text:span text:style-name="_2f__2f_C"><text:span text:style-name="T15">//i va de 0 a </text:span></text:span><text:span text:style-name="_2f__2f_C"><text:span text:style-name="T136">10</text:span></text:span></text:p>
      <text:p text:style-name="P81"><text:span text:style-name="_2f__2f_C"><text:span text:style-name="T132">o con matrices:</text:span></text:span></text:p>
      <text:p text:style-name="P81"><text:span text:style-name="_3c_C_3e_"><text:span text:style-name="T12">let v = [1, 2, 3];</text:span></text:span></text:p>
      <text:p text:style-name="P81"><text:span text:style-name="_3c_C_2b__2b__3e_"><text:span text:style-name="T15">for i in v</text:span></text:span><text:span text:style-name="_3c_C_3e_"><text:span text:style-name="T12">{ ... }</text:span></text:span></text:p>
      <text:p text:style-name="P84"><text:span text:style-name="_2f__2f_C"><text:span text:style-name="T137">Si queremos ir en inversa debemos aplicar el método .rev()</text:span></text:span><text:span text:style-name="_2f__2f_C"><text:span text:style-name="T132">:</text:span></text:span></text:p>
      <text:p text:style-name="P84"><text:span text:style-name="_3c_C_2b__2b__3e_"><text:span text:style-name="T15">for i in </text:span></text:span><text:span text:style-name="_3c_C_2b__2b__3e_"><text:span text:style-name="T138">(</text:span></text:span><text:span text:style-name="_3c_C_2b__2b__3e_"><text:span text:style-name="T15">0..10</text:span></text:span><text:span text:style-name="_3c_C_2b__2b__3e_"><text:span text:style-name="T138">).rev()</text:span></text:span><text:span text:style-name="_3c_C_2b__2b__3e_"><text:span text:style-name="T15">{</text:span></text:span><text:span text:style-name="_3c_C_3e_"><text:span text:style-name="T12"> ... }</text:span></text:span><text:span text:style-name="_3c_C_2b__2b__3e_"><text:span text:style-name="T15"> </text:span></text:span><text:span text:style-name="_2f__2f_C"><text:span text:style-name="T12">//i va de </text:span></text:span><text:span text:style-name="_2f__2f_C"><text:span text:style-name="T139">9 a 0. </text:span></text:span><text:span text:style-name="_2f__2f_C"><text:span text:style-name="T140">Tiene que ponerse los paréntesis para que se forme el grupo primero.</text:span></text:span></text:p>
      <text:p text:style-name="P81"><text:span text:style-name="_3c_C_3e_"><text:span text:style-name="T12"/></text:span></text:p>
      <text:h text:style-name="P85" text:outline-level="3"><text:span text:style-name="_3c_C_3e_"><text:span text:style-name="T141">COLLECTIONS (contenedores)</text:span></text:span></text:h>
      <text:p text:style-name="P86"><text:span text:style-name="_2f__2f_C"><text:span text:style-name="T142">Como en C++ tenemos contenedores:</text:span></text:span></text:p>
      <text:p text:style-name="P86"><text:span text:style-name="_2f__2f_C"><text:span text:style-name="T142"/></text:span></text:p>
      <text:p text:style-name="P87"><text:span text:style-name="_2f__2f_C"><text:span text:style-name="T143">1. VECTOR DINAMICO:</text:span></text:span></text:p>
      <text:p text:style-name="P87"><text:span text:style-name="_3c_C_3e_"><text:span text:style-name="T12">let mut v = </text:span></text:span><text:span text:style-name="_3c_C_2b__2b__3e_"><text:span text:style-name="T15">Vec::new();</text:span></text:span></text:p>
      <text:p text:style-name="P87"><text:span text:style-name="_3c_C_3e_"><text:span text:style-name="T12">v.push(1);</text:span></text:span><text:span text:style-name="_3c_C_3e_"><text:span text:style-name="T144"> </text:span></text:span><text:span text:style-name="_2f__2f_C"><text:span text:style-name="T144">//mete el 1</text:span></text:span></text:p>
      <text:p text:style-name="P87"><text:span text:style-name="_3c_C_3e_"><text:span text:style-name="T12">v.push(2);</text:span></text:span><text:span text:style-name="_3c_C_3e_"><text:span text:style-name="T144"> </text:span></text:span><text:span text:style-name="_2f__2f_C"><text:span text:style-name="T144">//mete el 2 detrás del 1.</text:span></text:span></text:p>
      <text:p text:style-name="P88"><text:span text:style-name="_3c_C_3e_"><text:span text:style-name="T12">v.pop(); </text:span></text:span><text:span text:style-name="_2f__2f_C"><text:span text:style-name="T12">// quita el 2 (el ultimo)</text:span></text:span><text:span text:style-name="_2f__2f_C"><text:span text:style-name="T144"> Devuelve un Option&lt;T&gt;</text:span></text:span></text:p>
      <text:p text:style-name="P88"><text:span text:style-name="_2f__2f_C"><text:span text:style-name="T145">Para acceder a los datos se puede usar:</text:span></text:span></text:p>
      <text:p text:style-name="P88"><text:span text:style-name="_3c_C_3e_"><text:span text:style-name="T12">v[i]; </text:span></text:span><text:span text:style-name="_2f__2f_C"><text:span text:style-name="T12">//puede ser panic</text:span></text:span></text:p>
      <text:p text:style-name="P88"><text:span text:style-name="_3c_C_3e_"><text:span text:style-name="T12">v.get(i);</text:span></text:span><text:span text:style-name="_2f__2f_C"><text:span text:style-name="T12"> //seguro.</text:span></text:span></text:p>
      <text:p text:style-name="P88"><text:span text:style-name="_2f__2f_C"><text:span text:style-name="T145">El tamaño es con:</text:span></text:span></text:p>
      <text:p text:style-name="P88"><text:span text:style-name="_3c_C_3e_"><text:span text:style-name="T12">v.len();</text:span></text:span></text:p>
      <text:p text:style-name="P89"><text:span text:style-name="_2f__2f_C"><text:span text:style-name="T146">Se puede usar iteradores:</text:span></text:span></text:p>
      <text:p text:style-name="P89"><text:span text:style-name="_3c_C_3e_"><text:span text:style-name="T12">let mut it = v</text:span></text:span><text:span text:style-name="_3c_C_2b__2b__3e_"><text:span text:style-name="T15">.iter();</text:span></text:span></text:p>
      <text:p text:style-name="P89"><text:span text:style-name="_3c_C_2b__2b__3e_"><text:span text:style-name="T15">it.next();</text:span></text:span><text:span text:style-name="_3c_C_3e_"><text:span text:style-name="T12"> //es el siguiente.</text:span></text:span></text:p>
      <text:p text:style-name="P89"><text:span text:style-name="_3c_C_2b__2b__3e_"><text:span text:style-name="T15">it.next_back()</text:span></text:span><text:span text:style-name="_3c_C_3e_"><text:span text:style-name="T12">; es el anterior.</text:span></text:span></text:p>
      <text:p text:style-name="P89"><text:soft-page-break/><text:span text:style-name="_2f__2f_C"><text:span text:style-name="T146">Los dos devuelven Option&lt;&amp;T&gt;</text:span></text:span><text:span text:style-name="_2f__2f_C"><text:span text:style-name="T147"> por lo tanto para usarlos:</text:span></text:span></text:p>
      <text:p text:style-name="P90"><text:span text:style-name="_3c_C_3e_"><text:span text:style-name="T12">if let Some(x) = it.next(){...}</text:span></text:span></text:p>
      <text:p text:style-name="P89"><text:span text:style-name="_2f__2f_C"><text:span text:style-name="T146"/></text:span></text:p>
      <text:p text:style-name="P87"><text:span text:style-name="_3c_C_3e_"><text:span text:style-name="T12"/></text:span></text:p>
      <text:p text:style-name="P87"><text:span text:style-name="_3c_C_3e_"><text:span text:style-name="T12"/></text:span></text:p>
      <text:p text:style-name="P87"><text:span text:style-name="_2f__2f_C"><text:span text:style-name="T148">2. ARRAYS</text:span></text:span></text:p>
      <text:p text:style-name="P87"><text:span text:style-name="_2f__2f_C"><text:span text:style-name="T148"/></text:span></text:p>
      <text:p text:style-name="P87"><text:span text:style-name="_2f__2f_C"><text:span text:style-name="T148">3. STRING</text:span></text:span></text:p>
      <text:p text:style-name="P87"><text:span text:style-name="_2f__2f_C"><text:span text:style-name="T148"/></text:span></text:p>
      <text:p text:style-name="P87"><text:span text:style-name="_2f__2f_C"><text:span text:style-name="T148">4. HASHMAP</text:span></text:span></text:p>
      <text:p text:style-name="P87"><text:span text:style-name="_2f__2f_C"><text:span text:style-name="T148"/></text:span></text:p>
      <text:p text:style-name="P87"><text:span text:style-name="_2f__2f_C"><text:span text:style-name="T148">5. VECDEQUE</text:span></text:span></text:p>
      <text:p text:style-name="P87"><text:span text:style-name="_2f__2f_C"><text:span text:style-name="T148"/></text:span></text:p>
      <text:p text:style-name="P87"><text:span text:style-name="_2f__2f_C"><text:span text:style-name="T148">6. HASHSET</text:span></text:span></text:p>
      <text:p text:style-name="P87"><text:span text:style-name="_2f__2f_C"><text:span text:style-name="T148"/></text:span></text:p>
      <text:p text:style-name="P87"><text:span text:style-name="_2f__2f_C"><text:span text:style-name="T148">7. BTREEMAP</text:span></text:span></text:p>
      <text:p text:style-name="P87"><text:span text:style-name="_2f__2f_C"><text:span text:style-name="T148"/></text:span></text:p>
      <text:h text:style-name="P91" text:outline-level="3"><text:span text:style-name="_3c_C_3e_"><text:span text:style-name="T149">RESERVA DE MEMORIA EN EL HEAP</text:span></text:span></text:h>
      <text:p text:style-name="P92"><text:span text:style-name="_2f__2f_C"><text:span text:style-name="T150">No se puede. Rust lo prohibe. De hecho esa es la protección de Rust frente a las fugas de memoria, punteros colgantes etc. Cuando nosotros hacemos una estructura como:</text:span></text:span></text:p>
      <text:p text:style-name="P92"><text:span text:style-name="_3c_C_3e_"><text:span text:style-name="T12">pub struct Estructura{</text:span></text:span></text:p>
      <text:p text:style-name="P92"><text:span text:style-name="_3c_C_3e_"><text:span text:style-name="T12"><text:tab/>dato1: u32,</text:span></text:span></text:p>
      <text:p text:style-name="P92"><text:span text:style-name="_3c_C_3e_"><text:span text:style-name="T12"><text:tab/>dato2: String,</text:span></text:span></text:p>
      <text:p text:style-name="P92"><text:span text:style-name="_3c_C_3e_"><text:span text:style-name="T12">}</text:span></text:span></text:p>
      <text:p text:style-name="P92"><text:span text:style-name="_3c_C_3e_"><text:span text:style-name="T12"/></text:span></text:p>
      <text:p text:style-name="P92"><text:span text:style-name="_3c_C_3e_"><text:span text:style-name="T12">fn main ()</text:span></text:span><text:span text:style-name="_3c_C_2b__2b__3e_"><text:span text:style-name="T15">{</text:span></text:span></text:p>
      <text:p text:style-name="P92"><text:span text:style-name="_3c_C_3e_"><text:span text:style-name="T12"><text:tab/></text:span></text:span><text:span text:style-name="_2f__2f_C"><text:span text:style-name="T12">//Rust no deja hacer esto:</text:span></text:span></text:p>
      <text:p text:style-name="P92"><text:span text:style-name="_2f__2f_C"><text:span text:style-name="T12"><text:tab/>//let mi_estructura: Estructura; por que contendría valores basura. Algo prohibido en Rust.</text:span></text:span></text:p>
      <text:p text:style-name="P92"><text:span text:style-name="_2f__2f_C"><text:span text:style-name="T12"><text:tab/>//Sino que hay que inicializarla de esta manera:</text:span></text:span></text:p>
      <text:p text:style-name="P92"><text:span text:style-name="_3c_C_3e_"><text:span text:style-name="T12"><text:tab/></text:span></text:span><text:span text:style-name="_3c_C_2b__2b__3e_"><text:span text:style-name="T15">let mi_estructura = Estructura{</text:span></text:span></text:p>
      <text:p text:style-name="P92"><text:span text:style-name="_3c_C_2b__2b__3e_"><text:span text:style-name="T15"><text:tab/><text:tab/>dato1: 32, </text:span></text:span><text:span text:style-name="_2f__2f_C"><text:span text:style-name="T15">//se asigna 4 bytes en el STACK ya que sabe cuanto son y es más rapido.</text:span></text:span></text:p>
      <text:p text:style-name="P92"><text:span text:style-name="_3c_C_2b__2b__3e_"><text:span text:style-name="T15"><text:tab/><text:tab/>dato2: “hola”.into(),</text:span></text:span><text:span text:style-name="_3c_C_3e_"><text:span text:style-name="T12"> </text:span></text:span><text:span text:style-name="_2f__2f_C"><text:span text:style-name="T12">//se reserva 4 bytes en el HEAP y 24 bytes en el STACK con los metadatos <text:tab/><text:tab/><text:tab/>(que incluyen la direccion de memoria, el numero de bytes ocupados y el num de bytes de capacidad.</text:span></text:span></text:p>
      <text:p text:style-name="P92"><text:span text:style-name="_3c_C_3e_"><text:span text:style-name="T12"><text:tab/>}</text:span></text:span></text:p>
      <text:p text:style-name="P92"><text:soft-page-break/><text:span text:style-name="_3c_C_2b__2b__3e_"><text:span text:style-name="T15">}</text:span></text:span><text:span text:style-name="_3c_C_3e_"><text:span text:style-name="T12"> </text:span></text:span><text:span text:style-name="_2f__2f_C"><text:span text:style-name="T12">//al salir del main se hace el free automaticamente de la memoria reservada en el HEA</text:span></text:span><text:span text:style-name="_2f__2f_C"><text:span text:style-name="T151">P y el STACK</text:span></text:span></text:p>
      <text:p text:style-name="P92"><text:span text:style-name="_2f__2f_C"><text:span text:style-name="T150"/></text:span></text:p>
      <text:p text:style-name="P92"><text:span text:style-name="_2f__2f_C"><text:span text:style-name="T150">Para elementos que no sabemos cuanto van a ser de grandes, como String o Vector, se hace esto:</text:span></text:span></text:p>
      <text:p text:style-name="P92"><text:span text:style-name="_3c_C_3e_"><text:span text:style-name="T12">let mut s = </text:span></text:span><text:span text:style-name="_3c_C_2b__2b__3e_"><text:span text:style-name="T15">String::with_capacity(5);</text:span></text:span><text:span text:style-name="_2f__2f_C"><text:span text:style-name="T15">//</text:span></text:span><text:span text:style-name="_2f__2f_C"><text:span text:style-name="T151">aquí reservamos 5 bytes en el HEAP para que pueda crecer y en el STACK están los metadatos del String con 8 bytes para la dirección de memoria inicial en el HEAP, la longitud actual en número entero que sería cero por ahora (8 bytes más) y la capacidad que son otros 8 bytes.</text:span></text:span></text:p>
      <text:p text:style-name="P93"><text:span text:style-name="_2f__2f_C"><text:span text:style-name="T150">Pa</text:span></text:span><text:span text:style-name="_2f__2f_C"><text:span text:style-name="T152">ra los vectores, por ejemplo capacidad para 5 numeros enteros:</text:span></text:span></text:p>
      <text:p text:style-name="P93"><text:span text:style-name="_3c_C_2b__2b__3e_"><text:span text:style-name="T15">let mut v = Vec&lt;i32&gt; = Vec::with_capacity(5);</text:span></text:span><text:span text:style-name="_3c_C_3e_"><text:span text:style-name="T12"> /</text:span></text:span><text:span text:style-name="_2f__2f_C"><text:span text:style-name="T12">/STACK (8bytes memoria, 8bytes 0longitud, 8bytes 5 capacidad.</text:span></text:span></text:p>
      <text:p text:style-name="P93"><text:span text:style-name="_3c_C_3e_"><text:span text:style-name="T12">v.push(12); </text:span></text:span><text:span text:style-name="_2f__2f_C"><text:span text:style-name="T12">//la longitud pasa a ser 1 y la capacidad sigue siendo 5.</text:span></text:span></text:p>
      <text:p text:style-name="P93"><text:span text:style-name="_2f__2f_C"><text:span text:style-name="T12"/></text:span></text:p>
      <text:p text:style-name="P93"><text:span text:style-name="_2f__2f_C"><text:span text:style-name="T152">En ambos como en el caso de la estructura, al salir de su scope {}, se hace el free automatico.. pero se podría forzar un free con esta instrucción antes de terminar las llaves:</text:span></text:span></text:p>
      <text:p text:style-name="P93"><text:span text:style-name="_3c_C_2b__2b__3e_"><text:span text:style-name="T153">drop(v);</text:span></text:span></text:p>
      <text:p text:style-name="P93"><text:span text:style-name="_3c_C_2b__2b__3e_"><text:span text:style-name="T15">drop(</text:span></text:span><text:span text:style-name="_3c_C_2b__2b__3e_"><text:span text:style-name="T153">s</text:span></text:span><text:span text:style-name="_3c_C_2b__2b__3e_"><text:span text:style-name="T15">);</text:span></text:span></text:p>
      <text:p text:style-name="P93"><text:span text:style-name="_3c_C_2b__2b__3e_"><text:span text:style-name="T15"/></text:span></text:p>
      <text:h text:style-name="P94" text:outline-level="3"><text:span text:style-name="_3c_C_3e_"><text:span text:style-name="T154">TIEMPO DE VIDA. LIFETIME. OWNERSHIP!!!</text:span></text:span></text:h>
      <text:p text:style-name="P95"><text:span text:style-name="_2f__2f_C"><text:span text:style-name="T155">Rust para preservar la memoria, tiene un método que es el </text:span></text:span><text:span text:style-name="_3c_C_2b__2b__3e_"><text:span text:style-name="T15">ownership</text:span></text:span><text:span text:style-name="_2f__2f_C"><text:span text:style-name="T155">. Si por ejemplo hacemos esto:</text:span></text:span></text:p>
      <text:p text:style-name="P95"><text:span text:style-name="_3c_C_3e_"><text:span text:style-name="T156">let num = 32;</text:span></text:span></text:p>
      <text:p text:style-name="P95"><text:span text:style-name="_3c_C_3e_"><text:span text:style-name="T156">ft_funcion(num);</text:span></text:span></text:p>
      <text:p text:style-name="P95"><text:span text:style-name="_3c_C_3e_"><text:span text:style-name="T156">println!("{}", num); </text:span></text:span></text:p>
      <text:p text:style-name="P95"><text:span text:style-name="_2f__2f_C"><text:span text:style-name="T155">No hay problema por que los tipos básicos, tienen implementando </text:span></text:span><text:span text:style-name="_3c_C_2b__2b__3e_"><text:span text:style-name="T15">Trait</text:span></text:span><text:span text:style-name="_2f__2f_C"><text:span text:style-name="T157"> </text:span></text:span><text:span text:style-name="_2f__2f_C"><text:span text:style-name="T155">el </text:span></text:span><text:span text:style-name="_3c_C_2b__2b__3e_"><text:span text:style-name="T15">Copy</text:span></text:span><text:span text:style-name="_2f__2f_C"><text:span text:style-name="T155"> o </text:span></text:span><text:span text:style-name="_3c_C_2b__2b__3e_"><text:span text:style-name="T15">Clone</text:span></text:span><text:span text:style-name="_2f__2f_C"><text:span text:style-name="T155"> de los mismos y por lo tanto el compilador no dará problema.</text:span></text:span></text:p>
      <text:p text:style-name="P95"><text:span text:style-name="_2f__2f_C"><text:span text:style-name="T155">Pero si tenemos un:</text:span></text:span></text:p>
      <text:p text:style-name="P95"><text:span text:style-name="_3c_C_3e_"><text:span text:style-name="T156">struct MiStruct{ dato: i32</text:span></text:span><text:span text:style-name="_3c_C_3e_"><text:span text:style-name="T158"> </text:span></text:span><text:span text:style-name="_3c_C_3e_"><text:span text:style-name="T156">};</text:span></text:span></text:p>
      <text:p text:style-name="P95"><text:span text:style-name="_3c_C_3e_"><text:span text:style-name="T156">let kk = MiStruct {dato: 42</text:span></text:span><text:span text:style-name="_3c_C_3e_"><text:span text:style-name="T158"> </text:span></text:span><text:span text:style-name="_3c_C_3e_"><text:span text:style-name="T156">};</text:span></text:span></text:p>
      <text:p text:style-name="P95"><text:span text:style-name="_3c_C_2b__2b__3e_"><text:span text:style-name="T15">ft_funcion(kk); </text:span></text:span><text:span text:style-name="_2f__2f_C"><text:span text:style-name="T156">//hemos perdido el ownership aqui. Ya no es dueña kk de los datos. Se han transferido a la función</text:span></text:span></text:p>
      <text:p text:style-name="P95"><text:span text:style-name="_3c_C_3e_"><text:span text:style-name="T156">println!("{}", kk.dato); </text:span></text:span><text:span text:style-name="_2f__2f_C"><text:span text:style-name="T156">//da error aqui por que no tiene el ownership ya.</text:span></text:span></text:p>
      <text:p text:style-name="P95"><text:span text:style-name="_2f__2f_C"><text:span text:style-name="T155"/></text:span></text:p>
      <text:p text:style-name="P95"><text:span text:style-name="_2f__2f_C"><text:span text:style-name="T155">Esto se puede arreglar con una sola linea y es implementando el </text:span></text:span><text:span text:style-name="_3c_C_2b__2b__3e_"><text:span text:style-name="T15">Trait</text:span></text:span><text:span text:style-name="_2f__2f_C"><text:span text:style-name="T155"> de </text:span></text:span><text:span text:style-name="_3c_C_2b__2b__3e_"><text:span text:style-name="T15">Copy Clone</text:span></text:span><text:span text:style-name="_2f__2f_C"><text:span text:style-name="T155"> para la estructura.. y se tiene que hacer arriba de ella:</text:span></text:span></text:p>
      <text:p text:style-name="P95"><text:span text:style-name="_3c_C_2b__2b__3e_"><text:span text:style-name="T15">#[derive(Copy, Clone)]</text:span></text:span></text:p>
      <text:p text:style-name="P96"><text:span text:style-name="_3c_C_3e_"><text:span text:style-name="T156">struct MiStruct{ dato: i32, };</text:span></text:span></text:p>
      <text:p text:style-name="P96"><text:soft-page-break/><text:span text:style-name="_3c_C_3e_"><text:span text:style-name="T156">.... </text:span></text:span><text:span text:style-name="_2f__2f_C"><text:span text:style-name="T156">//el resto del código.</text:span></text:span><text:span text:style-name="_3c_C_3e_"><text:span text:style-name="T156"> </text:span></text:span></text:p>
      <text:p text:style-name="P96"><text:span text:style-name="_2f__2f_C"><text:span text:style-name="T157">Ahora no daría error de compilación ya que la estructura al llamarse a la función, se copiaría. </text:span></text:span></text:p>
      <text:p text:style-name="P96"><text:span text:style-name="_2f__2f_C"><text:span text:style-name="T157">Si la estructura tuviera un String dentro, el Copy no se puede hacer ya que parte de los datos del String se almacenan en el Heap, y por lo tanto hay que aplicar un </text:span></text:span><text:span text:style-name="_3c_C_2b__2b__3e_"><text:span text:style-name="T15">.clone()</text:span></text:span><text:span text:style-name="_2f__2f_C"><text:span text:style-name="T157">:</text:span></text:span></text:p>
      <text:p text:style-name="P96"><text:span text:style-name="_3c_C_2b__2b__3e_"><text:span text:style-name="T15">#[derive(Clone)]</text:span></text:span></text:p>
      <text:p text:style-name="P96"><text:span text:style-name="_3c_C_3e_"><text:span text:style-name="T156">struct MiStruct{ dato: </text:span></text:span><text:span text:style-name="_3c_C_2b__2b__3e_"><text:span text:style-name="T15">String</text:span></text:span><text:span text:style-name="_3c_C_3e_"><text:span text:style-name="T156"> };</text:span></text:span></text:p>
      <text:p text:style-name="P96"><text:span text:style-name="_3c_C_3e_"><text:span text:style-name="T156">let kk = MiStruct {dato: "hola mundo".into(),};</text:span></text:span></text:p>
      <text:p text:style-name="P96"><text:span text:style-name="_3c_C_3e_"><text:span text:style-name="T156">ft_funcion(</text:span></text:span><text:span text:style-name="_3c_C_2b__2b__3e_"><text:span text:style-name="T15">kk.clone()</text:span></text:span><text:span text:style-name="_3c_C_3e_"><text:span text:style-name="T156">); </text:span></text:span><text:span text:style-name="_2f__2f_C"><text:span text:style-name="T156">//y ahí pasamos un clone y no se pierde.</text:span></text:span></text:p>
      <text:p text:style-name="P96"><text:span text:style-name="_2f__2f_C"><text:span text:style-name="T157"/></text:span></text:p>
      <text:p text:style-name="P97"><text:span text:style-name="_2f__2f_C"><text:span text:style-name="T159">Esto mismo pasaría si en vez de a una función se le pasa a un match, o cualquier cosa que esté entre llaves {}.<text:line-break/></text:span></text:span><text:span text:style-name="_2f__2f_C"><text:span text:style-name="T160">Para no hacer copia se puede pasar la referencia como en C++:</text:span></text:span></text:p>
      <text:p text:style-name="P98"><text:span text:style-name="_3c_C_3e_"><text:span text:style-name="T156">struct MiStruct{ dato: i32</text:span></text:span><text:span text:style-name="_3c_C_3e_"><text:span text:style-name="T158"> </text:span></text:span><text:span text:style-name="_3c_C_3e_"><text:span text:style-name="T156">};</text:span></text:span></text:p>
      <text:p text:style-name="P98"><text:span text:style-name="_3c_C_3e_"><text:span text:style-name="T156">let kk = MiStruct {dato: 42</text:span></text:span><text:span text:style-name="_3c_C_3e_"><text:span text:style-name="T158"> </text:span></text:span><text:span text:style-name="_3c_C_3e_"><text:span text:style-name="T156">};</text:span></text:span></text:p>
      <text:p text:style-name="P98"><text:span text:style-name="_3c_C_3e_"><text:span text:style-name="T15">ft_funcion(</text:span></text:span><text:span text:style-name="_3c_C_2b__2b__3e_"><text:span text:style-name="T15">&amp;</text:span></text:span><text:span text:style-name="_3c_C_3e_"><text:span text:style-name="T15">kk);</text:span></text:span><text:span text:style-name="_3c_C_2b__2b__3e_"><text:span text:style-name="T15"> </text:span></text:span><text:span text:style-name="_2f__2f_C"><text:span text:style-name="T156">//</text:span></text:span><text:span text:style-name="_2f__2f_C"><text:span text:style-name="T161">donde la funcion recibe un &amp; tambien como fn ft_funcion(kk: &amp;MiStruct);</text:span></text:span></text:p>
      <text:p text:style-name="P98"><text:span text:style-name="_3c_C_3e_"><text:span text:style-name="T156">println!("{}", kk.dato); </text:span></text:span><text:span text:style-name="_2f__2f_C"><text:span text:style-name="T156">//</text:span></text:span><text:span text:style-name="_2f__2f_C"><text:span text:style-name="T161">ya no da error.</text:span></text:span></text:p>
      <text:p text:style-name="P99"><text:span text:style-name="_2f__2f_C"><text:span text:style-name="T162">Y lo mismo pasándolo a un match:</text:span></text:span></text:p>
      <text:p text:style-name="P99"><text:span text:style-name="_3c_C_3e_"><text:span text:style-name="T12">enum Status{</text:span></text:span><text:span text:style-name="_3c_C_3e_"><text:span text:style-name="T163"> </text:span></text:span><text:span text:style-name="_3c_C_3e_"><text:span text:style-name="T12">PorHacer,</text:span></text:span><text:span text:style-name="_3c_C_3e_"><text:span text:style-name="T163"> </text:span></text:span><text:span text:style-name="_3c_C_3e_"><text:span text:style-name="T12">EnProgreso</text:span></text:span><text:span text:style-name="_3c_C_2b__2b__3e_"><text:span text:style-name="T15">{</text:span></text:span><text:span text:style-name="_3c_C_2b__2b__3e_"><text:span text:style-name="T164"> </text:span></text:span><text:span text:style-name="_3c_C_2b__2b__3e_"><text:span text:style-name="T15">asignado_a: String,},</text:span></text:span><text:span text:style-name="_3c_C_3e_"><text:span text:style-name="T12"><text:tab/>Hecho,}</text:span></text:span></text:p>
      <text:p text:style-name="P99"><text:span text:style-name="_3c_C_3e_"><text:span text:style-name="T12">match </text:span></text:span><text:span text:style-name="_3c_C_2b__2b__3e_"><text:span text:style-name="T15">&amp;</text:span></text:span><text:span text:style-name="_3c_C_3e_"><text:span text:style-name="T12">Status{</text:span></text:span><text:span text:style-name="_3c_C_3e_"><text:span text:style-name="T163"> </text:span></text:span><text:span text:style-name="_2f__2f_C"><text:span text:style-name="T163">//si no pusiera el &amp; en el =&gt; { println!...., asignado_a perdería el ownership</text:span></text:span></text:p>
      <text:p text:style-name="P99"><text:span text:style-name="_3c_C_3e_"><text:span text:style-name="T12"><text:tab/>Status::EnProgreso</text:span></text:span><text:span text:style-name="_3c_C_3e_"><text:span text:style-name="T15">{ asignado_a }</text:span></text:span><text:span text:style-name="_3c_C_3e_"><text:span text:style-name="T12"> =&gt; { println! "Lo hace: {}",</text:span></text:span><text:span text:style-name="_3c_C_3e_"><text:span text:style-name="T15"> asignado_a</text:span></text:span><text:span text:style-name="_3c_C_3e_"><text:span text:style-name="T12">; },</text:span></text:span></text:p>
      <text:p text:style-name="P99"><text:span text:style-name="_3c_C_3e_"><text:span text:style-name="T156"><text:tab/>_ =&gt; {} </text:span></text:span><text:span text:style-name="_2f__2f_C"><text:span text:style-name="T156">//si no queremos que haga nada, pues doble llave.</text:span></text:span><text:span text:style-name="_3c_C_3e_"><text:span text:style-name="T165">}</text:span></text:span></text:p>
      <text:p text:style-name="P99"><text:span text:style-name="_3c_C_3e_"><text:span text:style-name="T165"/></text:span></text:p>
      <text:p text:style-name="P99"><text:span text:style-name="_2f__2f_C"><text:span text:style-name="T162">Pero ¿qué está haciendo el compilador por debajo? está dándole una vida a la referencia en el bloque de la llamada a la función de tal forma que cuando hago un </text:span></text:span><text:span text:style-name="_3c_C_3e_"><text:span text:style-name="T156">ft_funcion(&amp;kk);</text:span></text:span><text:span text:style-name="_2f__2f_C"><text:span text:style-name="T162"> la estructura kk va asegurarse a vivir durante TODO el tiempo de la función, aunque luego se haga llamada a otras funciones:</text:span></text:span></text:p>
      <text:p text:style-name="P99"><text:span text:style-name="_2f__2f_C"><text:span text:style-name="T162"/></text:span></text:p>
      <text:p text:style-name="P100"><text:span text:style-name="_3c_C_3e_"><text:span text:style-name="T156">struct ST {dato: String}; </text:span></text:span><text:span text:style-name="_2f__2f_C"><text:span text:style-name="T156">//debe estar fuera para ser reconocida por funcion1 y funcion2</text:span></text:span></text:p>
      <text:p text:style-name="P99"><text:span text:style-name="_3c_C_3e_"><text:span text:style-name="T156">fn main(){</text:span></text:span></text:p>
      <text:p text:style-name="P99"><text:span text:style-name="_3c_C_3e_"><text:span text:style-name="T156"><text:tab/>let st = ST { dato: "hola".into() };</text:span></text:span></text:p>
      <text:p text:style-name="P101"><text:span text:style-name="_3c_C_3e_"><text:span text:style-name="T156"><text:tab/>funcion1(</text:span></text:span><text:span text:style-name="_3c_C_2b__2b__3e_"><text:span text:style-name="T15">&amp;</text:span></text:span><text:span text:style-name="_3c_C_3e_"><text:span text:style-name="T156">st); </text:span></text:span><text:span text:style-name="_2f__2f_C"><text:span text:style-name="T156">//no pierde el ownership</text:span></text:span><text:span text:style-name="_2f__2f_C"><text:span text:style-name="T166">. Sigue perteneciendo st a main.</text:span></text:span></text:p>
      <text:p text:style-name="P101"><text:span text:style-name="_3c_C_3e_"><text:span text:style-name="T156"><text:tab/>println!("{}", st.dato); </text:span></text:span><text:span text:style-name="_2f__2f_C"><text:span text:style-name="T156">//compila sin problema por que no perdió el ownership.<text:tab/></text:span></text:span></text:p>
      <text:p text:style-name="P99"><text:span text:style-name="_3c_C_3e_"><text:span text:style-name="T156">}</text:span></text:span></text:p>
      <text:p text:style-name="P101"><text:span text:style-name="_2f__2f_C"><text:span text:style-name="T156">//En Rust no hace falta declarar las funciones antes de usarlas.</text:span></text:span></text:p>
      <text:p text:style-name="P101"><text:span text:style-name="_3c_C_3e_"><text:span text:style-name="T156">fn funcion1(</text:span></text:span><text:span text:style-name="_3c_C_2b__2b__3e_"><text:span text:style-name="T15">st: &amp;ST</text:span></text:span><text:span text:style-name="_3c_C_3e_"><text:span text:style-name="T156">){ </text:span></text:span></text:p>
      <text:p text:style-name="P100"><text:soft-page-break/><text:span text:style-name="_3c_C_3e_"><text:span text:style-name="T156"><text:tab/></text:span></text:span><text:span text:style-name="_2f__2f_C"><text:span text:style-name="T156">//al loro con esto!! ahora st es una direccion de memoria asi que no se pasa como <text:tab/>funcion2(&amp;st) que </text:span></text:span><text:span text:style-name="_2f__2f_C"><text:span text:style-name="T167"><text:tab/></text:span></text:span><text:span text:style-name="_2f__2f_C"><text:span text:style-name="T156">daría un error de compilación.<text:tab/></text:span></text:span></text:p>
      <text:p text:style-name="P100"><text:span text:style-name="_3c_C_3e_"><text:span text:style-name="T156"><text:tab/>funcion2(</text:span></text:span><text:span text:style-name="_3c_C_2b__2b__3e_"><text:span text:style-name="T15">st</text:span></text:span><text:span text:style-name="_3c_C_3e_"><text:span text:style-name="T156">); </text:span></text:span></text:p>
      <text:p text:style-name="P101"><text:span text:style-name="_3c_C_3e_"><text:span text:style-name="T156"><text:tab/>println!("{}", st.dato); </text:span></text:span><text:span text:style-name="_2f__2f_C"><text:span text:style-name="T156">//compila</text:span></text:span></text:p>
      <text:p text:style-name="P101"><text:span text:style-name="_3c_C_3e_"><text:span text:style-name="T156">}</text:span></text:span></text:p>
      <text:p text:style-name="P101"><text:span text:style-name="_3c_C_3e_"><text:span text:style-name="T156">fn funcion2(</text:span></text:span><text:span text:style-name="_3c_C_2b__2b__3e_"><text:span text:style-name="T15">st: &amp;ST</text:span></text:span><text:span text:style-name="_3c_C_3e_"><text:span text:style-name="T156">){</text:span></text:span></text:p>
      <text:p text:style-name="P101"><text:span text:style-name="_3c_C_3e_"><text:span text:style-name="T156"><text:tab/>... </text:span></text:span><text:span text:style-name="_2f__2f_C"><text:span text:style-name="T156">//dentro de la primera llamada en el main al hacer &amp; Rust hace que st viva hasta aquí y después de cada linea de la función.</text:span></text:span></text:p>
      <text:p text:style-name="P101"><text:span text:style-name="_3c_C_3e_"><text:span text:style-name="T156">}</text:span></text:span></text:p>
      <text:p text:style-name="P101"><text:span text:style-name="_3c_C_3e_"><text:span text:style-name="T156"/></text:span></text:p>
      <text:p text:style-name="P102"><text:span text:style-name="_2f__2f_C"><text:span text:style-name="T168">LIFETIMES!!</text:span></text:span></text:p>
      <text:p text:style-name="P102"><text:span text:style-name="_2f__2f_C"><text:span text:style-name="T169">Cuando es obligatorio usar LIFETIMES? (</text:span></text:span><text:span text:style-name="_3c_C_3e_"><text:span text:style-name="T156">&lt;'loquesea&gt;</text:span></text:span><text:span text:style-name="_2f__2f_C"><text:span text:style-name="T169">) con una referencia </text:span></text:span><text:span text:style-name="_3c_C_2b__2b__3e_"><text:span text:style-name="T15">&amp;</text:span></text:span><text:span text:style-name="_2f__2f_C"><text:span text:style-name="T169">?</text:span></text:span></text:p>
      <text:p text:style-name="P102"><text:span text:style-name="_2f__2f_C"><text:span text:style-name="T169">1. Cuando guardamos una referencia en un STRUCT o ENUM:</text:span></text:span></text:p>
      <text:p text:style-name="P102"><text:span text:style-name="_3c_C_3e_"><text:span text:style-name="T170"><text:tab/></text:span></text:span><text:span text:style-name="_3c_C_3e_"><text:span text:style-name="T156">struct ST { texto: </text:span></text:span><text:span text:style-name="_3c_C_2b__2b__3e_"><text:span text:style-name="T15">&amp;str</text:span></text:span><text:span text:style-name="_3c_C_3e_"><text:span text:style-name="T156">}</text:span></text:span><text:span text:style-name="_2f__2f_C"><text:span text:style-name="T169"> </text:span></text:span><text:span text:style-name="_2f__2f_C"><text:span text:style-name="T15">//&amp;str es como un char*. pero ERROR!! Rust no sabe cuanto vive</text:span></text:span></text:p>
      <text:p text:style-name="P102"><text:span text:style-name="_2f__2f_C"><text:span text:style-name="T169"><text:tab/>Para Solucionarlo:</text:span></text:span></text:p>
      <text:p text:style-name="P103"><text:span text:style-name="_2f__2f_C"><text:span text:style-name="T171"><text:tab/></text:span></text:span><text:span text:style-name="_2f__2f_C"><text:span text:style-name="T15">//primero se define el lifetime y luego se aplica. el ST&lt;'a&gt; va a tener un str que vive 'a y no menos.</text:span></text:span></text:p>
      <text:p text:style-name="P102"><text:span text:style-name="_3c_C_3e_"><text:span text:style-name="T15"><text:tab/>struct ST</text:span></text:span><text:span text:style-name="_3c_C_2b__2b__3e_"><text:span text:style-name="T15">&lt;'a&gt; </text:span></text:span><text:span text:style-name="_3c_C_3e_"><text:span text:style-name="T15">{texto: </text:span></text:span><text:span text:style-name="_3c_C_2b__2b__3e_"><text:span text:style-name="T15">&amp;'a</text:span></text:span><text:span text:style-name="_3c_C_3e_"><text:span text:style-name="T15"> str, } /</text:span></text:span><text:span text:style-name="_2f__2f_C"><text:span text:style-name="T15">/Significa que ST no puede vivir más que el texto str, por <text:tab/>que si no tendríamos un puntero basura.</text:span></text:span></text:p>
      <text:p text:style-name="P102"><text:span text:style-name="_2f__2f_C"><text:span text:style-name="T15"/></text:span></text:p>
      <text:p text:style-name="P104"><text:span text:style-name="_2f__2f_C"><text:span text:style-name="T172">2</text:span></text:span><text:span text:style-name="_2f__2f_C"><text:span text:style-name="T169">. Cuando </text:span></text:span><text:span text:style-name="_2f__2f_C"><text:span text:style-name="T172">pasamos varias referencias que devuelve una de ellas. Si una función recibe dos o más referencias y devuelve otra referencia, el compilador se confunde y no sabe cual de los parámetros proviene del dato resuelto.</text:span></text:span></text:p>
      <text:p text:style-name="P104"><text:span text:style-name="_2f__2f_C"><text:span text:style-name="T172"><text:tab/></text:span></text:span><text:span text:style-name="_2f__2f_C"><text:span text:style-name="T156">//Rust no sabe si el &amp;str viene de x o y</text:span></text:span><text:span text:style-name="_2f__2f_C"><text:span text:style-name="T173">, po r lo que una podria vivir menos que otra y contendria basura.</text:span></text:span></text:p>
      <text:p text:style-name="P104"><text:span text:style-name="_3c_C_3e_"><text:span text:style-name="T156"><text:tab/>fn el_mas_largo(x: &amp;str, y: &amp;str) -&gt; &amp;str</text:span></text:span><text:span text:style-name="_3c_C_3e_"><text:span text:style-name="T173"> /</text:span></text:span><text:span text:style-name="_2f__2f_C"><text:span text:style-name="T173">/error de compilación</text:span></text:span></text:p>
      <text:p text:style-name="P104"><text:span text:style-name="_2f__2f_C"><text:span text:style-name="T172"><text:tab/></text:span></text:span><text:span text:style-name="_2f__2f_C"><text:span text:style-name="T169">Para</text:span></text:span><text:span text:style-name="_2f__2f_C"><text:span text:style-name="T172"> solucionarlo:</text:span></text:span></text:p>
      <text:p text:style-name="P104"><text:span text:style-name="_2f__2f_C"><text:span text:style-name="T172"><text:tab/></text:span></text:span><text:span text:style-name="_3c_C_3e_"><text:span text:style-name="T156">fn el_mas_largo</text:span></text:span><text:span text:style-name="_3c_C_2b__2b__3e_"><text:span text:style-name="T15">&lt;'a&gt;</text:span></text:span><text:span text:style-name="_3c_C_3e_"><text:span text:style-name="T156">(x: </text:span></text:span><text:span text:style-name="_3c_C_2b__2b__3e_"><text:span text:style-name="T15">&amp;'a</text:span></text:span><text:span text:style-name="_3c_C_3e_"><text:span text:style-name="T156"> str, y: </text:span></text:span><text:span text:style-name="_3c_C_2b__2b__3e_"><text:span text:style-name="T15">&amp;'a</text:span></text:span><text:span text:style-name="_3c_C_3e_"><text:span text:style-name="T156"> str) -&gt; </text:span></text:span><text:span text:style-name="_3c_C_2b__2b__3e_"><text:span text:style-name="T15">&amp;'a</text:span></text:span><text:span text:style-name="_3c_C_3e_"><text:span text:style-name="T156"> str{</text:span></text:span></text:p>
      <text:p text:style-name="P104"><text:span text:style-name="_3c_C_3e_"><text:span text:style-name="T156"><text:tab/><text:tab/>if x.len() &gt; y.len() { x } else { y } </text:span></text:span><text:span text:style-name="_2f__2f_C"><text:span text:style-name="T156">//la referencia devuelta vivirá tanto como la menor.</text:span></text:span></text:p>
      <text:p text:style-name="P104"><text:span text:style-name="_3c_C_3e_"><text:span text:style-name="T156"><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7T10:34:38.234000000</meta:creation-date>
    <dc:date>2026-07-13T13:13:11.850040902</dc:date>
    <meta:editing-duration>P3DT6H46M23S</meta:editing-duration>
    <meta:editing-cycles>487</meta:editing-cycles>
    <meta:generator>LibreOffice/26.2.4.2$Linux_X86_64 LibreOffice_project/620$Build-2</meta:generator>
    <meta:print-date>2025-01-04T16:07:11.302000000</meta:print-date>
    <meta:printed-by>Archivos PDF</meta:printed-by>
    <meta:document-statistic meta:table-count="0" meta:image-count="0" meta:object-count="0" meta:page-count="20" meta:paragraph-count="512" meta:word-count="4428" meta:character-count="24923" meta:non-whitespace-character-count="20589"/>
  </office:meta>
</office:document-meta>
</file>