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1"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2"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3"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4"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5"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6"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7"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8"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9" style:family="paragraph" style:parent-style-name="Heading_20_3">
      <style:paragraph-properties fo:line-height="100%"/>
      <style:text-properties fo:color="#ffffff" loext:opacity="100%" style:font-name="Arial1" style:text-underline-style="none" officeooo:rsid="0216a37b" officeooo:paragraph-rsid="0216a37b"/>
    </style:style>
    <style:style style:name="P20" style:family="paragraph" style:parent-style-name="Text_20_body">
      <style:paragraph-properties fo:line-height="100%"/>
      <style:text-properties fo:color="#ffffff" loext:opacity="100%" style:font-name="Arial1" style:text-underline-style="none" officeooo:rsid="0216a37b" officeooo:paragraph-rsid="0216a37b"/>
    </style:style>
    <style:style style:name="P21" style:family="paragraph" style:parent-style-name="Text_20_body">
      <style:paragraph-properties fo:line-height="100%"/>
      <style:text-properties officeooo:rsid="0216a37b" officeooo:paragraph-rsid="0216a37b"/>
    </style:style>
    <style:style style:name="P22" style:family="paragraph" style:parent-style-name="Text_20_body">
      <style:paragraph-properties fo:line-height="100%"/>
      <style:text-properties officeooo:rsid="0216a37b" officeooo:paragraph-rsid="0216c522"/>
    </style:style>
    <style:style style:name="P23" style:family="paragraph" style:parent-style-name="Text_20_body">
      <style:paragraph-properties fo:line-height="100%"/>
      <style:text-properties officeooo:rsid="0216a37b" officeooo:paragraph-rsid="02171d48"/>
    </style:style>
    <style:style style:name="P24" style:family="paragraph" style:parent-style-name="Heading_20_3">
      <style:paragraph-properties fo:line-height="100%"/>
      <style:text-properties style:text-underline-style="none" officeooo:rsid="0216a37b" officeooo:paragraph-rsid="0216a37b" fo:background-color="#bf0041"/>
    </style:style>
    <style:style style:name="P25"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6" style:family="paragraph" style:parent-style-name="Text_20_body">
      <style:paragraph-properties fo:line-height="100%"/>
      <style:text-properties fo:color="#00a933" loext:opacity="100%" style:font-name="Arial1" officeooo:rsid="0017c700" officeooo:paragraph-rsid="023aa484"/>
    </style:style>
    <style:style style:name="P27"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8" style:family="paragraph" style:parent-style-name="Text_20_body">
      <style:paragraph-properties fo:line-height="100%"/>
      <style:text-properties fo:color="#00a933" loext:opacity="100%" style:font-name="Arial1" officeooo:rsid="0017c700" officeooo:paragraph-rsid="023c909b"/>
    </style:style>
    <style:style style:name="P29" style:family="paragraph" style:parent-style-name="Text_20_body">
      <style:paragraph-properties fo:line-height="100%"/>
      <style:text-properties fo:color="#00a933" loext:opacity="100%" style:font-name="Arial1" officeooo:rsid="0017c700" officeooo:paragraph-rsid="023d09dc"/>
    </style:style>
    <style:style style:name="P30" style:family="paragraph" style:parent-style-name="Text_20_body">
      <style:paragraph-properties fo:line-height="100%"/>
      <style:text-properties fo:color="#00a933" loext:opacity="100%" style:font-name="Arial1" officeooo:rsid="0017c700" officeooo:paragraph-rsid="023ee483"/>
    </style:style>
    <style:style style:name="P31" style:family="paragraph" style:parent-style-name="Text_20_body">
      <style:paragraph-properties fo:line-height="100%"/>
      <style:text-properties fo:color="#00a933" loext:opacity="100%" style:font-name="Arial1" officeooo:rsid="0017c700" officeooo:paragraph-rsid="0240b662"/>
    </style:style>
    <style:style style:name="P32" style:family="paragraph" style:parent-style-name="Text_20_body">
      <style:paragraph-properties fo:line-height="100%"/>
      <style:text-properties fo:color="#00a933" loext:opacity="100%" style:font-name="Arial1" officeooo:rsid="0017c700" officeooo:paragraph-rsid="024209b0"/>
    </style:style>
    <style:style style:name="P33" style:family="paragraph" style:parent-style-name="Text_20_body">
      <style:paragraph-properties fo:line-height="100%"/>
      <style:text-properties fo:color="#00a933" loext:opacity="100%" style:font-name="Arial1" officeooo:rsid="0017c700" officeooo:paragraph-rsid="02425b33"/>
    </style:style>
    <style:style style:name="P34" style:family="paragraph" style:parent-style-name="Heading_20_3">
      <style:paragraph-properties fo:line-height="100%"/>
      <style:text-properties style:text-underline-style="none" officeooo:rsid="020908b2" officeooo:paragraph-rsid="020908b2" fo:background-color="#bf0041"/>
    </style:style>
    <style:style style:name="P35" style:family="paragraph" style:parent-style-name="Text_20_body">
      <style:paragraph-properties fo:line-height="100%"/>
      <style:text-properties fo:color="#00a933" loext:opacity="100%" style:font-name="Arial1" officeooo:rsid="0017c700" officeooo:paragraph-rsid="020d2357"/>
    </style:style>
    <style:style style:name="P36" style:family="paragraph" style:parent-style-name="Text_20_body">
      <style:paragraph-properties fo:line-height="100%"/>
      <style:text-properties fo:color="#00a933" loext:opacity="100%" style:font-name="Arial1" officeooo:rsid="0017c700" officeooo:paragraph-rsid="02113cfb"/>
    </style:style>
    <style:style style:name="P37" style:family="paragraph" style:parent-style-name="Text_20_body">
      <style:paragraph-properties fo:line-height="100%"/>
      <style:text-properties fo:color="#00a933" loext:opacity="100%" style:font-name="Arial1" officeooo:rsid="0017c700" officeooo:paragraph-rsid="02171d48"/>
    </style:style>
    <style:style style:name="P38" style:family="paragraph" style:parent-style-name="Text_20_body">
      <style:paragraph-properties fo:line-height="100%"/>
      <style:text-properties fo:color="#00a933" loext:opacity="100%" style:font-name="Arial1" officeooo:rsid="0017c700" officeooo:paragraph-rsid="02120630"/>
    </style:style>
    <style:style style:name="P39" style:family="paragraph" style:parent-style-name="Text_20_body">
      <style:paragraph-properties fo:line-height="100%"/>
      <style:text-properties fo:color="#00a933" loext:opacity="100%" style:font-name="Arial1" officeooo:rsid="0017c700" officeooo:paragraph-rsid="021770f8"/>
    </style:style>
    <style:style style:name="P40" style:family="paragraph" style:parent-style-name="Text_20_body">
      <style:paragraph-properties fo:line-height="100%"/>
      <style:text-properties fo:color="#00a933" loext:opacity="100%" style:font-name="Arial1" officeooo:rsid="0017c700" officeooo:paragraph-rsid="0256b2db"/>
    </style:style>
    <style:style style:name="P41"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42" style:family="paragraph" style:parent-style-name="Text_20_body">
      <style:paragraph-properties fo:line-height="100%"/>
      <style:text-properties fo:color="#00a933" loext:opacity="100%" style:font-name="Arial1" officeooo:rsid="0017c700" officeooo:paragraph-rsid="021d5bcc"/>
    </style:style>
    <style:style style:name="P43" style:family="paragraph" style:parent-style-name="Text_20_body">
      <style:paragraph-properties fo:line-height="100%"/>
      <style:text-properties fo:color="#00a933" loext:opacity="100%" style:font-name="Arial1" officeooo:rsid="0017c700" officeooo:paragraph-rsid="021fa2ef"/>
    </style:style>
    <style:style style:name="P44"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5" style:family="paragraph" style:parent-style-name="Text_20_body">
      <style:paragraph-properties fo:line-height="100%"/>
      <style:text-properties fo:color="#00a933" loext:opacity="100%" style:font-name="Arial1" officeooo:rsid="0017c700" officeooo:paragraph-rsid="0257f2af"/>
    </style:style>
    <style:style style:name="P46" style:family="paragraph" style:parent-style-name="Text_20_body">
      <style:paragraph-properties fo:line-height="100%"/>
      <style:text-properties fo:color="#00a933" loext:opacity="100%" style:font-name="Arial1" officeooo:rsid="0017c700" officeooo:paragraph-rsid="025964c2"/>
    </style:style>
    <style:style style:name="P47"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8" style:family="paragraph" style:parent-style-name="Text_20_body">
      <style:paragraph-properties fo:line-height="100%"/>
      <style:text-properties fo:color="#00a933" loext:opacity="100%" style:font-name="Arial1" officeooo:rsid="0017c700" officeooo:paragraph-rsid="025c4710"/>
    </style:style>
    <style:style style:name="P49" style:family="paragraph" style:parent-style-name="Text_20_body">
      <style:paragraph-properties fo:line-height="100%"/>
      <style:text-properties fo:color="#00a933" loext:opacity="100%" style:font-name="Arial1" officeooo:rsid="0017c700" officeooo:paragraph-rsid="025e5682"/>
    </style:style>
    <style:style style:name="P5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51" style:family="paragraph" style:parent-style-name="Text_20_body">
      <style:paragraph-properties fo:line-height="100%"/>
      <style:text-properties fo:color="#00a933" loext:opacity="100%" style:font-name="Arial1" officeooo:rsid="0017c700" officeooo:paragraph-rsid="026e980c"/>
    </style:style>
    <style:style style:name="P52" style:family="paragraph" style:parent-style-name="Text_20_body">
      <style:paragraph-properties fo:line-height="100%"/>
      <style:text-properties fo:color="#00a933" loext:opacity="100%" style:font-name="Arial1" officeooo:rsid="0017c700" officeooo:paragraph-rsid="026f46d2"/>
    </style:style>
    <style:style style:name="P53" style:family="paragraph" style:parent-style-name="Text_20_body">
      <style:paragraph-properties fo:line-height="100%"/>
      <style:text-properties fo:color="#00a933" loext:opacity="100%" style:font-name="Arial1" officeooo:rsid="0017c700" officeooo:paragraph-rsid="026fe807"/>
    </style:style>
    <style:style style:name="P54" style:family="paragraph" style:parent-style-name="Text_20_body">
      <style:paragraph-properties fo:line-height="100%"/>
      <style:text-properties fo:color="#00a933" loext:opacity="100%" style:font-name="Arial1" officeooo:paragraph-rsid="026fe807"/>
    </style:style>
    <style:style style:name="P55"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56" style:family="paragraph" style:parent-style-name="Text_20_body">
      <style:paragraph-properties fo:line-height="100%"/>
      <style:text-properties fo:color="#00a933" loext:opacity="100%" style:font-name="Arial1" officeooo:rsid="0017c700" officeooo:paragraph-rsid="0234a03a"/>
    </style:style>
    <style:style style:name="P57"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58"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9" style:family="paragraph" style:parent-style-name="Text_20_body">
      <style:paragraph-properties fo:line-height="100%"/>
      <style:text-properties fo:color="#00a933" loext:opacity="100%" style:font-name="Arial1" officeooo:rsid="0017c700" officeooo:paragraph-rsid="022b8b4d"/>
    </style:style>
    <style:style style:name="P60" style:family="paragraph" style:parent-style-name="Text_20_body">
      <style:paragraph-properties fo:line-height="100%"/>
      <style:text-properties fo:color="#00a933" loext:opacity="100%" style:font-name="Arial1" officeooo:rsid="0017c700" officeooo:paragraph-rsid="02300a0c"/>
    </style:style>
    <style:style style:name="P61" style:family="paragraph" style:parent-style-name="Standard">
      <style:paragraph-properties fo:line-height="100%"/>
      <style:text-properties fo:color="#00a933" loext:opacity="100%" style:font-name="Arial1" officeooo:rsid="0017c700" officeooo:paragraph-rsid="02300a0c"/>
    </style:style>
    <style:style style:name="P62" style:family="paragraph" style:parent-style-name="Text_20_body">
      <style:paragraph-properties fo:line-height="100%"/>
      <style:text-properties fo:color="#00a933" loext:opacity="100%" style:font-name="Arial1" officeooo:rsid="0017c700" officeooo:paragraph-rsid="02463c3d"/>
    </style:style>
    <style:style style:name="P63" style:family="paragraph" style:parent-style-name="Text_20_body">
      <style:paragraph-properties fo:line-height="100%"/>
      <style:text-properties fo:color="#00a933" loext:opacity="100%" style:font-name="Arial1" officeooo:rsid="0017c700" officeooo:paragraph-rsid="022bdc6a"/>
    </style:style>
    <style:style style:name="P64"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65"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66"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67"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68"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69"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70"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71"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72"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73"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74"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75"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76"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77"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78"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79"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80"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81"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82"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83"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84"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85"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86"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87"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88"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89"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90"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91" style:family="paragraph" style:parent-style-name="Text_20_body">
      <style:paragraph-properties fo:line-height="100%"/>
      <style:text-properties officeooo:paragraph-rsid="024defaf"/>
    </style:style>
    <style:style style:name="P92" style:family="paragraph" style:parent-style-name="Text_20_body">
      <style:paragraph-properties fo:line-height="100%"/>
      <style:text-properties fo:color="#00a933" loext:opacity="100%" style:font-name="Arial1" officeooo:rsid="0017c700" officeooo:paragraph-rsid="02212731"/>
    </style:style>
    <style:style style:name="P93" style:family="paragraph" style:parent-style-name="Text_20_body">
      <style:paragraph-properties fo:line-height="100%"/>
      <style:text-properties fo:color="#00a933" loext:opacity="100%" style:font-name="Arial1" officeooo:rsid="0017c700" officeooo:paragraph-rsid="022317e8"/>
    </style:style>
    <style:style style:name="P94"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95" style:family="paragraph" style:parent-style-name="Text_20_body">
      <style:paragraph-properties fo:line-height="100%"/>
      <style:text-properties fo:color="#00a933" loext:opacity="100%" style:font-name="Arial1" officeooo:rsid="0017c700" officeooo:paragraph-rsid="023943ac"/>
    </style:style>
    <style:style style:name="P96" style:family="paragraph" style:parent-style-name="Text_20_body">
      <style:paragraph-properties fo:line-height="100%"/>
      <style:text-properties fo:color="#00a933" loext:opacity="100%" style:font-name="Arial1" officeooo:rsid="0017c700" officeooo:paragraph-rsid="0236e83a"/>
    </style:style>
    <style:style style:name="P97"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98" style:family="paragraph" style:parent-style-name="Text_20_body">
      <style:paragraph-properties fo:line-height="100%"/>
      <style:text-properties fo:color="#00a933" loext:opacity="100%" style:font-name="Arial1" officeooo:rsid="0017c700" officeooo:paragraph-rsid="0227dcad"/>
    </style:style>
    <style:style style:name="P99" style:family="paragraph" style:parent-style-name="Text_20_body">
      <style:paragraph-properties fo:line-height="100%"/>
      <style:text-properties fo:color="#00a933" loext:opacity="100%" style:font-name="Arial1" officeooo:rsid="0017c700" officeooo:paragraph-rsid="0228c36d"/>
    </style:style>
    <style:style style:name="P100" style:family="paragraph" style:parent-style-name="Text_20_body">
      <style:paragraph-properties fo:line-height="100%"/>
      <style:text-properties fo:color="#00a933" loext:opacity="100%" style:font-name="Arial1" officeooo:rsid="0017c700" officeooo:paragraph-rsid="0229133e"/>
    </style:style>
    <style:style style:name="P101" style:family="paragraph" style:parent-style-name="Text_20_body">
      <style:paragraph-properties fo:line-height="100%"/>
      <style:text-properties fo:color="#00a933" loext:opacity="100%" style:font-name="Arial1" officeooo:rsid="0017c700" officeooo:paragraph-rsid="0229172e"/>
    </style:style>
    <style:style style:name="P102" style:family="paragraph" style:parent-style-name="Text_20_body">
      <style:paragraph-properties fo:line-height="100%"/>
      <style:text-properties fo:color="#00a933" loext:opacity="100%" style:font-name="Arial1" officeooo:rsid="0017c700" officeooo:paragraph-rsid="0229bac5"/>
    </style:style>
    <style:style style:name="P103"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04" style:family="paragraph" style:parent-style-name="Text_20_body">
      <style:paragraph-properties fo:line-height="100%"/>
      <style:text-properties fo:color="#00a933" loext:opacity="100%" style:font-name="Arial1" officeooo:rsid="0017c700" officeooo:paragraph-rsid="0243785a"/>
    </style:style>
    <style:style style:name="P105" style:family="paragraph" style:parent-style-name="Text_20_body">
      <style:paragraph-properties fo:line-height="100%"/>
      <style:text-properties fo:color="#00a933" loext:opacity="100%" style:font-name="Arial1" officeooo:rsid="0017c700" officeooo:paragraph-rsid="0244af53"/>
    </style:style>
    <style:style style:name="P106"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07" style:family="paragraph" style:parent-style-name="Text_20_body">
      <style:paragraph-properties fo:line-height="100%"/>
      <style:text-properties fo:color="#00a933" loext:opacity="100%" style:font-name="Arial1" officeooo:rsid="0017c700" officeooo:paragraph-rsid="026010dc"/>
    </style:style>
    <style:style style:name="P108" style:family="paragraph" style:parent-style-name="Text_20_body">
      <style:paragraph-properties fo:line-height="100%"/>
      <style:text-properties fo:color="#00a933" loext:opacity="100%" style:font-name="Arial1" officeooo:rsid="0017c700" officeooo:paragraph-rsid="02611b1c"/>
    </style:style>
    <style:style style:name="P109" style:family="paragraph" style:parent-style-name="Text_20_body">
      <style:paragraph-properties fo:line-height="100%"/>
      <style:text-properties fo:color="#00a933" loext:opacity="100%" style:font-name="Arial1" officeooo:rsid="0017c700" officeooo:paragraph-rsid="0262cfc4"/>
    </style:style>
    <style:style style:name="P110" style:family="paragraph" style:parent-style-name="Text_20_body">
      <style:paragraph-properties fo:line-height="100%"/>
      <style:text-properties fo:color="#00a933" loext:opacity="100%" style:font-name="Arial1" officeooo:rsid="0017c700" officeooo:paragraph-rsid="0263ef18"/>
    </style:style>
    <style:style style:name="P111" style:family="paragraph" style:parent-style-name="Text_20_body">
      <style:paragraph-properties fo:line-height="100%"/>
      <style:text-properties fo:color="#00a933" loext:opacity="100%" style:font-name="Arial1" officeooo:rsid="0017c700" officeooo:paragraph-rsid="02655e58"/>
    </style:style>
    <style:style style:name="P112" style:family="paragraph" style:parent-style-name="Text_20_body">
      <style:paragraph-properties fo:line-height="100%"/>
      <style:text-properties fo:color="#00a933" loext:opacity="100%" style:font-name="Arial1" officeooo:rsid="0017c700" officeooo:paragraph-rsid="0267ea92"/>
    </style:style>
    <style:style style:name="P113" style:family="paragraph" style:parent-style-name="Text_20_body">
      <style:paragraph-properties fo:line-height="100%"/>
      <style:text-properties fo:color="#00a933" loext:opacity="100%" style:font-name="Arial1" officeooo:rsid="0017c700" officeooo:paragraph-rsid="0265f0df"/>
    </style:style>
    <style:style style:name="P114" style:family="paragraph" style:parent-style-name="Text_20_body">
      <style:paragraph-properties fo:line-height="100%"/>
      <style:text-properties fo:color="#00a933" loext:opacity="100%" style:font-name="Arial1" officeooo:rsid="0017c700" officeooo:paragraph-rsid="026b6d9d"/>
    </style:style>
    <style:style style:name="P115" style:family="paragraph" style:parent-style-name="Text_20_body">
      <style:paragraph-properties fo:line-height="100%"/>
      <style:text-properties fo:color="#00a933" loext:opacity="100%" style:font-name="Arial1" officeooo:rsid="0017c700" officeooo:paragraph-rsid="026cad15"/>
    </style:style>
    <style:style style:name="P116" style:family="paragraph" style:parent-style-name="Text_20_body">
      <style:paragraph-properties fo:line-height="100%"/>
      <style:text-properties fo:color="#00a933" loext:opacity="100%" style:font-name="Arial1" officeooo:rsid="0017c700" officeooo:paragraph-rsid="026ce633"/>
    </style:style>
    <style:style style:name="P117"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18" style:family="paragraph" style:parent-style-name="Text_20_body">
      <style:paragraph-properties fo:line-height="100%"/>
      <style:text-properties fo:color="#00a933" loext:opacity="100%" style:font-name="Arial1" officeooo:rsid="0017c700" officeooo:paragraph-rsid="0273bc6d"/>
    </style:style>
    <style:style style:name="P119" style:family="paragraph" style:parent-style-name="Text_20_body">
      <style:paragraph-properties fo:line-height="100%"/>
      <style:text-properties fo:color="#00a933" loext:opacity="100%" style:font-name="Arial1" officeooo:rsid="0017c700" officeooo:paragraph-rsid="0275a1db"/>
    </style:style>
    <style:style style:name="P120" style:family="paragraph" style:parent-style-name="Text_20_body">
      <style:paragraph-properties fo:line-height="100%"/>
      <style:text-properties fo:color="#00a933" loext:opacity="100%" style:font-name="Arial1" officeooo:paragraph-rsid="0275a1db"/>
    </style:style>
    <style:style style:name="P121"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22" style:family="paragraph" style:parent-style-name="Text_20_body">
      <style:paragraph-properties fo:line-height="100%"/>
      <style:text-properties fo:color="#00a933" loext:opacity="100%" style:font-name="Arial1" officeooo:rsid="0017c700" officeooo:paragraph-rsid="02773f73"/>
    </style:style>
    <style:style style:name="P123"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24" style:family="paragraph" style:parent-style-name="Text_20_body">
      <style:paragraph-properties fo:line-height="100%"/>
      <style:text-properties fo:color="#00a933" loext:opacity="100%" style:font-name="Arial1" officeooo:rsid="0017c700" officeooo:paragraph-rsid="0278fc4b"/>
    </style:style>
    <style:style style:name="P12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26" style:family="paragraph" style:parent-style-name="Text_20_body">
      <style:paragraph-properties fo:line-height="100%"/>
      <style:text-properties fo:color="#00a933" loext:opacity="100%" style:font-name="Arial1" officeooo:rsid="0017c700" officeooo:paragraph-rsid="0279eff7"/>
    </style:style>
    <style:style style:name="P127" style:family="paragraph" style:parent-style-name="Text_20_body">
      <style:paragraph-properties fo:line-height="100%"/>
      <style:text-properties fo:color="#00a933" loext:opacity="100%" style:font-name="Arial1" officeooo:rsid="0017c700" officeooo:paragraph-rsid="027aa592"/>
    </style:style>
    <style:style style:name="P128" style:family="paragraph" style:parent-style-name="Text_20_body">
      <style:paragraph-properties fo:line-height="100%"/>
      <style:text-properties fo:color="#00a933" loext:opacity="100%" style:font-name="Arial1" officeooo:rsid="0017c700" officeooo:paragraph-rsid="027a9c47"/>
    </style:style>
    <style:style style:name="P12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3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31" style:family="paragraph" style:parent-style-name="Text_20_body">
      <style:paragraph-properties fo:line-height="100%"/>
      <style:text-properties fo:color="#00a933" loext:opacity="100%" style:font-name="Arial1" officeooo:rsid="0017c700" officeooo:paragraph-rsid="027bc442"/>
    </style:style>
    <style:style style:name="P132" style:family="paragraph" style:parent-style-name="Text_20_body">
      <style:paragraph-properties fo:line-height="100%"/>
      <style:text-properties fo:color="#00a933" loext:opacity="100%" style:font-name="Arial1" officeooo:rsid="0017c700" officeooo:paragraph-rsid="027d4a81"/>
    </style:style>
    <style:style style:name="P133"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34" style:family="paragraph" style:parent-style-name="Text_20_body">
      <style:paragraph-properties fo:line-height="100%"/>
      <style:text-properties fo:color="#00a933" loext:opacity="100%" style:font-name="Arial1" officeooo:rsid="0017c700" officeooo:paragraph-rsid="0280f154"/>
    </style:style>
    <style:style style:name="P13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36" style:family="paragraph" style:parent-style-name="Text_20_body">
      <style:paragraph-properties fo:line-height="100%"/>
      <style:text-properties fo:color="#00a933" loext:opacity="100%" style:font-name="Arial1" officeooo:rsid="0017c700" officeooo:paragraph-rsid="02812038"/>
    </style:style>
    <style:style style:name="P137"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38" style:family="paragraph" style:parent-style-name="Text_20_body">
      <style:paragraph-properties fo:line-height="100%"/>
      <style:text-properties fo:color="#00a933" loext:opacity="100%" style:font-name="Arial1" officeooo:rsid="0017c700" officeooo:paragraph-rsid="0282fb75"/>
    </style:style>
    <style:style style:name="P13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40" style:family="paragraph" style:parent-style-name="Text_20_body">
      <style:paragraph-properties fo:line-height="100%"/>
      <style:text-properties fo:color="#00a933" loext:opacity="100%" style:font-name="Arial1" officeooo:rsid="0017c700" officeooo:paragraph-rsid="02801787"/>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officeooo:rsid="02845fa8"/>
    </style:style>
    <style:style style:name="T11" style:family="text">
      <style:text-properties fo:color="#ffff38" loext:opacity="100%" officeooo:rsid="02845fa8"/>
    </style:style>
    <style:style style:name="T12"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13" style:family="text">
      <style:text-properties style:text-underline-style="none" fo:font-weight="normal" fo:background-color="transparent" loext:char-shading-value="0"/>
    </style:style>
    <style:style style:name="T14" style:family="text">
      <style:text-properties style:text-underline-style="none" fo:background-color="transparent" loext:char-shading-value="0"/>
    </style:style>
    <style:style style:name="T15"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6"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7" style:family="text">
      <style:text-properties style:text-underline-style="none" fo:font-weight="normal" officeooo:rsid="020aa978" fo:background-color="transparent" loext:char-shading-value="0"/>
    </style:style>
    <style:style style:name="T18"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9"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20"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21"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22"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3" style:family="text">
      <style:text-properties style:text-underline-style="none" fo:font-weight="normal" officeooo:rsid="021593b3" fo:background-color="transparent" loext:char-shading-value="0"/>
    </style:style>
    <style:style style:name="T24" style:family="text">
      <style:text-properties style:text-underline-style="none" fo:font-weight="normal" officeooo:rsid="0213cb13" fo:background-color="transparent" loext:char-shading-value="0"/>
    </style:style>
    <style:style style:name="T25" style:family="text">
      <style:text-properties fo:color="#ffffff" loext:opacity="100%" fo:font-size="12pt" fo:font-weight="normal" officeooo:rsid="0235268e" fo:background-color="transparent" loext:char-shading-value="0" style:font-size-asian="12pt" style:font-size-complex="12pt"/>
    </style:style>
    <style:style style:name="T26" style:family="text">
      <style:text-properties fo:font-weight="normal" fo:background-color="transparent" loext:char-shading-value="0"/>
    </style:style>
    <style:style style:name="T27" style:family="text">
      <style:text-properties officeooo:rsid="0227dcad"/>
    </style:style>
    <style:style style:name="T28" style:family="text">
      <style:text-properties officeooo:rsid="02259ec8"/>
    </style:style>
    <style:style style:name="T29" style:family="text">
      <style:text-properties officeooo:rsid="0226a567"/>
    </style:style>
    <style:style style:name="T30" style:family="text">
      <style:text-properties style:text-underline-style="none" officeooo:rsid="0216a37b"/>
    </style:style>
    <style:style style:name="T31" style:family="text">
      <style:text-properties officeooo:rsid="0216a37b"/>
    </style:style>
    <style:style style:name="T32" style:family="text">
      <style:text-properties officeooo:rsid="0216c522"/>
    </style:style>
    <style:style style:name="T33" style:family="text">
      <style:text-properties fo:color="#ffffff" loext:opacity="100%" style:font-name="Arial1" style:text-underline-style="none" officeooo:rsid="0216c522"/>
    </style:style>
    <style:style style:name="T34" style:family="text">
      <style:text-properties officeooo:rsid="02171d48"/>
    </style:style>
    <style:style style:name="T35" style:family="text">
      <style:text-properties fo:color="#469df9" loext:opacity="100%" style:font-name="Arial" fo:font-size="10pt" officeooo:rsid="02171d48" style:font-size-asian="10pt" style:font-size-complex="10pt"/>
    </style:style>
    <style:style style:name="T36" style:family="text">
      <style:text-properties fo:color="#ffffff" loext:opacity="100%" fo:font-size="12pt" fo:font-weight="normal" officeooo:rsid="020908b2" fo:background-color="transparent" loext:char-shading-value="0" style:font-size-asian="12pt" style:font-size-complex="12pt"/>
    </style:style>
    <style:style style:name="T37" style:family="text">
      <style:text-properties fo:color="#ffffff" loext:opacity="100%" fo:font-size="12pt" fo:font-weight="normal" officeooo:rsid="023aa484" fo:background-color="transparent" loext:char-shading-value="0" style:font-size-asian="12pt" style:font-size-complex="12pt"/>
    </style:style>
    <style:style style:name="T38" style:family="text">
      <style:text-properties fo:font-weight="normal" officeooo:rsid="023c909b" fo:background-color="transparent" loext:char-shading-value="0"/>
    </style:style>
    <style:style style:name="T39" style:family="text">
      <style:text-properties fo:color="#c9211e" loext:opacity="100%" style:font-name="Arial1" fo:font-size="14pt" fo:font-weight="normal" officeooo:rsid="023aa484" style:font-size-asian="14pt" style:font-size-complex="14pt"/>
    </style:style>
    <style:style style:name="T40" style:family="text">
      <style:text-properties fo:color="#ffffff" loext:opacity="100%" fo:font-size="12pt" officeooo:rsid="023c909b" fo:background-color="transparent" loext:char-shading-value="0" style:font-size-asian="12pt" style:font-size-complex="12pt"/>
    </style:style>
    <style:style style:name="T41" style:family="text">
      <style:text-properties fo:color="#c9211e" loext:opacity="100%" style:font-name="Arial1" fo:font-size="14pt" officeooo:rsid="023c909b" style:font-size-asian="14pt" style:font-size-complex="14pt"/>
    </style:style>
    <style:style style:name="T42" style:family="text">
      <style:text-properties fo:color="#ffffff" loext:opacity="100%" fo:font-size="12pt" fo:font-weight="normal" officeooo:rsid="023c909b" fo:background-color="transparent" loext:char-shading-value="0" style:font-size-asian="12pt" style:font-size-complex="12pt"/>
    </style:style>
    <style:style style:name="T43" style:family="text">
      <style:text-properties fo:color="#ffffff" loext:opacity="100%" fo:font-size="12pt" fo:font-weight="normal" officeooo:rsid="023d09dc" fo:background-color="transparent" loext:char-shading-value="0" style:font-size-asian="12pt" style:font-size-complex="12pt"/>
    </style:style>
    <style:style style:name="T44"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5"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6" style:family="text">
      <style:text-properties style:text-line-through-style="none" style:text-line-through-type="none" style:text-underline-style="none" style:text-blinking="false" fo:background-color="transparent" loext:char-shading-value="0" loext:padding="0cm" loext:border="none"/>
    </style:style>
    <style:style style:name="T47" style:family="text">
      <style:text-properties fo:color="#ffffff" loext:opacity="100%" fo:font-size="12pt" fo:font-weight="normal" officeooo:rsid="023ee483" fo:background-color="transparent" loext:char-shading-value="0" style:font-size-asian="12pt" style:font-size-complex="12pt"/>
    </style:style>
    <style:style style:name="T48" style:family="text">
      <style:text-properties fo:font-weight="normal" officeooo:rsid="0240b662" fo:background-color="transparent" loext:char-shading-value="0"/>
    </style:style>
    <style:style style:name="T49" style:family="text">
      <style:text-properties fo:color="#a1467e" loext:opacity="100%" fo:font-weight="normal" fo:background-color="transparent" loext:char-shading-value="0"/>
    </style:style>
    <style:style style:name="T50" style:family="text">
      <style:text-properties fo:color="#00a933" loext:opacity="100%" fo:font-weight="normal" fo:background-color="transparent" loext:char-shading-value="0"/>
    </style:style>
    <style:style style:name="T51" style:family="text">
      <style:text-properties fo:font-weight="normal" officeooo:rsid="024209b0" fo:background-color="transparent" loext:char-shading-value="0"/>
    </style:style>
    <style:style style:name="T52" style:family="text">
      <style:text-properties fo:color="#ffffff" loext:opacity="100%" fo:font-size="12pt" fo:font-weight="normal" officeooo:rsid="024209b0" fo:background-color="transparent" loext:char-shading-value="0" style:font-size-asian="12pt" style:font-size-complex="12pt"/>
    </style:style>
    <style:style style:name="T53" style:family="text">
      <style:text-properties fo:font-weight="normal" officeooo:rsid="02425b33" fo:background-color="transparent" loext:char-shading-value="0"/>
    </style:style>
    <style:style style:name="T54" style:family="text">
      <style:text-properties fo:color="#ffffff" loext:opacity="100%" style:font-name="Arial" fo:font-size="12pt" fo:font-weight="normal" officeooo:rsid="020908b2" fo:background-color="transparent" loext:char-shading-value="0" style:font-size-asian="12pt" style:font-size-complex="12pt"/>
    </style:style>
    <style:style style:name="T55" style:family="text">
      <style:text-properties fo:color="#ffffff" loext:opacity="100%" fo:font-size="12pt" fo:font-weight="normal" officeooo:rsid="020bd315" fo:background-color="transparent" loext:char-shading-value="0" style:font-size-asian="12pt" style:font-size-complex="12pt"/>
    </style:style>
    <style:style style:name="T56" style:family="text">
      <style:text-properties fo:font-size="12pt" fo:background-color="transparent" loext:char-shading-value="0" style:font-size-asian="12pt" style:font-size-complex="12pt"/>
    </style:style>
    <style:style style:name="T57" style:family="text">
      <style:text-properties fo:color="#ffffff" loext:opacity="100%" fo:font-size="12pt" fo:font-weight="normal" officeooo:rsid="020d2357" fo:background-color="transparent" loext:char-shading-value="0" style:font-size-asian="12pt" style:font-size-complex="12pt"/>
    </style:style>
    <style:style style:name="T58" style:family="text">
      <style:text-properties fo:color="#ffffff" loext:opacity="100%" fo:font-size="14pt" fo:font-weight="normal" officeooo:rsid="020d2357" fo:background-color="transparent" loext:char-shading-value="0" style:font-size-asian="14pt" style:font-size-complex="14pt"/>
    </style:style>
    <style:style style:name="T59" style:family="text">
      <style:text-properties officeooo:rsid="020ebc40" fo:background-color="transparent" loext:char-shading-value="0"/>
    </style:style>
    <style:style style:name="T60" style:family="text">
      <style:text-properties fo:font-weight="normal" officeooo:rsid="020ebc40" fo:background-color="transparent" loext:char-shading-value="0"/>
    </style:style>
    <style:style style:name="T61" style:family="text">
      <style:text-properties fo:color="#ffffff" loext:opacity="100%" fo:font-size="14pt" fo:font-weight="normal" officeooo:rsid="02113cfb" fo:background-color="transparent" loext:char-shading-value="0" style:font-size-asian="14pt" style:font-size-complex="14pt"/>
    </style:style>
    <style:style style:name="T62"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20630" fo:background-color="transparent" loext:char-shading-value="0"/>
    </style:style>
    <style:style style:name="T64" style:family="text">
      <style:text-properties style:text-underline-style="none" fo:font-weight="normal" officeooo:rsid="021770f8" fo:background-color="transparent" loext:char-shading-value="0"/>
    </style:style>
    <style:style style:name="T65"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6" style:family="text">
      <style:text-properties style:text-underline-style="none" fo:font-weight="normal" officeooo:rsid="02171d48" fo:background-color="transparent" loext:char-shading-value="0"/>
    </style:style>
    <style:style style:name="T67" style:family="text">
      <style:text-properties style:text-underline-style="none" fo:font-weight="normal" officeooo:rsid="02191726" fo:background-color="transparent" loext:char-shading-value="0"/>
    </style:style>
    <style:style style:name="T68"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9"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70" style:family="text">
      <style:text-properties fo:color="#ffffff" loext:opacity="100%" fo:font-size="14pt" fo:font-weight="normal" officeooo:rsid="021c3799" style:font-size-asian="14pt" style:font-size-complex="14pt"/>
    </style:style>
    <style:style style:name="T71"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72"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3" style:family="text">
      <style:text-properties style:text-underline-style="none" fo:font-weight="normal" officeooo:rsid="021d5bcc" fo:background-color="transparent" loext:char-shading-value="0"/>
    </style:style>
    <style:style style:name="T74" style:family="text">
      <style:text-properties style:text-underline-style="none" fo:font-weight="normal" officeooo:rsid="021fa2ef" fo:background-color="transparent" loext:char-shading-value="0"/>
    </style:style>
    <style:style style:name="T75"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6" style:family="text">
      <style:text-properties fo:color="#ffffff" loext:opacity="100%" fo:font-size="14pt" fo:font-weight="normal" officeooo:rsid="0257f2af" style:font-size-asian="14pt" style:font-size-complex="14pt"/>
    </style:style>
    <style:style style:name="T77"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8"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9"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80" style:family="text">
      <style:text-properties fo:color="#ffffff" loext:opacity="100%" fo:font-size="14pt" fo:font-weight="normal" officeooo:rsid="025c4710" style:font-size-asian="14pt" style:font-size-complex="14pt"/>
    </style:style>
    <style:style style:name="T81"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82" style:family="text">
      <style:text-properties style:text-underline-style="none" fo:font-weight="normal" officeooo:rsid="025c4710" fo:background-color="transparent" loext:char-shading-value="0"/>
    </style:style>
    <style:style style:name="T83" style:family="text">
      <style:text-properties fo:color="#a7074b" loext:opacity="100%" fo:font-size="14pt" style:text-underline-style="none" fo:font-weight="normal" officeooo:rsid="025e5682" fo:background-color="#ffbf00" loext:char-shading-value="0" style:font-size-asian="14pt" style:font-size-complex="14pt"/>
    </style:style>
    <style:style style:name="T84"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5" style:family="text">
      <style:text-properties style:text-underline-style="none" fo:font-weight="normal" officeooo:rsid="025e5682" fo:background-color="transparent" loext:char-shading-value="0"/>
    </style:style>
    <style:style style:name="T86" style:family="text">
      <style:text-properties fo:color="#ffffff" loext:opacity="100%" fo:font-size="14pt" fo:font-weight="normal" officeooo:rsid="026e980c" fo:background-color="transparent" loext:char-shading-value="0" style:font-size-asian="14pt" style:font-size-complex="14pt"/>
    </style:style>
    <style:style style:name="T87" style:family="text">
      <style:text-properties fo:color="#ffffff" loext:opacity="100%" fo:font-size="14pt" fo:font-weight="normal" officeooo:rsid="026f46d2" fo:background-color="transparent" loext:char-shading-value="0" style:font-size-asian="14pt" style:font-size-complex="14pt"/>
    </style:style>
    <style:style style:name="T88" style:family="text">
      <style:text-properties fo:color="#ffffff" loext:opacity="100%" fo:font-size="14pt" fo:font-weight="normal" officeooo:rsid="026fe807" fo:background-color="transparent" loext:char-shading-value="0" style:font-size-asian="14pt" style:font-size-complex="14pt"/>
    </style:style>
    <style:style style:name="T89" style:family="text">
      <style:text-properties fo:font-weight="normal" officeooo:rsid="026fe807" fo:background-color="transparent" loext:char-shading-value="0"/>
    </style:style>
    <style:style style:name="T90" style:family="text">
      <style:text-properties fo:color="#ffffff" loext:opacity="100%" fo:font-size="14pt" fo:font-weight="normal" officeooo:rsid="026eb8ab" style:font-size-asian="14pt" style:font-size-complex="14pt"/>
    </style:style>
    <style:style style:name="T91" style:family="text">
      <style:text-properties fo:color="#ffffff" loext:opacity="100%" fo:font-size="14pt" fo:font-weight="normal" officeooo:rsid="0234a03a" style:font-size-asian="14pt" style:font-size-complex="14pt"/>
    </style:style>
    <style:style style:name="T92"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93" style:family="text">
      <style:text-properties style:text-underline-style="none" officeooo:rsid="0234a03a" fo:background-color="transparent" loext:char-shading-value="0"/>
    </style:style>
    <style:style style:name="T94" style:family="text">
      <style:text-properties style:text-underline-style="none" fo:font-weight="normal" officeooo:rsid="0234a03a" fo:background-color="transparent" loext:char-shading-value="0"/>
    </style:style>
    <style:style style:name="T95" style:family="text">
      <style:text-properties fo:color="#ffffff" loext:opacity="100%" fo:font-size="20pt" fo:font-weight="normal" officeooo:rsid="026fe807" style:font-size-asian="20pt" style:font-size-complex="20pt"/>
    </style:style>
    <style:style style:name="T96" style:family="text">
      <style:text-properties fo:color="#ffffff" loext:opacity="100%" fo:font-size="14pt" fo:font-weight="normal" officeooo:rsid="022b8b4d" style:font-size-asian="14pt" style:font-size-complex="14pt"/>
    </style:style>
    <style:style style:name="T97"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98"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9" style:family="text">
      <style:text-properties style:text-underline-style="none" fo:font-weight="normal" officeooo:rsid="02300a0c" fo:background-color="transparent" loext:char-shading-value="0"/>
    </style:style>
    <style:style style:name="T100" style:family="text">
      <style:text-properties style:text-underline-style="none" fo:font-weight="normal" officeooo:rsid="02463c3d" fo:background-color="transparent" loext:char-shading-value="0"/>
    </style:style>
    <style:style style:name="T101" style:family="text">
      <style:text-properties fo:color="#ff7b72" loext:opacity="100%" fo:font-family="'Droid Sans Mono', monospace" fo:font-size="10.5pt" style:text-underline-style="none" fo:font-weight="normal" officeooo:rsid="02463c3d" fo:background-color="#121314" loext:char-shading-value="0"/>
    </style:style>
    <style:style style:name="T102" style:family="text">
      <style:text-properties fo:color="#bbbebf" loext:opacity="100%" fo:font-family="'Droid Sans Mono', monospace" fo:font-size="10.5pt" style:text-underline-style="none" fo:font-weight="normal" officeooo:rsid="02463c3d" fo:background-color="#121314" loext:char-shading-value="0"/>
    </style:style>
    <style:style style:name="T103" style:family="text">
      <style:text-properties fo:color="#4ec9b0" loext:opacity="100%" fo:font-family="'Droid Sans Mono', monospace" fo:font-size="10.5pt" style:text-underline-style="none" fo:font-weight="normal" officeooo:rsid="02463c3d" fo:background-color="#121314" loext:char-shading-value="0"/>
    </style:style>
    <style:style style:name="T104" style:family="text">
      <style:text-properties fo:color="#d4d4d4" loext:opacity="100%" fo:font-family="'Droid Sans Mono', monospace" fo:font-size="10.5pt" style:text-underline-style="none" fo:font-weight="normal" officeooo:rsid="02463c3d" fo:background-color="#121314" loext:char-shading-value="0"/>
    </style:style>
    <style:style style:name="T10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106"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07"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08"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9"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10"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11"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12"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13"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14"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15"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17" style:family="text">
      <style:text-properties style:text-underline-style="none" fo:font-weight="normal" officeooo:rsid="024defaf" fo:background-color="transparent" loext:char-shading-value="0"/>
    </style:style>
    <style:style style:name="T118"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9" style:family="text">
      <style:text-properties style:text-underline-style="none" fo:font-weight="normal" officeooo:rsid="024fdc8c" fo:background-color="transparent" loext:char-shading-value="0"/>
    </style:style>
    <style:style style:name="T120" style:family="text">
      <style:text-properties fo:color="#ffffff" loext:opacity="100%" fo:font-size="14pt" fo:font-weight="normal" officeooo:rsid="024fdc8c" style:font-size-asian="14pt" style:font-size-complex="14pt"/>
    </style:style>
    <style:style style:name="T121"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22" style:family="text">
      <style:text-properties style:text-underline-style="none" fo:font-weight="normal" officeooo:rsid="02483f67" fo:background-color="transparent" loext:char-shading-value="0"/>
    </style:style>
    <style:style style:name="T123" style:family="text">
      <style:text-properties fo:color="#ffffff" loext:opacity="100%" fo:font-size="14pt" fo:font-weight="normal" officeooo:rsid="02212731" fo:background-color="#b47804" loext:char-shading-value="0" style:font-size-asian="14pt" style:font-size-complex="14pt"/>
    </style:style>
    <style:style style:name="T124" style:family="text">
      <style:text-properties fo:color="#ffffff" loext:opacity="100%" fo:font-size="14pt" fo:font-weight="normal" officeooo:rsid="024aceee" fo:background-color="#ff3838" loext:char-shading-value="0" style:font-size-asian="14pt" style:font-size-complex="14pt"/>
    </style:style>
    <style:style style:name="T125" style:family="text">
      <style:text-properties fo:color="#ffffff" loext:opacity="100%" fo:font-size="14pt" fo:font-weight="normal" officeooo:rsid="024defaf" fo:background-color="#ff3838" loext:char-shading-value="0" style:font-size-asian="14pt" style:font-size-complex="14pt"/>
    </style:style>
    <style:style style:name="T126"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28" style:family="text">
      <style:text-properties style:text-underline-style="none" fo:font-weight="normal" officeooo:rsid="02530e64" fo:background-color="transparent" loext:char-shading-value="0"/>
    </style:style>
    <style:style style:name="T129" style:family="text">
      <style:text-properties style:text-underline-style="none" fo:font-weight="normal" officeooo:rsid="025162a0" fo:background-color="transparent" loext:char-shading-value="0"/>
    </style:style>
    <style:style style:name="T130" style:family="text">
      <style:text-properties style:text-underline-style="none" officeooo:rsid="02530e64" fo:background-color="transparent" loext:char-shading-value="0"/>
    </style:style>
    <style:style style:name="T131" style:family="text">
      <style:text-properties fo:color="#ffffff" loext:opacity="100%" fo:font-size="14pt" fo:font-weight="normal" officeooo:rsid="024aceee" fo:background-color="#00a933" loext:char-shading-value="0" style:font-size-asian="14pt" style:font-size-complex="14pt"/>
    </style:style>
    <style:style style:name="T132" style:family="text">
      <style:text-properties fo:color="#ffffff" loext:opacity="100%" fo:font-size="14pt" fo:font-weight="normal" officeooo:rsid="024defaf" fo:background-color="#00a933" loext:char-shading-value="0" style:font-size-asian="14pt" style:font-size-complex="14pt"/>
    </style:style>
    <style:style style:name="T13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34" style:family="text">
      <style:text-properties style:text-underline-style="none" officeooo:rsid="024c2621" fo:background-color="transparent" loext:char-shading-value="0"/>
    </style:style>
    <style:style style:name="T135"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36" style:family="text">
      <style:text-properties fo:color="#ffffff" loext:opacity="100%" fo:font-size="14pt" fo:font-weight="normal" officeooo:rsid="0254b429" fo:background-color="#00a933" loext:char-shading-value="0" style:font-size-asian="14pt" style:font-size-complex="14pt"/>
    </style:style>
    <style:style style:name="T13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38" style:family="text">
      <style:text-properties fo:color="#ffffff" loext:opacity="100%" fo:font-size="14pt" fo:font-weight="normal" officeooo:rsid="0286b636" fo:background-color="#00a933" loext:char-shading-value="0" style:font-size-asian="14pt" style:font-size-complex="14pt"/>
    </style:style>
    <style:style style:name="T139"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140" style:family="text">
      <style:text-properties style:text-underline-style="none" fo:font-weight="normal" officeooo:rsid="028ca448" fo:background-color="transparent" loext:char-shading-value="0"/>
    </style:style>
    <style:style style:name="T141"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142"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143" style:family="text">
      <style:text-properties style:text-underline-style="none" fo:font-weight="normal" officeooo:rsid="0288b994" fo:background-color="transparent" loext:char-shading-value="0"/>
    </style:style>
    <style:style style:name="T144" style:family="text">
      <style:text-properties style:text-underline-style="none" fo:font-weight="normal" officeooo:rsid="028981f5" fo:background-color="transparent" loext:char-shading-value="0"/>
    </style:style>
    <style:style style:name="T145"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146"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147" style:family="text">
      <style:text-properties style:text-underline-style="none" officeooo:rsid="028981f5" fo:background-color="transparent" loext:char-shading-value="0"/>
    </style:style>
    <style:style style:name="T148" style:family="text">
      <style:text-properties fo:color="#ffffff" loext:opacity="100%" fo:font-size="21pt" fo:font-weight="normal" officeooo:rsid="0286b636" fo:background-color="#b47804" loext:char-shading-value="0" style:font-size-asian="21pt" style:font-size-complex="21pt"/>
    </style:style>
    <style:style style:name="T149" style:family="text">
      <style:text-properties fo:color="#ffffff" loext:opacity="100%" fo:font-size="14pt" style:text-underline-style="none" fo:font-weight="normal" officeooo:rsid="024defaf" fo:background-color="#00a933" loext:char-shading-value="0" style:font-size-asian="14pt" style:font-size-complex="14pt"/>
    </style:style>
    <style:style style:name="T150"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52"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53" style:family="text">
      <style:text-properties fo:color="#ffffff" loext:opacity="100%" fo:font-weight="normal" officeooo:rsid="02212731"/>
    </style:style>
    <style:style style:name="T154" style:family="text">
      <style:text-properties fo:color="#ffffff" loext:opacity="100%" fo:font-size="14pt" fo:font-weight="normal" officeooo:rsid="022317e8" fo:background-color="#b47804" loext:char-shading-value="0" style:font-size-asian="14pt" style:font-size-complex="14pt"/>
    </style:style>
    <style:style style:name="T155" style:family="text">
      <style:text-properties style:text-underline-style="none" officeooo:rsid="023943ac" fo:background-color="transparent" loext:char-shading-value="0"/>
    </style:style>
    <style:style style:name="T156"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57" style:family="text">
      <style:text-properties style:text-underline-style="none" officeooo:rsid="0236e83a" fo:background-color="transparent" loext:char-shading-value="0"/>
    </style:style>
    <style:style style:name="T158" style:family="text">
      <style:text-properties style:text-underline-style="none" fo:font-weight="normal" officeooo:rsid="0236e83a" fo:background-color="transparent" loext:char-shading-value="0"/>
    </style:style>
    <style:style style:name="T159" style:family="text">
      <style:text-properties style:text-underline-style="none" fo:font-weight="normal" officeooo:rsid="023943ac" fo:background-color="transparent" loext:char-shading-value="0"/>
    </style:style>
    <style:style style:name="T160" style:family="text">
      <style:text-properties fo:color="#ffffff" loext:opacity="100%" fo:font-size="14pt" fo:font-weight="normal" officeooo:rsid="0227dcad" fo:background-color="#069a2e" loext:char-shading-value="0" style:font-size-asian="14pt" style:font-size-complex="14pt"/>
    </style:style>
    <style:style style:name="T161"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62" style:family="text">
      <style:text-properties fo:color="#ffffff" loext:opacity="100%" fo:font-size="14pt" style:text-underline-style="none" fo:font-weight="normal" officeooo:rsid="0228c36d" fo:background-color="#069a2e" loext:char-shading-value="0" style:font-size-asian="14pt" style:font-size-complex="14pt"/>
    </style:style>
    <style:style style:name="T163" style:family="text">
      <style:text-properties style:text-underline-style="none" fo:font-weight="normal" officeooo:rsid="0229133e" fo:background-color="transparent" loext:char-shading-value="0"/>
    </style:style>
    <style:style style:name="T164"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65"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66"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67"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68" style:family="text">
      <style:text-properties fo:color="#ff0000" loext:opacity="100%" fo:font-size="14pt" fo:font-weight="normal" officeooo:rsid="0243785a" fo:background-color="#ffff00" loext:char-shading-value="0" style:font-size-asian="14pt" style:font-size-complex="14pt"/>
    </style:style>
    <style:style style:name="T169"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70" style:family="text">
      <style:text-properties style:text-underline-style="none" fo:font-weight="normal" officeooo:rsid="0243785a" fo:background-color="transparent" loext:char-shading-value="0"/>
    </style:style>
    <style:style style:name="T171"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72" style:family="text">
      <style:text-properties style:text-underline-style="none" officeooo:rsid="0244af53" fo:background-color="transparent" loext:char-shading-value="0"/>
    </style:style>
    <style:style style:name="T173"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74"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75" style:family="text">
      <style:text-properties style:text-underline-style="none" fo:font-weight="normal" fo:background-color="transparent" loext:char-shading-value="0" style:font-weight-asian="bold" style:font-weight-complex="bold"/>
    </style:style>
    <style:style style:name="T176"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77" style:family="text">
      <style:text-properties style:text-underline-style="none" fo:font-weight="normal" officeooo:rsid="0262cfc4" fo:background-color="transparent" loext:char-shading-value="0" style:font-weight-asian="bold" style:font-weight-complex="bold"/>
    </style:style>
    <style:style style:name="T178"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79"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80" style:family="text">
      <style:text-properties style:text-underline-style="none" fo:font-weight="normal" officeooo:rsid="0263ef18" fo:background-color="transparent" loext:char-shading-value="0" style:font-weight-asian="bold" style:font-weight-complex="bold"/>
    </style:style>
    <style:style style:name="T181"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82" style:family="text">
      <style:text-properties style:text-underline-style="none" fo:font-weight="normal" officeooo:rsid="02655e58" fo:background-color="transparent" loext:char-shading-value="0"/>
    </style:style>
    <style:style style:name="T183" style:family="text">
      <style:text-properties style:text-underline-style="none" officeooo:rsid="02655e58" fo:background-color="transparent" loext:char-shading-value="0"/>
    </style:style>
    <style:style style:name="T184" style:family="text">
      <style:text-properties style:text-underline-style="none" fo:font-weight="normal" officeooo:rsid="025c4710" fo:background-color="transparent" loext:char-shading-value="0" style:font-weight-asian="bold" style:font-weight-complex="bold"/>
    </style:style>
    <style:style style:name="T185" style:family="text">
      <style:text-properties style:text-underline-style="none" fo:font-weight="normal" officeooo:rsid="0267ea92" fo:background-color="transparent" loext:char-shading-value="0" style:font-weight-asian="bold" style:font-weight-complex="bold"/>
    </style:style>
    <style:style style:name="T186" style:family="text">
      <style:text-properties style:text-underline-style="none" fo:font-weight="normal" officeooo:rsid="0269a241" fo:background-color="transparent" loext:char-shading-value="0" style:font-weight-asian="bold" style:font-weight-complex="bold"/>
    </style:style>
    <style:style style:name="T187"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88"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89" style:family="text">
      <style:text-properties style:text-underline-style="none" fo:font-weight="normal" officeooo:rsid="026b6d9d" fo:background-color="transparent" loext:char-shading-value="0" style:font-weight-asian="bold" style:font-weight-complex="bold"/>
    </style:style>
    <style:style style:name="T190"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91"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92" style:family="text">
      <style:text-properties style:text-underline-style="none" fo:font-weight="normal" officeooo:rsid="026ce633" fo:background-color="transparent" loext:char-shading-value="0" style:font-weight-asian="bold" style:font-weight-complex="bold"/>
    </style:style>
    <style:style style:name="T193"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194"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195" style:family="text">
      <style:text-properties style:text-underline-style="none" fo:font-weight="normal" officeooo:rsid="0273bc6d" fo:background-color="transparent" loext:char-shading-value="0" style:font-weight-asian="bold" style:font-weight-complex="bold"/>
    </style:style>
    <style:style style:name="T196"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197"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198"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199" style:family="text">
      <style:text-properties style:text-underline-style="none" fo:font-weight="normal" officeooo:rsid="0278d050" fo:background-color="transparent" loext:char-shading-value="0" style:font-weight-asian="bold" style:font-weight-complex="bold"/>
    </style:style>
    <style:style style:name="T200"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201"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02"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203"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04" style:family="text">
      <style:text-properties style:text-underline-style="none" fo:font-weight="normal" officeooo:rsid="0279eff7" fo:background-color="transparent" loext:char-shading-value="0" style:font-weight-asian="bold" style:font-weight-complex="bold"/>
    </style:style>
    <style:style style:name="T205" style:family="text">
      <style:text-properties style:text-underline-style="none" officeooo:rsid="0279eff7" fo:background-color="transparent" loext:char-shading-value="0"/>
    </style:style>
    <style:style style:name="T206"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207" style:family="text">
      <style:text-properties style:text-underline-style="none" fo:font-weight="normal" officeooo:rsid="027aa592" fo:background-color="transparent" loext:char-shading-value="0" style:font-weight-asian="bold" style:font-weight-complex="bold"/>
    </style:style>
    <style:style style:name="T208"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209"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10"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211" style:family="text">
      <style:text-properties style:text-underline-style="none" officeooo:rsid="027aa592" fo:background-color="transparent" loext:char-shading-value="0"/>
    </style:style>
    <style:style style:name="T212"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13"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214"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215" style:family="text">
      <style:text-properties style:text-underline-style="solid" style:text-underline-width="auto" style:text-underline-color="font-color" fo:background-color="transparent" loext:char-shading-value="0"/>
    </style:style>
    <style:style style:name="T216" style:family="text">
      <style:text-properties style:text-underline-style="none" fo:font-weight="normal" officeooo:rsid="027d4a81" fo:background-color="transparent" loext:char-shading-value="0" style:font-weight-asian="bold" style:font-weight-complex="bold"/>
    </style:style>
    <style:style style:name="T217"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18"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19"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220"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221"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22"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223"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24"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 </text:span></text:span><text:span text:style-name="_3c_C_2b__2b__3e_"><text:span text:style-name="T10">y &amp;’static str </text:span></text:span><text:span text:style-name="_3c_C_2b__2b__3e_"><text:span text:style-name="T11">(*nota)</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2">*NOTA: en C se puede devolver un </text:span></text:span><text:span text:style-name="_3c_C_3e_"><text:span text:style-name="T13">char*</text:span></text:span><text:span text:style-name="_2f__2f_C"><text:span text:style-name="T12"> pero si se hace un </text:span></text:span><text:span text:style-name="_3c_C_3e_"><text:span text:style-name="T13">char str[] = “hola”</text:span></text:span><text:span text:style-name="_2f__2f_C"><text:span text:style-name="T12">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14">&amp;’static str</text:span></text:span><text:span text:style-name="_2f__2f_C"><text:span text:style-name="T12">, y cuando lo lea de un parametro donde morirá dentro de la función podremos usar un </text:span></text:span><text:span text:style-name="_3c_C_2b__2b__3e_"><text:span text:style-name="T14">&amp;str</text:span></text:span><text:span text:style-name="_2f__2f_C"><text:span text:style-name="T12">.</text:span></text:span></text:p>
      <text:p text:style-name="P4"><text:span text:style-name="_2f__2f_C"><text:span text:style-name="T12">El </text:span></text:span><text:span text:style-name="_3c_C_2b__2b__3e_"><text:span text:style-name="T14">‘</text:span></text:span><text:span text:style-name="_2f__2f_C"><text:span text:style-name="T12"> del </text:span></text:span><text:span text:style-name="_3c_C_2b__2b__3e_"><text:span text:style-name="T14">&amp;’</text:span></text:span><text:span text:style-name="_2f__2f_C"><text:span text:style-name="T12"> indica lifetime y se puede ver más abajo qué significa.</text:span></text:span></text:p>
      <text:p text:style-name="P5"><text:span text:style-name="_2f__2f_C"><text:span text:style-name="T15">Para asignar un valor a una variable seria:</text:span></text:span><text:span text:style-name="_2f__2f_C"><text:span text:style-name="T16"><text:line-break/><text:line-break/></text:span></text:span><text:span text:style-name="_3c_C_3e_"><text:span text:style-name="T13">let a = 32;</text:span></text:span><text:span text:style-name="_3c_C_3e_"><text:span text:style-name="T17"> </text:span></text:span><text:span text:style-name="_2f__2f_C"><text:span text:style-name="T17">//no habría una declaracion previa tipo a: i32, y Rust deduce lo que es.\</text:span></text:span></text:p>
      <text:p text:style-name="P6"><text:span text:style-name="_3c_C_3e_"><text:span text:style-name="T13">let a = 32 as f32</text:span></text:span><text:span text:style-name="_2f__2f_C"><text:span text:style-name="T17"> //le indicamos que es un float</text:span></text:span></text:p>
      <text:p text:style-name="P6"><text:span text:style-name="_2f__2f_C"><text:span text:style-name="T18">o</text:span></text:span></text:p>
      <text:p text:style-name="P6"><text:span text:style-name="_3c_C_3e_"><text:span text:style-name="T13">let a: i32 = 42;</text:span></text:span></text:p>
      <text:p text:style-name="P6"><text:span text:style-name="_3c_C_3e_"><text:span text:style-name="T13"/></text:span></text:p>
      <text:p text:style-name="P7"><text:span text:style-name="_3c_C_2b__2b__3e_"><text:span text:style-name="T14">LET</text:span></text:span><text:span text:style-name="_2f__2f_C"><text:span text:style-name="T19"> es para hacer que no pueda variar</text:span></text:span><text:span text:style-name="_2f__2f_C"><text:span text:style-name="T20"> (NO PUEDE SER GLOBAL).</text:span></text:span><text:span text:style-name="_2f__2f_C"><text:span text:style-name="T21"> </text:span></text:span><text:span text:style-name="_3c_C_2b__2b__3e_"><text:span text:style-name="T14">LET</text:span></text:span><text:span text:style-name="_2f__2f_C"><text:span text:style-name="T20"> </text:span></text:span><text:span text:style-name="_3c_C_2b__2b__3e_"><text:span text:style-name="T14">MUT</text:span></text:span><text:span text:style-name="_2f__2f_C"><text:span text:style-name="T19"> para que varie</text:span></text:span><text:span text:style-name="_2f__2f_C"><text:span text:style-name="T20"> (Hay que poner </text:span></text:span><text:span text:style-name="_3c_C_2b__2b__3e_"><text:span text:style-name="T14">let</text:span></text:span><text:span text:style-name="_2f__2f_C"><text:span text:style-name="T20"> delante)</text:span></text:span><text:span text:style-name="_2f__2f_C"><text:span text:style-name="T19">, y </text:span></text:span><text:span text:style-name="_3c_C_2b__2b__3e_"><text:span text:style-name="T14">CONST</text:span></text:span><text:span text:style-name="_2f__2f_C"><text:span text:style-name="T19"> para constante</text:span></text:span><text:span text:style-name="_2f__2f_C"><text:span text:style-name="T20"> (si puede ser global)</text:span></text:span></text:p>
      <text:p text:style-name="P8"><text:span text:style-name="_2f__2f_C"><text:span text:style-name="T22"/></text:span></text:p>
      <text:p text:style-name="P8"><text:span text:style-name="_3c_C_2b__2b__3e_"><text:span text:style-name="T14">let mut</text:span></text:span><text:span text:style-name="_3c_C_3e_"><text:span text:style-name="T13"> i = 0; </text:span></text:span><text:span text:style-name="_2f__2f_C"><text:span text:style-name="T13">//tipico para hacer while ya que la i variará. No global</text:span></text:span><text:span text:style-name="_2f__2f_C"><text:span text:style-name="T23">. En runtime</text:span></text:span></text:p>
      <text:p text:style-name="P8"><text:span text:style-name="_3c_C_2b__2b__3e_"><text:span text:style-name="T14">const i: i32</text:span></text:span><text:span text:style-name="_3c_C_3e_"><text:span text:style-name="T13"> = 0; </text:span></text:span><text:span text:style-name="_2f__2f_C"><text:span text:style-name="T13">//no puede mutar NUNCA en compilacion y puede ser global</text:span></text:span><text:span text:style-name="_2f__2f_C"><text:span text:style-name="T24">. Necesita ser declarado el tipo.</text:span></text:span><text:span text:style-name="_2f__2f_C"><text:span text:style-name="T23"> y se crea en tiempo de compilación</text:span></text:span></text:p>
      <text:p text:style-name="P9"><text:soft-page-break/><text:span text:style-name="_2f__2f_C"><text:span text:style-name="T25">Si a una variable le ponemos '_’ delante, esta variable aunque no se use, el compilador no se quejará de ella:</text:span></text:span></text:p>
      <text:p text:style-name="P9"><text:span text:style-name="_3c_C_3e_"><text:span text:style-name="T26">let </text:span></text:span><text:span text:style-name="_3c_C_2b__2b__3e_"><text:span text:style-name="T6">_</text:span></text:span><text:span text:style-name="_3c_C_3e_"><text:span text:style-name="T26">num: f32 = 0.4; </text:span></text:span><text:span text:style-name="_2f__2f_C"><text:span text:style-name="T26">//aunque no la use el compilador no lanzara un warning</text:span></text:span></text:p>
      <text:h text:style-name="P10" text:outline-level="3"/>
      <text:h text:style-name="P10" text:outline-level="3">VARIABLES DUPLAS</text:h>
      <text:p text:style-name="P11">Rust puede almacenar varias variables en duplas que pueden tener dos o más tipos de datos. Por ejemplo:</text:p>
      <text:p text:style-name="P11"><text:span text:style-name="_3c_C_3e_">let dupla1: </text:span><text:span text:style-name="_3c_C_2b__2b__3e_">(i32, i32) = (32, 42)</text:span><text:span text:style-name="_3c_C_3e_">;</text:span></text:p>
      <text:p text:style-name="P11"><text:span text:style-name="_3c_C_3e_">let dupla2: </text:span><text:span text:style-name="_3c_C_2b__2b__3e_">(i32, bool, &amp;str) = (32, true, "hola")</text:span><text:span text:style-name="_3c_C_3e_">;</text:span></text:p>
      <text:p text:style-name="P12">De tal forma que si queremos acceder a sus elementos seria:</text:p>
      <text:p text:style-name="P12"><text:span text:style-name="_3c_C_3e_">if dupla2</text:span><text:span text:style-name="_3c_C_2b__2b__3e_">.2</text:span><text:span text:style-name="_3c_C_3e_"> == "hola" {...}</text:span></text:p>
      <text:p text:style-name="P13"/>
      <text:h text:style-name="P14" text:outline-level="3">MATRICES</text:h>
      <text:p text:style-name="P15">Podemos usar matrices como en C:<text:line-break/></text:p>
      <text:p text:style-name="P15"><text:span text:style-name="_3c_C_2b__2b__3e_">let x: </text:span><text:span text:style-name="_3c_C_2b__2b__3e_"><text:span text:style-name="T27">[i32; 3]</text:span></text:span><text:span text:style-name="_3c_C_2b__2b__3e_"> = [1, 2 , 3];</text:span></text:p>
      <text:p text:style-name="P16"><text:span text:style-name="_2f__2f_C"><text:span text:style-name="T27">//let x = [1, 2, 3]; puede ser asi tambien y el deduciria el tipo.</text:span></text:span></text:p>
      <text:p text:style-name="P15"><text:span text:style-name="_3c_C_3e_">println!("{}", x[1]); </text:span><text:span text:style-name="_2f__2f_C">//imprimiría 2, pero es arriesgado</text:span></text:p>
      <text:p text:style-name="P15"><text:span text:style-name="_3c_C_3e_"><text:span text:style-name="T28">println!("{}", x[7]);</text:span></text:span><text:span text:style-name="_2f__2f_C"> //Entraría en modo "panic" que saldría de forma segura. No soltaria basura</text:span></text:p>
      <text:p text:style-name="P15"><text:span text:style-name="_2f__2f_C"/></text:p>
      <text:p text:style-name="P17">Para hacerlo de forma segura se puede usar </text:p>
      <text:p text:style-name="P17"><text:span text:style-name="_3c_C_2b__2b__3e_">x.get(1)</text:span><text:span text:style-name="_3c_C_3e_">; </text:span><text:span text:style-name="_2f__2f_C">//devolveria "Some(2)" en mayusculas la S</text:span></text:p>
      <text:p text:style-name="P17"><text:span text:style-name="_3c_C_3e_">x.get(7);</text:span><text:span text:style-name="_2f__2f_C"> //devolveria "None" en mayusculas la N</text:span></text:p>
      <text:p text:style-name="P17">Por lo tanto para usarlo por que un x.get(1) devolveria en pantalla un some(2) con un println! tenemos que hacer:<text:line-break/><text:line-break/><text:span text:style-name="_3c_C_2b__2b__3e_">if let Some(</text:span><text:span text:style-name="_3c_C_2b__2b__3e_"><text:span text:style-name="T29">i</text:span></text:span><text:span text:style-name="_3c_C_2b__2b__3e_">) = x.get(1) </text:span><text:span text:style-name="_3c_C_3e_">{</text:span></text:p>
      <text:p text:style-name="P17"><text:span text:style-name="_3c_C_3e_"><text:tab/>println!("{}", </text:span><text:span text:style-name="_3c_C_3e_"><text:span text:style-name="T29">i</text:span></text:span><text:span text:style-name="_3c_C_3e_"><text:span text:style-name="T27">)</text:span></text:span><text:span text:style-name="_3c_C_3e_">;</text:span></text:p>
      <text:p text:style-name="P17"><text:span text:style-name="_3c_C_3e_">}</text:span><text:span text:style-name="_3c_C_3e_"><text:span text:style-name="T27"> </text:span></text:span><text:span text:style-name="_3c_C_3e_">else {</text:span></text:p>
      <text:p text:style-name="P17"><text:span text:style-name="_3c_C_3e_"><text:tab/>println!("no existe");</text:span></text:p>
      <text:p text:style-name="P17"><text:span text:style-name="_3c_C_3e_">}</text:span></text:p>
      <text:p text:style-name="P17">O en formáto Rust:</text:p>
      <text:p text:style-name="P17"/>
      <text:p text:style-name="P18"><text:span text:style-name="_3c_C_2b__2b__3e_">match x.get(2) {</text:span></text:p>
      <text:p text:style-name="P18"><text:span text:style-name="_3c_C_2b__2b__3e_"><text:tab/>Some(i) =&gt; println!("{}", i),</text:span></text:p>
      <text:p text:style-name="P18"><text:soft-page-break/><text:span text:style-name="_3c_C_2b__2b__3e_"><text:tab/>None<text:tab/>=&gt;<text:tab/> println!("No existe"),</text:span></text:p>
      <text:p text:style-name="P18"><text:span text:style-name="_3c_C_2b__2b__3e_">}</text:span></text:p>
      <text:p text:style-name="P11">El <text:span text:style-name="_3c_C_2b__2b__3e_">.get</text:span> lo que hace es devolver un <text:span text:style-name="_3c_C_2b__2b__3e_">OPTION</text:span> que puede ser un <text:span text:style-name="_3c_C_2b__2b__3e_">Some(T)</text:span> es decir algo, o <text:span text:style-name="_3c_C_2b__2b__3e_">None</text:span>.. es decir nada. Explicado más abajo en la parte de memorias.</text:p>
      <text:p text:style-name="P11"/>
      <text:h text:style-name="P19" text:outline-level="3">VARIABLES GLOBALES</text:h>
      <text:p text:style-name="P20">El tener una variable global en Rust es <text:s/>un problema, ya que puede haber dataraces para modificarla asi que tiene que estar protegida.. si no no deja. </text:p>
      <text:p text:style-name="P20">La forma clásica es:<text:line-break/></text:p>
      <text:p text:style-name="P21"><text:span text:style-name="_3c_C_2b__2b__3e_"><text:span text:style-name="T2">static mut </text:span></text:span><text:span text:style-name="_3c_C_3e_"><text:span text:style-name="T2">A: i32 = 0;</text:span></text:span><text:span text:style-name="_3c_C_3e_"><text:span text:style-name="T30"> </text:span></text:span><text:span text:style-name="_2f__2f_C"><text:span text:style-name="T2">//variable global</text:span></text:span></text:p>
      <text:p text:style-name="P21"><text:span text:style-name="_3c_C_3e_"><text:span text:style-name="T31">fn main(){</text:span></text:span></text:p>
      <text:p text:style-name="P21"><text:span text:style-name="_3c_C_3e_"><text:span text:style-name="T31"><text:tab/>if true{</text:span></text:span></text:p>
      <text:p text:style-name="P21"><text:span text:style-name="_3c_C_3e_"><text:span text:style-name="T31"><text:tab/><text:tab/></text:span></text:span><text:span text:style-name="_3c_C_2b__2b__3e_">unsafe{</text:span><text:span text:style-name="_3c_C_3e_"><text:span text:style-name="T31"> A = 10;</text:span></text:span><text:span text:style-name="_3c_C_2b__2b__3e_">}</text:span><text:span text:style-name="_3c_C_2b__2b__3e_"><text:span text:style-name="T31"> </text:span></text:span><text:span text:style-name="_2f__2f_C">//no se recomienda pero permitido</text:span><text:span text:style-name="_2f__2f_C"><text:span text:style-name="T32">. unsafe le dice el compilador que confie en el programador. </text:span></text:span></text:p>
      <text:p text:style-name="P21"><text:span text:style-name="_3c_C_3e_"><text:span text:style-name="T31"><text:tab/>}</text:span></text:span></text:p>
      <text:p text:style-name="P21"><text:span text:style-name="_3c_C_3e_"><text:span text:style-name="T31">}</text:span></text:span></text:p>
      <text:p text:style-name="P21"><text:span text:style-name="_3c_C_3e_"/></text:p>
      <text:p text:style-name="P22"><text:span text:style-name="_3c_C_2b__2b__3e_"><text:span text:style-name="T2">Unsafe</text:span></text:span><text:span text:style-name="_3c_C_3e_"><text:span text:style-name="T33"> es un peligro.. asi que usamos </text:span></text:span><text:span text:style-name="_3c_C_2b__2b__3e_"><text:span text:style-name="T2">atomic</text:span></text:span><text:span text:style-name="_3c_C_3e_"><text:span text:style-name="T33"> para no provocar dataraces:<text:line-break/></text:span></text:span></text:p>
      <text:p text:style-name="P22"><text:span text:style-name="_3c_C_2b__2b__3e_">use std::sync::atomic::{AtomicI32, ordering}</text:span></text:p>
      <text:p text:style-name="P22"><text:span text:style-name="_3c_C_3e_"><text:span text:style-name="T32">static A: </text:span></text:span><text:span text:style-name="_3c_C_2b__2b__3e_">AtomicI32</text:span><text:span text:style-name="_3c_C_3e_"><text:span text:style-name="T32"> = AtomicI32::new(0); </text:span></text:span><text:span text:style-name="_2f__2f_C"><text:span text:style-name="T32">//no hace reserva de memoria. Solo inicializa a cero</text:span></text:span></text:p>
      <text:p text:style-name="P23"><text:span text:style-name="_3c_C_3e_">fn main() {<text:line-break/></text:span><text:span text:style-name="_3c_C_3e_"><text:span text:style-name="T32"><text:tab/></text:span></text:span><text:span text:style-name="_3c_C_3e_">if true {<text:line-break/></text:span><text:span text:style-name="_3c_C_3e_"><text:span text:style-name="T32"><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4"> </text:span></text:span><text:span text:style-name="_2f__2f_C"><text:span text:style-name="T34">//Relaxed es el nivel más débil del ordenamiento at</text:span></text:span><text:span text:style-name="_2f__2f_C"><text:span text:style-name="T35">ó</text:span></text:span><text:span text:style-name="_2f__2f_C"><text:span text:style-name="T34">mico. solo </text:span></text:span></text:p>
      <text:p text:style-name="P23"><text:span text:style-name="_2f__2f_C"><text:span text:style-name="T34">me importa modificar el valor, no el orden del tiempo en que se haga.</text:span></text:span><text:span text:style-name="_3c_C_3e_"><text:line-break/> }<text:line-break/>}</text:span></text:p>
      <text:h text:style-name="P24" text:outline-level="3"/>
      <text:h text:style-name="P25" text:outline-level="3">PANIC!()</text:h>
      <text:p text:style-name="P26"><text:span text:style-name="_2f__2f_C"><text:span text:style-name="T36">R</text:span></text:span><text:span text:style-name="_2f__2f_C"><text:span text:style-name="T37">ust cuando encuentra un proceso que no puede solventar (por ejemplo dividir por cero) entra en </text:span></text:span><text:span text:style-name="_3c_C_2b__2b__3e_"><text:span text:style-name="T6">Panic</text:span></text:span><text:span text:style-name="_2f__2f_C"><text:span text:style-name="T37"> liberando toda la memoria y saliendo limpiamente. Para forzarlo se usa esto:</text:span></text:span></text:p>
      <text:p text:style-name="P26"><text:span text:style-name="_3c_C_3e_"><text:span text:style-name="T26">fn set_title(&amp;mut self, title: String){ </text:span></text:span><text:span text:style-name="_2f__2f_C"><text:span text:style-name="T26">//</text:span></text:span><text:span text:style-name="_2f__2f_C"><text:span text:style-name="T38">esto es un setter de una estructura por eso lleva el self</text:span></text:span></text:p>
      <text:p text:style-name="P26"><text:span text:style-name="_3c_C_3e_"><text:span text:style-name="T26"><text:tab/>if title.is_empty(){</text:span></text:span><text:span text:style-name="_3c_C_2b__2b__3e_"><text:span text:style-name="T6">panic!(“El título no puede ser vacio”);</text:span></text:span><text:span text:style-name="_3c_C_3e_"><text:span text:style-name="T26">} </text:span></text:span><text:span text:style-name="_2f__2f_C"><text:span text:style-name="T26">//</text:span></text:span><text:span text:style-name="_2f__2f_C"><text:span text:style-name="T38">panic hará salirse el programa</text:span></text:span></text:p>
      <text:p text:style-name="P26"><text:span text:style-name="_3c_C_3e_"><text:span text:style-name="T26"><text:tab/>if title.len() &gt; 50 {</text:span></text:span><text:span text:style-name="_3c_C_2b__2b__3e_"><text:span text:style-name="T6">panic!(</text:span></text:span><text:span text:style-name="_3c_C_3e_"><text:span text:style-name="T26">“El título es más largo de 50 bits”</text:span></text:span><text:span text:style-name="_3c_C_2b__2b__3e_"><text:span text:style-name="T6">)</text:span></text:span><text:span text:style-name="_3c_C_3e_"><text:span text:style-name="T26">;}</text:span></text:span></text:p>
      <text:p text:style-name="P26"><text:soft-page-break/><text:span text:style-name="_3c_C_3e_"><text:span text:style-name="T26"><text:tab/>self.title = title</text:span></text:span></text:p>
      <text:p text:style-name="P26"><text:span text:style-name="_3c_C_3e_"><text:span text:style-name="T26">}</text:span></text:span></text:p>
      <text:h text:style-name="P27" text:outline-level="3"><text:span text:style-name="_3c_C_3e_"><text:span text:style-name="T39">ExitCode</text:span></text:span></text:h>
      <text:p text:style-name="P28"><text:span text:style-name="_2f__2f_C"><text:span text:style-name="T40">Como en C, podemos retornar un valor de restorno 1 o 0 del programa. Para ello usamos el ExitCode de esta manera:</text:span></text:span></text:p>
      <text:p text:style-name="P28"><text:span text:style-name="_3c_C_2b__2b__3e_"><text:span text:style-name="T6">use std::process::ExitCode;</text:span></text:span></text:p>
      <text:p text:style-name="P28"><text:span text:style-name="_3c_C_3e_"><text:span text:style-name="T6">fn main() -</text:span></text:span><text:span text:style-name="_3c_C_2b__2b__3e_"><text:span text:style-name="T6"> &gt; ExitCode</text:span></text:span><text:span text:style-name="_3c_C_3e_"><text:span text:style-name="T6">{</text:span></text:span></text:p>
      <text:p text:style-name="P28"><text:span text:style-name="_3c_C_3e_"><text:span text:style-name="T6"><text:tab/>…</text:span></text:span></text:p>
      <text:p text:style-name="P28"><text:span text:style-name="_3c_C_3e_"><text:span text:style-name="T6"><text:tab/></text:span></text:span><text:span text:style-name="_3c_C_2b__2b__3e_"><text:span text:style-name="T6">ExitCode::from(0)</text:span></text:span></text:p>
      <text:p text:style-name="P28"><text:span text:style-name="_3c_C_3e_"><text:span text:style-name="T6">}</text:span></text:span></text:p>
      <text:p text:style-name="P28"><text:span text:style-name="_3c_C_3e_"><text:span text:style-name="T6"/></text:span></text:p>
      <text:h text:style-name="P27" text:outline-level="3"><text:span text:style-name="_3c_C_3e_"><text:span text:style-name="T41">Result()</text:span></text:span></text:h>
      <text:p text:style-name="P28"><text:span text:style-name="_2f__2f_C"><text:span text:style-name="T36">R</text:span></text:span><text:span text:style-name="_2f__2f_C"><text:span text:style-name="T37">ust </text:span></text:span><text:span text:style-name="_2f__2f_C"><text:span text:style-name="T42">la forma de devolver valores es muchas veces un Result(), que es una pareja donde el primero es un Ok</text:span></text:span><text:span text:style-name="_2f__2f_C"><text:span text:style-name="T43">(valor)</text:span></text:span><text:span text:style-name="_2f__2f_C"><text:span text:style-name="T42">, y el segundo un Err</text:span></text:span><text:span text:style-name="_2f__2f_C"><text:span text:style-name="T43">(error)</text:span></text:span><text:span text:style-name="_2f__2f_C"><text:span text:style-name="T42">. </text:span></text:span><text:span text:style-name="_2f__2f_C"><text:span text:style-name="T43">Es como un interruptor de dos posiciones</text:span></text:span></text:p>
      <text:p text:style-name="P29"><text:span text:style-name="_2f__2f_C"><text:span text:style-name="T44">// Devuelve un Ok con el resultado (f32) O un Err con un texto (&amp;'static str)</text:span></text:span><text:span text:style-name="T45"/></text:p>
      <text:p text:style-name="P29"><text:span text:style-name="_3c_C_3e_"><text:span text:style-name="T44">fn dividir(dividendo: f32, divisor: f32) -&gt; </text:span></text:span><text:span text:style-name="_3c_C_2b__2b__3e_"><text:span text:style-name="T46">Result&lt;f32, &amp;'static str&gt;</text:span></text:span><text:span text:style-name="_3c_C_3e_"><text:span text:style-name="T44"> {</text:span></text:span></text:p>
      <text:p text:style-name="P29"><text:span text:style-name="_3c_C_3e_"><text:span text:style-name="T44">if divisor == 0.0 {</text:span></text:span></text:p>
      <text:p text:style-name="P29"><text:span text:style-name="_3c_C_3e_"><text:span text:style-name="T44"><text:tab/></text:span></text:span><text:span text:style-name="_3c_C_2b__2b__3e_"><text:span text:style-name="T46">return Err(</text:span></text:span><text:span text:style-name="_3c_C_3e_"><text:span text:style-name="T44">"¡No se puede dividir entre cero!"); </text:span></text:span><text:span text:style-name="_2f__2f_C"><text:span text:style-name="T44">// Pasó algo malo</text:span></text:span></text:p>
      <text:p text:style-name="P29"><text:span text:style-name="_3c_C_3e_"><text:span text:style-name="T44">}</text:span></text:span></text:p>
      <text:p text:style-name="P29"><text:span text:style-name="_3c_C_2b__2b__3e_"><text:span text:style-name="T46">Ok(dividendo / divisor)</text:span></text:span><text:span text:style-name="_3c_C_3e_"><text:span text:style-name="T44"> // Todo salió bien }</text:span></text:span></text:p>
      <text:p text:style-name="P29"><text:span text:style-name="_3c_C_3e_"><text:span text:style-name="T44">fn main() {</text:span></text:span></text:p>
      <text:p text:style-name="P29"><text:span text:style-name="_3c_C_3e_"><text:span text:style-name="T44"><text:tab/>// Cómo usar el resultado con un 'match' limpio</text:span></text:span></text:p>
      <text:p text:style-name="P29"><text:span text:style-name="_3c_C_3e_"><text:span text:style-name="T44"><text:tab/></text:span></text:span><text:span text:style-name="_3c_C_2b__2b__3e_"><text:span text:style-name="T46">match</text:span></text:span><text:span text:style-name="_3c_C_3e_"><text:span text:style-name="T44"> dividir(10.0, 2.0) {</text:span></text:span></text:p>
      <text:p text:style-name="P29"><text:span text:style-name="_3c_C_3e_"><text:span text:style-name="T44"><text:tab/><text:tab/></text:span></text:span><text:span text:style-name="_3c_C_2b__2b__3e_"><text:span text:style-name="T46">Ok(resultado) =&gt;</text:span></text:span><text:span text:style-name="_3c_C_3e_"><text:span text:style-name="T44"> println!("El resultado es: {}", resultado),</text:span></text:span></text:p>
      <text:p text:style-name="P29"><text:span text:style-name="_3c_C_3e_"><text:span text:style-name="T44"><text:tab/><text:tab/></text:span></text:span><text:span text:style-name="_3c_C_2b__2b__3e_"><text:span text:style-name="T46">Err(mensaje) =&gt;</text:span></text:span><text:span text:style-name="_3c_C_3e_"><text:span text:style-name="T44"> println!("Error: {}", mensaje),</text:span></text:span></text:p>
      <text:p text:style-name="P29"><text:span text:style-name="_3c_C_3e_"><text:span text:style-name="T44"><text:tab/>} </text:span></text:span></text:p>
      <text:p text:style-name="P30"><text:span text:style-name="_3c_C_3e_"><text:span text:style-name="T44">}</text:span></text:span></text:p>
      <text:p text:style-name="P30"><text:span text:style-name="_2f__2f_C"><text:span text:style-name="T47">Vamos a verlo con una forma más compleja. Abriendo un archivo que puede dar errores:</text:span></text:span></text:p>
      <text:p text:style-name="P30"><text:span text:style-name="_3c_C_3e_"><text:span text:style-name="T26">fn process_file(str: &amp;str) - &gt; </text:span></text:span><text:span text:style-name="_3c_C_2b__2b__3e_"><text:span text:style-name="T6">Result &lt;(), &amp;’static str&gt;</text:span></text:span><text:span text:style-name="_3c_C_3e_"><text:span text:style-name="T26">{ </text:span></text:span><text:span text:style-name="_2f__2f_C"><text:span text:style-name="T26">//() no nos interesa el tipo devuelto. </text:span></text:span><text:span text:style-name="_2f__2f_C"><text:span text:style-name="T48">U</text:span></text:span><text:span text:style-name="_2f__2f_C"><text:span text:style-name="T26">n void.</text:span></text:span><text:span text:style-name="_3c_C_3e_"><text:span text:style-name="T26"><text:line-break/><text:tab/>If let Ok(input_file) = </text:span></text:span><text:a xlink:type="simple" xlink:href="../../../../../:open(str" text:style-name="Internet_20_link" text:visited-style-name="Visited_20_Internet_20_Link"><text:span text:style-name="_3c_C_3e_"><text:span text:style-name="T49">File::open(str</text:span></text:span></text:a><text:span text:style-name="_3c_C_3e_"><text:span text:style-name="T50">)</text:span></text:span><text:span text:style-name="_3c_C_3e_"><text:span text:style-name="T26">{</text:span></text:span><text:span text:style-name="_2f__2f_C"><text:span text:style-name="T48">//tras el open es un Result&lt;File, std::io:.error&gt;</text:span></text:span></text:p>
      <text:p text:style-name="P31"><text:span text:style-name="_3c_C_3e_"><text:span text:style-name="T48"><text:tab/><text:tab/>let _reader = BufReader::new(input_file);</text:span></text:span></text:p>
      <text:p text:style-name="P31"><text:span text:style-name="_3c_C_3e_"><text:span text:style-name="T48"><text:tab/><text:tab/>for line in _reader.lines(){</text:span></text:span></text:p>
      <text:p text:style-name="P32"><text:span text:style-name="_3c_C_3e_"><text:span text:style-name="T48"><text:tab/><text:tab/><text:tab/></text:span></text:span><text:span text:style-name="_3c_C_2b__2b__3e_"><text:span text:style-name="T6">let line = match line{</text:span></text:span></text:p>
      <text:p text:style-name="P32"><text:span text:style-name="_3c_C_2b__2b__3e_"><text:span text:style-name="T6"><text:tab/><text:tab/><text:tab/><text:tab/>Ok(value) =&gt; value,</text:span></text:span></text:p>
      <text:p text:style-name="P32"><text:soft-page-break/><text:span text:style-name="_3c_C_2b__2b__3e_"><text:span text:style-name="T6"><text:tab/><text:tab/><text:tab/><text:tab/>Err(e) =&gt; return Err(“Error: Error leyendo el archivo\n”),</text:span></text:span></text:p>
      <text:p text:style-name="P32"><text:span text:style-name="_3c_C_3e_"><text:span text:style-name="T51"><text:tab/><text:tab/><text:tab/></text:span></text:span><text:span text:style-name="_3c_C_2b__2b__3e_"><text:span text:style-name="T6">};</text:span></text:span></text:p>
      <text:p text:style-name="P31"><text:span text:style-name="_3c_C_3e_"><text:span text:style-name="T48"><text:tab/><text:tab/>}</text:span></text:span></text:p>
      <text:p text:style-name="P31"><text:span text:style-name="_3c_C_2b__2b__3e_"><text:span text:style-name="T6">return Ok(());</text:span></text:span></text:p>
      <text:p text:style-name="P32"><text:span text:style-name="_3c_C_3e_"><text:span text:style-name="T51">} else {</text:span></text:span></text:p>
      <text:p text:style-name="P32"><text:span text:style-name="_3c_C_3e_"><text:span text:style-name="T51"><text:tab/></text:span></text:span><text:span text:style-name="_3c_C_2b__2b__3e_"><text:span text:style-name="T6">return Err(“Error: No puede abrir el fichero\n”);</text:span></text:span></text:p>
      <text:p text:style-name="P32"><text:span text:style-name="_3c_C_3e_"><text:span text:style-name="T51">}</text:span></text:span></text:p>
      <text:p text:style-name="P32"><text:span text:style-name="_3c_C_3e_"><text:span text:style-name="T51">}</text:span></text:span></text:p>
      <text:p text:style-name="P32"><text:span text:style-name="_2f__2f_C"><text:span text:style-name="T52">En este caso _reader.lines() devuelve un ITERADOR line y cada uno de ellos devuelve un Result&lt;String, error&gt; para averiguarlo hemos usado el match.. pero se puede hacer más pa linea:</text:span></text:span></text:p>
      <text:p text:style-name="P32"><text:span text:style-name="_3c_C_2b__2b__3e_"><text:span text:style-name="T6">let line = line?;</text:span></text:span></text:p>
      <text:p text:style-name="P33"><text:span text:style-name="_2f__2f_C"><text:span text:style-name="T53">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3"><text:span text:style-name="_3c_C_2b__2b__3e_"><text:span text:style-name="T6">let line = line.map_err(|_|, “Error: Error leyendo el archivo\n”)?;</text:span></text:span></text:p>
      <text:h text:style-name="P34" text:outline-level="3"/>
      <text:h text:style-name="P34" text:outline-level="3">ESTRUCTURAS</text:h>
      <text:p text:style-name="P5"><text:span text:style-name="_2f__2f_C"><text:span text:style-name="T36">Rust no tiene objectos ni clases, pero s</text:span></text:span><text:span text:style-name="_2f__2f_C"><text:span text:style-name="T54">í </text:span></text:span><text:span text:style-name="_2f__2f_C"><text:span text:style-name="T36">que puede acercarse a ellos con las estructuras. En Rust todo es privado que se declare</text:span></text:span><text:span text:style-name="_2f__2f_C"><text:span text:style-name="T55">. Para hacerlo accesible hay que ponerle la palabra </text:span></text:span><text:span text:style-name="_3c_C_2b__2b__3e_"><text:span text:style-name="T56">pub</text:span></text:span><text:span text:style-name="_2f__2f_C"><text:span text:style-name="T55"> delante. No solo a la estructura</text:span></text:span><text:span text:style-name="_2f__2f_C"><text:span text:style-name="T57">.</text:span></text:span></text:p>
      <text:p text:style-name="P35"><text:span text:style-name="_2f__2f_C"><text:span text:style-name="T58">(</text:span></text:span><text:span text:style-name="_3c_C_3e_"><text:span text:style-name="T26">fichero.rs</text:span></text:span><text:span text:style-name="_2f__2f_C"><text:span text:style-name="T58">)</text:span></text:span></text:p>
      <text:p text:style-name="P35"><text:span text:style-name="_3c_C_2b__2b__3e_"><text:span text:style-name="T6">pub struct </text:span></text:span><text:span text:style-name="_3c_C_2b__2b__3e_"><text:span text:style-name="T59">P</text:span></text:span><text:span text:style-name="_3c_C_3e_"><text:span text:style-name="T26">rueba{</text:span></text:span><text:span text:style-name="_3c_C_3e_"><text:span text:style-name="T60"> </text:span></text:span><text:span text:style-name="_2f__2f_C"><text:span text:style-name="T60">//debe ser CamelCase P mayúscula</text:span></text:span></text:p>
      <text:p text:style-name="P35"><text:span text:style-name="_3c_C_3e_"><text:span text:style-name="T26"><text:tab/></text:span></text:span><text:span text:style-name="_3c_C_2b__2b__3e_"><text:span text:style-name="T6">pub</text:span></text:span><text:span text:style-name="_3c_C_3e_"><text:span text:style-name="T26"> var1: i32</text:span></text:span><text:span text:style-name="_3c_C_2b__2b__3e_"><text:span text:style-name="T6">,</text:span></text:span></text:p>
      <text:p text:style-name="P35"><text:span text:style-name="_3c_C_3e_"><text:span text:style-name="T26"><text:tab/></text:span></text:span><text:span text:style-name="_3c_C_2b__2b__3e_"><text:span text:style-name="T6">pub</text:span></text:span><text:span text:style-name="_3c_C_3e_"><text:span text:style-name="T26"> var2: char</text:span></text:span><text:span text:style-name="_3c_C_2b__2b__3e_"><text:span text:style-name="T6">,</text:span></text:span><text:span text:style-name="_3c_C_3e_"><text:span text:style-name="T60"> </text:span></text:span><text:span text:style-name="_2f__2f_C"><text:span text:style-name="T26">//si no son pub estas variables no se puede acceder a ellas</text:span></text:span></text:p>
      <text:p text:style-name="P35"><text:span text:style-name="_3c_C_3e_"><text:span text:style-name="T26">}</text:span></text:span></text:p>
      <text:p text:style-name="P35"><text:span text:style-name="_2f__2f_C"><text:span text:style-name="T58">Importando el </text:span></text:span><text:span text:style-name="_3c_C_3e_"><text:span text:style-name="T26">fichero.rs</text:span></text:span><text:span text:style-name="_2f__2f_C"><text:span text:style-name="T58"> como <text:line-break/></text:span></text:span></text:p>
      <text:p text:style-name="P36"><text:span text:style-name="_2f__2f_C"><text:span text:style-name="T61">(fichero: main.rs)</text:span></text:span></text:p>
      <text:p text:style-name="P35"><text:span text:style-name="_3c_C_2b__2b__3e_"><text:span text:style-name="T6">mod</text:span></text:span><text:span text:style-name="_3c_C_3e_"><text:span text:style-name="T26"> fichero;</text:span></text:span><text:span text:style-name="_3c_C_3e_"><text:span text:style-name="T60"> </text:span></text:span><text:span text:style-name="_2f__2f_C"><text:span text:style-name="T60">//importa el fichero fichero.rs</text:span></text:span></text:p>
      <text:p text:style-name="P35"><text:span text:style-name="_3c_C_3e_"><text:span text:style-name="T26">fn main(){</text:span></text:span></text:p>
      <text:p text:style-name="P35"><text:span text:style-name="_3c_C_3e_"><text:span text:style-name="T26"><text:tab/>let a = fichero::prueba { var1: 42, var2: 'a'</text:span></text:span><text:span text:style-name="_3c_C_3e_"><text:span text:style-name="T60">}</text:span></text:span><text:span text:style-name="_3c_C_3e_"><text:span text:style-name="T26">;</text:span></text:span></text:p>
      <text:p text:style-name="P35"><text:span text:style-name="_3c_C_3e_"><text:span text:style-name="T26">} </text:span></text:span></text:p>
      <text:p text:style-name="P35"><text:span text:style-name="_3c_C_3e_"><text:span text:style-name="T26"/></text:span></text:p>
      <text:p text:style-name="P36"><text:span text:style-name="_2f__2f_C"><text:span text:style-name="T62">Ahora imaginemos que tenemos un archivo.rs que tiene esto:</text:span></text:span></text:p>
      <text:p text:style-name="P36"><text:soft-page-break/><text:span text:style-name="_2f__2f_C"><text:span text:style-name="T62">(</text:span></text:span><text:span text:style-name="_3c_C_3e_"><text:span text:style-name="T13">fichero.rs</text:span></text:span><text:span text:style-name="_2f__2f_C"><text:span text:style-name="T62">)</text:span></text:span></text:p>
      <text:p text:style-name="P36"><text:span text:style-name="_3c_C_3e_"><text:span text:style-name="T63">pub </text:span></text:span><text:span text:style-name="_3c_C_3e_"><text:span text:style-name="T13">struct Prueba{</text:span></text:span><text:span text:style-name="_3c_C_3e_"><text:span text:style-name="T63"> //para implementar el getter tiene que ser la estructura pub</text:span></text:span></text:p>
      <text:p text:style-name="P36"><text:span text:style-name="_3c_C_3e_"><text:span text:style-name="T13"><text:tab/>x: i32,</text:span></text:span></text:p>
      <text:p text:style-name="P36"><text:span text:style-name="_3c_C_3e_"><text:span text:style-name="T13">}</text:span></text:span></text:p>
      <text:p text:style-name="P36"><text:span text:style-name="_3c_C_3e_"><text:span text:style-name="T24">pub </text:span></text:span><text:span text:style-name="_3c_C_3e_"><text:span text:style-name="T13">fn test()</text:span></text:span><text:span text:style-name="_3c_C_3e_"><text:span text:style-name="T64"> -&gt; Prueba</text:span></text:span><text:span text:style-name="_3c_C_3e_"><text:span text:style-name="T13">{</text:span></text:span><text:span text:style-name="_2f__2f_C"><text:span text:style-name="T64"> //-&gt; devuelve un tipo Prueba (estructura)</text:span></text:span></text:p>
      <text:p text:style-name="P36"><text:span text:style-name="_3c_C_3e_"><text:span text:style-name="T64"><text:tab/></text:span></text:span><text:span text:style-name="_3c_C_3e_"><text:span text:style-name="T13">Prueba {x: 56}</text:span></text:span></text:p>
      <text:p text:style-name="P36"><text:span text:style-name="_3c_C_3e_"><text:span text:style-name="T13">}</text:span></text:span></text:p>
      <text:p text:style-name="P36"><text:span text:style-name="_2f__2f_C"><text:span text:style-name="T62">No habr</text:span></text:span><text:span text:style-name="_2f__2f_C"><text:span text:style-name="T65">í</text:span></text:span><text:span text:style-name="_2f__2f_C"><text:span text:style-name="T62">a problema en darle valor dentro de fichero.rs PERO si queremos acceder a el, tendriamos que hacer un metodo de la estructura en el propio archivo fichero.rs:<text:line-break/><text:line-break/></text:span></text:span><text:span text:style-name="_3c_C_2b__2b__3e_"><text:span text:style-name="T14">impl</text:span></text:span><text:span text:style-name="_3c_C_3e_"><text:span text:style-name="T13"> Prueba{</text:span></text:span></text:p>
      <text:p text:style-name="P36"><text:span text:style-name="_3c_C_3e_"><text:span text:style-name="T13"><text:tab/></text:span></text:span><text:span text:style-name="_3c_C_3e_"><text:span text:style-name="T63">pub </text:span></text:span><text:span text:style-name="_3c_C_3e_"><text:span text:style-name="T13">fn get_x(&amp;self) -&gt; i32{</text:span></text:span><text:span text:style-name="_3c_C_3e_"><text:span text:style-name="T63"> </text:span></text:span><text:span text:style-name="_2f__2f_C"><text:span text:style-name="T63">//tiene que ser pub tambien</text:span></text:span><text:span text:style-name="_2f__2f_C"><text:span text:style-name="T64">. -&gt; i32 = devuelve un int.</text:span></text:span></text:p>
      <text:p text:style-name="P37"><text:span text:style-name="_2f__2f_C"><text:span text:style-name="T66"><text:tab/>//&amp;self es como los objetos.. o this en c++ va implicito</text:span></text:span></text:p>
      <text:p text:style-name="P37"><text:span text:style-name="_2f__2f_C"><text:span text:style-name="T66"><text:tab/><text:tab/>(self) lo moveria el valor</text:span></text:span></text:p>
      <text:p text:style-name="P37"><text:span text:style-name="_2f__2f_C"><text:span text:style-name="T66"><text:tab/><text:tab/>(&amp;self) es inmutable</text:span></text:span></text:p>
      <text:p text:style-name="P37"><text:span text:style-name="_2f__2f_C"><text:span text:style-name="T66"><text:tab/><text:tab/>(&amp;mut self) lo podria cambiar.</text:span></text:span></text:p>
      <text:p text:style-name="P36"><text:span text:style-name="_3c_C_3e_"><text:span text:style-name="T13"><text:tab/><text:tab/>self.</text:span></text:span><text:span text:style-name="_3c_C_3e_"><text:span text:style-name="T63">x</text:span></text:span><text:span text:style-name="_3c_C_3e_"><text:span text:style-name="T67"> </text:span></text:span><text:span text:style-name="_2f__2f_C"><text:span text:style-name="T67">//IMPORTANTE!!! SI NO TIENE ';' ES UN RETURN IMPLICITO!!!</text:span></text:span></text:p>
      <text:p text:style-name="P36"><text:span text:style-name="_3c_C_3e_"><text:span text:style-name="T13"><text:tab/>}</text:span></text:span></text:p>
      <text:p text:style-name="P36"><text:span text:style-name="_3c_C_3e_"><text:span text:style-name="T13">}</text:span></text:span></text:p>
      <text:p text:style-name="P38"><text:span text:style-name="_2f__2f_C"><text:span text:style-name="T68">En el main.rs:<text:line-break/></text:span></text:span></text:p>
      <text:p text:style-name="P38"><text:span text:style-name="_3c_C_3e_"><text:span text:style-name="T13">mod fichero;</text:span></text:span></text:p>
      <text:p text:style-name="P38"><text:span text:style-name="_3c_C_3e_"><text:span text:style-name="T13">fn main (){</text:span></text:span></text:p>
      <text:p text:style-name="P39"><text:span text:style-name="_3c_C_3e_"><text:span text:style-name="T64"><text:tab/>let a = fichero::test(); </text:span></text:span><text:span text:style-name="_2f__2f_C"><text:span text:style-name="T64">//llama a la funcion externa en fichero y le da el valor 56</text:span></text:span><text:span text:style-name="_3c_C_3e_"><text:span text:style-name="T13"><text:tab/></text:span></text:span></text:p>
      <text:p text:style-name="P39"><text:span text:style-name="_3c_C_3e_"><text:span text:style-name="T64"><text:tab/></text:span></text:span><text:span text:style-name="_3c_C_3e_"><text:span text:style-name="T13">println!("{}", a.get_x());</text:span></text:span></text:p>
      <text:p text:style-name="P38"><text:span text:style-name="_3c_C_3e_"><text:span text:style-name="T13">}</text:span></text:span></text:p>
      <text:p text:style-name="P38"><text:span text:style-name="_3c_C_3e_"><text:span text:style-name="T13"/></text:span></text:p>
      <text:p text:style-name="P40"><text:span text:style-name="_2f__2f_C"><text:span text:style-name="T69">También se puede definir una estructura como:</text:span></text:span></text:p>
      <text:p text:style-name="P40"><text:span text:style-name="_3c_C_2b__2b__3e_"><text:span text:style-name="T14">struct St1(i32);</text:span></text:span></text:p>
      <text:p text:style-name="P40"><text:span text:style-name="_3c_C_2b__2b__3e_"><text:span text:style-name="T14">struct St2(f32, String, bool);</text:span></text:span></text:p>
      <text:p text:style-name="P40"><text:span text:style-name="_2f__2f_C"><text:span text:style-name="T69">En donde para tomar variables y usarlo sería:</text:span></text:span></text:p>
      <text:p text:style-name="P40"><text:span text:style-name="_3c_C_3e_"><text:span text:style-name="T13">let st1 = St1(42);</text:span></text:span></text:p>
      <text:p text:style-name="P40"><text:span text:style-name="_3c_C_3e_"><text:span text:style-name="T13">let st2 = St2(3.2, "hola".into(), true);</text:span></text:span></text:p>
      <text:p text:style-name="P40"><text:span text:style-name="_2f__2f_C"><text:span text:style-name="T69">Y para acceder a sus campos sería con </text:span></text:span><text:span text:style-name="_3c_C_2b__2b__3e_"><text:span text:style-name="T14">.0</text:span></text:span><text:span text:style-name="_2f__2f_C"><text:span text:style-name="T69">, .</text:span></text:span><text:span text:style-name="_3c_C_2b__2b__3e_"><text:span text:style-name="T14">1</text:span></text:span><text:span text:style-name="_2f__2f_C"><text:span text:style-name="T69">, </text:span></text:span><text:span text:style-name="_3c_C_2b__2b__3e_"><text:span text:style-name="T14">.2</text:span></text:span><text:span text:style-name="_2f__2f_C"><text:span text:style-name="T69">, etc...</text:span></text:span></text:p>
      <text:p text:style-name="P40"><text:span text:style-name="_3c_C_3e_"><text:span text:style-name="T13">println!("{}", st2.1); </text:span></text:span><text:span text:style-name="_2f__2f_C"><text:span text:style-name="T13">//imprimiria "hola"</text:span></text:span></text:p>
      <text:p text:style-name="P38"><text:soft-page-break/><text:span text:style-name="_3c_C_3e_"><text:span text:style-name="T13"/></text:span></text:p>
      <text:h text:style-name="P41" text:outline-level="3"><text:span text:style-name="_3c_C_3e_"><text:span text:style-name="T70">FUNCIONES</text:span></text:span></text:h>
      <text:p text:style-name="P42"><text:span text:style-name="_2f__2f_C"><text:span text:style-name="T71">Las funciones en Rust estan divididas entre las que no devuelven nada y las que s</text:span></text:span><text:span text:style-name="_2f__2f_C"><text:span text:style-name="T72">í</text:span></text:span><text:span text:style-name="_2f__2f_C"><text:span text:style-name="T71">. </text:span></text:span></text:p>
      <text:p text:style-name="P42"><text:span text:style-name="_2f__2f_C"><text:span text:style-name="T71">NO DEVUELVE:</text:span></text:span></text:p>
      <text:p text:style-name="P42"><text:span text:style-name="_3c_C_3e_"><text:span text:style-name="T13">fn funcion(num1: &amp;i32){</text:span></text:span><text:span text:style-name="_3c_C_3e_"><text:span text:style-name="T73"> </text:span></text:span><text:span text:style-name="_2f__2f_C"><text:span text:style-name="T73">//</text:span></text:span><text:span text:style-name="_2f__2f_C"><text:span text:style-name="T74">referenciada</text:span></text:span></text:p>
      <text:p text:style-name="P42"><text:span text:style-name="_3c_C_3e_"><text:span text:style-name="T13"><text:tab/>println!("El numero es: {}", num1</text:span></text:span><text:span text:style-name="_3c_C_3e_"><text:span text:style-name="T74">)</text:span></text:span><text:span text:style-name="_3c_C_3e_"><text:span text:style-name="T13">;</text:span></text:span></text:p>
      <text:p text:style-name="P42"><text:span text:style-name="_3c_C_3e_"><text:span text:style-name="T13">}</text:span></text:span></text:p>
      <text:p text:style-name="P42"><text:span text:style-name="_2f__2f_C"><text:span text:style-name="T71">DEVUELVE:</text:span></text:span></text:p>
      <text:p text:style-name="P42"><text:span text:style-name="_3c_C_3e_"><text:span text:style-name="T13">fn<text:tab/>suma(num1: &amp;i32, num2: &amp;i32) </text:span></text:span><text:span text:style-name="_3c_C_2b__2b__3e_"><text:span text:style-name="T14">-&gt; i32</text:span></text:span><text:span text:style-name="_3c_C_3e_"><text:span text:style-name="T13">{</text:span></text:span><text:span text:style-name="_3c_C_3e_"><text:span text:style-name="T73"> </text:span></text:span><text:span text:style-name="_2f__2f_C"><text:span text:style-name="T73">//-&gt; lo que devuelve</text:span></text:span></text:p>
      <text:p text:style-name="P42"><text:span text:style-name="_3c_C_3e_"><text:span text:style-name="T13"><text:tab/></text:span></text:span><text:span text:style-name="_3c_C_3e_"><text:span text:style-name="T74">*</text:span></text:span><text:span text:style-name="_3c_C_3e_"><text:span text:style-name="T13">num1 + </text:span></text:span><text:span text:style-name="_3c_C_3e_"><text:span text:style-name="T74">*</text:span></text:span><text:span text:style-name="_3c_C_3e_"><text:span text:style-name="T13">num2 </text:span></text:span><text:span text:style-name="_2f__2f_C"><text:span text:style-name="T13">//es importante que no tenga ; ya que este es un return oculto, sin ese punto y coma.</text:span></text:span></text:p>
      <text:p text:style-name="P43"><text:span text:style-name="_2f__2f_C"><text:span text:style-name="T74"><text:tab/>//Hay que derreferenciar, ya que son referencias (direcciones de memoria)</text:span></text:span></text:p>
      <text:p text:style-name="P42"><text:span text:style-name="_3c_C_3e_"><text:span text:style-name="T13">}</text:span></text:span></text:p>
      <text:p text:style-name="P42"><text:span text:style-name="_2f__2f_C"><text:span text:style-name="T71">Para llamarlas:</text:span></text:span></text:p>
      <text:p text:style-name="P42"><text:span text:style-name="_3c_C_3e_"><text:span text:style-name="T13">funcion(&amp;n);</text:span></text:span></text:p>
      <text:p text:style-name="P42"><text:span text:style-name="_3c_C_3e_"><text:span text:style-name="T13">suma(&amp;x, &amp;y);</text:span></text:span></text:p>
      <text:p text:style-name="P42"><text:span text:style-name="_3c_C_3e_"><text:span text:style-name="T13"/></text:span></text:p>
      <text:p text:style-name="P43"><text:span text:style-name="_2f__2f_C"><text:span text:style-name="T71">Para </text:span></text:span><text:span text:style-name="_2f__2f_C"><text:span text:style-name="T75">cambiar el valor de un numero</text:span></text:span><text:span text:style-name="_2f__2f_C"><text:span text:style-name="T71">:</text:span></text:span></text:p>
      <text:p text:style-name="P43"><text:span text:style-name="_3c_C_3e_"><text:span text:style-name="T13">fn cambia(n: &amp;mut i32){</text:span></text:span></text:p>
      <text:p text:style-name="P43"><text:span text:style-name="_3c_C_3e_"><text:span text:style-name="T13"><text:tab/>*n = 42;</text:span></text:span></text:p>
      <text:p text:style-name="P43"><text:span text:style-name="_3c_C_3e_"><text:span text:style-name="T13">}</text:span></text:span></text:p>
      <text:p text:style-name="P43"><text:span text:style-name="_2f__2f_C"><text:span text:style-name="T75">y para llamarla:</text:span></text:span></text:p>
      <text:p text:style-name="P43"><text:span text:style-name="_3c_C_3e_"><text:span text:style-name="T13">cambia(&amp;mut x);</text:span></text:span></text:p>
      <text:p text:style-name="P43"><text:span text:style-name="_3c_C_3e_"><text:span text:style-name="T13"/></text:span></text:p>
      <text:h text:style-name="P44" text:outline-level="3"><text:span text:style-name="_3c_C_3e_"><text:span text:style-name="T76">ENUMS</text:span></text:span></text:h>
      <text:p text:style-name="P45"><text:span text:style-name="_2f__2f_C"><text:span text:style-name="T77">Los enums son tipos de variable como en C++11 y funcionan igual</text:span></text:span><text:span text:style-name="_2f__2f_C"><text:span text:style-name="T78"> salvo por los métodos que no se pueden hacer en C++</text:span></text:span><text:span text:style-name="_2f__2f_C"><text:span text:style-name="T77">:</text:span></text:span></text:p>
      <text:p text:style-name="P45"><text:span text:style-name="_3c_C_2b__2b__3e_"><text:span text:style-name="T14">enum Animales</text:span></text:span><text:span text:style-name="_3c_C_3e_"><text:span text:style-name="T13">{</text:span></text:span></text:p>
      <text:p text:style-name="P45"><text:span text:style-name="_3c_C_3e_"><text:span text:style-name="T13"><text:tab/>Gato,</text:span></text:span></text:p>
      <text:p text:style-name="P45"><text:span text:style-name="_3c_C_3e_"><text:span text:style-name="T13"><text:tab/>Perro,</text:span></text:span></text:p>
      <text:p text:style-name="P45"><text:span text:style-name="_3c_C_3e_"><text:span text:style-name="T13"><text:tab/>Mosca,</text:span></text:span></text:p>
      <text:p text:style-name="P45"><text:span text:style-name="_3c_C_3e_"><text:span text:style-name="T13"><text:tab/>Ballena,</text:span></text:span></text:p>
      <text:p text:style-name="P45"><text:span text:style-name="_3c_C_3e_"><text:span text:style-name="T13">}</text:span></text:span></text:p>
      <text:p text:style-name="P45"><text:span text:style-name="_2f__2f_C"><text:span text:style-name="T77">De tal forma que para darle un valor se puede hacer:</text:span></text:span></text:p>
      <text:p text:style-name="P45"><text:soft-page-break/><text:span text:style-name="_3c_C_3e_"><text:span text:style-name="T13">let animal: Animales = </text:span></text:span><text:span text:style-name="_3c_C_2b__2b__3e_"><text:span text:style-name="T14">Animales::Mosca;</text:span></text:span></text:p>
      <text:p text:style-name="P45"><text:span text:style-name="_2f__2f_C"><text:span text:style-name="T77"/></text:span></text:p>
      <text:p text:style-name="P45"><text:span text:style-name="_2f__2f_C"><text:span text:style-name="T77">Podríamos crear funciones propias como:</text:span></text:span></text:p>
      <text:p text:style-name="P45"><text:span text:style-name="_3c_C_2b__2b__3e_"><text:span text:style-name="T14">impl Animales</text:span></text:span><text:span text:style-name="_3c_C_3e_"><text:span text:style-name="T13">{</text:span></text:span></text:p>
      <text:p text:style-name="P45"><text:span text:style-name="_3c_C_3e_"><text:span text:style-name="T13"><text:tab/></text:span></text:span><text:span text:style-name="_3c_C_2b__2b__3e_"><text:span text:style-name="T14">fn es_mamifero(&amp;self) -&gt; bool</text:span></text:span><text:span text:style-name="_3c_C_3e_"><text:span text:style-name="T13">{</text:span></text:span></text:p>
      <text:p text:style-name="P45"><text:span text:style-name="_3c_C_3e_"><text:span text:style-name="T13"><text:tab/><text:tab/></text:span></text:span><text:span text:style-name="_3c_C_2b__2b__3e_"><text:span text:style-name="T14">match self</text:span></text:span><text:span text:style-name="_3c_C_3e_"><text:span text:style-name="T13"> {</text:span></text:span></text:p>
      <text:p text:style-name="P45"><text:span text:style-name="_3c_C_3e_"><text:span text:style-name="T13"><text:tab/><text:tab/><text:tab/></text:span></text:span><text:span text:style-name="_3c_C_2b__2b__3e_"><text:span text:style-name="T14">Animales::Gato | Animales::Perro | Animales::Ballena =&gt; true,</text:span></text:span><text:span text:style-name="_3c_C_3e_"><text:span text:style-name="T13"> </text:span></text:span><text:span text:style-name="_2f__2f_C"><text:span text:style-name="T13">//"|" = O</text:span></text:span></text:p>
      <text:p text:style-name="P45"><text:span text:style-name="_3c_C_3e_"><text:span text:style-name="T13"><text:tab/><text:tab/><text:tab/></text:span></text:span><text:span text:style-name="_3c_C_2b__2b__3e_"><text:span text:style-name="T14">Animales::Mosca =&gt; false</text:span></text:span></text:p>
      <text:p text:style-name="P45"><text:span text:style-name="_3c_C_3e_"><text:span text:style-name="T13"><text:tab/><text:tab/>}</text:span></text:span></text:p>
      <text:p text:style-name="P45"><text:span text:style-name="_3c_C_3e_"><text:span text:style-name="T13"><text:tab/>}</text:span></text:span></text:p>
      <text:p text:style-name="P45"><text:span text:style-name="_3c_C_3e_"><text:span text:style-name="T13">}</text:span></text:span></text:p>
      <text:p text:style-name="P45"><text:span text:style-name="_2f__2f_C"><text:span text:style-name="T77">Siempre habrá que definir cada uno de los Enums en los </text:span></text:span><text:span text:style-name="_3c_C_2b__2b__3e_"><text:span text:style-name="T14">match</text:span></text:span><text:span text:style-name="_2f__2f_C"><text:span text:style-name="T77">, por que si no el compilador dará error. A no ser que se utilize el </text:span></text:span><text:span text:style-name="_2f__2f_C"><text:span text:style-name="T78">comodín</text:span></text:span><text:span text:style-name="_2f__2f_C"><text:span text:style-name="T77"> "</text:span></text:span><text:span text:style-name="_3c_C_2b__2b__3e_"><text:span text:style-name="T14">_</text:span></text:span><text:span text:style-name="_2f__2f_C"><text:span text:style-name="T77">" </text:span></text:span><text:span text:style-name="_2f__2f_C"><text:span text:style-name="T78">que alberga a los restantes.</text:span></text:span><text:span text:style-name="_2f__2f_C"><text:span text:style-name="T77"><text:line-break/></text:span></text:span></text:p>
      <text:p text:style-name="P45"><text:span text:style-name="_3c_C_3e_"><text:span text:style-name="T14">impl Animales{</text:span></text:span></text:p>
      <text:p text:style-name="P45"><text:span text:style-name="_3c_C_3e_"><text:span text:style-name="T14"><text:tab/>fn es_mamifero(&amp;self) -&gt; bool{</text:span></text:span></text:p>
      <text:p text:style-name="P45"><text:span text:style-name="_3c_C_3e_"><text:span text:style-name="T14"><text:tab/><text:tab/>match self {</text:span></text:span></text:p>
      <text:p text:style-name="P45"><text:span text:style-name="_3c_C_3e_"><text:span text:style-name="T14"><text:tab/><text:tab/><text:tab/>Animales::Mosca =&gt; false,</text:span></text:span></text:p>
      <text:p text:style-name="P45"><text:span text:style-name="_3c_C_3e_"><text:span text:style-name="T14"><text:tab/><text:tab/><text:tab/></text:span></text:span><text:span text:style-name="_3c_C_2b__2b__3e_"><text:span text:style-name="T14">_ =&gt;</text:span></text:span><text:span text:style-name="_3c_C_3e_"><text:span text:style-name="T14"> true</text:span></text:span></text:p>
      <text:p text:style-name="P45"><text:span text:style-name="_3c_C_3e_"><text:span text:style-name="T14"><text:tab/><text:tab/>}</text:span></text:span></text:p>
      <text:p text:style-name="P45"><text:span text:style-name="_3c_C_3e_"><text:span text:style-name="T14"><text:tab/>}</text:span></text:span></text:p>
      <text:p text:style-name="P45"><text:span text:style-name="_3c_C_3e_"><text:span text:style-name="T14">}</text:span></text:span></text:p>
      <text:p text:style-name="P46"><text:span text:style-name="_2f__2f_C"><text:span text:style-name="T79">Y para acceder a ese método es como un objeto:</text:span></text:span></text:p>
      <text:p text:style-name="P46"><text:span text:style-name="_3c_C_3e_"><text:span text:style-name="T13">let kk = Animales::Gato;</text:span></text:span></text:p>
      <text:p text:style-name="P46"><text:span text:style-name="_3c_C_3e_"><text:span text:style-name="T13">if kk</text:span></text:span><text:span text:style-name="_3c_C_2b__2b__3e_"><text:span text:style-name="T14">.es_mamifero() </text:span></text:span><text:span text:style-name="_3c_C_3e_"><text:span text:style-name="T13">{...}</text:span></text:span></text:p>
      <text:p text:style-name="P46"><text:span text:style-name="_3c_C_3e_"><text:span text:style-name="T13"/></text:span></text:p>
      <text:h text:style-name="P47" text:outline-level="3"><text:span text:style-name="_3c_C_3e_"><text:span text:style-name="T76">ENUMS</text:span></text:span><text:span text:style-name="_3c_C_3e_"><text:span text:style-name="T80"> con variables extra</text:span></text:span></text:h>
      <text:p text:style-name="P48"><text:span text:style-name="_2f__2f_C"><text:span text:style-name="T81">Los Enums en Rust son como los de C, C++, Java, pero tienen algo único. Se les pueden añadir variables a cada uno de los datos incluidos:</text:span></text:span></text:p>
      <text:p text:style-name="P48"><text:span text:style-name="_3c_C_3e_"><text:span text:style-name="T13">enum Status{</text:span></text:span></text:p>
      <text:p text:style-name="P48"><text:span text:style-name="_3c_C_3e_"><text:span text:style-name="T13"><text:tab/>PorHacer,</text:span></text:span></text:p>
      <text:p text:style-name="P48"><text:span text:style-name="_3c_C_3e_"><text:span text:style-name="T13"><text:tab/>EnProgreso</text:span></text:span><text:span text:style-name="_3c_C_2b__2b__3e_"><text:span text:style-name="T14">{</text:span></text:span></text:p>
      <text:p text:style-name="P48"><text:span text:style-name="_3c_C_2b__2b__3e_"><text:span text:style-name="T14"><text:tab/><text:tab/>asignado_a: String,</text:span></text:span></text:p>
      <text:p text:style-name="P48"><text:soft-page-break/><text:span text:style-name="_3c_C_2b__2b__3e_"><text:span text:style-name="T14"><text:tab/>},</text:span></text:span></text:p>
      <text:p text:style-name="P48"><text:span text:style-name="_3c_C_3e_"><text:span text:style-name="T13"><text:tab/>Hecho,</text:span></text:span></text:p>
      <text:p text:style-name="P48"><text:span text:style-name="_3c_C_3e_"><text:span text:style-name="T13">}</text:span></text:span></text:p>
      <text:p text:style-name="P48"><text:span text:style-name="_2f__2f_C"><text:span text:style-name="T81">Y la forma de acceder a ello no es mediante un </text:span></text:span></text:p>
      <text:p text:style-name="P48"><text:span text:style-name="_2f__2f_C"><text:span text:style-name="T81"/></text:span></text:p>
      <text:p text:style-name="P48"><text:span text:style-name="_3c_C_3e_"><text:span text:style-name="T13">let estado = Status::EnProgreso;</text:span></text:span></text:p>
      <text:p text:style-name="P48"><text:span text:style-name="_3c_C_3e_"><text:span text:style-name="T13">estado.asignado_a; </text:span></text:span><text:span text:style-name="_3c_C_2b__2b__3e_"><text:span text:style-name="T14">//error de compilación</text:span></text:span></text:p>
      <text:p text:style-name="P48"><text:span text:style-name="_2f__2f_C"><text:span text:style-name="T81"/></text:span></text:p>
      <text:p text:style-name="P48"><text:span text:style-name="_2f__2f_C"><text:span text:style-name="T81">Sino con un bloque match:<text:line-break/></text:span></text:span><text:span text:style-name="_3c_C_3e_"><text:span text:style-name="T13">match Status{</text:span></text:span></text:p>
      <text:p text:style-name="P48"><text:span text:style-name="_3c_C_3e_"><text:span text:style-name="T13"><text:tab/>Status::EnProgreso</text:span></text:span><text:span text:style-name="_3c_C_2b__2b__3e_"><text:span text:style-name="T14">{ asignado_a }</text:span></text:span><text:span text:style-name="_3c_C_3e_"><text:span text:style-name="T13"> =&gt; { println! "Lo hace: {}",</text:span></text:span><text:span text:style-name="_3c_C_2b__2b__3e_"><text:span text:style-name="T14"> asignado_a</text:span></text:span><text:span text:style-name="_3c_C_3e_"><text:span text:style-name="T13">; },</text:span></text:span></text:p>
      <text:p text:style-name="P48"><text:span text:style-name="_3c_C_3e_"><text:span text:style-name="T13"><text:tab/>_ =&gt; {} </text:span></text:span><text:span text:style-name="_2f__2f_C"><text:span text:style-name="T13">//si no queremos que haga nada, pues doble llave.</text:span></text:span><text:span text:style-name="_3c_C_3e_"><text:span text:style-name="T82">}</text:span></text:span></text:p>
      <text:p text:style-name="P49"><text:span text:style-name="_2f__2f_C"><text:span text:style-name="T83">PERO CUIDADO!!!!</text:span></text:span><text:span text:style-name="_2f__2f_C"><text:span text:style-name="T84"> Si hacemos eso destruimos la variable instanciada de Status, por que el Ownership pasaría en el bloque </text:span></text:span><text:span text:style-name="_3c_C_3e_"><text:span text:style-name="T13">{println!...}</text:span></text:span><text:span text:style-name="_3c_C_3e_"><text:span text:style-name="T85"> </text:span></text:span><text:span text:style-name="_2f__2f_C"><text:span text:style-name="T84">al </text:span></text:span><text:span text:style-name="_3c_C_3e_"><text:span text:style-name="T13">match</text:span></text:span><text:span text:style-name="_2f__2f_C"><text:span text:style-name="T84"> y por lo tanto al querer usar el </text:span></text:span><text:span text:style-name="_3c_C_3e_"><text:span text:style-name="T13">Status</text:span></text:span><text:span text:style-name="_2f__2f_C"><text:span text:style-name="T84"> de la instancia después daría error de compilación. Para ello es mejor hacer:</text:span></text:span></text:p>
      <text:p text:style-name="P49"><text:span text:style-name="_3c_C_3e_"><text:span text:style-name="T13">match </text:span></text:span><text:span text:style-name="_3c_C_2b__2b__3e_"><text:span text:style-name="T14">&amp;</text:span></text:span><text:span text:style-name="_3c_C_3e_"><text:span text:style-name="T13">Status{ </text:span></text:span><text:span text:style-name="_2f__2f_C"><text:span text:style-name="T13">//mismo código</text:span></text:span><text:span text:style-name="_3c_C_3e_"><text:span text:style-name="T13">}</text:span></text:span><text:span text:style-name="_2f__2f_C"><text:span text:style-name="T84"> y ahí se podria usar sin problemas después.</text:span></text:span></text:p>
      <text:h text:style-name="P50" text:outline-level="3"><text:span text:style-name="_3c_C_3e_"><text:span text:style-name="T70"/></text:span></text:h>
      <text:p text:style-name="P51"><text:span text:style-name="_2f__2f_C"><text:span text:style-name="T86">También se puede hacer el acceso con el if let. </text:span></text:span></text:p>
      <text:p text:style-name="P51"><text:span text:style-name="_3c_C_3e_"><text:span text:style-name="T26">impl Ticket{</text:span></text:span></text:p>
      <text:p text:style-name="P51"><text:span text:style-name="_3c_C_3e_"><text:span text:style-name="T26"><text:tab/>pub fn assigned_to(&amp;self) -&gt; &amp;str{</text:span></text:span></text:p>
      <text:p text:style-name="P51"><text:span text:style-name="_3c_C_3e_"><text:span text:style-name="T26"><text:tab/><text:tab/>if let Status::EnProgreso { asignado_a : kk } = &amp;self.status { kk }</text:span></text:span></text:p>
      <text:p text:style-name="P51"><text:span text:style-name="_3c_C_3e_"><text:span text:style-name="T26"><text:tab/><text:tab/>else { panic!();}</text:span></text:span></text:p>
      <text:p text:style-name="P51"><text:span text:style-name="_3c_C_3e_"><text:span text:style-name="T26"><text:tab/>}</text:span></text:span></text:p>
      <text:p text:style-name="P51"><text:span text:style-name="_3c_C_3e_"><text:span text:style-name="T26">}</text:span></text:span></text:p>
      <text:p text:style-name="P51"><text:span text:style-name="_2f__2f_C"><text:span text:style-name="T86">Es complicado de entender pero ahi va:</text:span></text:span></text:p>
      <text:p text:style-name="P51"><text:span text:style-name="_2f__2f_C"><text:span text:style-name="T86">cuando hay un un let siempre es una asignación a una variable. pero podemos hacerlo dentro de un if. La forma de leer esto es de derecha a izquierda, por que como se puede ver hay una = no ==. entonces esto se estructura asi:<text:line-break/></text:span></text:span></text:p>
      <text:p text:style-name="P51"><text:span text:style-name="_3c_C_2b__2b__3e_"><text:span text:style-name="T6">if let PLANTILLA (nueva variable) = algo que existe o no.</text:span></text:span></text:p>
      <text:p text:style-name="P51"><text:span text:style-name="_2f__2f_C"><text:span text:style-name="T86"/></text:span></text:p>
      <text:p text:style-name="P51"><text:span text:style-name="_2f__2f_C"><text:span text:style-name="T86">asi que se leería, que si esto: </text:span></text:span><text:span text:style-name="_3c_C_2b__2b__3e_"><text:span text:style-name="T6">self.status</text:span></text:span><text:span text:style-name="_2f__2f_C"><text:span text:style-name="T86"> existe y se adapta a que sea un </text:span></text:span><text:span text:style-name="_3c_C_3e_"><text:span text:style-name="T26">Status::EnProgreso { asignado_a },</text:span></text:span><text:span text:style-name="_2f__2f_C"><text:span text:style-name="T86"> entonces mete ese </text:span></text:span><text:span text:style-name="_3c_C_3e_"><text:span text:style-name="T26">asignado_a</text:span></text:span><text:span text:style-name="_2f__2f_C"><text:span text:style-name="T86"> dentro de la </text:span></text:span><text:soft-page-break/><text:span text:style-name="_2f__2f_C"><text:span text:style-name="T86">variable </text:span></text:span><text:span text:style-name="_3c_C_3e_"><text:span text:style-name="T26">kk</text:span></text:span><text:span text:style-name="_2f__2f_C"><text:span text:style-name="T86"> y devuelve ese </text:span></text:span><text:span text:style-name="_3c_C_3e_"><text:span text:style-name="T26">kk</text:span></text:span><text:span text:style-name="_2f__2f_C"><text:span text:style-name="T86"> de esta forma </text:span></text:span><text:span text:style-name="_3c_C_3e_"><text:span text:style-name="T26">{ kk }</text:span></text:span><text:span text:style-name="_2f__2f_C"><text:span text:style-name="T86">.</text:span></text:span><text:span text:style-name="_2f__2f_C"><text:span text:style-name="T87"> El meter ese valor, se llama DESTRUCTURACION. Sacar el valor de la caja y meterlo dentro.</text:span></text:span></text:p>
      <text:p text:style-name="P52"><text:span text:style-name="_2f__2f_C"><text:span text:style-name="T87">Por qué es necesario? por que quizá podríamos pensar hacer un:</text:span></text:span></text:p>
      <text:p text:style-name="P52"><text:span text:style-name="_3c_C_3e_"><text:span text:style-name="T26">if Status::EnProgreso.asignado_a == {asignado_a = paco}</text:span></text:span><text:span text:style-name="_2f__2f_C"><text:span text:style-name="T87"> pero primero no sabemos a quien está asignado, y segundo que pasaría si no existe ese </text:span></text:span><text:span text:style-name="_3c_C_3e_"><text:span text:style-name="T6">EnProgreso</text:span></text:span><text:span text:style-name="_2f__2f_C"><text:span text:style-name="T87"> y es un </text:span></text:span><text:span text:style-name="_3c_C_3e_"><text:span text:style-name="T26">Status::Hecho</text:span></text:span><text:span text:style-name="_2f__2f_C"><text:span text:style-name="T87">? no existiría el </text:span></text:span><text:span text:style-name="_3c_C_3e_"><text:span text:style-name="T26">.asignado_a</text:span></text:span><text:span text:style-name="_2f__2f_C"><text:span text:style-name="T87">, y por lo tanto daría un </text:span></text:span><text:span text:style-name="_3c_C_2b__2b__3e_"><text:span text:style-name="T6">segfaul</text:span></text:span><text:span text:style-name="_2f__2f_C"><text:span text:style-name="T87">.</text:span></text:span></text:p>
      <text:p text:style-name="P51"><text:span text:style-name="_2f__2f_C"><text:span text:style-name="T86">Todo se podría haber resumido asi:</text:span></text:span></text:p>
      <text:p text:style-name="P51"><text:span text:style-name="_3c_C_3e_"><text:span text:style-name="T26">if let Status::EnProgreso { </text:span></text:span><text:span text:style-name="_3c_C_2b__2b__3e_"><text:span text:style-name="T6">asignado_a</text:span></text:span><text:span text:style-name="_3c_C_3e_"><text:span text:style-name="T26"> } = &amp;self.status { </text:span></text:span><text:span text:style-name="_3c_C_2b__2b__3e_"><text:span text:style-name="T6">asignado_a</text:span></text:span><text:span text:style-name="_3c_C_3e_"><text:span text:style-name="T26"> } else....</text:span></text:span></text:p>
      <text:p text:style-name="P53"><text:span text:style-name="_2f__2f_C"><text:span text:style-name="T86"/></text:span></text:p>
      <text:p text:style-name="P53"><text:span text:style-name="_2f__2f_C"><text:span text:style-name="T88">Pero importante. Fijarse lo que devuelve: </text:span></text:span></text:p>
      <text:p text:style-name="P53"><text:span text:style-name="_3c_C_3e_"><text:span text:style-name="T26">pub fn assigned_to(&amp;self) -&gt; &amp;str{</text:span></text:span></text:p>
      <text:p text:style-name="P53"><text:span text:style-name="_2f__2f_C"><text:span text:style-name="T88">Es decir una dirección de memoria (</text:span></text:span><text:span text:style-name="_3c_C_3e_"><text:span text:style-name="T26">char*</text:span></text:span><text:span text:style-name="_2f__2f_C"><text:span text:style-name="T88">) por lo tanto el segundo </text:span></text:span><text:span text:style-name="_3c_C_3e_"><text:span text:style-name="T26">asignado_a</text:span></text:span><text:span text:style-name="_2f__2f_C"><text:span text:style-name="T88"> o el </text:span></text:span><text:span text:style-name="_3c_C_3e_"><text:span text:style-name="T26">{kk}</text:span></text:span><text:span text:style-name="_2f__2f_C"><text:span text:style-name="T88"> primero, son direcciones de memoria y está bien. Si devolviéramos valores, entonces tendría que ir como </text:span></text:span><text:span text:style-name="_3c_C_2b__2b__3e_"><text:span text:style-name="T6">*asignado_a</text:span></text:span><text:span text:style-name="_2f__2f_C"><text:span text:style-name="T88">.</text:span></text:span></text:p>
      <text:p text:style-name="P53"><text:span text:style-name="_3c_C_3e_"><text:span text:style-name="T26">enum Shape{</text:span></text:span></text:p>
      <text:p text:style-name="P53"><text:span text:style-name="_3c_C_3e_"><text:span text:style-name="T26"><text:tab/>Circle { radius: f64}, Square { border: f64 }, Rectangle { width: f64 }, </text:span></text:span></text:p>
      <text:p text:style-name="P53"><text:span text:style-name="_3c_C_3e_"><text:span text:style-name="T26">}</text:span></text:span></text:p>
      <text:p text:style-name="P53"><text:span text:style-name="_3c_C_3e_"><text:span text:style-name="T26">impl Shape {</text:span></text:span></text:p>
      <text:p text:style-name="P53"><text:span text:style-name="_3c_C_3e_"><text:span text:style-name="T26"><text:tab/>pub fn radius(&amp;self) -&gt; </text:span></text:span><text:span text:style-name="_3c_C_2b__2b__3e_"><text:span text:style-name="T6">f64</text:span></text:span><text:span text:style-name="_3c_C_3e_"><text:span text:style-name="T26">{</text:span></text:span></text:p>
      <text:p text:style-name="P53"><text:span text:style-name="_3c_C_3e_"><text:span text:style-name="T26"><text:tab/><text:tab/>if let Shape::Circle { radius } = </text:span></text:span><text:span text:style-name="_3c_C_2b__2b__3e_"><text:span text:style-name="T6">&amp;</text:span></text:span><text:span text:style-name="_3c_C_3e_"><text:span text:style-name="T26">self { </text:span></text:span><text:span text:style-name="_3c_C_2b__2b__3e_"><text:span text:style-name="T6">*radius</text:span></text:span><text:span text:style-name="_3c_C_3e_"><text:span text:style-name="T26"> } </text:span></text:span><text:span text:style-name="_2f__2f_C"><text:span text:style-name="T26">//derreferencia por ser </text:span></text:span><text:span text:style-name="_2f__2f_C"><text:span text:style-name="T89">&amp;self</text:span></text:span></text:p>
      <text:p text:style-name="P53"><text:span text:style-name="_3c_C_3e_"><text:span text:style-name="T26"><text:tab/><text:tab/>else { panic!(); }</text:span></text:span></text:p>
      <text:p text:style-name="P53"><text:span text:style-name="_3c_C_3e_"><text:span text:style-name="T26"><text:tab/>}</text:span></text:span></text:p>
      <text:p text:style-name="P54"><text:span text:style-name="_3c_C_3e_"><text:span text:style-name="T26">}</text:span></text:span></text:p>
      <text:p text:style-name="P55"><text:span text:style-name="_3c_C_3e_"><text:span text:style-name="T90"/></text:span></text:p>
      <text:h text:style-name="P50" text:outline-level="3"><text:span text:style-name="_3c_C_3e_"><text:span text:style-name="T70">FUNCIONES</text:span></text:span><text:span text:style-name="_3c_C_3e_"><text:span text:style-name="T91"> CLOSURE |parametros|</text:span></text:span></text:h>
      <text:p text:style-name="P56"><text:span text:style-name="_2f__2f_C"><text:span text:style-name="T92">Hay veces que queremos pasar una funcion mas limpiamente o mas corta. Se puede definir la normal como:<text:line-break/></text:span></text:span></text:p>
      <text:p text:style-name="P56"><text:span text:style-name="_3c_C_3e_"><text:span text:style-name="T13">fn sumar (x: i32, y: i32) -&gt; i32{</text:span></text:span></text:p>
      <text:p text:style-name="P56"><text:span text:style-name="_3c_C_3e_"><text:span text:style-name="T13"><text:tab/>x + y</text:span></text:span></text:p>
      <text:p text:style-name="P56"><text:span text:style-name="_3c_C_3e_"><text:span text:style-name="T13">}</text:span></text:span></text:p>
      <text:p text:style-name="P56"><text:span text:style-name="_2f__2f_C"><text:span text:style-name="T92">Pero podemos hacerla Closure:</text:span></text:span></text:p>
      <text:p text:style-name="P56"><text:span text:style-name="_3c_C_2b__2b__3e_"><text:span text:style-name="T14">let sumar = |x</text:span></text:span><text:span text:style-name="_3c_C_2b__2b__3e_"><text:span text:style-name="T93">,</text:span></text:span><text:span text:style-name="_3c_C_2b__2b__3e_"><text:span text:style-name="T14"> y| x + y;</text:span></text:span></text:p>
      <text:p text:style-name="P56"><text:span text:style-name="_2f__2f_C"><text:span text:style-name="T92">y se la llama como:</text:span></text:span></text:p>
      <text:p text:style-name="P56"><text:span text:style-name="_3c_C_3e_"><text:span text:style-name="T94">let resultado = </text:span></text:span><text:span text:style-name="_3c_C_3e_"><text:span text:style-name="T13">sumar(2, 3);</text:span></text:span></text:p>
      <text:p text:style-name="P56"><text:soft-page-break/><text:span text:style-name="_2f__2f_C"><text:span text:style-name="T92">esto mismo se puede hacer en una unica linea asi:</text:span></text:span></text:p>
      <text:p text:style-name="P56"><text:span text:style-name="_3c_C_2b__2b__3e_"><text:span text:style-name="T14">let sumar = </text:span></text:span><text:span text:style-name="_3c_C_2b__2b__3e_"><text:span text:style-name="T93">(</text:span></text:span><text:span text:style-name="_3c_C_2b__2b__3e_"><text:span text:style-name="T14">|x</text:span></text:span><text:span text:style-name="_3c_C_2b__2b__3e_"><text:span text:style-name="T93">,</text:span></text:span><text:span text:style-name="_3c_C_2b__2b__3e_"><text:span text:style-name="T14"> y| x + y</text:span></text:span><text:span text:style-name="_3c_C_2b__2b__3e_"><text:span text:style-name="T93">)(2, 3);</text:span></text:span></text:p>
      <text:p text:style-name="P56"><text:span text:style-name="_2f__2f_C"><text:span text:style-name="T92"/></text:span></text:p>
      <text:h text:style-name="P57" text:outline-level="3"><text:span text:style-name="_3c_C_3e_"><text:span text:style-name="T95">TRAITS</text:span></text:span></text:h>
      <text:h text:style-name="P58" text:outline-level="3"><text:span text:style-name="_3c_C_3e_"><text:span text:style-name="T96">SOBRECARGA DE OPERADORES</text:span></text:span></text:h>
      <text:p text:style-name="P59"><text:span text:style-name="_2f__2f_C"><text:span text:style-name="T97">Rust tiene sobrecarga de operadores, y la forma de declararlos es en el </text:span></text:span><text:span text:style-name="_3c_C_2b__2b__3e_"><text:span text:style-name="T14">impl</text:span></text:span><text:span text:style-name="_2f__2f_C"><text:span text:style-name="T97"> de tal forma:</text:span></text:span></text:p>
      <text:p text:style-name="P60"><text:span text:style-name="_3c_C_3e_"><text:span text:style-name="T13">use std::ops::Add;</text:span></text:span><text:span text:style-name="_2f__2f_C"><text:span text:style-name="T98"> </text:span></text:span><text:span text:style-name="_2f__2f_C"><text:span text:style-name="T99">//importa el trait (el operador) de Add. Si no no se puede usar. </text:span></text:span><text:span text:style-name="_2f__2f_C"><text:span text:style-name="T100">Para implementar muchos poner:</text:span></text:span></text:p>
      <text:p text:style-name="P61"><text:span text:style-name="_2f__2f_C"><text:span text:style-name="T101">use</text:span></text:span><text:span text:style-name="_2f__2f_C"><text:span text:style-name="T102"> </text:span></text:span><text:span text:style-name="_2f__2f_C"><text:span text:style-name="T103">std</text:span></text:span><text:span text:style-name="_2f__2f_C"><text:span text:style-name="T104">::</text:span></text:span><text:span text:style-name="_2f__2f_C"><text:span text:style-name="T103">ops</text:span></text:span><text:span text:style-name="_2f__2f_C"><text:span text:style-name="T104">::</text:span></text:span><text:span text:style-name="_2f__2f_C"><text:span text:style-name="T102">{</text:span></text:span><text:span text:style-name="_2f__2f_C"><text:span text:style-name="T103">Add</text:span></text:span><text:span text:style-name="_2f__2f_C"><text:span text:style-name="T102">, </text:span></text:span><text:span text:style-name="_2f__2f_C"><text:span text:style-name="T103">AddAssign</text:span></text:span><text:span text:style-name="_2f__2f_C"><text:span text:style-name="T102">, </text:span></text:span><text:span text:style-name="_2f__2f_C"><text:span text:style-name="T103">Sub</text:span></text:span><text:span text:style-name="_2f__2f_C"><text:span text:style-name="T102">, </text:span></text:span><text:span text:style-name="_2f__2f_C"><text:span text:style-name="T103">SubAssign</text:span></text:span><text:span text:style-name="_2f__2f_C"><text:span text:style-name="T102">, </text:span></text:span><text:span text:style-name="_2f__2f_C"><text:span text:style-name="T103">Mul</text:span></text:span><text:span text:style-name="_2f__2f_C"><text:span text:style-name="T102">, </text:span></text:span><text:span text:style-name="_2f__2f_C"><text:span text:style-name="T103">MulAssign</text:span></text:span><text:span text:style-name="_2f__2f_C"><text:span text:style-name="T102">, </text:span></text:span><text:span text:style-name="_2f__2f_C"><text:span text:style-name="T103">Div</text:span></text:span><text:span text:style-name="_2f__2f_C"><text:span text:style-name="T102">, </text:span></text:span><text:span text:style-name="_2f__2f_C"><text:span text:style-name="T103">DivAssign</text:span></text:span><text:span text:style-name="_2f__2f_C"><text:span text:style-name="T102">};</text:span></text:span></text:p>
      <text:p text:style-name="P60"><text:span text:style-name="_2f__2f_C"><text:span text:style-name="T100"/></text:span></text:p>
      <text:p text:style-name="P62"><text:span text:style-name="_2f__2f_C"><text:span text:style-name="T44">// Es muy útil derivar Copy y Clone para tipos matemáticos simples </text:span></text:span><text:span text:style-name="_2f__2f_C"><text:span text:style-name="T105">hay que hacerlo copy por que sino será un clone que pierde su propiedad y no se puede usar al pasarlo a dicha función.</text:span></text:span></text:p>
      <text:p text:style-name="P62"><text:span text:style-name="_3c_C_2b__2b__3e_"><text:span text:style-name="T46">#[derive(Debug, Clone, Copy)]</text:span></text:span></text:p>
      <text:p text:style-name="P59"><text:span text:style-name="_3c_C_3e_"><text:span text:style-name="T13">struct Vector3{...}</text:span></text:span></text:p>
      <text:p text:style-name="P59"><text:span text:style-name="_3c_C_2b__2b__3e_"><text:span text:style-name="T14">impl</text:span></text:span><text:span text:style-name="_3c_C_3e_"><text:span text:style-name="T13"><text:tab/></text:span></text:span><text:span text:style-name="_3c_C_2b__2b__3e_"><text:span text:style-name="T14">Add</text:span></text:span><text:span text:style-name="_3c_C_3e_"><text:span text:style-name="T13"> for Vector3{</text:span></text:span></text:p>
      <text:p text:style-name="P59"><text:span text:style-name="_3c_C_3e_"><text:span text:style-name="T13"><text:tab/>type Output = Vect</text:span></text:span><text:span text:style-name="_3c_C_3e_"><text:span text:style-name="T99">or</text:span></text:span><text:span text:style-name="_3c_C_3e_"><text:span text:style-name="T13">3; </text:span></text:span><text:span text:style-name="_2f__2f_C"><text:span text:style-name="T13">//el resultado de la operacion v1 + v2 sera un Vect3</text:span></text:span></text:p>
      <text:p text:style-name="P59"><text:span text:style-name="_3c_C_3e_"><text:span text:style-name="T13"><text:tab/>fn </text:span></text:span><text:span text:style-name="_3c_C_2b__2b__3e_"><text:span text:style-name="T14">add</text:span></text:span><text:span text:style-name="_3c_C_3e_"><text:span text:style-name="T13">(self, other: Vect</text:span></text:span><text:span text:style-name="_3c_C_3e_"><text:span text:style-name="T99">or</text:span></text:span><text:span text:style-name="_3c_C_3e_"><text:span text:style-name="T13">3) -&gt; Vect</text:span></text:span><text:span text:style-name="_3c_C_3e_"><text:span text:style-name="T99">or</text:span></text:span><text:span text:style-name="_3c_C_3e_"><text:span text:style-name="T13">3{…}</text:span></text:span></text:p>
      <text:p text:style-name="P62"><text:span text:style-name="_2f__2f_C"><text:span text:style-name="T106">Como se ve, necesita el tipo de output, es decir lo <text:s/>que va a devolver, por que podría ser cualquier otra cosa. Pero en los de asignación no hay que ponerlo:</text:span></text:span></text:p>
      <text:p text:style-name="P62"><text:span text:style-name="_3c_C_3e_"><text:span text:style-name="T13">impl </text:span></text:span><text:span text:style-name="_3c_C_2b__2b__3e_"><text:span text:style-name="T14">AddAssign</text:span></text:span><text:span text:style-name="_3c_C_3e_"><text:span text:style-name="T13"> for Vector3{</text:span></text:span></text:p>
      <text:p text:style-name="P62"><text:span text:style-name="_3c_C_3e_"><text:span text:style-name="T13"><text:tab/>fn </text:span></text:span><text:span text:style-name="_3c_C_2b__2b__3e_"><text:span text:style-name="T14">add_assign</text:span></text:span><text:span text:style-name="_3c_C_3e_"><text:span text:style-name="T13">(</text:span></text:span><text:span text:style-name="_3c_C_2b__2b__3e_"><text:span text:style-name="T14">&amp;mut </text:span></text:span><text:span text:style-name="_3c_C_3e_"><text:span text:style-name="T13">self, other: Vector3){</text:span></text:span></text:p>
      <text:p text:style-name="P62"><text:span text:style-name="_3c_C_3e_"><text:span text:style-name="T13"><text:tab/><text:tab/>self.x += other.x;</text:span></text:span></text:p>
      <text:p text:style-name="P62"><text:span text:style-name="_3c_C_3e_"><text:span text:style-name="T13"><text:tab/><text:tab/>self.y += other.y;</text:span></text:span></text:p>
      <text:p text:style-name="P62"><text:span text:style-name="_3c_C_3e_"><text:span text:style-name="T13"><text:tab/><text:tab/>self.z += other.z;</text:span></text:span></text:p>
      <text:p text:style-name="P62"><text:span text:style-name="_3c_C_3e_"><text:span text:style-name="T13"><text:tab/>}</text:span></text:span></text:p>
      <text:p text:style-name="P62"><text:span text:style-name="_3c_C_3e_"><text:span text:style-name="T13">}</text:span></text:span></text:p>
      <text:p text:style-name="P59"><text:span text:style-name="_3c_C_3e_"><text:span text:style-name="T13"/></text:span></text:p>
      <text:p text:style-name="P63"><text:span text:style-name="_2f__2f_C"><text:span text:style-name="T107">La sobrecarga es con nombre may</text:span></text:span><text:span text:style-name="_2f__2f_C"><text:span text:style-name="T108">ú</text:span></text:span><text:span text:style-name="_2f__2f_C"><text:span text:style-name="T107">scula, y la funci</text:span></text:span><text:span text:style-name="_2f__2f_C"><text:span text:style-name="T108">ón</text:span></text:span><text:span text:style-name="_2f__2f_C"><text:span text:style-name="T107"> en min</text:span></text:span><text:span text:style-name="_2f__2f_C"><text:span text:style-name="T108">ú</text:span></text:span><text:span text:style-name="_2f__2f_C"><text:span text:style-name="T107">scula pero llamada igual. La lista es la siguiente para las sobrecargas (entre par</text:span></text:span><text:span text:style-name="_2f__2f_C"><text:span text:style-name="T108">éntesis el nombre a la función)</text:span></text:span><text:span text:style-name="_2f__2f_C"><text:span text:style-name="T107">:</text:span></text:span></text:p>
      <text:p text:style-name="P64"><text:span text:style-name="_2f__2f_C"><text:span text:style-name="T109">+<text:tab/>-&gt; <text:tab/>Add (add)<text:tab/><text:tab/><text:tab/><text:tab/></text:span></text:span><text:span text:style-name="_2f__2f_C"><text:span text:style-name="T110"><text:tab/><text:tab/><text:tab/><text:tab/></text:span></text:span><text:span text:style-name="_2f__2f_C"><text:span text:style-name="T109">+=<text:tab/>-&gt;<text:tab/><text:tab/>AddAssign (add</text:span></text:span><text:span text:style-name="_2f__2f_C"><text:span text:style-name="T111">_</text:span></text:span><text:span text:style-name="_2f__2f_C"><text:span text:style-name="T109">assign)<text:tab/><text:tab/><text:tab/><text:tab/><text:tab/></text:span></text:span></text:p>
      <text:p text:style-name="P64"><text:span text:style-name="_2f__2f_C"><text:span text:style-name="T109">-<text:tab/>-&gt;<text:tab/></text:span></text:span><text:span text:style-name="_2f__2f_C"><text:span text:style-name="T111"><text:tab/></text:span></text:span><text:span text:style-name="_2f__2f_C"><text:span text:style-name="T109">Sub (sub)</text:span></text:span><text:span text:style-name="_2f__2f_C"><text:span text:style-name="T111"><text:tab/><text:tab/><text:tab/><text:tab/></text:span></text:span><text:span text:style-name="_2f__2f_C"><text:span text:style-name="T110"><text:tab/><text:tab/><text:tab/><text:tab/></text:span></text:span><text:span text:style-name="_2f__2f_C"><text:span text:style-name="T111">-=<text:tab/><text:tab/>-&gt;<text:tab/><text:tab/>SubAssign (sub_assign)</text:span></text:span></text:p>
      <text:p text:style-name="P65"><text:soft-page-break/><text:span text:style-name="_2f__2f_C"><text:span text:style-name="T109">*<text:tab/>-&gt;<text:tab/><text:tab/>Mul (mul)</text:span></text:span><text:span text:style-name="_2f__2f_C"><text:span text:style-name="T111"><text:tab/><text:tab/><text:tab/><text:tab/></text:span></text:span><text:span text:style-name="_2f__2f_C"><text:span text:style-name="T110"><text:tab/><text:tab/><text:tab/><text:tab/></text:span></text:span><text:span text:style-name="_2f__2f_C"><text:span text:style-name="T111">*=<text:tab/><text:tab/>-&gt;<text:tab/><text:tab/>MulAssign (mul_assign)</text:span></text:span></text:p>
      <text:p text:style-name="P65"><text:span text:style-name="_2f__2f_C"><text:span text:style-name="T111">/</text:span></text:span><text:span text:style-name="_2f__2f_C"><text:span text:style-name="T112"><text:tab/></text:span></text:span><text:span text:style-name="_2f__2f_C"><text:span text:style-name="T111">-&gt;<text:tab/><text:tab/>Div (div)<text:tab/><text:tab/><text:tab/><text:tab/><text:tab/></text:span></text:span><text:span text:style-name="_2f__2f_C"><text:span text:style-name="T110"><text:tab/><text:tab/><text:tab/><text:tab/></text:span></text:span><text:span text:style-name="_2f__2f_C"><text:span text:style-name="T111">/=<text:tab/><text:tab/>-&gt;<text:tab/><text:tab/>DivAssign<text:tab/>(div_assign)</text:span></text:span></text:p>
      <text:p text:style-name="P65"><text:span text:style-name="_2f__2f_C"><text:span text:style-name="T111">%</text:span></text:span><text:span text:style-name="_2f__2f_C"><text:span text:style-name="T112"> </text:span></text:span><text:span text:style-name="_2f__2f_C"><text:span text:style-name="T111"><text:tab/>-&gt;<text:tab/>Rem </text:span></text:span><text:span text:style-name="_2f__2f_C"><text:span text:style-name="T109">(rem</text:span></text:span><text:span text:style-name="_2f__2f_C"><text:span text:style-name="T111">)</text:span></text:span><text:span text:style-name="_2f__2f_C"><text:span text:style-name="T109"><text:tab/></text:span></text:span><text:span text:style-name="_2f__2f_C"><text:span text:style-name="T111"><text:tab/><text:tab/><text:tab/></text:span></text:span><text:span text:style-name="_2f__2f_C"><text:span text:style-name="T110"><text:tab/><text:tab/><text:tab/><text:tab/></text:span></text:span><text:span text:style-name="_2f__2f_C"><text:span text:style-name="T111">%=<text:tab/>-&gt;<text:tab/><text:tab/>RemAssign (rem_assign)</text:span></text:span></text:p>
      <text:p text:style-name="P66"><text:span text:style-name="_2f__2f_C"><text:span text:style-name="T109">==<text:tab/>-&gt; PartialEq</text:span></text:span><text:span text:style-name="_2f__2f_C"><text:span text:style-name="T110"> (eq)</text:span></text:span><text:span text:style-name="_2f__2f_C"><text:span text:style-name="T109"><text:tab/><text:tab/></text:span></text:span><text:span text:style-name="_2f__2f_C"><text:span text:style-name="T113"><text:tab/><text:tab/><text:tab/></text:span></text:span><text:span text:style-name="_2f__2f_C"><text:span text:style-name="T109"><text:tab/></text:span></text:span><text:span text:style-name="_2f__2f_C"><text:span text:style-name="T110">!=<text:tab/><text:tab/>-&gt;<text:tab/><text:tab/>PartialEq (</text:span></text:span><text:span text:style-name="_2f__2f_C"><text:span text:style-name="T114">ne</text:span></text:span><text:span text:style-name="_2f__2f_C"><text:span text:style-name="T110">)</text:span></text:span></text:p>
      <text:p text:style-name="P67"><text:span text:style-name="_2f__2f_C"><text:span text:style-name="T109">[ ]</text:span></text:span><text:span text:style-name="_2f__2f_C"><text:span text:style-name="T110"><text:tab/><text:tab/>-&gt;</text:span></text:span><text:span text:style-name="_2f__2f_C"><text:span text:style-name="T112"> </text:span></text:span><text:span text:style-name="_2f__2f_C"><text:span text:style-name="T110">Index (index)</text:span></text:span><text:span text:style-name="_2f__2f_C"><text:span text:style-name="T112"><text:tab/></text:span></text:span><text:span text:style-name="_2f__2f_C"><text:span text:style-name="T109"><text:tab/><text:tab/></text:span></text:span><text:span text:style-name="_2f__2f_C"><text:span text:style-name="T110"><text:tab/><text:tab/><text:tab/><text:tab/>[ ] =<text:tab/>-&gt;<text:tab/><text:tab/>IndexMut (index_mut)</text:span></text:span></text:p>
      <text:p text:style-name="P67"><text:span text:style-name="_2f__2f_C"><text:span text:style-name="T112">-x<text:tab/><text:tab/>-&gt; Neg (neg)<text:tab/><text:tab/><text:tab/><text:tab/><text:tab/><text:tab/><text:tab/><text:tab/>!x = -&gt;<text:tab/><text:tab/>Not (not)</text:span></text:span></text:p>
      <text:p text:style-name="P68"><text:span text:style-name="_2f__2f_C"><text:span text:style-name="T112">&amp;<text:tab/><text:tab/>-&gt; BitAnd (bitand)<text:tab/><text:tab/><text:tab/><text:tab/><text:tab/></text:span></text:span><text:span text:style-name="_2f__2f_C"><text:span text:style-name="T115"><text:tab/></text:span></text:span><text:span text:style-name="_2f__2f_C"><text:span text:style-name="T113">&amp;=</text:span></text:span><text:span text:style-name="_2f__2f_C"><text:span text:style-name="T112"><text:tab/>-&gt;<text:tab/><text:tab/></text:span></text:span><text:span text:style-name="_2f__2f_C"><text:span text:style-name="T113">BitAndAssign (bit_and_assign)</text:span></text:span></text:p>
      <text:p text:style-name="P68"><text:span text:style-name="_2f__2f_C"><text:span text:style-name="T113">|<text:tab/><text:tab/>-&gt; BitOr (bitor)<text:tab/><text:tab/><text:tab/><text:tab/><text:tab/><text:tab/><text:tab/>|=<text:tab/><text:tab/>-&gt;<text:tab/><text:tab/>BitOrAssign (bit_or_assign)</text:span></text:span></text:p>
      <text:p text:style-name="P68"><text:span text:style-name="_2f__2f_C"><text:span text:style-name="T113">^<text:tab/><text:tab/>-&gt;<text:tab/>BitXor (bitxor)<text:tab/><text:tab/><text:tab/><text:tab/><text:tab/><text:tab/>^=<text:tab/>-&gt;<text:tab/><text:tab/>BitXorAssign (bit_xor_assign)</text:span></text:span></text:p>
      <text:p text:style-name="P68"><text:span text:style-name="_2f__2f_C"><text:span text:style-name="T113">&lt;&lt;<text:tab/>-&gt;<text:tab/>Shl<text:tab/>(shl)<text:tab/><text:tab/><text:tab/><text:tab/><text:tab/><text:tab/><text:tab/><text:tab/><text:tab/>&lt;&lt;=<text:tab/>-&gt;<text:tab/><text:tab/>ShlAssign (shl_assign)</text:span></text:span></text:p>
      <text:p text:style-name="P68"><text:span text:style-name="_2f__2f_C"><text:span text:style-name="T113">&gt;&gt;<text:tab/>-&gt;<text:tab/>Shr<text:tab/>(shr)<text:tab/><text:tab/><text:tab/><text:tab/><text:tab/><text:tab/><text:tab/><text:tab/>&gt;&gt;=<text:tab/>-&gt;<text:tab/><text:tab/>ShrAssign (shr_assign)</text:span></text:span></text:p>
      <text:p text:style-name="P68"><text:span text:style-name="_2f__2f_C"><text:span text:style-name="T113">*x<text:tab/><text:tab/>-&gt;<text:tab/>Deref (deref)<text:tab/><text:tab/><text:tab/><text:tab/><text:tab/><text:tab/><text:tab/>*x=<text:tab/>-&gt;<text:tab/><text:tab/>DerefMut (deref_mut)</text:span></text:span></text:p>
      <text:p text:style-name="P68"><text:span text:style-name="_2f__2f_C"><text:span text:style-name="T113">x..y<text:tab/>-&gt;<text:tab/>Range </text:span></text:span><text:span text:style-name="_2f__2f_C"><text:span text:style-name="T114">(no hay</text:span></text:span><text:span text:style-name="_2f__2f_C"><text:span text:style-name="T113">)<text:tab/><text:tab/><text:tab/></text:span></text:span><text:span text:style-name="_2f__2f_C"><text:span text:style-name="T114"><text:tab/><text:tab/></text:span></text:span><text:span text:style-name="_2f__2f_C"><text:span text:style-name="T113"><text:tab/>()<text:tab/>-&gt;<text:tab/><text:tab/>Fn, FnMut, FnOnce (</text:span></text:span><text:span text:style-name="_2f__2f_C"><text:span text:style-name="T114">call</text:span></text:span><text:span text:style-name="_2f__2f_C"><text:span text:style-name="T113">)</text:span></text:span></text:p>
      <text:p text:style-name="P69"><text:span text:style-name="_2f__2f_C"><text:span text:style-name="T107"><text:tab/></text:span></text:span><text:span text:style-name="_2f__2f_C"><text:span text:style-name="T113"><text:tab/><text:tab/><text:tab/></text:span></text:span><text:span text:style-name="_2f__2f_C"><text:span text:style-name="T109">&lt;, &lt;=, &gt;, &gt;=<text:tab/>-&gt; PartialOrd (partial_cm</text:span></text:span><text:span text:style-name="_2f__2f_C"><text:span text:style-name="T114">p</text:span></text:span><text:span text:style-name="_2f__2f_C"><text:span text:style-name="T110">)</text:span></text:span><text:span text:style-name="_2f__2f_C"><text:span text:style-name="T109"><text:tab/><text:tab/></text:span></text:span></text:p>
      <text:p text:style-name="P69"><text:span text:style-name="_2f__2f_C"><text:span text:style-name="T109"/></text:span></text:p>
      <text:p text:style-name="P70"><text:span text:style-name="_2f__2f_C"><text:span text:style-name="T116">Para alterar el orden por ejemplo en una multiplicacion de un Vector3 por ejemplo seria:<text:line-break/><text:line-break/>2 * v1</text:span></text:span></text:p>
      <text:p text:style-name="P71"><text:span text:style-name="_2f__2f_C"><text:span text:style-name="T117">//como se ve el int va a la izda, pero aquí se cruza a la dcha del for por lo que el self, se refiere al tipo int, y por eso no es self.x o self.y.</text:span></text:span></text:p>
      <text:p text:style-name="P70"><text:span text:style-name="_3c_C_3e_"><text:span text:style-name="T13">impl<text:tab/><text:tab/>Mul</text:span></text:span><text:span text:style-name="_3c_C_2b__2b__3e_"><text:span text:style-name="T14">&lt;Vect3&gt;</text:span></text:span><text:span text:style-name="_3c_C_3e_"><text:span text:style-name="T13"> for </text:span></text:span><text:span text:style-name="_3c_C_2b__2b__3e_"><text:span text:style-name="T14">i32</text:span></text:span><text:span text:style-name="_3c_C_3e_"><text:span text:style-name="T13">{</text:span></text:span><text:span text:style-name="_3c_C_3e_"><text:span text:style-name="T117"> </text:span></text:span></text:p>
      <text:p text:style-name="P70"><text:span text:style-name="_3c_C_3e_"><text:span text:style-name="T13"><text:tab/>type Output = Vect3</text:span></text:span></text:p>
      <text:p text:style-name="P70"><text:span text:style-name="_3c_C_3e_"><text:span text:style-name="T13"><text:tab/>fn mul(self, other: Vect3) -&gt; Vect3{</text:span></text:span></text:p>
      <text:p text:style-name="P70"><text:span text:style-name="_3c_C_3e_"><text:span text:style-name="T13"><text:tab/><text:tab/>return Vect3 {x: </text:span></text:span><text:span text:style-name="_3c_C_2b__2b__3e_"><text:span text:style-name="T14">self</text:span></text:span><text:span text:style-name="_3c_C_3e_"><text:span text:style-name="T13"> * other.x, y: </text:span></text:span><text:span text:style-name="_3c_C_2b__2b__3e_"><text:span text:style-name="T14">self</text:span></text:span><text:span text:style-name="_3c_C_3e_"><text:span text:style-name="T13"> * other.y, z: </text:span></text:span><text:span text:style-name="_3c_C_2b__2b__3e_"><text:span text:style-name="T14">self</text:span></text:span><text:span text:style-name="_3c_C_3e_"><text:span text:style-name="T13"> * other.z}; </text:span></text:span><text:span text:style-name="_2f__2f_C"><text:span text:style-name="T13">//hay return, entonces <text:s/>;</text:span></text:span></text:p>
      <text:p text:style-name="P70"><text:span text:style-name="_3c_C_3e_"><text:span text:style-name="T13"><text:tab/>}</text:span></text:span></text:p>
      <text:p text:style-name="P70"><text:span text:style-name="_3c_C_3e_"><text:span text:style-name="T13">}</text:span></text:span></text:p>
      <text:p text:style-name="P72"><text:span text:style-name="_2f__2f_C"><text:span text:style-name="T118">v1 * 2</text:span></text:span></text:p>
      <text:p text:style-name="P71"><text:span text:style-name="_2f__2f_C"><text:span text:style-name="T117">//aquí el numero está a la derecha, por lo que se cruza y va a la izquierda, y en este caso el for es del Vect3 por lo que el self será self.x, self.y o self.z</text:span></text:span></text:p>
      <text:p text:style-name="P72"><text:span text:style-name="_3c_C_3e_"><text:span text:style-name="T13">impl Mul</text:span></text:span><text:span text:style-name="_3c_C_2b__2b__3e_"><text:span text:style-name="T14">&lt;i32&gt;</text:span></text:span><text:span text:style-name="_3c_C_3e_"><text:span text:style-name="T13"> for Vect3{</text:span></text:span></text:p>
      <text:p text:style-name="P72"><text:span text:style-name="_3c_C_3e_"><text:span text:style-name="T13"><text:tab/>type Output = Vect3;</text:span></text:span></text:p>
      <text:p text:style-name="P72"><text:span text:style-name="_3c_C_3e_"><text:span text:style-name="T13"><text:tab/>fn mul(self, n: i32) -&gt; Vect3{</text:span></text:span></text:p>
      <text:p text:style-name="P72"><text:span text:style-name="_3c_C_3e_"><text:span text:style-name="T13"><text:tab/><text:tab/>Vect3 {x: </text:span></text:span><text:span text:style-name="_3c_C_3e_"><text:span text:style-name="T119">s</text:span></text:span><text:span text:style-name="_3c_C_3e_"><text:span text:style-name="T13">elf.x * n , y: </text:span></text:span><text:span text:style-name="_3c_C_3e_"><text:span text:style-name="T119">s</text:span></text:span><text:span text:style-name="_3c_C_3e_"><text:span text:style-name="T13">elf.y * n, z: </text:span></text:span><text:span text:style-name="_3c_C_3e_"><text:span text:style-name="T119">s</text:span></text:span><text:span text:style-name="_3c_C_3e_"><text:span text:style-name="T13">elf.z * n} </text:span></text:span><text:span text:style-name="_2f__2f_C"><text:span text:style-name="T13">//no hay return no hay ;</text:span></text:span><text:span text:style-name="_2f__2f_C"><text:span text:style-name="T119"> El self tiene que ser en minúsculas si se devuelve el valor como aquí.. Podriamos haber puesto:</text:span></text:span></text:p>
      <text:p text:style-name="P73"><text:soft-page-break/><text:span text:style-name="_2f__2f_C"><text:span text:style-name="T119">ft mul(self, n: i32) -&gt; Self{. Donde ahí si que va en Mayúsculas por que es un tipo.</text:span></text:span></text:p>
      <text:p text:style-name="P72"><text:span text:style-name="_3c_C_3e_"><text:span text:style-name="T13"><text:tab/>}</text:span></text:span></text:p>
      <text:p text:style-name="P72"><text:span text:style-name="_3c_C_3e_"><text:span text:style-name="T13">}</text:span></text:span></text:p>
      <text:p text:style-name="P72"><text:span text:style-name="_2f__2f_C"><text:span text:style-name="T118">El formato es:<text:line-break/></text:span></text:span></text:p>
      <text:p text:style-name="P72"><text:span text:style-name="_3c_C_3e_"><text:span text:style-name="T13">impl Trait</text:span></text:span><text:span text:style-name="_3c_C_2b__2b__3e_"><text:span text:style-name="T14">&lt;RightHandElement&gt;</text:span></text:span><text:span text:style-name="_3c_C_3e_"><text:span text:style-name="T13"> for </text:span></text:span><text:span text:style-name="_3c_C_2b__2b__3e_"><text:span text:style-name="T14">LeftHandElement</text:span></text:span></text:p>
      <text:p text:style-name="P72"><text:span text:style-name="_2f__2f_C"><text:span text:style-name="T118">entonces el self es del tipo del LeftHandElement</text:span></text:span></text:p>
      <text:p text:style-name="P70"><text:span text:style-name="_2f__2f_C"><text:span text:style-name="T116"/></text:span></text:p>
      <text:h text:style-name="P74" text:outline-level="3"><text:span text:style-name="_3c_C_3e_"><text:span text:style-name="T96">SOBRECARGA DE OPERADORES </text:span></text:span><text:span text:style-name="_3c_C_3e_"><text:span text:style-name="T120">por instancia</text:span></text:span></text:h>
      <text:p text:style-name="P75"><text:span text:style-name="_2f__2f_C"><text:span text:style-name="T121">En la sobrecarga hemos visto que teniamos que hacer un:</text:span></text:span></text:p>
      <text:p text:style-name="P75"><text:span text:style-name="_3c_C_2b__2b__3e_"><text:span text:style-name="T14">#[derive(Debug, Clone, Copy)] </text:span></text:span><text:span text:style-name="_2f__2f_C"><text:span text:style-name="T121">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75"><text:span text:style-name="_3c_C_3e_"><text:span text:style-name="T13">use::std::ops::Add;</text:span></text:span></text:p>
      <text:p text:style-name="P75"><text:span text:style-name="_3c_C_3e_"><text:span text:style-name="T13">struct Vect3{ todo lo de x y z pero sin ser pub f32,}</text:span></text:span></text:p>
      <text:p text:style-name="P75"><text:span text:style-name="_3c_C_3e_"><text:span text:style-name="T13">impl</text:span></text:span><text:span text:style-name="_3c_C_2b__2b__3e_"><text:span text:style-name="T14">&lt;’a, ‘b&gt;</text:span></text:span><text:span text:style-name="_3c_C_3e_"><text:span text:style-name="T13"> Add</text:span></text:span><text:span text:style-name="_3c_C_2b__2b__3e_"><text:span text:style-name="T14">&lt;&amp;’b Vect3&gt;</text:span></text:span><text:span text:style-name="_3c_C_3e_"><text:span text:style-name="T13"> for </text:span></text:span><text:span text:style-name="_3c_C_2b__2b__3e_"><text:span text:style-name="T14">&amp;’a</text:span></text:span><text:span text:style-name="_3c_C_3e_"><text:span text:style-name="T13"> Vect3{</text:span></text:span><text:span text:style-name="_3c_C_3e_"><text:span text:style-name="T117"> </text:span></text:span><text:span text:style-name="_2f__2f_C"><text:span text:style-name="T117">//&lt;' le indica que será un lifetime, es decir que vivirá el tiempo suficiente mientras que esté la función aplicada de Suma. Después de</text:span></text:span></text:p>
      <text:p text:style-name="P71"><text:span text:style-name="_2f__2f_C"><text:span text:style-name="T117">impl lo declaramos y luego despueś lo usamos. en &amp;'a y &amp;'b. Es por motivos de onwership.</text:span></text:span></text:p>
      <text:p text:style-name="P75"><text:span text:style-name="_3c_C_3e_"><text:span text:style-name="T13"><text:tab/>type Output = Vect3;</text:span></text:span></text:p>
      <text:p text:style-name="P75"><text:span text:style-name="_3c_C_3e_"><text:span text:style-name="T13"><text:tab/>fn add(self, other: </text:span></text:span><text:span text:style-name="_3c_C_2b__2b__3e_"><text:span text:style-name="T14">&amp;</text:span></text:span><text:span text:style-name="_3c_C_3e_"><text:span text:style-name="T13">Vect3) → Vect3{</text:span></text:span></text:p>
      <text:p text:style-name="P75"><text:span text:style-name="_3c_C_3e_"><text:span text:style-name="T13"><text:tab/><text:tab/>x: self.x + other.x, ….</text:span></text:span></text:p>
      <text:p text:style-name="P75"><text:span text:style-name="_3c_C_3e_"><text:span text:style-name="T13"><text:tab/>}</text:span></text:span></text:p>
      <text:p text:style-name="P75"><text:span text:style-name="_3c_C_3e_"><text:span text:style-name="T13">}</text:span></text:span></text:p>
      <text:p text:style-name="P75"><text:span text:style-name="_2f__2f_C"><text:span text:style-name="T121">y para usarlo sería :</text:span></text:span></text:p>
      <text:p text:style-name="P75"><text:span text:style-name="_3c_C_3e_"><text:span text:style-name="T13">let v3 = </text:span></text:span><text:span text:style-name="_3c_C_2b__2b__3e_"><text:span text:style-name="T14">&amp;</text:span></text:span><text:span text:style-name="_3c_C_3e_"><text:span text:style-name="T13">v1 + </text:span></text:span><text:span text:style-name="_3c_C_2b__2b__3e_"><text:span text:style-name="T14">&amp;</text:span></text:span><text:span text:style-name="_3c_C_3e_"><text:span text:style-name="T13">v2;</text:span></text:span></text:p>
      <text:p text:style-name="P75"><text:span text:style-name="_3c_C_3e_"><text:span text:style-name="T13">println!(“{}”, v1.</text:span></text:span><text:span text:style-name="_3c_C_3e_"><text:span text:style-name="T122">x</text:span></text:span><text:span text:style-name="_3c_C_3e_"><text:span text:style-name="T13">); </text:span></text:span><text:span text:style-name="_2f__2f_C"><text:span text:style-name="T13">//aquí ya no daría error el compilador por que todavía existe.</text:span></text:span></text:p>
      <text:h text:style-name="P76" text:outline-level="3"><text:span text:style-name="_3c_C_3e_"><text:span text:style-name="T123"/></text:span></text:h>
      <text:h text:style-name="P77" text:outline-level="3"><text:span text:style-name="_3c_C_3e_"><text:span text:style-name="T124">TRAITS</text:span></text:span><text:span text:style-name="_3c_C_3e_"><text:span text:style-name="T125">. Para el uso de Templates en sobrecarga operadores</text:span></text:span></text:h>
      <text:p text:style-name="P78"><text:span text:style-name="_2f__2f_C"><text:span text:style-name="T126">Hemos visto que se puede hacer la sobrecarga de operadores de la multiplicación</text:span></text:span><text:span text:style-name="_2f__2f_C"><text:span text:style-name="T127"> por un número. Pero y si queremos que pueda ser de cualquier tipo que sean números. Usamos los templates como en C++:<text:line-break/></text:span></text:span></text:p>
      <text:p text:style-name="P78"><text:span text:style-name="_2f__2f_C"><text:span text:style-name="T13">//Hay que añadir la dependencia de "num-traits" en el Cargo.toml</text:span></text:span><text:span text:style-name="_2f__2f_C"><text:span text:style-name="T128">. Debajo de [Dependencies] poner</text:span></text:span></text:p>
      <text:p text:style-name="P78"><text:span text:style-name="_2f__2f_C"><text:span text:style-name="T128">//num-traits = "0.2"</text:span></text:span></text:p>
      <text:p text:style-name="P78"><text:soft-page-break/><text:span text:style-name="_3c_C_3e_"><text:span text:style-name="T13">use std::ops:Mul;</text:span></text:span></text:p>
      <text:p text:style-name="P78"><text:span text:style-name="_3c_C_2b__2b__3e_"><text:span text:style-name="T14">use num_traits::Num;</text:span></text:span><text:span text:style-name="_3c_C_3e_"><text:span text:style-name="T13"> </text:span></text:span><text:span text:style-name="_2f__2f_C"><text:span text:style-name="T13">//esto es un TRAIT e incluye cualquier número (i32, f64, u8, etc..)</text:span></text:span></text:p>
      <text:p text:style-name="P78"><text:span text:style-name="_2f__2f_C"><text:span text:style-name="T129">//</text:span></text:span><text:span text:style-name="_2f__2f_C"><text:span text:style-name="T13">1. Hacemos que el struct acepte cualquier tipo T que sea un número:</text:span></text:span></text:p>
      <text:p text:style-name="P78"><text:span text:style-name="_3c_C_3e_"><text:span text:style-name="T13">pub struct Vect3</text:span></text:span><text:span text:style-name="_3c_C_2b__2b__3e_"><text:span text:style-name="T14">&lt;T&gt;</text:span></text:span><text:span text:style-name="_3c_C_3e_"><text:span text:style-name="T13">{pub x: </text:span></text:span><text:span text:style-name="_3c_C_2b__2b__3e_"><text:span text:style-name="T14">T</text:span></text:span><text:span text:style-name="_3c_C_3e_"><text:span text:style-name="T13">, pub y: </text:span></text:span><text:span text:style-name="_3c_C_2b__2b__3e_"><text:span text:style-name="T14">T</text:span></text:span><text:span text:style-name="_3c_C_3e_"><text:span text:style-name="T13">, pub z: </text:span></text:span><text:span text:style-name="_3c_C_2b__2b__3e_"><text:span text:style-name="T14">T</text:span></text:span><text:span text:style-name="_3c_C_3e_"><text:span text:style-name="T13">,}</text:span></text:span></text:p>
      <text:p text:style-name="P78"><text:span text:style-name="_2f__2f_C"><text:span text:style-name="T129">//</text:span></text:span><text:span text:style-name="_2f__2f_C"><text:span text:style-name="T13">2. implementamos la multiplicación para cualquier número T</text:span></text:span></text:p>
      <text:p text:style-name="P78"><text:span text:style-name="_3c_C_3e_"><text:span text:style-name="T13">impl</text:span></text:span><text:span text:style-name="_3c_C_2b__2b__3e_"><text:span text:style-name="T14">&lt;T&gt;</text:span></text:span><text:span text:style-name="_3c_C_3e_"><text:span text:style-name="T13"> Mul</text:span></text:span><text:span text:style-name="_3c_C_2b__2b__3e_"><text:span text:style-name="T14">&lt;T&gt;</text:span></text:span><text:span text:style-name="_3c_C_3e_"><text:span text:style-name="T13"> for Vect3</text:span></text:span><text:span text:style-name="_3c_C_2b__2b__3e_"><text:span text:style-name="T14">&lt;T&gt;</text:span></text:span></text:p>
      <text:p text:style-name="P78"><text:span text:style-name="_3c_C_2b__2b__3e_"><text:span text:style-name="T14">where</text:span></text:span></text:p>
      <text:p text:style-name="P78"><text:span text:style-name="_3c_C_3e_"><text:span text:style-name="T13"><text:tab/></text:span></text:span><text:span text:style-name="_2f__2f_C"><text:span text:style-name="T14">//esto es la condición y nos dice que T tiene que ser un número y poder copiarse</text:span></text:span></text:p>
      <text:p text:style-name="P78"><text:span text:style-name="_3c_C_3e_"><text:span text:style-name="T13"><text:tab/></text:span></text:span><text:span text:style-name="_3c_C_2b__2b__3e_"><text:span text:style-name="T14">T: Num + Copy</text:span></text:span><text:span text:style-name="_3c_C_2b__2b__3e_"><text:span text:style-name="T130">, </text:span></text:span><text:span text:style-name="_2f__2f_C"><text:span text:style-name="T130">//fijarse que es , no ; el + inica "and"</text:span></text:span></text:p>
      <text:p text:style-name="P78"><text:span text:style-name="_2f__2f_C"><text:span text:style-name="T130">//si hubieramos querido hacerlo con un solo tipo, podriamos heberlo metido, pero también asi:</text:span></text:span></text:p>
      <text:p text:style-name="P78"><text:span text:style-name="_2f__2f_C"><text:span text:style-name="T130">//T: Mul&lt;f32, Output = T&gt; + Copy //Cuantas más lineas como esta más restrictivo. Mul&lt;f32&gt; es que se pueda multiplicar por un float. y Output = T indica que el resultado sea uno de Tipo T.</text:span></text:span></text:p>
      <text:p text:style-name="P78"><text:span text:style-name="_3c_C_3e_"><text:span text:style-name="T13">{</text:span></text:span></text:p>
      <text:p text:style-name="P78"><text:span text:style-name="_3c_C_3e_"><text:span text:style-name="T13"><text:tab/>type Output = Vect3</text:span></text:span><text:span text:style-name="_3c_C_2b__2b__3e_"><text:span text:style-name="T14">&lt;T&gt;</text:span></text:span><text:span text:style-name="_3c_C_3e_"><text:span text:style-name="T13">; </text:span></text:span><text:span text:style-name="_2f__2f_C"><text:span text:style-name="T13">//la salida tiene que ser un struct del mismo tipo</text:span></text:span></text:p>
      <text:p text:style-name="P78"><text:span text:style-name="_3c_C_3e_"><text:span text:style-name="T13"><text:s/><text:tab/>fn mul(self, n: </text:span></text:span><text:span text:style-name="_3c_C_2b__2b__3e_"><text:span text:style-name="T14">T</text:span></text:span><text:span text:style-name="_3c_C_3e_"><text:span text:style-name="T13">) -&gt; Vect3</text:span></text:span><text:span text:style-name="_3c_C_2b__2b__3e_"><text:span text:style-name="T14">&lt;T&gt;</text:span></text:span><text:span text:style-name="_3c_C_3e_"><text:span text:style-name="T13"> {</text:span></text:span></text:p>
      <text:p text:style-name="P78"><text:span text:style-name="_3c_C_3e_"><text:span text:style-name="T128"><text:tab/><text:tab/>Vect3{</text:span></text:span></text:p>
      <text:p text:style-name="P78"><text:span text:style-name="_3c_C_3e_"><text:span text:style-name="T13"><text:tab/><text:tab/></text:span></text:span><text:span text:style-name="_3c_C_3e_"><text:span text:style-name="T128"><text:tab/></text:span></text:span><text:span text:style-name="_3c_C_3e_"><text:span text:style-name="T13">x: self.x * n</text:span></text:span><text:span text:style-name="_3c_C_3e_"><text:span text:style-name="T128">,</text:span></text:span><text:span text:style-name="_3c_C_3e_"><text:span text:style-name="T13"> </text:span></text:span><text:span text:style-name="_2f__2f_C"><text:span text:style-name="T13">//Rust ya sabe que se puede multiplicar por que es un Num</text:span></text:span></text:p>
      <text:p text:style-name="P78"><text:span text:style-name="_3c_C_3e_"><text:span text:style-name="T13"><text:tab/><text:tab/></text:span></text:span><text:span text:style-name="_3c_C_3e_"><text:span text:style-name="T128"><text:tab/></text:span></text:span><text:span text:style-name="_3c_C_3e_"><text:span text:style-name="T13">y: self.y * n</text:span></text:span><text:span text:style-name="_3c_C_3e_"><text:span text:style-name="T128">,</text:span></text:span><text:span text:style-name="_3c_C_3e_"><text:span text:style-name="T13"> </text:span></text:span><text:span text:style-name="_3c_C_3e_"><text:span text:style-name="T129">//</text:span></text:span><text:span text:style-name="_2f__2f_C"><text:span text:style-name="T13">etc....</text:span></text:span></text:p>
      <text:p text:style-name="P78"><text:span text:style-name="_3c_C_3e_"><text:span text:style-name="T13"><text:tab/></text:span></text:span><text:span text:style-name="_3c_C_3e_"><text:span text:style-name="T128"><text:tab/>}</text:span></text:span></text:p>
      <text:p text:style-name="P78"><text:span text:style-name="_3c_C_3e_"><text:span text:style-name="T128"><text:tab/></text:span></text:span><text:span text:style-name="_3c_C_3e_"><text:span text:style-name="T13">}</text:span></text:span></text:p>
      <text:p text:style-name="P78"><text:span text:style-name="_3c_C_3e_"><text:span text:style-name="T26">}</text:span></text:span></text:p>
      <text:p text:style-name="P79"><text:span text:style-name="_3c_C_3e_"><text:span text:style-name="T123"/></text:span></text:p>
      <text:h text:style-name="P80" text:outline-level="3"><text:span text:style-name="_3c_C_3e_"><text:span text:style-name="T131">TRAITS</text:span></text:span><text:span text:style-name="_3c_C_3e_"><text:span text:style-name="T132">. Añadir un nuevo método a un tipo</text:span></text:span></text:h>
      <text:p text:style-name="P81"><text:span text:style-name="_2f__2f_C"><text:span text:style-name="T133">Como hemos visto, podemos hacer sobrecarga de operadores para un nuevo tipo de variable que tengamos. Para ello usábamos unos traits ya definidos que los cargábamos con:</text:span></text:span></text:p>
      <text:p text:style-name="P81"><text:span text:style-name="_3c_C_2b__2b__3e_"><text:span text:style-name="T14">use std::ops::{Add, Sub, …};</text:span></text:span></text:p>
      <text:p text:style-name="P81"><text:span text:style-name="_2f__2f_C"><text:span text:style-name="T133">Pero y si quisieramos construir nuestros propios métodos a dichos tipos nuevos O A LOS YA STANDARD?</text:span></text:span></text:p>
      <text:p text:style-name="P81"><text:span text:style-name="_3c_C_2b__2b__3e_"><text:span text:style-name="T14">trait &lt;nuevo_trait&gt; {fn &lt;método&gt; (parametros)</text:span></text:span><text:span text:style-name="_3c_C_2b__2b__3e_"><text:span text:style-name="T134">;</text:span></text:span><text:span text:style-name="_3c_C_2b__2b__3e_"><text:span text:style-name="T14">}</text:span></text:span></text:p>
      <text:p text:style-name="P81"><text:span text:style-name="_2f__2f_C"><text:span text:style-name="T133">de tal forma que quedaría para saber si un numero i32 es par:</text:span></text:span></text:p>
      <text:p text:style-name="P81"><text:span text:style-name="_3c_C_2b__2b__3e_"><text:span text:style-name="T14">trait </text:span></text:span><text:span text:style-name="_3c_C_2b__2b__3e_"><text:span text:style-name="T134">E</text:span></text:span><text:span text:style-name="_3c_C_2b__2b__3e_"><text:span text:style-name="T14">sPar{ fn es_par(self) -&gt; bool;}</text:span></text:span></text:p>
      <text:p text:style-name="P81"><text:span text:style-name="_3c_C_3e_"><text:span text:style-name="T13">impl </text:span></text:span><text:span text:style-name="_3c_C_2b__2b__3e_"><text:span text:style-name="T14">EsPar</text:span></text:span><text:span text:style-name="_3c_C_3e_"><text:span text:style-name="T13"> for </text:span></text:span><text:span text:style-name="_3c_C_2b__2b__3e_"><text:span text:style-name="T14">i32</text:span></text:span><text:span text:style-name="_3c_C_3e_"><text:span text:style-name="T13">{</text:span></text:span></text:p>
      <text:p text:style-name="P81"><text:span text:style-name="_3c_C_3e_"><text:span text:style-name="T13"><text:tab/>fn </text:span></text:span><text:span text:style-name="_3c_C_2b__2b__3e_"><text:span text:style-name="T14">es_par</text:span></text:span><text:span text:style-name="_3c_C_3e_"><text:span text:style-name="T13">(self) -&gt; bool{</text:span></text:span></text:p>
      <text:p text:style-name="P81"><text:span text:style-name="_3c_C_3e_"><text:span text:style-name="T13"><text:tab/><text:tab/>self % 2 == 0 </text:span></text:span><text:span text:style-name="_2f__2f_C"><text:span text:style-name="T13">//devolvera true o false.</text:span></text:span></text:p>
      <text:p text:style-name="P81"><text:soft-page-break/><text:span text:style-name="_3c_C_3e_"><text:span text:style-name="T13"><text:tab/>}</text:span></text:span></text:p>
      <text:p text:style-name="P81"><text:span text:style-name="_3c_C_3e_"><text:span text:style-name="T13">}</text:span></text:span></text:p>
      <text:p text:style-name="P81"><text:span text:style-name="_2f__2f_C"><text:span text:style-name="T133">Y ahora lo podriamos implementar como:<text:line-break/></text:span></text:span><text:span text:style-name="_3c_C_3e_"><text:span text:style-name="T13">if 42i32</text:span></text:span><text:span text:style-name="_3c_C_2b__2b__3e_"><text:span text:style-name="T14">.es_par()</text:span></text:span><text:span text:style-name="_3c_C_3e_"><text:span text:style-name="T13"> {...}</text:span></text:span></text:p>
      <text:p text:style-name="P81"><text:span text:style-name="_3c_C_3e_"><text:span text:style-name="T13"/></text:span></text:p>
      <text:p text:style-name="P82"><text:span text:style-name="_2f__2f_C"><text:span text:style-name="T135">Hay que tener en cuenta que esto solo lo puede ver si está dentro del mismo módulo (archivo o no dentro de un "mod") si no habría que usar use. Por ejemplo imaginemos que implementamos </text:span></text:span><text:span text:style-name="_3c_C_3e_"><text:span text:style-name="T13">es_par()</text:span></text:span><text:span text:style-name="_2f__2f_C"><text:span text:style-name="T135"> en otro archivo paralelo al main.rs que se llama "</text:span></text:span><text:span text:style-name="_3c_C_2b__2b__3e_"><text:span text:style-name="T14">tools</text:span></text:span><text:span text:style-name="_2f__2f_C"><text:span text:style-name="T135">" pues en main tendríamos que poner:</text:span></text:span></text:p>
      <text:p text:style-name="P82"><text:span text:style-name="_3c_C_2b__2b__3e_"><text:span text:style-name="T14">mod tools;</text:span></text:span></text:p>
      <text:p text:style-name="P82"><text:span text:style-name="_3c_C_2b__2b__3e_"><text:span text:style-name="T14">use tools::EsPar;</text:span></text:span></text:p>
      <text:p text:style-name="P82"><text:span text:style-name="_2f__2f_C"><text:span text:style-name="T135">y ahí ya sí que sería visto.</text:span></text:span></text:p>
      <text:p text:style-name="P82"><text:span text:style-name="_2f__2f_C"><text:span text:style-name="T135">si hicieramos un:</text:span></text:span></text:p>
      <text:p text:style-name="P82"><text:span text:style-name="_3c_C_2b__2b__3e_"><text:span text:style-name="T14">trait....</text:span></text:span></text:p>
      <text:p text:style-name="P82"><text:span text:style-name="_3c_C_2b__2b__3e_"><text:span text:style-name="T14">impl EsPar</text:span></text:span></text:p>
      <text:p text:style-name="P82"><text:span text:style-name="_3c_C_3e_"><text:span text:style-name="T13">mod OtroCodigo{</text:span></text:span></text:p>
      <text:p text:style-name="P82"><text:span text:style-name="_3c_C_3e_"><text:span text:style-name="T13"><text:tab/></text:span></text:span><text:span text:style-name="_3c_C_2b__2b__3e_"><text:span text:style-name="T14">use super::EsPar;</text:span></text:span><text:span text:style-name="_3c_C_3e_"><text:span text:style-name="T13"> </text:span></text:span><text:span text:style-name="_2f__2f_C"><text:span text:style-name="T13">//necesario ya que estamos en otro módulo.</text:span></text:span><text:span text:style-name="_3c_C_3e_"><text:span text:style-name="T13">}</text:span></text:span></text:p>
      <text:h text:style-name="P83" text:outline-level="3"><text:span text:style-name="_3c_C_3e_"><text:span text:style-name="T131">TRAITS</text:span></text:span><text:span text:style-name="_3c_C_3e_"><text:span text:style-name="T132">. </text:span></text:span><text:span text:style-name="_3c_C_3e_"><text:span text:style-name="T136">Implementar el from e into a un tipo nuevo</text:span></text:span></text:h>
      <text:p text:style-name="P84"><text:span text:style-name="_2f__2f_C"><text:span text:style-name="T137">Para que se pueda usar el método into y from que son duales, por lo tanto al implementar el From, queda implementado el Into, no tenemos que hacer un </text:span></text:span></text:p>
      <text:p text:style-name="P84"><text:span text:style-name="_3c_C_3e_"><text:span text:style-name="T13">trait From</text:span></text:span><text:span text:style-name="_2f__2f_C"><text:span text:style-name="T137">... ya que ya está incluido en el "prelude" de Rust, es decir las herramientas básicas de Rust. Por lo tanto no tenemos que usar siquiera un:</text:span></text:span></text:p>
      <text:p text:style-name="P84"><text:span text:style-name="_3c_C_3e_"><text:span text:style-name="T13">use std::convert:From</text:span></text:span></text:p>
      <text:p text:style-name="P84"><text:span text:style-name="_2f__2f_C"><text:span text:style-name="T137">Recordemos que para convertir de un &amp;str a String habia que hacer:</text:span></text:span></text:p>
      <text:p text:style-name="P84"><text:span text:style-name="_3c_C_3e_"><text:span text:style-name="T14">let s = "hola"</text:span></text:span><text:span text:style-name="_3c_C_2b__2b__3e_"><text:span text:style-name="T14">.into()</text:span></text:span><text:span text:style-name="_3c_C_3e_"><text:span text:style-name="T14">;</text:span></text:span></text:p>
      <text:p text:style-name="P84"><text:span text:style-name="_2f__2f_C"><text:span text:style-name="T137">o </text:span></text:span></text:p>
      <text:p text:style-name="P84"><text:span text:style-name="_3c_C_3e_"><text:span text:style-name="T13">let s = String::</text:span></text:span><text:span text:style-name="_3c_C_2b__2b__3e_"><text:span text:style-name="T14">from</text:span></text:span><text:span text:style-name="_3c_C_3e_"><text:span text:style-name="T13">("hola");</text:span></text:span></text:p>
      <text:p text:style-name="P84"><text:span text:style-name="_2f__2f_C"><text:span text:style-name="T137">Ahora para implementarlo para un nuevo tipo:</text:span></text:span></text:p>
      <text:p text:style-name="P84"><text:span text:style-name="_3c_C_3e_"><text:span text:style-name="T13">pub struct WrappingU32{</text:span></text:span></text:p>
      <text:p text:style-name="P84"><text:span text:style-name="_3c_C_3e_"><text:span text:style-name="T13"><text:tab/>value: u32;</text:span></text:span></text:p>
      <text:p text:style-name="P84"><text:span text:style-name="_3c_C_3e_"><text:span text:style-name="T13">}</text:span></text:span></text:p>
      <text:p text:style-name="P84"><text:span text:style-name="_2f__2f_C"><text:span text:style-name="T137">hemos de hacer esto:</text:span></text:span></text:p>
      <text:p text:style-name="P84"><text:span text:style-name="_3c_C_2b__2b__3e_"><text:span text:style-name="T14">impl From&lt;u32&gt; for WrappingU32</text:span></text:span><text:span text:style-name="_3c_C_3e_"><text:span text:style-name="T13">{</text:span></text:span></text:p>
      <text:p text:style-name="P84"><text:span text:style-name="_3c_C_3e_"><text:span text:style-name="T13"><text:tab/>fn from(num: u32) -&gt; Self{</text:span></text:span></text:p>
      <text:p text:style-name="P84"><text:soft-page-break/><text:span text:style-name="_3c_C_3e_"><text:span text:style-name="T13"><text:tab/><text:tab/>Self{value: num}</text:span></text:span></text:p>
      <text:p text:style-name="P84"><text:span text:style-name="_3c_C_3e_"><text:span text:style-name="T13"><text:tab/>}</text:span></text:span></text:p>
      <text:p text:style-name="P84"><text:span text:style-name="_3c_C_3e_"><text:span text:style-name="T13">}</text:span></text:span></text:p>
      <text:p text:style-name="P84"><text:span text:style-name="_2f__2f_C"><text:span text:style-name="T137">y con eso ya podremos hacer cosas como:</text:span></text:span></text:p>
      <text:p text:style-name="P84"><text:span text:style-name="_3c_C_3e_"><text:span text:style-name="T13">let kk: WrappingU32 = 42</text:span></text:span><text:span text:style-name="_3c_C_2b__2b__3e_"><text:span text:style-name="T14">.into()</text:span></text:span><text:span text:style-name="_3c_C_3e_"><text:span text:style-name="T13">;</text:span></text:span></text:p>
      <text:p text:style-name="P84"><text:span text:style-name="_3c_C_3e_"><text:span text:style-name="T13">let kk = WrappingU32::</text:span></text:span><text:span text:style-name="_3c_C_2b__2b__3e_"><text:span text:style-name="T14">from(42)</text:span></text:span><text:span text:style-name="_3c_C_3e_"><text:span text:style-name="T13">;</text:span></text:span></text:p>
      <text:p text:style-name="P84"><text:span text:style-name="_3c_C_3e_"><text:span text:style-name="T13"/></text:span></text:p>
      <text:h text:style-name="P77" text:outline-level="3"><text:span text:style-name="_3c_C_3e_"><text:span text:style-name="T131">TRAITS</text:span></text:span><text:span text:style-name="_3c_C_3e_"><text:span text:style-name="T132">. </text:span></text:span><text:span text:style-name="_3c_C_3e_"><text:span text:style-name="T138">Display, debug y Error</text:span></text:span></text:h>
      <text:p text:style-name="P78"><text:span text:style-name="_2f__2f_C"><text:span text:style-name="T139">Podemos hacer que nuestras funciones devuelvan un Result(Ok, Err) de tal manera que al sacar el resultado tengamos que hacer un unwrap() o un match para dilucidad cual de los dos han sido, pero podemos hacerlo de forma más cómoda implementando nuestros traits de Display, debug y error.<text:line-break/>Debug se autogenera cuando se le mete el #[derive(Debug)], que es el que suelta los errores y los tipos para informar en el log del programa por debajo.<text:line-break/>pero si queremos informar al usuario de un error en tiempo de ejecución usamos el Display, y como este es más personalizable, entonces es necesario implementarlo a mano. Ejemplo:</text:span></text:span></text:p>
      <text:p text:style-name="P78"><text:span text:style-name="_3c_C_3e_"><text:span text:style-name="T13">use std::fmt; </text:span></text:span><text:span text:style-name="_2f__2f_C"><text:span text:style-name="T13">//para usar el Display</text:span></text:span></text:p>
      <text:p text:style-name="P78"><text:span text:style-name="_3c_C_3e_"><text:span text:style-name="T13">use std::error::Error; </text:span></text:span><text:span text:style-name="_2f__2f_C"><text:span text:style-name="T13">//para usar el Error</text:span></text:span></text:p>
      <text:p text:style-name="P78"><text:span text:style-name="_2f__2f_C"><text:span text:style-name="T13">//1.definimos nuestro tipo de error y le añadimos el Debug. El tipo podria ser un Enum</text:span></text:span></text:p>
      <text:p text:style-name="P78"><text:span text:style-name="_3c_C_2b__2b__3e_"><text:span text:style-name="T14">#[derive(Debug)]</text:span></text:span></text:p>
      <text:p text:style-name="P78"><text:span text:style-name="_3c_C_2b__2b__3e_"><text:span text:style-name="T14">struct EdadInvalidaError;</text:span></text:span></text:p>
      <text:p text:style-name="P78"><text:span text:style-name="_2f__2f_C"><text:span text:style-name="T14">//2. implementamos Display para el usuario final</text:span></text:span></text:p>
      <text:p text:style-name="P78"><text:span text:style-name="_3c_C_2b__2b__3e_"><text:span text:style-name="T14">impl fmt::Display for EdadInvalidaError {</text:span></text:span></text:p>
      <text:p text:style-name="P78"><text:span text:style-name="_3c_C_2b__2b__3e_"><text:span text:style-name="T14"><text:tab/>fn fmt(&amp;self, f: &amp;mut fmt::Formatter) - &gt; fmt::Result {</text:span></text:span></text:p>
      <text:p text:style-name="P78"><text:span text:style-name="_3c_C_2b__2b__3e_"><text:span text:style-name="T14"><text:tab/><text:tab/>write!(f, “Lo siento, debes ser mayor de 18 años para entrar.”) </text:span></text:span><text:span text:style-name="_2f__2f_C"><text:span text:style-name="T14">//ver write apuntes.</text:span></text:span></text:p>
      <text:p text:style-name="P78"><text:span text:style-name="_3c_C_2b__2b__3e_"><text:span text:style-name="T14"><text:tab/>}</text:span></text:span></text:p>
      <text:p text:style-name="P78"><text:span text:style-name="_3c_C_2b__2b__3e_"><text:span text:style-name="T14">}</text:span></text:span></text:p>
      <text:p text:style-name="P78"><text:span text:style-name="_2f__2f_C"><text:span text:style-name="T13">//3. Implementamos el trait Error ya que tenemos Debug y Display (necesarios los dos)</text:span></text:span></text:p>
      <text:p text:style-name="P78"><text:span text:style-name="_3c_C_2b__2b__3e_"><text:span text:style-name="T14">impl Error for EdadInvalidaError {}</text:span></text:span><text:span text:style-name="_3c_C_3e_"><text:span text:style-name="T13"> </text:span></text:span><text:span text:style-name="_2f__2f_C"><text:span text:style-name="T13">//por defecto </text:span></text:span><text:span text:style-name="_2f__2f_C"><text:span text:style-name="T140">y con ello ya puedo hacer el operador ?</text:span></text:span></text:p>
      <text:p text:style-name="P78"><text:span text:style-name="_3c_C_3e_"><text:span text:style-name="T13"/></text:span></text:p>
      <text:p text:style-name="P78"><text:span text:style-name="_2f__2f_C"><text:span text:style-name="T13">//Función que puede fallar</text:span></text:span><text:span text:style-name="_3c_C_3e_"><text:span text:style-name="T13"><text:line-break/>fn verifica_entrada(edad: i32) - &gt; Result&lt;&amp;’static str, </text:span></text:span><text:span text:style-name="_3c_C_2b__2b__3e_"><text:span text:style-name="T14">EdadInvalidaError</text:span></text:span><text:span text:style-name="_3c_C_3e_"><text:span text:style-name="T13">&gt; {</text:span></text:span></text:p>
      <text:p text:style-name="P78"><text:span text:style-name="_3c_C_3e_"><text:span text:style-name="T13"><text:tab/>if edad &gt;= 18 { Ok(“Bienvenido al club!”) }</text:span></text:span></text:p>
      <text:p text:style-name="P78"><text:span text:style-name="_3c_C_3e_"><text:span text:style-name="T13"><text:tab/>else { Err(EdadInvalidaError) }</text:span></text:span></text:p>
      <text:p text:style-name="P78"><text:span text:style-name="_3c_C_3e_"><text:span text:style-name="T13">}</text:span></text:span></text:p>
      <text:p text:style-name="P78"><text:span text:style-name="_3c_C_3e_"><text:span text:style-name="T13"/></text:span></text:p>
      <text:p text:style-name="P85"><text:soft-page-break/><text:span text:style-name="_2f__2f_C"><text:span text:style-name="T141">Todo esto para qué? Se verá en el main:</text:span></text:span></text:p>
      <text:p text:style-name="P85"><text:span text:style-name="_3c_C_3e_"><text:span text:style-name="T13">fn main() {</text:span></text:span></text:p>
      <text:p text:style-name="P85"><text:span text:style-name="_3c_C_3e_"><text:span text:style-name="T13"><text:tab/>let resultado = verifica_entrada(16)?;</text:span></text:span></text:p>
      <text:p text:style-name="P85"><text:span text:style-name="_3c_C_3e_"><text:span text:style-name="T13"><text:tab/></text:span></text:span><text:span text:style-name="_2f__2f_C"><text:span text:style-name="T13">//si es error, lo imprimimos. verifica_entrada devolverá un Result. Con el if let, podemos </text:span></text:span></text:p>
      <text:p text:style-name="P85"><text:span text:style-name="_2f__2f_C"><text:span text:style-name="T13"><text:tab/>//...desempaquetarlo. Recordemos se lee dcha a izda. Resultado encaja en <text:tab/>Err(error_detectado)? pues mételo en la variable “error_detectado” para luego usarlo.</text:span></text:span></text:p>
      <text:p text:style-name="P85"><text:span text:style-name="_3c_C_3e_"><text:span text:style-name="T13"><text:tab/>if let Err(error_detectado) = resultado {</text:span></text:span></text:p>
      <text:p text:style-name="P85"><text:span text:style-name="_3c_C_3e_"><text:span text:style-name="T13"><text:tab/><text:tab/></text:span></text:span><text:span text:style-name="_2f__2f_C"><text:span text:style-name="T13">//uso de Display: Msg bonito para el cliente</text:span></text:span></text:p>
      <text:p text:style-name="P85"><text:span text:style-name="_3c_C_3e_"><text:span text:style-name="T13"><text:tab/><text:tab/>println!(“Error: {}”, error_detectado); //imprimirá Error: Lo siento debes ser mayor …</text:span></text:span></text:p>
      <text:p text:style-name="P85"><text:span text:style-name="_3c_C_3e_"><text:span text:style-name="T13"><text:tab/><text:tab/></text:span></text:span><text:span text:style-name="_2f__2f_C"><text:span text:style-name="T13">//uso de Debug: imprime informacion para el programador</text:span></text:span></text:p>
      <text:p text:style-name="P85"><text:span text:style-name="_3c_C_3e_"><text:span text:style-name="T13"><text:tab/><text:tab/>println!(“Log: {:?}”, error_detectado);</text:span></text:span></text:p>
      <text:p text:style-name="P85"><text:span text:style-name="_3c_C_3e_"><text:span text:style-name="T13"><text:tab/>}</text:span></text:span></text:p>
      <text:p text:style-name="P85"><text:span text:style-name="_3c_C_3e_"><text:span text:style-name="T13">}</text:span></text:span></text:p>
      <text:p text:style-name="P86"><text:span text:style-name="_2f__2f_C"><text:span text:style-name="T142">Parece que tengo que seguir desempaquetando el tipo de error ya que hago el if let. Pero por qué es necesario en proyectos profesionales de Rust? por que el operador </text:span></text:span><text:span text:style-name="_3c_C_2b__2b__3e_"><text:span text:style-name="T14">?</text:span></text:span><text:span text:style-name="_2f__2f_C"><text:span text:style-name="T142"> no se puede usar sin el trait de error.. y para ello es necesario el de Display.</text:span></text:span></text:p>
      <text:p text:style-name="P86"><text:span text:style-name="_2f__2f_C"><text:span text:style-name="T142">Entonces como se podria usar el </text:span></text:span><text:span text:style-name="_3c_C_2b__2b__3e_"><text:span text:style-name="T14">?</text:span></text:span><text:span text:style-name="_2f__2f_C"><text:span text:style-name="T142"> sin el if let para desempaquetar?</text:span></text:span></text:p>
      <text:p text:style-name="P87"><text:span text:style-name="_3c_C_3e_"><text:span text:style-name="T13">fn main() </text:span></text:span><text:span text:style-name="_3c_C_2b__2b__3e_"><text:span text:style-name="T14">- &gt; Result&lt;(), EdadInvalidaError&gt;</text:span></text:span><text:span text:style-name="_3c_C_3e_"><text:span text:style-name="T13"> {</text:span></text:span></text:p>
      <text:p text:style-name="P87"><text:span text:style-name="_3c_C_3e_"><text:span text:style-name="T13"><text:tab/>let resultado = verifica_entrada(16)</text:span></text:span><text:span text:style-name="_3c_C_2b__2b__3e_"><text:span text:style-name="T14">?</text:span></text:span><text:span text:style-name="_3c_C_3e_"><text:span text:style-name="T13">; </text:span></text:span><text:span text:style-name="_2f__2f_C"><text:span text:style-name="T13">//</text:span></text:span><text:span text:style-name="_2f__2f_C"><text:span text:style-name="T143">cuando se usa el ? siempre tiene que devolver <text:tab/>un return la función donde se incluye (la main en este caso). Si no, no compila.</text:span></text:span></text:p>
      <text:p text:style-name="P88"><text:span text:style-name="_2f__2f_C"><text:span text:style-name="T144">el ? solo se puede usar si está implementado el Trait Error y Error solo si está Display y Debug.</text:span></text:span></text:p>
      <text:p text:style-name="P87"><text:span text:style-name="_3c_C_3e_"><text:span text:style-name="T13"><text:tab/>…. </text:span></text:span><text:span text:style-name="_2f__2f_C"><text:span text:style-name="T13">//nunca llegará si la edad es menor de 18</text:span></text:span></text:p>
      <text:p text:style-name="P87"><text:span text:style-name="_3c_C_3e_"><text:span text:style-name="T13"><text:tab/></text:span></text:span><text:span text:style-name="_3c_C_2b__2b__3e_"><text:span text:style-name="T14">Ok(())</text:span></text:span><text:span text:style-name="_3c_C_3e_"><text:span text:style-name="T13"> </text:span></text:span><text:span text:style-name="_2f__2f_C"><text:span text:style-name="T13">//si todo va bien devolverá el Ok.</text:span></text:span></text:p>
      <text:p text:style-name="P87"><text:span text:style-name="_3c_C_3e_"><text:span text:style-name="T13">}</text:span></text:span></text:p>
      <text:p text:style-name="P88"><text:span text:style-name="_2f__2f_C"><text:span text:style-name="T142">P</text:span></text:span><text:span text:style-name="_2f__2f_C"><text:span text:style-name="T145">ero aquí no imprimiría el mensaje de: </text:span></text:span><text:span text:style-name="_3c_C_2b__2b__3e_"><text:span text:style-name="T14">Lo siento, debes ser mayor de 18 años para entrar. </text:span></text:span><text:span text:style-name="_2f__2f_C"><text:span text:style-name="T142">P</text:span></text:span><text:span text:style-name="_2f__2f_C"><text:span text:style-name="T145">ara que lo hiciera tendría que devolver el main otra cosa. </text:span></text:span><text:span text:style-name="_2f__2f_C"><text:span text:style-name="T146">Usamos la librería anyhow. <text:line-break/>Para ello en [dependencies] del Cargo.toml ponemos</text:span></text:span></text:p>
      <text:p text:style-name="P89"><text:span text:style-name="_2f__2f_C"><text:span text:style-name="T146">[dependencies]</text:span></text:span></text:p>
      <text:p text:style-name="P89"><text:span text:style-name="_2f__2f_C"><text:span text:style-name="T146">anyhow = “1.0”</text:span></text:span></text:p>
      <text:p text:style-name="P89"><text:span text:style-name="_2f__2f_C"><text:span text:style-name="T146">y cambiamos el código a:</text:span></text:span></text:p>
      <text:p text:style-name="P88"><text:span text:style-name="_2f__2f_C"><text:span text:style-name="T13"/></text:span></text:p>
      <text:p text:style-name="P88"><text:span text:style-name="_3c_C_3e_"><text:span text:style-name="T13">fn main() - &gt; </text:span></text:span><text:span text:style-name="_3c_C_2b__2b__3e_"><text:span text:style-name="T14">anyhow::Result&lt;()&gt;</text:span></text:span><text:span text:style-name="_3c_C_3e_"><text:span text:style-name="T13"> {</text:span></text:span></text:p>
      <text:p text:style-name="P88"><text:span text:style-name="_3c_C_3e_"><text:span text:style-name="T13"><text:tab/>let resultado = verifica_entrada(16)?; </text:span></text:span><text:span text:style-name="_2f__2f_C"><text:span text:style-name="T13">//se sale </text:span></text:span><text:span text:style-name="_2f__2f_C"><text:span text:style-name="T140">e imprime Error: Lo siento, debes...</text:span></text:span></text:p>
      <text:p text:style-name="P88"><text:span text:style-name="_3c_C_3e_"><text:span text:style-name="T13"><text:tab/>println!(“{}”, resultado);</text:span></text:span></text:p>
      <text:p text:style-name="P88"><text:span text:style-name="_3c_C_3e_"><text:span text:style-name="T13"><text:tab/>Ok(())</text:span></text:span></text:p>
      <text:p text:style-name="P88"><text:span text:style-name="_3c_C_3e_"><text:span text:style-name="T13">}</text:span></text:span></text:p>
      <text:p text:style-name="P88"><text:soft-page-break/><text:span text:style-name="_3c_C_2b__2b__3e_"><text:span text:style-name="T147"/></text:span></text:p>
      <text:p text:style-name="P86"><text:span text:style-name="_2f__2f_C"><text:span text:style-name="T142"/></text:span></text:p>
      <text:h text:style-name="P90" text:outline-level="3"><text:span text:style-name="_3c_C_3e_"><text:span text:style-name="T148">BUCLES</text:span></text:span></text:h>
      <text:p text:style-name="P91"><text:span text:style-name="_3c_C_3e_"><text:span text:style-name="T149"/></text:span></text:p>
      <text:h text:style-name="P76" text:outline-level="3"><text:span text:style-name="_3c_C_3e_"><text:span text:style-name="T123">WHILE</text:span></text:span></text:h>
      <text:p text:style-name="P92"><text:span text:style-name="_2f__2f_C"><text:span text:style-name="T150">El bucle while es:</text:span></text:span></text:p>
      <text:p text:style-name="P92"><text:span text:style-name="_3c_C_3e_"><text:span text:style-name="T13">let mut i: u32 = 1;<text:line-break/></text:span></text:span><text:span text:style-name="_3c_C_2b__2b__3e_"><text:span text:style-name="T14">while i &lt; 10 &amp;&amp; i &gt; 0</text:span></text:span><text:span text:style-name="_3c_C_3e_"><text:span text:style-name="T13">{</text:span></text:span></text:p>
      <text:p text:style-name="P92"><text:span text:style-name="_3c_C_3e_"><text:span text:style-name="T13"><text:tab/>....</text:span></text:span></text:p>
      <text:p text:style-name="P92"><text:span text:style-name="_3c_C_3e_"><text:span text:style-name="T13"><text:tab/>i += 1;</text:span></text:span></text:p>
      <text:p text:style-name="P92"><text:span text:style-name="_3c_C_3e_"><text:span text:style-name="T13">}</text:span></text:span></text:p>
      <text:p text:style-name="P93"><text:span text:style-name="_2f__2f_C"><text:span text:style-name="T151">La condici</text:span></text:span><text:span text:style-name="_2f__2f_C"><text:span text:style-name="T152">ón</text:span></text:span><text:span text:style-name="_2f__2f_C"><text:span text:style-name="T151"> nunca va entre par</text:span></text:span><text:span text:style-name="_2f__2f_C"><text:span text:style-name="T152">é</text:span></text:span><text:span text:style-name="_2f__2f_C"><text:span text:style-name="T151">ntesis para evitar la confusi</text:span></text:span><text:span text:style-name="_2f__2f_C"><text:span text:style-name="T152">ón</text:span></text:span><text:span text:style-name="_2f__2f_C"><text:span text:style-name="T151"> de C ya que en rust la condici</text:span></text:span><text:span text:style-name="_2f__2f_C"><text:span text:style-name="T152">ón</text:span></text:span><text:span text:style-name="_2f__2f_C"><text:span text:style-name="T151"> es una expresi</text:span></text:span><text:span text:style-name="_2f__2f_C"><text:span text:style-name="T152">ón</text:span></text:span><text:span text:style-name="_2f__2f_C"><text:span text:style-name="T151"> booleana. Esto es un error:</text:span></text:span></text:p>
      <text:p text:style-name="P93"><text:span text:style-name="_3c_C_3e_"><text:span text:style-name="T13">while 5</text:span></text:span><text:span text:style-name="_2f__2f_C"><text:span text:style-name="T151"> o </text:span></text:span><text:span text:style-name="_3c_C_3e_"><text:span text:style-name="T13">while (5)</text:span></text:span></text:p>
      <text:h text:style-name="P76" text:outline-level="3"><text:span text:style-name="_3c_C_3e_"><text:span text:style-name="T153"/></text:span></text:h>
      <text:h text:style-name="P76" text:outline-level="3"><text:span text:style-name="_3c_C_3e_"><text:span text:style-name="T153"/></text:span></text:h>
      <text:h text:style-name="P76" text:outline-level="3"><text:span text:style-name="_3c_C_3e_"><text:span text:style-name="T123">LOOP</text:span></text:span></text:h>
      <text:p text:style-name="P92"><text:span text:style-name="_2f__2f_C"><text:span text:style-name="T150">loop es infinito a no ser que se saque</text:span></text:span></text:p>
      <text:p text:style-name="P92"><text:span text:style-name="_3c_C_2b__2b__3e_"><text:span text:style-name="T14">loop</text:span></text:span><text:span text:style-name="_3c_C_3e_"><text:span text:style-name="T13"> {</text:span></text:span></text:p>
      <text:p text:style-name="P92"><text:span text:style-name="_3c_C_3e_"><text:span text:style-name="T13"><text:tab/>codigo();</text:span></text:span></text:p>
      <text:p text:style-name="P92"><text:span text:style-name="_3c_C_3e_"><text:span text:style-name="T13"><text:tab/>if !condicion {</text:span></text:span></text:p>
      <text:p text:style-name="P92"><text:span text:style-name="_3c_C_3e_"><text:span text:style-name="T13"><text:tab/><text:tab/>break; </text:span></text:span><text:span text:style-name="_2f__2f_C"><text:span text:style-name="T13">// asi sale</text:span></text:span></text:p>
      <text:p text:style-name="P92"><text:span text:style-name="_3c_C_3e_"><text:span text:style-name="T13"><text:tab/>}</text:span></text:span></text:p>
      <text:p text:style-name="P92"><text:span text:style-name="_3c_C_3e_"><text:span text:style-name="T13">}</text:span></text:span></text:p>
      <text:p text:style-name="P92"><text:span text:style-name="_3c_C_3e_"><text:span text:style-name="T13"/></text:span></text:p>
      <text:h text:style-name="P94" text:outline-level="3"><text:span text:style-name="_3c_C_3e_"><text:span text:style-name="T154">FOR</text:span></text:span></text:h>
      <text:p text:style-name="P93"><text:span text:style-name="_2f__2f_C"><text:span text:style-name="T151">El for en Rust es bajo iteradores</text:span></text:span></text:p>
      <text:p text:style-name="P93"><text:span text:style-name="_3c_C_2b__2b__3e_"><text:span text:style-name="T14">for elemento in iterable {...}</text:span></text:span></text:p>
      <text:p text:style-name="P93"><text:span text:style-name="_2f__2f_C"><text:span text:style-name="T151">Por ejemplo:</text:span></text:span></text:p>
      <text:p text:style-name="P93"><text:span text:style-name="_3c_C_2b__2b__3e_"><text:span text:style-name="T14">for i in 0..10{</text:span></text:span><text:span text:style-name="_3c_C_3e_"><text:span text:style-name="T13"> ... }</text:span></text:span><text:span text:style-name="_3c_C_2b__2b__3e_"><text:span text:style-name="T14"> </text:span></text:span><text:span text:style-name="_2f__2f_C"><text:span text:style-name="T14">//i va de 0 a 9</text:span></text:span></text:p>
      <text:p text:style-name="P95"><text:span text:style-name="_3c_C_2b__2b__3e_"><text:span text:style-name="T14">for i in 0..</text:span></text:span><text:span text:style-name="_3c_C_2b__2b__3e_"><text:span text:style-name="T155">=</text:span></text:span><text:span text:style-name="_3c_C_2b__2b__3e_"><text:span text:style-name="T14">10{</text:span></text:span><text:span text:style-name="_3c_C_3e_"><text:span text:style-name="T13"> ... }</text:span></text:span><text:span text:style-name="_3c_C_2b__2b__3e_"><text:span text:style-name="T14"> </text:span></text:span><text:span text:style-name="_2f__2f_C"><text:span text:style-name="T14">//i va de 0 a </text:span></text:span><text:span text:style-name="_2f__2f_C"><text:span text:style-name="T155">10</text:span></text:span></text:p>
      <text:p text:style-name="P93"><text:span text:style-name="_2f__2f_C"><text:span text:style-name="T151">o con matrices:</text:span></text:span></text:p>
      <text:p text:style-name="P93"><text:soft-page-break/><text:span text:style-name="_3c_C_3e_"><text:span text:style-name="T13">let v = [1, 2, 3];</text:span></text:span></text:p>
      <text:p text:style-name="P93"><text:span text:style-name="_3c_C_2b__2b__3e_"><text:span text:style-name="T14">for i in v</text:span></text:span><text:span text:style-name="_3c_C_3e_"><text:span text:style-name="T13">{ ... }</text:span></text:span></text:p>
      <text:p text:style-name="P96"><text:span text:style-name="_2f__2f_C"><text:span text:style-name="T156">Si queremos ir en inversa debemos aplicar el método .rev()</text:span></text:span><text:span text:style-name="_2f__2f_C"><text:span text:style-name="T151">:</text:span></text:span></text:p>
      <text:p text:style-name="P96"><text:span text:style-name="_3c_C_2b__2b__3e_"><text:span text:style-name="T14">for i in </text:span></text:span><text:span text:style-name="_3c_C_2b__2b__3e_"><text:span text:style-name="T157">(</text:span></text:span><text:span text:style-name="_3c_C_2b__2b__3e_"><text:span text:style-name="T14">0..10</text:span></text:span><text:span text:style-name="_3c_C_2b__2b__3e_"><text:span text:style-name="T157">).rev()</text:span></text:span><text:span text:style-name="_3c_C_2b__2b__3e_"><text:span text:style-name="T14">{</text:span></text:span><text:span text:style-name="_3c_C_3e_"><text:span text:style-name="T13"> ... }</text:span></text:span><text:span text:style-name="_3c_C_2b__2b__3e_"><text:span text:style-name="T14"> </text:span></text:span><text:span text:style-name="_2f__2f_C"><text:span text:style-name="T13">//i va de </text:span></text:span><text:span text:style-name="_2f__2f_C"><text:span text:style-name="T158">9 a 0. </text:span></text:span><text:span text:style-name="_2f__2f_C"><text:span text:style-name="T159">Tiene que ponerse los paréntesis para que se forme el grupo primero.</text:span></text:span></text:p>
      <text:p text:style-name="P93"><text:span text:style-name="_3c_C_3e_"><text:span text:style-name="T13"/></text:span></text:p>
      <text:h text:style-name="P97" text:outline-level="3"><text:span text:style-name="_3c_C_3e_"><text:span text:style-name="T160">COLLECTIONS (contenedores)</text:span></text:span></text:h>
      <text:p text:style-name="P98"><text:span text:style-name="_2f__2f_C"><text:span text:style-name="T161">Como en C++ tenemos contenedores:</text:span></text:span></text:p>
      <text:p text:style-name="P98"><text:span text:style-name="_2f__2f_C"><text:span text:style-name="T161"/></text:span></text:p>
      <text:p text:style-name="P99"><text:span text:style-name="_2f__2f_C"><text:span text:style-name="T162">1. VECTOR DINAMICO:</text:span></text:span></text:p>
      <text:p text:style-name="P99"><text:span text:style-name="_3c_C_3e_"><text:span text:style-name="T13">let mut v = </text:span></text:span><text:span text:style-name="_3c_C_2b__2b__3e_"><text:span text:style-name="T14">Vec::new();</text:span></text:span></text:p>
      <text:p text:style-name="P99"><text:span text:style-name="_3c_C_3e_"><text:span text:style-name="T13">v.push(1);</text:span></text:span><text:span text:style-name="_3c_C_3e_"><text:span text:style-name="T163"> </text:span></text:span><text:span text:style-name="_2f__2f_C"><text:span text:style-name="T163">//mete el 1</text:span></text:span></text:p>
      <text:p text:style-name="P99"><text:span text:style-name="_3c_C_3e_"><text:span text:style-name="T13">v.push(2);</text:span></text:span><text:span text:style-name="_3c_C_3e_"><text:span text:style-name="T163"> </text:span></text:span><text:span text:style-name="_2f__2f_C"><text:span text:style-name="T163">//mete el 2 detrás del 1.</text:span></text:span></text:p>
      <text:p text:style-name="P100"><text:span text:style-name="_3c_C_3e_"><text:span text:style-name="T13">v.pop(); </text:span></text:span><text:span text:style-name="_2f__2f_C"><text:span text:style-name="T13">// quita el 2 (el ultimo)</text:span></text:span><text:span text:style-name="_2f__2f_C"><text:span text:style-name="T163"> Devuelve un Option&lt;T&gt;</text:span></text:span></text:p>
      <text:p text:style-name="P100"><text:span text:style-name="_2f__2f_C"><text:span text:style-name="T164">Para acceder a los datos se puede usar:</text:span></text:span></text:p>
      <text:p text:style-name="P100"><text:span text:style-name="_3c_C_3e_"><text:span text:style-name="T13">v[i]; </text:span></text:span><text:span text:style-name="_2f__2f_C"><text:span text:style-name="T13">//puede ser panic</text:span></text:span></text:p>
      <text:p text:style-name="P100"><text:span text:style-name="_3c_C_3e_"><text:span text:style-name="T13">v.get(i);</text:span></text:span><text:span text:style-name="_2f__2f_C"><text:span text:style-name="T13"> //seguro.</text:span></text:span></text:p>
      <text:p text:style-name="P100"><text:span text:style-name="_2f__2f_C"><text:span text:style-name="T164">El tamaño es con:</text:span></text:span></text:p>
      <text:p text:style-name="P100"><text:span text:style-name="_3c_C_3e_"><text:span text:style-name="T13">v.len();</text:span></text:span></text:p>
      <text:p text:style-name="P101"><text:span text:style-name="_2f__2f_C"><text:span text:style-name="T165">Se puede usar iteradores:</text:span></text:span></text:p>
      <text:p text:style-name="P101"><text:span text:style-name="_3c_C_3e_"><text:span text:style-name="T13">let mut it = v</text:span></text:span><text:span text:style-name="_3c_C_2b__2b__3e_"><text:span text:style-name="T14">.iter();</text:span></text:span></text:p>
      <text:p text:style-name="P101"><text:span text:style-name="_3c_C_2b__2b__3e_"><text:span text:style-name="T14">it.next();</text:span></text:span><text:span text:style-name="_3c_C_3e_"><text:span text:style-name="T13"> //es el siguiente.</text:span></text:span></text:p>
      <text:p text:style-name="P101"><text:span text:style-name="_3c_C_2b__2b__3e_"><text:span text:style-name="T14">it.next_back()</text:span></text:span><text:span text:style-name="_3c_C_3e_"><text:span text:style-name="T13">; es el anterior.</text:span></text:span></text:p>
      <text:p text:style-name="P101"><text:span text:style-name="_2f__2f_C"><text:span text:style-name="T165">Los dos devuelven Option&lt;&amp;T&gt;</text:span></text:span><text:span text:style-name="_2f__2f_C"><text:span text:style-name="T166"> por lo tanto para usarlos:</text:span></text:span></text:p>
      <text:p text:style-name="P102"><text:span text:style-name="_3c_C_3e_"><text:span text:style-name="T13">if let Some(x) = it.next(){...}</text:span></text:span></text:p>
      <text:p text:style-name="P101"><text:span text:style-name="_2f__2f_C"><text:span text:style-name="T165"/></text:span></text:p>
      <text:p text:style-name="P99"><text:span text:style-name="_3c_C_3e_"><text:span text:style-name="T13"/></text:span></text:p>
      <text:p text:style-name="P99"><text:span text:style-name="_3c_C_3e_"><text:span text:style-name="T13"/></text:span></text:p>
      <text:p text:style-name="P99"><text:span text:style-name="_2f__2f_C"><text:span text:style-name="T167">2. ARRAYS</text:span></text:span></text:p>
      <text:p text:style-name="P99"><text:span text:style-name="_2f__2f_C"><text:span text:style-name="T167"/></text:span></text:p>
      <text:p text:style-name="P99"><text:span text:style-name="_2f__2f_C"><text:span text:style-name="T167">3. STRING</text:span></text:span></text:p>
      <text:p text:style-name="P99"><text:span text:style-name="_2f__2f_C"><text:span text:style-name="T167"/></text:span></text:p>
      <text:p text:style-name="P99"><text:span text:style-name="_2f__2f_C"><text:span text:style-name="T167">4. HASHMAP</text:span></text:span></text:p>
      <text:p text:style-name="P99"><text:soft-page-break/><text:span text:style-name="_2f__2f_C"><text:span text:style-name="T167"/></text:span></text:p>
      <text:p text:style-name="P99"><text:span text:style-name="_2f__2f_C"><text:span text:style-name="T167">5. VECDEQUE</text:span></text:span></text:p>
      <text:p text:style-name="P99"><text:span text:style-name="_2f__2f_C"><text:span text:style-name="T167"/></text:span></text:p>
      <text:p text:style-name="P99"><text:span text:style-name="_2f__2f_C"><text:span text:style-name="T167">6. HASHSET</text:span></text:span></text:p>
      <text:p text:style-name="P99"><text:span text:style-name="_2f__2f_C"><text:span text:style-name="T167"/></text:span></text:p>
      <text:p text:style-name="P99"><text:span text:style-name="_2f__2f_C"><text:span text:style-name="T167">7. BTREEMAP</text:span></text:span></text:p>
      <text:p text:style-name="P99"><text:span text:style-name="_2f__2f_C"><text:span text:style-name="T167"/></text:span></text:p>
      <text:h text:style-name="P103" text:outline-level="3"><text:span text:style-name="_3c_C_3e_"><text:span text:style-name="T168">RESERVA DE MEMORIA EN EL HEAP</text:span></text:span></text:h>
      <text:p text:style-name="P104"><text:span text:style-name="_2f__2f_C"><text:span text:style-name="T169">No se puede. Rust lo prohibe. De hecho esa es la protección de Rust frente a las fugas de memoria, punteros colgantes etc. Cuando nosotros hacemos una estructura como:</text:span></text:span></text:p>
      <text:p text:style-name="P104"><text:span text:style-name="_3c_C_3e_"><text:span text:style-name="T13">pub struct Estructura{</text:span></text:span></text:p>
      <text:p text:style-name="P104"><text:span text:style-name="_3c_C_3e_"><text:span text:style-name="T13"><text:tab/>dato1: u32,</text:span></text:span></text:p>
      <text:p text:style-name="P104"><text:span text:style-name="_3c_C_3e_"><text:span text:style-name="T13"><text:tab/>dato2: String,</text:span></text:span></text:p>
      <text:p text:style-name="P104"><text:span text:style-name="_3c_C_3e_"><text:span text:style-name="T13">}</text:span></text:span></text:p>
      <text:p text:style-name="P104"><text:span text:style-name="_3c_C_3e_"><text:span text:style-name="T13"/></text:span></text:p>
      <text:p text:style-name="P104"><text:span text:style-name="_3c_C_3e_"><text:span text:style-name="T13">fn main ()</text:span></text:span><text:span text:style-name="_3c_C_2b__2b__3e_"><text:span text:style-name="T14">{</text:span></text:span></text:p>
      <text:p text:style-name="P104"><text:span text:style-name="_3c_C_3e_"><text:span text:style-name="T13"><text:tab/></text:span></text:span><text:span text:style-name="_2f__2f_C"><text:span text:style-name="T13">//Rust no deja hacer esto:</text:span></text:span></text:p>
      <text:p text:style-name="P104"><text:span text:style-name="_2f__2f_C"><text:span text:style-name="T13"><text:tab/>//let mi_estructura: Estructura; por que contendría valores basura. Algo prohibido en Rust.</text:span></text:span></text:p>
      <text:p text:style-name="P104"><text:span text:style-name="_2f__2f_C"><text:span text:style-name="T13"><text:tab/>//Sino que hay que inicializarla de esta manera:</text:span></text:span></text:p>
      <text:p text:style-name="P104"><text:span text:style-name="_3c_C_3e_"><text:span text:style-name="T13"><text:tab/></text:span></text:span><text:span text:style-name="_3c_C_2b__2b__3e_"><text:span text:style-name="T14">let mi_estructura = Estructura{</text:span></text:span></text:p>
      <text:p text:style-name="P104"><text:span text:style-name="_3c_C_2b__2b__3e_"><text:span text:style-name="T14"><text:tab/><text:tab/>dato1: 32, </text:span></text:span><text:span text:style-name="_2f__2f_C"><text:span text:style-name="T14">//se asigna 4 bytes en el STACK ya que sabe cuanto son y es más rapido.</text:span></text:span></text:p>
      <text:p text:style-name="P104"><text:span text:style-name="_3c_C_2b__2b__3e_"><text:span text:style-name="T14"><text:tab/><text:tab/>dato2: “hola”.into(),</text:span></text:span><text:span text:style-name="_3c_C_3e_"><text:span text:style-name="T13"> </text:span></text:span><text:span text:style-name="_2f__2f_C"><text:span text:style-name="T13">//se reserva 4 bytes en el HEAP y 24 bytes en el STACK con los metadatos <text:tab/><text:tab/><text:tab/>(que incluyen la direccion de memoria, el numero de bytes ocupados y el num de bytes de capacidad.</text:span></text:span></text:p>
      <text:p text:style-name="P104"><text:span text:style-name="_3c_C_3e_"><text:span text:style-name="T13"><text:tab/>}</text:span></text:span></text:p>
      <text:p text:style-name="P104"><text:span text:style-name="_3c_C_2b__2b__3e_"><text:span text:style-name="T14">}</text:span></text:span><text:span text:style-name="_3c_C_3e_"><text:span text:style-name="T13"> </text:span></text:span><text:span text:style-name="_2f__2f_C"><text:span text:style-name="T13">//al salir del main se hace el free automaticamente de la memoria reservada en el HEA</text:span></text:span><text:span text:style-name="_2f__2f_C"><text:span text:style-name="T170">P y el STACK</text:span></text:span></text:p>
      <text:p text:style-name="P104"><text:span text:style-name="_2f__2f_C"><text:span text:style-name="T169"/></text:span></text:p>
      <text:p text:style-name="P104"><text:span text:style-name="_2f__2f_C"><text:span text:style-name="T169">Para elementos que no sabemos cuanto van a ser de grandes, como String o Vector, se hace esto:</text:span></text:span></text:p>
      <text:p text:style-name="P104"><text:span text:style-name="_3c_C_3e_"><text:span text:style-name="T13">let mut s = </text:span></text:span><text:span text:style-name="_3c_C_2b__2b__3e_"><text:span text:style-name="T14">String::with_capacity(5);</text:span></text:span><text:span text:style-name="_2f__2f_C"><text:span text:style-name="T14">//</text:span></text:span><text:span text:style-name="_2f__2f_C"><text:span text:style-name="T17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105"><text:span text:style-name="_2f__2f_C"><text:span text:style-name="T169">Pa</text:span></text:span><text:span text:style-name="_2f__2f_C"><text:span text:style-name="T171">ra los vectores, por ejemplo capacidad para 5 numeros enteros:</text:span></text:span></text:p>
      <text:p text:style-name="P105"><text:span text:style-name="_3c_C_2b__2b__3e_"><text:span text:style-name="T14">let mut v = Vec&lt;i32&gt; = Vec::with_capacity(5);</text:span></text:span><text:span text:style-name="_3c_C_3e_"><text:span text:style-name="T13"> /</text:span></text:span><text:span text:style-name="_2f__2f_C"><text:span text:style-name="T13">/STACK (8bytes memoria, 8bytes 0longitud, 8bytes 5 capacidad.</text:span></text:span></text:p>
      <text:p text:style-name="P105"><text:span text:style-name="_3c_C_3e_"><text:span text:style-name="T13">v.push(12); </text:span></text:span><text:span text:style-name="_2f__2f_C"><text:span text:style-name="T13">//la longitud pasa a ser 1 y la capacidad sigue siendo 5.</text:span></text:span></text:p>
      <text:p text:style-name="P105"><text:span text:style-name="_2f__2f_C"><text:span text:style-name="T13"/></text:span></text:p>
      <text:p text:style-name="P105"><text:soft-page-break/><text:span text:style-name="_2f__2f_C"><text:span text:style-name="T171">En ambos como en el caso de la estructura, al salir de su scope {}, se hace el free automatico.. pero se podría forzar un free con esta instrucción antes de terminar las llaves:</text:span></text:span></text:p>
      <text:p text:style-name="P105"><text:span text:style-name="_3c_C_2b__2b__3e_"><text:span text:style-name="T172">drop(v);</text:span></text:span></text:p>
      <text:p text:style-name="P105"><text:span text:style-name="_3c_C_2b__2b__3e_"><text:span text:style-name="T14">drop(</text:span></text:span><text:span text:style-name="_3c_C_2b__2b__3e_"><text:span text:style-name="T172">s</text:span></text:span><text:span text:style-name="_3c_C_2b__2b__3e_"><text:span text:style-name="T14">);</text:span></text:span></text:p>
      <text:p text:style-name="P105"><text:span text:style-name="_3c_C_2b__2b__3e_"><text:span text:style-name="T14"/></text:span></text:p>
      <text:h text:style-name="P106" text:outline-level="3"><text:span text:style-name="_3c_C_3e_"><text:span text:style-name="T173">TIEMPO DE VIDA. LIFETIME. OWNERSHIP!!!</text:span></text:span></text:h>
      <text:p text:style-name="P107"><text:span text:style-name="_2f__2f_C"><text:span text:style-name="T174">Rust para preservar la memoria, tiene un método que es el </text:span></text:span><text:span text:style-name="_3c_C_2b__2b__3e_"><text:span text:style-name="T14">ownership</text:span></text:span><text:span text:style-name="_2f__2f_C"><text:span text:style-name="T174">. Si por ejemplo hacemos esto:</text:span></text:span></text:p>
      <text:p text:style-name="P107"><text:span text:style-name="_3c_C_3e_"><text:span text:style-name="T175">let num = 32;</text:span></text:span></text:p>
      <text:p text:style-name="P107"><text:span text:style-name="_3c_C_3e_"><text:span text:style-name="T175">ft_funcion(num);</text:span></text:span></text:p>
      <text:p text:style-name="P107"><text:span text:style-name="_3c_C_3e_"><text:span text:style-name="T175">println!("{}", num); </text:span></text:span></text:p>
      <text:p text:style-name="P107"><text:span text:style-name="_2f__2f_C"><text:span text:style-name="T174">No hay problema por que los tipos básicos, tienen implementando </text:span></text:span><text:span text:style-name="_3c_C_2b__2b__3e_"><text:span text:style-name="T14">Trait</text:span></text:span><text:span text:style-name="_2f__2f_C"><text:span text:style-name="T176"> </text:span></text:span><text:span text:style-name="_2f__2f_C"><text:span text:style-name="T174">el </text:span></text:span><text:span text:style-name="_3c_C_2b__2b__3e_"><text:span text:style-name="T14">Copy</text:span></text:span><text:span text:style-name="_2f__2f_C"><text:span text:style-name="T174"> o </text:span></text:span><text:span text:style-name="_3c_C_2b__2b__3e_"><text:span text:style-name="T14">Clone</text:span></text:span><text:span text:style-name="_2f__2f_C"><text:span text:style-name="T174"> de los mismos y por lo tanto el compilador no dará problema.</text:span></text:span></text:p>
      <text:p text:style-name="P107"><text:span text:style-name="_2f__2f_C"><text:span text:style-name="T174">Pero si tenemos un:</text:span></text:span></text:p>
      <text:p text:style-name="P107"><text:span text:style-name="_3c_C_3e_"><text:span text:style-name="T175">struct MiStruct{ dato: i32</text:span></text:span><text:span text:style-name="_3c_C_3e_"><text:span text:style-name="T177"> </text:span></text:span><text:span text:style-name="_3c_C_3e_"><text:span text:style-name="T175">};</text:span></text:span></text:p>
      <text:p text:style-name="P107"><text:span text:style-name="_3c_C_3e_"><text:span text:style-name="T175">let kk = MiStruct {dato: 42</text:span></text:span><text:span text:style-name="_3c_C_3e_"><text:span text:style-name="T177"> </text:span></text:span><text:span text:style-name="_3c_C_3e_"><text:span text:style-name="T175">};</text:span></text:span></text:p>
      <text:p text:style-name="P107"><text:span text:style-name="_3c_C_2b__2b__3e_"><text:span text:style-name="T14">ft_funcion(kk); </text:span></text:span><text:span text:style-name="_2f__2f_C"><text:span text:style-name="T175">//hemos perdido el ownership aqui. Ya no es dueña kk de los datos. Se han transferido a la función</text:span></text:span></text:p>
      <text:p text:style-name="P107"><text:span text:style-name="_3c_C_3e_"><text:span text:style-name="T175">println!("{}", kk.dato); </text:span></text:span><text:span text:style-name="_2f__2f_C"><text:span text:style-name="T175">//da error aqui por que no tiene el ownership ya.</text:span></text:span></text:p>
      <text:p text:style-name="P107"><text:span text:style-name="_2f__2f_C"><text:span text:style-name="T174"/></text:span></text:p>
      <text:p text:style-name="P107"><text:span text:style-name="_2f__2f_C"><text:span text:style-name="T174">Esto se puede arreglar con una sola linea y es implementando el </text:span></text:span><text:span text:style-name="_3c_C_2b__2b__3e_"><text:span text:style-name="T14">Trait</text:span></text:span><text:span text:style-name="_2f__2f_C"><text:span text:style-name="T174"> de </text:span></text:span><text:span text:style-name="_3c_C_2b__2b__3e_"><text:span text:style-name="T14">Copy Clone</text:span></text:span><text:span text:style-name="_2f__2f_C"><text:span text:style-name="T174"> para la estructura.. y se tiene que hacer arriba de ella:</text:span></text:span></text:p>
      <text:p text:style-name="P107"><text:span text:style-name="_3c_C_2b__2b__3e_"><text:span text:style-name="T14">#[derive(Copy, Clone)]</text:span></text:span></text:p>
      <text:p text:style-name="P108"><text:span text:style-name="_3c_C_3e_"><text:span text:style-name="T175">struct MiStruct{ dato: i32, };</text:span></text:span></text:p>
      <text:p text:style-name="P108"><text:span text:style-name="_3c_C_3e_"><text:span text:style-name="T175">.... </text:span></text:span><text:span text:style-name="_2f__2f_C"><text:span text:style-name="T175">//el resto del código.</text:span></text:span><text:span text:style-name="_3c_C_3e_"><text:span text:style-name="T175"> </text:span></text:span></text:p>
      <text:p text:style-name="P108"><text:span text:style-name="_2f__2f_C"><text:span text:style-name="T176">Ahora no daría error de compilación ya que la estructura al llamarse a la función, se copiaría. </text:span></text:span></text:p>
      <text:p text:style-name="P108"><text:span text:style-name="_2f__2f_C"><text:span text:style-name="T176">Si la estructura tuviera un String dentro, el Copy no se puede hacer ya que parte de los datos del String se almacenan en el Heap, y por lo tanto hay que aplicar un </text:span></text:span><text:span text:style-name="_3c_C_2b__2b__3e_"><text:span text:style-name="T14">.clone()</text:span></text:span><text:span text:style-name="_2f__2f_C"><text:span text:style-name="T176">:</text:span></text:span></text:p>
      <text:p text:style-name="P108"><text:span text:style-name="_3c_C_2b__2b__3e_"><text:span text:style-name="T14">#[derive(Clone)]</text:span></text:span></text:p>
      <text:p text:style-name="P108"><text:span text:style-name="_3c_C_3e_"><text:span text:style-name="T175">struct MiStruct{ dato: </text:span></text:span><text:span text:style-name="_3c_C_2b__2b__3e_"><text:span text:style-name="T14">String</text:span></text:span><text:span text:style-name="_3c_C_3e_"><text:span text:style-name="T175"> };</text:span></text:span></text:p>
      <text:p text:style-name="P108"><text:span text:style-name="_3c_C_3e_"><text:span text:style-name="T175">let kk = MiStruct {dato: "hola mundo".into(),};</text:span></text:span></text:p>
      <text:p text:style-name="P108"><text:span text:style-name="_3c_C_3e_"><text:span text:style-name="T175">ft_funcion(</text:span></text:span><text:span text:style-name="_3c_C_2b__2b__3e_"><text:span text:style-name="T14">kk.clone()</text:span></text:span><text:span text:style-name="_3c_C_3e_"><text:span text:style-name="T175">); </text:span></text:span><text:span text:style-name="_2f__2f_C"><text:span text:style-name="T175">//y ahí pasamos un clone y no se pierde.</text:span></text:span></text:p>
      <text:p text:style-name="P108"><text:span text:style-name="_2f__2f_C"><text:span text:style-name="T176"/></text:span></text:p>
      <text:p text:style-name="P109"><text:soft-page-break/><text:span text:style-name="_2f__2f_C"><text:span text:style-name="T178">Esto mismo pasaría si en vez de a una función se le pasa a un match, o cualquier cosa que esté entre llaves {}.<text:line-break/></text:span></text:span><text:span text:style-name="_2f__2f_C"><text:span text:style-name="T179">Para no hacer copia se puede pasar la referencia como en C++:</text:span></text:span></text:p>
      <text:p text:style-name="P110"><text:span text:style-name="_3c_C_3e_"><text:span text:style-name="T175">struct MiStruct{ dato: i32</text:span></text:span><text:span text:style-name="_3c_C_3e_"><text:span text:style-name="T177"> </text:span></text:span><text:span text:style-name="_3c_C_3e_"><text:span text:style-name="T175">};</text:span></text:span></text:p>
      <text:p text:style-name="P110"><text:span text:style-name="_3c_C_3e_"><text:span text:style-name="T175">let kk = MiStruct {dato: 42</text:span></text:span><text:span text:style-name="_3c_C_3e_"><text:span text:style-name="T177"> </text:span></text:span><text:span text:style-name="_3c_C_3e_"><text:span text:style-name="T175">};</text:span></text:span></text:p>
      <text:p text:style-name="P110"><text:span text:style-name="_3c_C_3e_"><text:span text:style-name="T14">ft_funcion(</text:span></text:span><text:span text:style-name="_3c_C_2b__2b__3e_"><text:span text:style-name="T14">&amp;</text:span></text:span><text:span text:style-name="_3c_C_3e_"><text:span text:style-name="T14">kk);</text:span></text:span><text:span text:style-name="_3c_C_2b__2b__3e_"><text:span text:style-name="T14"> </text:span></text:span><text:span text:style-name="_2f__2f_C"><text:span text:style-name="T175">//</text:span></text:span><text:span text:style-name="_2f__2f_C"><text:span text:style-name="T180">donde la funcion recibe un &amp; tambien como fn ft_funcion(kk: &amp;MiStruct);</text:span></text:span></text:p>
      <text:p text:style-name="P110"><text:span text:style-name="_3c_C_3e_"><text:span text:style-name="T175">println!("{}", kk.dato); </text:span></text:span><text:span text:style-name="_2f__2f_C"><text:span text:style-name="T175">//</text:span></text:span><text:span text:style-name="_2f__2f_C"><text:span text:style-name="T180">ya no da error.</text:span></text:span></text:p>
      <text:p text:style-name="P111"><text:span text:style-name="_2f__2f_C"><text:span text:style-name="T181">Y lo mismo pasándolo a un match:</text:span></text:span></text:p>
      <text:p text:style-name="P111"><text:span text:style-name="_3c_C_3e_"><text:span text:style-name="T13">enum Status{</text:span></text:span><text:span text:style-name="_3c_C_3e_"><text:span text:style-name="T182"> </text:span></text:span><text:span text:style-name="_3c_C_3e_"><text:span text:style-name="T13">PorHacer,</text:span></text:span><text:span text:style-name="_3c_C_3e_"><text:span text:style-name="T182"> </text:span></text:span><text:span text:style-name="_3c_C_3e_"><text:span text:style-name="T13">EnProgreso</text:span></text:span><text:span text:style-name="_3c_C_2b__2b__3e_"><text:span text:style-name="T14">{</text:span></text:span><text:span text:style-name="_3c_C_2b__2b__3e_"><text:span text:style-name="T183"> </text:span></text:span><text:span text:style-name="_3c_C_2b__2b__3e_"><text:span text:style-name="T14">asignado_a: String,},</text:span></text:span><text:span text:style-name="_3c_C_3e_"><text:span text:style-name="T13"><text:tab/>Hecho,}</text:span></text:span></text:p>
      <text:p text:style-name="P111"><text:span text:style-name="_3c_C_3e_"><text:span text:style-name="T13">match </text:span></text:span><text:span text:style-name="_3c_C_2b__2b__3e_"><text:span text:style-name="T14">&amp;</text:span></text:span><text:span text:style-name="_3c_C_3e_"><text:span text:style-name="T13">Status{</text:span></text:span><text:span text:style-name="_3c_C_3e_"><text:span text:style-name="T182"> </text:span></text:span><text:span text:style-name="_2f__2f_C"><text:span text:style-name="T182">//si no pusiera el &amp; en el =&gt; { println!...., asignado_a perdería el ownership</text:span></text:span></text:p>
      <text:p text:style-name="P111"><text:span text:style-name="_3c_C_3e_"><text:span text:style-name="T13"><text:tab/>Status::EnProgreso</text:span></text:span><text:span text:style-name="_3c_C_3e_"><text:span text:style-name="T14">{ asignado_a }</text:span></text:span><text:span text:style-name="_3c_C_3e_"><text:span text:style-name="T13"> =&gt; { println! "Lo hace: {}",</text:span></text:span><text:span text:style-name="_3c_C_3e_"><text:span text:style-name="T14"> asignado_a</text:span></text:span><text:span text:style-name="_3c_C_3e_"><text:span text:style-name="T13">; },</text:span></text:span></text:p>
      <text:p text:style-name="P111"><text:span text:style-name="_3c_C_3e_"><text:span text:style-name="T175"><text:tab/>_ =&gt; {} </text:span></text:span><text:span text:style-name="_2f__2f_C"><text:span text:style-name="T175">//si no queremos que haga nada, pues doble llave.</text:span></text:span><text:span text:style-name="_3c_C_3e_"><text:span text:style-name="T184">}</text:span></text:span></text:p>
      <text:p text:style-name="P111"><text:span text:style-name="_3c_C_3e_"><text:span text:style-name="T184"/></text:span></text:p>
      <text:p text:style-name="P111"><text:span text:style-name="_2f__2f_C"><text:span text:style-name="T181">Pero ¿qué está haciendo el compilador por debajo? está dándole una vida a la referencia en el bloque de la llamada a la función de tal forma que cuando hago un </text:span></text:span><text:span text:style-name="_3c_C_3e_"><text:span text:style-name="T175">ft_funcion(&amp;kk);</text:span></text:span><text:span text:style-name="_2f__2f_C"><text:span text:style-name="T181"> la estructura kk va asegurarse a vivir durante TODO el tiempo de la función, aunque luego se haga llamada a otras funciones:</text:span></text:span></text:p>
      <text:p text:style-name="P111"><text:span text:style-name="_2f__2f_C"><text:span text:style-name="T181"/></text:span></text:p>
      <text:p text:style-name="P112"><text:span text:style-name="_3c_C_3e_"><text:span text:style-name="T175">struct ST {dato: String}; </text:span></text:span><text:span text:style-name="_2f__2f_C"><text:span text:style-name="T175">//debe estar fuera para ser reconocida por funcion1 y funcion2</text:span></text:span></text:p>
      <text:p text:style-name="P111"><text:span text:style-name="_3c_C_3e_"><text:span text:style-name="T175">fn main(){</text:span></text:span></text:p>
      <text:p text:style-name="P111"><text:span text:style-name="_3c_C_3e_"><text:span text:style-name="T175"><text:tab/>let st = ST { dato: "hola".into() };</text:span></text:span></text:p>
      <text:p text:style-name="P113"><text:span text:style-name="_3c_C_3e_"><text:span text:style-name="T175"><text:tab/>funcion1(</text:span></text:span><text:span text:style-name="_3c_C_2b__2b__3e_"><text:span text:style-name="T14">&amp;</text:span></text:span><text:span text:style-name="_3c_C_3e_"><text:span text:style-name="T175">st); </text:span></text:span><text:span text:style-name="_2f__2f_C"><text:span text:style-name="T175">//no pierde el ownership</text:span></text:span><text:span text:style-name="_2f__2f_C"><text:span text:style-name="T185">. Sigue perteneciendo st a main.</text:span></text:span></text:p>
      <text:p text:style-name="P113"><text:span text:style-name="_3c_C_3e_"><text:span text:style-name="T175"><text:tab/>println!("{}", st.dato); </text:span></text:span><text:span text:style-name="_2f__2f_C"><text:span text:style-name="T175">//compila sin problema por que no perdió el ownership.<text:tab/></text:span></text:span></text:p>
      <text:p text:style-name="P111"><text:span text:style-name="_3c_C_3e_"><text:span text:style-name="T175">}</text:span></text:span></text:p>
      <text:p text:style-name="P113"><text:span text:style-name="_2f__2f_C"><text:span text:style-name="T175">//En Rust no hace falta declarar las funciones antes de usarlas.</text:span></text:span></text:p>
      <text:p text:style-name="P113"><text:span text:style-name="_3c_C_3e_"><text:span text:style-name="T175">fn funcion1(</text:span></text:span><text:span text:style-name="_3c_C_2b__2b__3e_"><text:span text:style-name="T14">st: &amp;ST</text:span></text:span><text:span text:style-name="_3c_C_3e_"><text:span text:style-name="T175">){ </text:span></text:span></text:p>
      <text:p text:style-name="P112"><text:span text:style-name="_3c_C_3e_"><text:span text:style-name="T175"><text:tab/></text:span></text:span><text:span text:style-name="_2f__2f_C"><text:span text:style-name="T175">//al loro con esto!! ahora st es una direccion de memoria asi que no se pasa como <text:tab/>funcion2(&amp;st) que </text:span></text:span><text:span text:style-name="_2f__2f_C"><text:span text:style-name="T186"><text:tab/></text:span></text:span><text:span text:style-name="_2f__2f_C"><text:span text:style-name="T175">daría un error de compilación.<text:tab/></text:span></text:span></text:p>
      <text:p text:style-name="P112"><text:span text:style-name="_3c_C_3e_"><text:span text:style-name="T175"><text:tab/>funcion2(</text:span></text:span><text:span text:style-name="_3c_C_2b__2b__3e_"><text:span text:style-name="T14">st</text:span></text:span><text:span text:style-name="_3c_C_3e_"><text:span text:style-name="T175">); </text:span></text:span></text:p>
      <text:p text:style-name="P113"><text:span text:style-name="_3c_C_3e_"><text:span text:style-name="T175"><text:tab/>println!("{}", st.dato); </text:span></text:span><text:span text:style-name="_2f__2f_C"><text:span text:style-name="T175">//compila</text:span></text:span></text:p>
      <text:p text:style-name="P113"><text:span text:style-name="_3c_C_3e_"><text:span text:style-name="T175">}</text:span></text:span></text:p>
      <text:p text:style-name="P113"><text:span text:style-name="_3c_C_3e_"><text:span text:style-name="T175">fn funcion2(</text:span></text:span><text:span text:style-name="_3c_C_2b__2b__3e_"><text:span text:style-name="T14">st: &amp;ST</text:span></text:span><text:span text:style-name="_3c_C_3e_"><text:span text:style-name="T175">){</text:span></text:span></text:p>
      <text:p text:style-name="P113"><text:span text:style-name="_3c_C_3e_"><text:span text:style-name="T175"><text:tab/>... </text:span></text:span><text:span text:style-name="_2f__2f_C"><text:span text:style-name="T175">//dentro de la primera llamada en el main al hacer &amp; Rust hace que st viva hasta aquí y después de cada linea de la función.</text:span></text:span></text:p>
      <text:p text:style-name="P113"><text:span text:style-name="_3c_C_3e_"><text:span text:style-name="T175">}</text:span></text:span></text:p>
      <text:p text:style-name="P113"><text:span text:style-name="_3c_C_3e_"><text:span text:style-name="T175"/></text:span></text:p>
      <text:p text:style-name="P114"><text:span text:style-name="_2f__2f_C"><text:span text:style-name="T187">LIFETIMES!!</text:span></text:span></text:p>
      <text:p text:style-name="P114"><text:soft-page-break/><text:span text:style-name="_2f__2f_C"><text:span text:style-name="T188">Cuando es obligatorio usar LIFETIMES? (</text:span></text:span><text:span text:style-name="_3c_C_3e_"><text:span text:style-name="T175">&lt;'loquesea&gt;</text:span></text:span><text:span text:style-name="_2f__2f_C"><text:span text:style-name="T188">) con una referencia </text:span></text:span><text:span text:style-name="_3c_C_2b__2b__3e_"><text:span text:style-name="T14">&amp;</text:span></text:span><text:span text:style-name="_2f__2f_C"><text:span text:style-name="T188">?</text:span></text:span></text:p>
      <text:p text:style-name="P114"><text:span text:style-name="_2f__2f_C"><text:span text:style-name="T188">1. Cuando guardamos una referencia en un STRUCT o ENUM:</text:span></text:span></text:p>
      <text:p text:style-name="P114"><text:span text:style-name="_3c_C_3e_"><text:span text:style-name="T189"><text:tab/></text:span></text:span><text:span text:style-name="_3c_C_3e_"><text:span text:style-name="T175">struct ST { texto: </text:span></text:span><text:span text:style-name="_3c_C_2b__2b__3e_"><text:span text:style-name="T14">&amp;str</text:span></text:span><text:span text:style-name="_3c_C_3e_"><text:span text:style-name="T175">}</text:span></text:span><text:span text:style-name="_2f__2f_C"><text:span text:style-name="T188"> </text:span></text:span><text:span text:style-name="_2f__2f_C"><text:span text:style-name="T14">//&amp;str es como un char*. pero ERROR!! Rust no sabe cuanto vive</text:span></text:span></text:p>
      <text:p text:style-name="P114"><text:span text:style-name="_2f__2f_C"><text:span text:style-name="T188"><text:tab/>Para Solucionarlo:</text:span></text:span></text:p>
      <text:p text:style-name="P115"><text:span text:style-name="_2f__2f_C"><text:span text:style-name="T190"><text:tab/></text:span></text:span><text:span text:style-name="_2f__2f_C"><text:span text:style-name="T14">//primero se define el lifetime y luego se aplica. el ST&lt;'a&gt; va a tener un str que vive 'a y no menos.</text:span></text:span></text:p>
      <text:p text:style-name="P114"><text:span text:style-name="_3c_C_3e_"><text:span text:style-name="T14"><text:tab/>struct ST</text:span></text:span><text:span text:style-name="_3c_C_2b__2b__3e_"><text:span text:style-name="T14">&lt;'a&gt; </text:span></text:span><text:span text:style-name="_3c_C_3e_"><text:span text:style-name="T14">{texto: </text:span></text:span><text:span text:style-name="_3c_C_2b__2b__3e_"><text:span text:style-name="T14">&amp;'a</text:span></text:span><text:span text:style-name="_3c_C_3e_"><text:span text:style-name="T14"> str, } /</text:span></text:span><text:span text:style-name="_2f__2f_C"><text:span text:style-name="T14">/Significa que ST no puede vivir más que el texto str, por <text:tab/>que si no tendríamos un puntero basura.</text:span></text:span></text:p>
      <text:p text:style-name="P114"><text:span text:style-name="_2f__2f_C"><text:span text:style-name="T14"/></text:span></text:p>
      <text:p text:style-name="P116"><text:span text:style-name="_2f__2f_C"><text:span text:style-name="T191">2</text:span></text:span><text:span text:style-name="_2f__2f_C"><text:span text:style-name="T188">. Cuando </text:span></text:span><text:span text:style-name="_2f__2f_C"><text:span text:style-name="T191">pasamos varias referencias que devuelve una de ellas. Si una función recibe dos o más referencias y devuelve otra referencia, el compilador se confunde y no sabe cual de los parámetros proviene del dato resuelto.</text:span></text:span></text:p>
      <text:p text:style-name="P116"><text:span text:style-name="_2f__2f_C"><text:span text:style-name="T191"><text:tab/></text:span></text:span><text:span text:style-name="_2f__2f_C"><text:span text:style-name="T175">//Rust no sabe si el &amp;str viene de x o y</text:span></text:span><text:span text:style-name="_2f__2f_C"><text:span text:style-name="T192">, po r lo que una podria vivir menos que otra y contendria basura.</text:span></text:span></text:p>
      <text:p text:style-name="P116"><text:span text:style-name="_3c_C_3e_"><text:span text:style-name="T175"><text:tab/>fn el_mas_largo(x: &amp;str, y: &amp;str) -&gt; &amp;str</text:span></text:span><text:span text:style-name="_3c_C_3e_"><text:span text:style-name="T192"> /</text:span></text:span><text:span text:style-name="_2f__2f_C"><text:span text:style-name="T192">/error de compilación</text:span></text:span></text:p>
      <text:p text:style-name="P116"><text:span text:style-name="_2f__2f_C"><text:span text:style-name="T191"><text:tab/></text:span></text:span><text:span text:style-name="_2f__2f_C"><text:span text:style-name="T188">Para</text:span></text:span><text:span text:style-name="_2f__2f_C"><text:span text:style-name="T191"> solucionarlo:</text:span></text:span></text:p>
      <text:p text:style-name="P116"><text:span text:style-name="_2f__2f_C"><text:span text:style-name="T191"><text:tab/></text:span></text:span><text:span text:style-name="_3c_C_3e_"><text:span text:style-name="T175">fn el_mas_largo</text:span></text:span><text:span text:style-name="_3c_C_2b__2b__3e_"><text:span text:style-name="T14">&lt;'a&gt;</text:span></text:span><text:span text:style-name="_3c_C_3e_"><text:span text:style-name="T175">(x: </text:span></text:span><text:span text:style-name="_3c_C_2b__2b__3e_"><text:span text:style-name="T14">&amp;'a</text:span></text:span><text:span text:style-name="_3c_C_3e_"><text:span text:style-name="T175"> str, y: </text:span></text:span><text:span text:style-name="_3c_C_2b__2b__3e_"><text:span text:style-name="T14">&amp;'a</text:span></text:span><text:span text:style-name="_3c_C_3e_"><text:span text:style-name="T175"> str) -&gt; </text:span></text:span><text:span text:style-name="_3c_C_2b__2b__3e_"><text:span text:style-name="T14">&amp;'a</text:span></text:span><text:span text:style-name="_3c_C_3e_"><text:span text:style-name="T175"> str{</text:span></text:span></text:p>
      <text:p text:style-name="P116"><text:span text:style-name="_3c_C_3e_"><text:span text:style-name="T175"><text:tab/><text:tab/>if x.len() &gt; y.len() { x } else { y } </text:span></text:span><text:span text:style-name="_2f__2f_C"><text:span text:style-name="T175">//la referencia devuelta vivirá tanto como la menor.</text:span></text:span></text:p>
      <text:p text:style-name="P116"><text:span text:style-name="_3c_C_3e_"><text:span text:style-name="T175"><text:tab/>}</text:span></text:span></text:p>
      <text:p text:style-name="P116"><text:span text:style-name="_3c_C_3e_"><text:span text:style-name="T175"/></text:span></text:p>
      <text:h text:style-name="P117" text:outline-level="3"><text:span text:style-name="_3c_C_3e_"><text:span text:style-name="T193">OPTION</text:span></text:span></text:h>
      <text:p text:style-name="P118"><text:span text:style-name="_2f__2f_C"><text:span text:style-name="T194">Qué pasa en C cuando tenemos un </text:span></text:span><text:span text:style-name="_3c_C_3e_"><text:span text:style-name="T175">Char* str = NULL</text:span></text:span><text:span text:style-name="_2f__2f_C"><text:span text:style-name="T194">, y le hacemos un </text:span></text:span><text:span text:style-name="_3c_C_3e_"><text:span text:style-name="T175">str[0]</text:span></text:span><text:span text:style-name="_2f__2f_C"><text:span text:style-name="T194">, pues que se produce un Segfaul y para evitarlo hacemos un </text:span></text:span><text:span text:style-name="_3c_C_3e_"><text:span text:style-name="T175">if (str) {</text:span></text:span><text:span text:style-name="_3c_C_3e_"><text:span text:style-name="T195">y ahora sí podemos acceder a </text:span></text:span><text:span text:style-name="_3c_C_3e_"><text:span text:style-name="T175">str[0]...}</text:span></text:span></text:p>
      <text:p text:style-name="P118"><text:span text:style-name="_2f__2f_C"><text:span text:style-name="T194">Es decir, si no checkeamos que primero existe </text:span></text:span><text:span text:style-name="_3c_C_3e_"><text:span text:style-name="T175">str</text:span></text:span><text:span text:style-name="_2f__2f_C"><text:span text:style-name="T194">, entonces se puede producir el crash. </text:span></text:span></text:p>
      <text:p text:style-name="P118"><text:span text:style-name="_2f__2f_C"><text:span text:style-name="T194">Rust evita esto, devolviendo en muchos casos y métodos un tipo llamado </text:span></text:span><text:span text:style-name="_3c_C_2b__2b__3e_"><text:span text:style-name="T14">OPTION</text:span></text:span><text:span text:style-name="_2f__2f_C"><text:span text:style-name="T194">, que en sí es un enum:</text:span></text:span></text:p>
      <text:p text:style-name="P118"><text:span text:style-name="_2f__2f_C"><text:span text:style-name="T194"/></text:span></text:p>
      <text:p text:style-name="P118"><text:span text:style-name="_3c_C_2b__2b__3e_"><text:span text:style-name="T14">enum Option&lt;T&gt;{</text:span></text:span></text:p>
      <text:p text:style-name="P118"><text:span text:style-name="_3c_C_2b__2b__3e_"><text:span text:style-name="T14"><text:tab/>Some(T),</text:span></text:span></text:p>
      <text:p text:style-name="P118"><text:span text:style-name="_3c_C_2b__2b__3e_"><text:span text:style-name="T14"><text:tab/>None,</text:span></text:span></text:p>
      <text:p text:style-name="P118"><text:span text:style-name="_3c_C_2b__2b__3e_"><text:span text:style-name="T14">}</text:span></text:span></text:p>
      <text:p text:style-name="P118"><text:span text:style-name="_2f__2f_C"><text:span text:style-name="T194"/></text:span></text:p>
      <text:p text:style-name="P118"><text:span text:style-name="_2f__2f_C"><text:span text:style-name="T194">Es decir devuelve una Tupla de valores. Un </text:span></text:span><text:span text:style-name="_3c_C_2b__2b__3e_"><text:span text:style-name="T14">Some(T)</text:span></text:span><text:span text:style-name="_2f__2f_C"><text:span text:style-name="T194"> si devuelve "algo" (y </text:span></text:span><text:span text:style-name="_3c_C_3e_"><text:span text:style-name="T175">Some</text:span></text:span><text:span text:style-name="_2f__2f_C"><text:span text:style-name="T194"> es palabra reservada para ello) o un </text:span></text:span><text:span text:style-name="_3c_C_2b__2b__3e_"><text:span text:style-name="T14">None</text:span></text:span><text:span text:style-name="_2f__2f_C"><text:span text:style-name="T194">, es decir nada. </text:span></text:span></text:p>
      <text:p text:style-name="P118"><text:span text:style-name="_2f__2f_C"><text:span text:style-name="T194">Esto puede ser un número o algo.. o una dirección de memoria o un </text:span></text:span><text:span text:style-name="_3c_C_3e_"><text:span text:style-name="T175">NULL</text:span></text:span><text:span text:style-name="_2f__2f_C"><text:span text:style-name="T194">. De esa manera siempre estamos protegidos.</text:span></text:span></text:p>
      <text:p text:style-name="P119"><text:span text:style-name="_2f__2f_C"><text:span text:style-name="T194">Para </text:span></text:span><text:span text:style-name="_2f__2f_C"><text:span text:style-name="T196">usarlo puede ser asi:</text:span></text:span></text:p>
      <text:p text:style-name="P119"><text:soft-page-break/><text:span text:style-name="_2f__2f_C"><text:span text:style-name="T196">Recordando la estructura </text:span></text:span><text:span text:style-name="_3c_C_3e_"><text:span text:style-name="T175">Ticket</text:span></text:span><text:span text:style-name="_2f__2f_C"><text:span text:style-name="T196"> que tenia un </text:span></text:span><text:span text:style-name="_3c_C_3e_"><text:span text:style-name="T175">status</text:span></text:span><text:span text:style-name="_2f__2f_C"><text:span text:style-name="T196"> de </text:span></text:span><text:span text:style-name="_3c_C_3e_"><text:span text:style-name="T175">enum Status</text:span></text:span><text:span text:style-name="_2f__2f_C"><text:span text:style-name="T196"> con </text:span></text:span><text:span text:style-name="_3c_C_3e_"><text:span text:style-name="T175">assigned_to</text:span></text:span><text:span text:style-name="_2f__2f_C"><text:span text:style-name="T196"> en el de </text:span></text:span><text:span text:style-name="_3c_C_3e_"><text:span text:style-name="T175">InProgress</text:span></text:span><text:span text:style-name="_2f__2f_C"><text:span text:style-name="T196">:</text:span></text:span></text:p>
      <text:p text:style-name="P119"><text:span text:style-name="_3c_C_3e_"><text:span text:style-name="T175">pub fn assigned_to(&amp;self) -&gt; </text:span></text:span><text:span text:style-name="_3c_C_2b__2b__3e_"><text:span text:style-name="T14">Option&lt;&amp;String&gt;</text:span></text:span><text:span text:style-name="_3c_C_3e_"><text:span text:style-name="T175">{ /</text:span></text:span><text:span text:style-name="_2f__2f_C"><text:span text:style-name="T175">/ya no tendremos que hacer panic ya que la otra opción seria un None (null).</text:span></text:span></text:p>
      <text:p text:style-name="P119"><text:span text:style-name="_3c_C_3e_"><text:span text:style-name="T175">if let Status::InProgress { assigned_to } = &amp;self.status { </text:span></text:span><text:span text:style-name="_3c_C_2b__2b__3e_"><text:span text:style-name="T14">Some(assigned_to)</text:span></text:span><text:span text:style-name="_3c_C_3e_"><text:span text:style-name="T175"> }</text:span></text:span></text:p>
      <text:p text:style-name="P120"><text:span text:style-name="_3c_C_3e_"><text:span text:style-name="T175">else { </text:span></text:span><text:span text:style-name="_3c_C_2b__2b__3e_"><text:span text:style-name="T14">None</text:span></text:span><text:span text:style-name="_3c_C_3e_"><text:span text:style-name="T175"> }</text:span></text:span></text:p>
      <text:p text:style-name="P118"><text:span text:style-name="_2f__2f_C"><text:span text:style-name="T196"/></text:span></text:p>
      <text:h text:style-name="P121" text:outline-level="3"><text:span text:style-name="_3c_C_3e_"><text:span text:style-name="T197">RESULT</text:span></text:span></text:h>
      <text:p text:style-name="P122"><text:span text:style-name="_2f__2f_C"><text:span text:style-name="T194">E</text:span></text:span><text:span text:style-name="_2f__2f_C"><text:span text:style-name="T198">s la otra tupla de Rust, y en este caso es:</text:span></text:span></text:p>
      <text:p text:style-name="P122"><text:span text:style-name="_3c_C_2b__2b__3e_"><text:span text:style-name="T14">enum RESULT&lt;T, J&gt;{</text:span></text:span></text:p>
      <text:p text:style-name="P122"><text:span text:style-name="_3c_C_2b__2b__3e_"><text:span text:style-name="T14"><text:tab/>Ok(T),</text:span></text:span></text:p>
      <text:p text:style-name="P122"><text:span text:style-name="_3c_C_2b__2b__3e_"><text:span text:style-name="T14"><text:tab/>Err(J),</text:span></text:span></text:p>
      <text:p text:style-name="P122"><text:span text:style-name="_3c_C_2b__2b__3e_"><text:span text:style-name="T14">}</text:span></text:span></text:p>
      <text:p text:style-name="P122"><text:span text:style-name="_2f__2f_C"><text:span text:style-name="T198">En este caso estamos viendo el resultado de una operación o paso a función que queramos probar.</text:span></text:span></text:p>
      <text:p text:style-name="P122"><text:span text:style-name="_3c_C_3e_"><text:span text:style-name="T175">fn dividir (dividendo: i32, divisor: i32) -&gt; </text:span></text:span><text:span text:style-name="_3c_C_2b__2b__3e_"><text:span text:style-name="T14">Result &lt;i32, String&gt;</text:span></text:span><text:span text:style-name="_3c_C_3e_"><text:span text:style-name="T175">{</text:span></text:span></text:p>
      <text:p text:style-name="P122"><text:span text:style-name="_3c_C_3e_"><text:span text:style-name="T175"><text:tab/>if divisor == 0 {</text:span></text:span></text:p>
      <text:p text:style-name="P122"><text:span text:style-name="_3c_C_3e_"><text:span text:style-name="T175"><text:tab/><text:tab/></text:span></text:span><text:span text:style-name="_3c_C_2b__2b__3e_"><text:span text:style-name="T14">Err("No se puede dividir por cero!".to_string()</text:span></text:span></text:p>
      <text:p text:style-name="P122"><text:span text:style-name="_3c_C_3e_"><text:span text:style-name="T175"><text:tab/>}</text:span></text:span></text:p>
      <text:p text:style-name="P122"><text:span text:style-name="_3c_C_3e_"><text:span text:style-name="T175"><text:tab/>else{</text:span></text:span></text:p>
      <text:p text:style-name="P122"><text:span text:style-name="_3c_C_3e_"><text:span text:style-name="T175"><text:tab/><text:tab/></text:span></text:span><text:span text:style-name="_3c_C_2b__2b__3e_"><text:span text:style-name="T14">Ok(dividento / divisor)</text:span></text:span></text:p>
      <text:p text:style-name="P122"><text:span text:style-name="_3c_C_3e_"><text:span text:style-name="T175"><text:tab/>}</text:span></text:span></text:p>
      <text:p text:style-name="P122"><text:span text:style-name="_3c_C_3e_"><text:span text:style-name="T175">}</text:span></text:span></text:p>
      <text:p text:style-name="P122"><text:span text:style-name="_3c_C_3e_"><text:span text:style-name="T175">fn main{</text:span></text:span></text:p>
      <text:p text:style-name="P122"><text:span text:style-name="_3c_C_3e_"><text:span text:style-name="T175"><text:tab/>let resultado = dividir(10, 2);</text:span></text:span><text:span text:style-name="_3c_C_3e_"><text:span text:style-name="T199"> </text:span></text:span><text:span text:style-name="_2f__2f_C"><text:span text:style-name="T199">//no podemos mostrar resultado por que es un "Result" hay que desempaquetarlo con un match</text:span></text:span></text:p>
      <text:p text:style-name="P122"><text:span text:style-name="_3c_C_3e_"><text:span text:style-name="T175"><text:tab/>match resultado{</text:span></text:span></text:p>
      <text:p text:style-name="P122"><text:span text:style-name="_3c_C_3e_"><text:span text:style-name="T175"><text:tab/><text:tab/>Ok(i) =&gt; println!("El resultado es: {}", i),</text:span></text:span></text:p>
      <text:p text:style-name="P122"><text:span text:style-name="_3c_C_3e_"><text:span text:style-name="T175"><text:tab/><text:tab/>Err(str) =&gt; println!("{}", str),</text:span></text:span></text:p>
      <text:p text:style-name="P122"><text:span text:style-name="_3c_C_3e_"><text:span text:style-name="T175"><text:tab/>}</text:span></text:span></text:p>
      <text:p text:style-name="P122"><text:span text:style-name="_3c_C_3e_"><text:span text:style-name="T175">}</text:span></text:span></text:p>
      <text:p text:style-name="P122"><text:span text:style-name="_2f__2f_C"><text:span text:style-name="T198">También en vez del </text:span></text:span><text:span text:style-name="_3c_C_3e_"><text:span text:style-name="T175">match</text:span></text:span><text:span text:style-name="_2f__2f_C"><text:span text:style-name="T198"> que es muy largo, se podría haber puesto:</text:span></text:span></text:p>
      <text:p text:style-name="P122"><text:span text:style-name="_3c_C_3e_"><text:span text:style-name="T175">let resultado = dividir(10,2)</text:span></text:span><text:span text:style-name="_3c_C_2b__2b__3e_"><text:span text:style-name="T14">.unwrap()</text:span></text:span><text:span text:style-name="_3c_C_3e_"><text:span text:style-name="T175">; </text:span></text:span><text:span text:style-name="_2f__2f_C"><text:span text:style-name="T175">//si es Err entonces hay un panic.</text:span></text:span></text:p>
      <text:p text:style-name="P122"><text:span text:style-name="_3c_C_3e_"><text:span text:style-name="T175">println!("El resultado es: {}", resultado);</text:span></text:span><text:span text:style-name="_3c_C_3e_"><text:span text:style-name="T199"> </text:span></text:span><text:span text:style-name="_2f__2f_C"><text:span text:style-name="T199">//con unwrap() hemos sacado el valor del Ok, si llega a ser Ok.</text:span></text:span></text:p>
      <text:p text:style-name="P122"><text:span text:style-name="_2f__2f_C"><text:span text:style-name="T198"/></text:span></text:p>
      <text:p text:style-name="P122"><text:soft-page-break/><text:span text:style-name="_2f__2f_C"><text:span text:style-name="T200">Y ese</text:span></text:span><text:span text:style-name="_2f__2f_C"><text:span text:style-name="T198"> panic hubiera salido </text:span></text:span><text:span text:style-name="_2f__2f_C"><text:span text:style-name="T200">CON el</text:span></text:span><text:span text:style-name="_2f__2f_C"><text:span text:style-name="T198"> msg de error</text:span></text:span><text:span text:style-name="_2f__2f_C"><text:span text:style-name="T200"> definido en la función</text:span></text:span><text:span text:style-name="_2f__2f_C"><text:span text:style-name="T198">. Si queremos uno </text:span></text:span><text:span text:style-name="_2f__2f_C"><text:span text:style-name="T200">más personalizado </text:span></text:span><text:span text:style-name="_2f__2f_C"><text:span text:style-name="T198">podríamos hacer:</text:span></text:span></text:p>
      <text:p text:style-name="P122"><text:span text:style-name="_3c_C_3e_"><text:span text:style-name="T175">let resultado = dividir(10,2)</text:span></text:span><text:span text:style-name="_3c_C_2b__2b__3e_"><text:span text:style-name="T14">.expect("No se puede dividir por cero");</text:span></text:span><text:span text:style-name="_3c_C_3e_"><text:span text:style-name="T175"> </text:span></text:span><text:span text:style-name="_2f__2f_C"><text:span text:style-name="T175">//saldrían los dos errores de texto y también hace panic.</text:span></text:span></text:p>
      <text:p text:style-name="P122"><text:span text:style-name="_2f__2f_C"><text:span text:style-name="T175"/></text:span></text:p>
      <text:p text:style-name="P122"><text:span text:style-name="_2f__2f_C"><text:span text:style-name="T175"/></text:span></text:p>
      <text:h text:style-name="P123" text:outline-level="3"><text:span text:style-name="_3c_C_3e_"><text:span text:style-name="T201">MACROS</text:span></text:span></text:h>
      <text:p text:style-name="P124"><text:span text:style-name="_2f__2f_C"><text:span text:style-name="T202">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14">!</text:span></text:span><text:span text:style-name="_2f__2f_C"><text:span text:style-name="T202"> al final. Las más famosas:<text:line-break/></text:span></text:span></text:p>
      <text:h text:style-name="P125" text:outline-level="3"><text:span text:style-name="_3c_C_3e_"><text:span text:style-name="T203">print!()</text:span></text:span></text:h>
      <text:p text:style-name="P124"><text:span text:style-name="_2f__2f_C"><text:span text:style-name="T202">Imprime el texto en pantalla sin salto de linea. El texto puede quedarse esperando en el buffer de la consola y no aparecer en pantalla hasta que se imprima un salto de linea:</text:span></text:span></text:p>
      <text:p text:style-name="P126"><text:span text:style-name="_3c_C_3e_"><text:span text:style-name="T175">fn main(){</text:span></text:span></text:p>
      <text:p text:style-name="P126"><text:span text:style-name="_3c_C_3e_"><text:span text:style-name="T175"><text:tab/></text:span></text:span><text:span text:style-name="_3c_C_3e_"><text:span text:style-name="T204">let str: &amp;str = “hola ”;</text:span></text:span></text:p>
      <text:p text:style-name="P126"><text:span text:style-name="_3c_C_3e_"><text:span text:style-name="T175"><text:tab/></text:span></text:span><text:span text:style-name="_3c_C_2b__2b__3e_"><text:span text:style-name="T14">print!(“</text:span></text:span><text:span text:style-name="_3c_C_2b__2b__3e_"><text:span text:style-name="T205">{}</text:span></text:span><text:span text:style-name="_3c_C_2b__2b__3e_"><text:span text:style-name="T14">”, </text:span></text:span><text:span text:style-name="_3c_C_2b__2b__3e_"><text:span text:style-name="T205">str</text:span></text:span><text:span text:style-name="_3c_C_2b__2b__3e_"><text:span text:style-name="T14">); </text:span></text:span><text:span text:style-name="_2f__2f_C"><text:span text:style-name="T14">//</text:span></text:span><text:span text:style-name="_2f__2f_C"><text:span text:style-name="T205">el {} es como el %s del printf, pero no hace falta poner el tipo.</text:span></text:span></text:p>
      <text:p text:style-name="P126"><text:span text:style-name="_3c_C_3e_"><text:span text:style-name="T175"><text:tab/>print!(“ mundo!);</text:span></text:span></text:p>
      <text:p text:style-name="P126"><text:span text:style-name="_3c_C_3e_"><text:span text:style-name="T175"><text:tab/></text:span></text:span><text:span text:style-name="_2f__2f_C"><text:span text:style-name="T175">//En pantalla se verá “hola mundo!” pero por que termina el scope de la función. Si no <text:tab/>seguiría sin <text:tab/>imprimir.</text:span></text:span></text:p>
      <text:p text:style-name="P126"><text:span text:style-name="_3c_C_3e_"><text:span text:style-name="T175">}</text:span></text:span></text:p>
      <text:p text:style-name="P126"><text:span text:style-name="_2f__2f_C"><text:span text:style-name="T206">Para soltarlo en pantalla si queremos antes de finalización de Scope se necesita el </text:span></text:span><text:span text:style-name="_3c_C_2b__2b__3e_"><text:span text:style-name="T14">flush()</text:span></text:span><text:span text:style-name="_2f__2f_C"><text:span text:style-name="T206"><text:line-break/></text:span></text:span></text:p>
      <text:p text:style-name="P126"><text:span text:style-name="_3c_C_3e_"><text:span text:style-name="T175">use std::io::{self, Write}; </text:span></text:span><text:span text:style-name="_2f__2f_C"><text:span text:style-name="T175">//necesario para el flush()</text:span></text:span></text:p>
      <text:p text:style-name="P126"><text:span text:style-name="_3c_C_3e_"><text:span text:style-name="T175">fn main(){</text:span></text:span></text:p>
      <text:p text:style-name="P126"><text:span text:style-name="_3c_C_3e_"><text:span text:style-name="T175"><text:tab/>print!(“hola”);<text:line-break/><text:tab/>print!(“ mundo!);</text:span></text:span></text:p>
      <text:p text:style-name="P126"><text:span text:style-name="_3c_C_3e_"><text:span text:style-name="T175"><text:tab/>io::stdout()::flush().unwrap(); </text:span></text:span><text:span text:style-name="_2f__2f_C"><text:span text:style-name="T175">//sin esto no imprimiría. Unwrap() por que devuelve un Result</text:span></text:span></text:p>
      <text:p text:style-name="P127"><text:span text:style-name="_3c_C_3e_"><text:span text:style-name="T175"><text:tab/>loop{} </text:span></text:span><text:span text:style-name="_2f__2f_C"><text:span text:style-name="T175">//infinito, </text:span></text:span><text:span text:style-name="_2f__2f_C"><text:span text:style-name="T204">por lo que impidiria que se escribiera en pantalla a no ser del flush().</text:span></text:span></text:p>
      <text:p text:style-name="P127"><text:span text:style-name="_2f__2f_C"><text:span text:style-name="T207"><text:tab/>Mejor que un while true{} por optimización de código.</text:span></text:span></text:p>
      <text:p text:style-name="P126"><text:span text:style-name="_3c_C_3e_"><text:span text:style-name="T175">}</text:span></text:span></text:p>
      <text:p text:style-name="P128"><text:span text:style-name="_2f__2f_C"><text:span text:style-name="T208">Sin el </text:span></text:span><text:span text:style-name="_3c_C_2b__2b__3e_"><text:span text:style-name="T14">flush()</text:span></text:span><text:span text:style-name="_2f__2f_C"><text:span text:style-name="T208"> si pusieramos </text:span></text:span><text:span text:style-name="_3c_C_3e_"><text:span text:style-name="T175">print!(“ mundo!</text:span></text:span><text:span text:style-name="_3c_C_2b__2b__3e_"><text:span text:style-name="T14">\n</text:span></text:span><text:span text:style-name="_3c_C_3e_"><text:span text:style-name="T175">”);</text:span></text:span><text:span text:style-name="_2f__2f_C"><text:span text:style-name="T208"> sí que lo imprimiría, pero para eso usamos uno </text:span></text:span><text:span text:style-name="_3c_C_2b__2b__3e_"><text:span text:style-name="T14">println!()</text:span></text:span></text:p>
      <text:p text:style-name="P128"><text:span text:style-name="_3c_C_2b__2b__3e_"><text:span text:style-name="T14"/></text:span></text:p>
      <text:h text:style-name="P129" text:outline-level="3"><text:soft-page-break/><text:span text:style-name="_3c_C_3e_"><text:span text:style-name="T203"/></text:span></text:h>
      <text:h text:style-name="P129" text:outline-level="3"><text:span text:style-name="_3c_C_3e_"><text:span text:style-name="T203">print</text:span></text:span><text:span text:style-name="_3c_C_3e_"><text:span text:style-name="T209">ln</text:span></text:span><text:span text:style-name="_3c_C_3e_"><text:span text:style-name="T203">!()</text:span></text:span></text:h>
      <text:p text:style-name="P127"><text:span text:style-name="_2f__2f_C"><text:span text:style-name="T210">La diferencia es que imprime el salto de linea y por lo tanto vacia el buffer:</text:span></text:span></text:p>
      <text:p text:style-name="P127"><text:span text:style-name="_3c_C_3e_"><text:span text:style-name="T175">fn main(){</text:span></text:span></text:p>
      <text:p text:style-name="P127"><text:span text:style-name="_3c_C_3e_"><text:span text:style-name="T175"><text:tab/></text:span></text:span><text:span text:style-name="_3c_C_3e_"><text:span text:style-name="T204">let str: &amp;str = “</text:span></text:span><text:span text:style-name="_3c_C_3e_"><text:span text:style-name="T207">mundo!</text:span></text:span><text:span text:style-name="_3c_C_3e_"><text:span text:style-name="T204">”;</text:span></text:span></text:p>
      <text:p text:style-name="P127"><text:span text:style-name="_3c_C_3e_"><text:span text:style-name="T175"><text:tab/></text:span></text:span><text:span text:style-name="_3c_C_2b__2b__3e_"><text:span text:style-name="T14">println!(“</text:span></text:span><text:span text:style-name="_3c_C_2b__2b__3e_"><text:span text:style-name="T211">hola {}, str</text:span></text:span><text:span text:style-name="_3c_C_2b__2b__3e_"><text:span text:style-name="T14">);</text:span></text:span><text:span text:style-name="_3c_C_3e_"><text:span text:style-name="T175"> </text:span></text:span><text:span text:style-name="_2f__2f_C"><text:span text:style-name="T175">//En pantalla se verá “hola mundo!” </text:span></text:span><text:span text:style-name="_2f__2f_C"><text:span text:style-name="T207">aunque haya un loop infinito después</text:span></text:span></text:p>
      <text:p text:style-name="P127"><text:span text:style-name="_2f__2f_C"><text:span text:style-name="T175"><text:tab/></text:span></text:span><text:span text:style-name="_3c_C_3e_"><text:span text:style-name="T175">loop{}</text:span></text:span></text:p>
      <text:p text:style-name="P127"><text:span text:style-name="_3c_C_3e_"><text:span text:style-name="T175">}</text:span></text:span></text:p>
      <text:p text:style-name="P127"><text:span text:style-name="_3c_C_3e_"><text:span text:style-name="T175"/></text:span></text:p>
      <text:h text:style-name="P130" text:outline-level="3"><text:span text:style-name="_3c_C_3e_"><text:span text:style-name="T212">format</text:span></text:span><text:span text:style-name="_3c_C_3e_"><text:span text:style-name="T203">!()</text:span></text:span></text:h>
      <text:p text:style-name="P131"><text:span text:style-name="_2f__2f_C"><text:span text:style-name="T213">No imprime nada. Es como el OstringStream de C++ para no ir reajustando la memoria en cada + que le hagamos al String. Devuelve un String siempre:</text:span></text:span></text:p>
      <text:p text:style-name="P131"><text:span text:style-name="_3c_C_3e_"><text:span text:style-name="T175">fn main(){</text:span></text:span></text:p>
      <text:p text:style-name="P131"><text:span text:style-name="_3c_C_3e_"><text:span text:style-name="T175"><text:tab/>let nombre = “Paco”; </text:span></text:span><text:span text:style-name="_2f__2f_C"><text:span text:style-name="T175">//aquí nombre es un &amp;str (char*) estático</text:span></text:span></text:p>
      <text:p text:style-name="P131"><text:span text:style-name="_3c_C_3e_"><text:span text:style-name="T175"><text:tab/>let msg =</text:span></text:span><text:span text:style-name="_3c_C_2b__2b__3e_"><text:span text:style-name="T14"> format!(“hola, {}!”, nombre);</text:span></text:span><text:span text:style-name="_3c_C_3e_"><text:span text:style-name="T175"> </text:span></text:span><text:span text:style-name="_2f__2f_C"><text:span text:style-name="T175">//aquí msg es un String.</text:span></text:span></text:p>
      <text:p text:style-name="P131"><text:span text:style-name="_3c_C_3e_"><text:span text:style-name="T175"><text:tab/>println(“{}”, msg); </text:span></text:span><text:span text:style-name="_2f__2f_C"><text:span text:style-name="T175">//para imprimirlo.. Si no no hará nada y al salir del scope liberará <text:tab/>memoria.</text:span></text:span></text:p>
      <text:p text:style-name="P131"><text:span text:style-name="_3c_C_3e_"><text:span text:style-name="T175">}</text:span></text:span></text:p>
      <text:p text:style-name="P131"><text:span text:style-name="_3c_C_3e_"><text:span text:style-name="T175"/></text:span></text:p>
      <text:h text:style-name="P130" text:outline-level="3"><text:span text:style-name="_3c_C_3e_"><text:span text:style-name="T212">write</text:span></text:span><text:span text:style-name="_3c_C_3e_"><text:span text:style-name="T203">!()</text:span></text:span></text:h>
      <text:p text:style-name="P131"><text:span text:style-name="_2f__2f_C"><text:span text:style-name="T213">No imprime nada en pantalla por si solo. Escribe en variables, archivos o red.</text:span></text:span></text:p>
      <text:p text:style-name="P131"><text:span text:style-name="_2f__2f_C"><text:span text:style-name="T213">1. Como ostringstream de c++. Escribir a un String:</text:span></text:span></text:p>
      <text:p text:style-name="P131"><text:span text:style-name="_2f__2f_C"><text:span text:style-name="T213"><text:tab/></text:span></text:span><text:span text:style-name="_3c_C_2b__2b__3e_"><text:span text:style-name="T14">use std::fmt::Write;</text:span></text:span><text:span text:style-name="_3c_C_3e_"><text:span text:style-name="T175"> </text:span></text:span><text:span text:style-name="_2f__2f_C"><text:span text:style-name="T175">//Obligatorio para escribir en Strings</text:span></text:span></text:p>
      <text:p text:style-name="P131"><text:span text:style-name="_3c_C_3e_"><text:span text:style-name="T175"><text:tab/>fn main(){</text:span></text:span></text:p>
      <text:p text:style-name="P131"><text:span text:style-name="_3c_C_3e_"><text:span text:style-name="T175"><text:tab/><text:tab/></text:span></text:span><text:span text:style-name="_3c_C_2b__2b__3e_"><text:span text:style-name="T14">let mut buffer </text:span></text:span><text:span text:style-name="_3c_C_3e_"><text:span text:style-name="T175">= String::from(“”); </text:span></text:span><text:span text:style-name="_2f__2f_C"><text:span text:style-name="T175">//aunque sea vacio ya existe.</text:span></text:span></text:p>
      <text:p text:style-name="P131"><text:span text:style-name="_3c_C_3e_"><text:span text:style-name="T175"><text:tab/><text:tab/></text:span></text:span><text:span text:style-name="_3c_C_2b__2b__3e_"><text:span text:style-name="T14">write!(&amp;mut buffer, “paso {}, <text:s/>paso{}.”, 1, 2).unwrap();</text:span></text:span><text:span text:style-name="_2f__2f_C"><text:span text:style-name="T175">//Devuelve un Result asi que<text:tab/><text:tab/><text:tab/><text:tab/>unwrap() para desempaquetarlo</text:span></text:span></text:p>
      <text:p text:style-name="P131"><text:span text:style-name="_3c_C_3e_"><text:span text:style-name="T175"><text:tab/><text:tab/>println(“{}”, buffer); </text:span></text:span><text:span text:style-name="_2f__2f_C"><text:span text:style-name="T175">//imprimirá “paso 1, paso 2.”</text:span></text:span></text:p>
      <text:p text:style-name="P131"><text:span text:style-name="_3c_C_3e_"><text:span text:style-name="T175"><text:tab/>}</text:span></text:span></text:p>
      <text:p text:style-name="P132"><text:span text:style-name="_2f__2f_C"><text:span text:style-name="T214">2</text:span></text:span><text:span text:style-name="_2f__2f_C"><text:span text:style-name="T213">. </text:span></text:span><text:span text:style-name="_2f__2f_C"><text:span text:style-name="T214">Escribir en un Archivo:</text:span></text:span></text:p>
      <text:p text:style-name="P132"><text:span text:style-name="_3c_C_3e_"><text:span text:style-name="T175"><text:tab/></text:span></text:span><text:span text:style-name="_3c_C_2b__2b__3e_"><text:span text:style-name="T14">use std::fs::File;</text:span></text:span></text:p>
      <text:p text:style-name="P132"><text:span text:style-name="_3c_C_3e_"><text:span text:style-name="T175"><text:tab/></text:span></text:span><text:span text:style-name="_3c_C_2b__2b__3e_"><text:span text:style-name="T14">use std::io::Write as IoWrite;</text:span></text:span><text:span text:style-name="_3c_C_3e_"><text:span text:style-name="T175"> </text:span></text:span><text:span text:style-name="_2f__2f_C"><text:span text:style-name="T175">//obligatorio para escribir en archivos/sockets</text:span></text:span></text:p>
      <text:p text:style-name="P132"><text:span text:style-name="_3c_C_3e_"><text:span text:style-name="T175"><text:tab/>fn funcion(){</text:span></text:span></text:p>
      <text:p text:style-name="P132"><text:span text:style-name="_3c_C_3e_"><text:span text:style-name="T175"><text:tab/><text:tab/></text:span></text:span><text:span text:style-name="_2f__2f_C"><text:span text:style-name="T175">//creamos el archivo en el disco duro</text:span></text:span></text:p>
      <text:p text:style-name="P132"><text:span text:style-name="_3c_C_3e_"><text:span text:style-name="T175"><text:tab/><text:tab/>let mut archivo =</text:span></text:span><text:span text:style-name="_3c_C_2b__2b__3e_"><text:span text:style-name="T14"> </text:span></text:span><text:a xlink:type="simple" xlink:href="file:///:create" text:style-name="Internet_20_link" text:visited-style-name="Visited_20_Internet_20_Link"><text:span text:style-name="_3c_C_2b__2b__3e_"><text:span text:style-name="T215">File::create</text:span></text:span></text:a><text:span text:style-name="_3c_C_3e_"><text:span text:style-name="T175">(“log.txt”).unwrap(); </text:span></text:span><text:span text:style-name="_2f__2f_C"><text:span text:style-name="T175">//unwrap ya q</text:span></text:span><text:span text:style-name="_2f__2f_C"><text:span text:style-name="T216">ue</text:span></text:span><text:span text:style-name="_2f__2f_C"><text:span text:style-name="T175"> es un result.</text:span></text:span></text:p>
      <text:p text:style-name="P132"><text:soft-page-break/><text:span text:style-name="_3c_C_3e_"><text:span text:style-name="T175"><text:tab/><text:tab/></text:span></text:span><text:span text:style-name="_2f__2f_C"><text:span text:style-name="T175">//</text:span></text:span><text:span text:style-name="_2f__2f_C"><text:span text:style-name="T216">mete directamente el texto en el archivo. No en pantalla</text:span></text:span></text:p>
      <text:p text:style-name="P132"><text:span text:style-name="_3c_C_3e_"><text:span text:style-name="T175"><text:tab/><text:tab/></text:span></text:span><text:span text:style-name="_3c_C_2b__2b__3e_"><text:span text:style-name="T14">write!(&amp;mut archivo, “Error crítico en el año {}, 2026).unwrap();</text:span></text:span></text:p>
      <text:p text:style-name="P132"><text:span text:style-name="_3c_C_3e_"><text:span text:style-name="T175"><text:tab/>}</text:span></text:span></text:p>
      <text:p text:style-name="P131"><text:span text:style-name="_3c_C_3e_"><text:span text:style-name="T175"/></text:span></text:p>
      <text:h text:style-name="P133" text:outline-level="3"><text:span text:style-name="_3c_C_3e_"><text:span text:style-name="T217">panic!</text:span></text:span><text:span text:style-name="_3c_C_3e_"><text:span text:style-name="T218">()</text:span></text:span></text:h>
      <text:p text:style-name="P134"><text:span text:style-name="_2f__2f_C"><text:span text:style-name="T219">Ya tratado más arriba en los apuntes.</text:span></text:span></text:p>
      <text:p text:style-name="P131"><text:span text:style-name="_3c_C_3e_"><text:span text:style-name="T175"/></text:span></text:p>
      <text:h text:style-name="P135" text:outline-level="3"><text:span text:style-name="_3c_C_3e_"><text:span text:style-name="T218">todo</text:span></text:span><text:span text:style-name="_3c_C_3e_"><text:span text:style-name="T217">!</text:span></text:span><text:span text:style-name="_3c_C_3e_"><text:span text:style-name="T218">()</text:span></text:span></text:h>
      <text:p text:style-name="P136"><text:span text:style-name="_2f__2f_C"><text:span text:style-name="T220">Sirve para indicarnos que debemos hacer algo en una función o lo que sea. Saltará un Panic!() cuando llegue.</text:span></text:span></text:p>
      <text:p text:style-name="P136"><text:span text:style-name="_2f__2f_C"><text:span text:style-name="T220"/></text:span></text:p>
      <text:h text:style-name="P137" text:outline-level="3"><text:span text:style-name="_3c_C_3e_"><text:span text:style-name="T217">unre</text:span></text:span><text:span text:style-name="_3c_C_3e_"><text:span text:style-name="T221">achable</text:span></text:span><text:span text:style-name="_3c_C_3e_"><text:span text:style-name="T217">!</text:span></text:span><text:span text:style-name="_3c_C_3e_"><text:span text:style-name="T218">()</text:span></text:span></text:h>
      <text:p text:style-name="P138"><text:span text:style-name="_2f__2f_C"><text:span text:style-name="T222">Cuando estemos 100% seguro de que el flujo del programa nunca debería llegar a ese punto. Si por algún motivo llegase, lanzará un panic:</text:span></text:span></text:p>
      <text:p text:style-name="P138"><text:span text:style-name="_3c_C_3e_"><text:span text:style-name="T175">let semaforo = “azul”;</text:span></text:span></text:p>
      <text:p text:style-name="P138"><text:span text:style-name="_3c_C_3e_"><text:span text:style-name="T175">match semaforo {</text:span></text:span></text:p>
      <text:p text:style-name="P138"><text:span text:style-name="_3c_C_3e_"><text:span text:style-name="T175"><text:tab/>“verde” =&gt; avanzar();</text:span></text:span></text:p>
      <text:p text:style-name="P138"><text:span text:style-name="_3c_C_3e_"><text:span text:style-name="T175"><text:tab/>“rojo” =&gt; detener();</text:span></text:span></text:p>
      <text:p text:style-name="P138"><text:span text:style-name="_3c_C_3e_"><text:span text:style-name="T175"><text:tab/>_ =&gt; </text:span></text:span><text:span text:style-name="_3c_C_2b__2b__3e_"><text:span text:style-name="T14">unreachable!();</text:span></text:span><text:span text:style-name="_3c_C_3e_"><text:span text:style-name="T175"> </text:span></text:span><text:span text:style-name="_2f__2f_C"><text:span text:style-name="T175">//como es azul hará panic!()</text:span></text:span></text:p>
      <text:p text:style-name="P138"><text:span text:style-name="_3c_C_3e_"><text:span text:style-name="T175">}</text:span></text:span></text:p>
      <text:p text:style-name="P136"><text:span text:style-name="_3c_C_3e_"><text:span text:style-name="T175"/></text:span></text:p>
      <text:h text:style-name="P137" text:outline-level="3"><text:span text:style-name="_3c_C_3e_"><text:span text:style-name="T221">unimplemented</text:span></text:span><text:span text:style-name="_3c_C_3e_"><text:span text:style-name="T217">!</text:span></text:span><text:span text:style-name="_3c_C_3e_"><text:span text:style-name="T218">()</text:span></text:span></text:h>
      <text:p text:style-name="P138"><text:span text:style-name="_2f__2f_C"><text:span text:style-name="T222">Cuando no tenemos intención de programar esa parte de código:</text:span></text:span></text:p>
      <text:p text:style-name="P138"><text:span text:style-name="_3c_C_3e_"><text:span text:style-name="T175">fn pagar_con_cheque(){</text:span></text:span></text:p>
      <text:p text:style-name="P138"><text:span text:style-name="_3c_C_3e_"><text:span text:style-name="T175"><text:tab/></text:span></text:span><text:span text:style-name="_3c_C_2b__2b__3e_"><text:span text:style-name="T14">unimplemented!();</text:span></text:span><text:span text:style-name="_3c_C_3e_"><text:span text:style-name="T175"> </text:span></text:span><text:span text:style-name="_2f__2f_C"><text:span text:style-name="T175">//el programa no soporta cheques. Si se llama panic()!</text:span></text:span></text:p>
      <text:p text:style-name="P138"><text:span text:style-name="_3c_C_3e_"><text:span text:style-name="T175">}</text:span></text:span></text:p>
      <text:p text:style-name="P136"><text:span text:style-name="_3c_C_3e_"><text:span text:style-name="T175"/></text:span></text:p>
      <text:h text:style-name="P139" text:outline-level="3"><text:span text:style-name="_3c_C_3e_"><text:span text:style-name="T223">assert_eq</text:span></text:span><text:span text:style-name="_3c_C_3e_"><text:span text:style-name="T203">!(</text:span></text:span><text:span text:style-name="_3c_C_3e_"><text:span text:style-name="T223">valor a, valor b</text:span></text:span><text:span text:style-name="_3c_C_3e_"><text:span text:style-name="T203">)</text:span></text:span></text:h>
      <text:p text:style-name="P140"><text:span text:style-name="_2f__2f_C"><text:span text:style-name="T224">Sirve para comprobar que dos valores son exactamente iguales. Si lo son, el programa continua en silencio. Si no, se produce un </text:span></text:span><text:span text:style-name="_3c_C_2b__2b__3e_"><text:span text:style-name="T14">panic!</text:span></text:span></text:p>
      <text:p text:style-name="P140"><text:span text:style-name="_3c_C_3e_"><text:span text:style-name="T175">fn sumar(a: i32, b: i32) - &gt; i32{ a + b }</text:span></text:span></text:p>
      <text:p text:style-name="P140"><text:span text:style-name="_3c_C_3e_"><text:span text:style-name="T175">fn main() {</text:span></text:span></text:p>
      <text:p text:style-name="P140"><text:span text:style-name="_3c_C_3e_"><text:span text:style-name="T175"><text:tab/>let resultado = sumar(2, 2);</text:span></text:span></text:p>
      <text:p text:style-name="P140"><text:span text:style-name="_3c_C_3e_"><text:span text:style-name="T175"><text:tab/></text:span></text:span><text:span text:style-name="_3c_C_2b__2b__3e_"><text:span text:style-name="T14">assert_eq!(resultado, 4);</text:span></text:span><text:span text:style-name="_3c_C_3e_"><text:span text:style-name="T175"> </text:span></text:span><text:span text:style-name="_2f__2f_C"><text:span text:style-name="T175">//pasará en silencio</text:span></text:span></text:p>
      <text:p text:style-name="P140"><text:soft-page-break/><text:span text:style-name="_3c_C_3e_"><text:span text:style-name="T175"><text:tab/></text:span></text:span><text:span text:style-name="_3c_C_2b__2b__3e_"><text:span text:style-name="T14">assert_eq!(resultado, 5, “Error: el resultado real deberia ser {}, resultado);</text:span></text:span><text:span text:style-name="_3c_C_3e_"><text:span text:style-name="T175"> </text:span></text:span><text:span text:style-name="_2f__2f_C"><text:span text:style-name="T175">//panic! <text:tab/>se <text:tab/>puede poner con o sin mensaje de error que saltará en el panic!</text:span></text:span></text:p>
      <text:p text:style-name="P140"><text:span text:style-name="_3c_C_3e_"><text:span text:style-name="T175">}</text:span></text:span></text:p>
      <text:p text:style-name="P140"><text:span text:style-name="_2f__2f_C"><text:span text:style-name="T224">Cuando tenemos un tipo propio como un </text:span></text:span><text:span text:style-name="_3c_C_3e_"><text:span text:style-name="T175">Struct</text:span></text:span><text:span text:style-name="_2f__2f_C"><text:span text:style-name="T224"> debemos añadirle al </text:span></text:span><text:span text:style-name="_3c_C_3e_"><text:span text:style-name="T175">Struct</text:span></text:span><text:span text:style-name="_2f__2f_C"><text:span text:style-name="T224">, </text:span></text:span><text:span text:style-name="_3c_C_3e_"><text:span text:style-name="T175">Enum</text:span></text:span><text:span text:style-name="_2f__2f_C"><text:span text:style-name="T224"> o lo que sea un </text:span></text:span><text:span text:style-name="_3c_C_2b__2b__3e_"><text:span text:style-name="T14">#[derive(PartialEq, Debug)]</text:span></text:span><text:span text:style-name="_2f__2f_C"><text:span text:style-name="T224">, para que pueda hacer sus comprobacion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6-07-17T14:16:46.954037900</dc:date>
    <meta:editing-duration>P3DT9H26M18S</meta:editing-duration>
    <meta:editing-cycles>510</meta:editing-cycles>
    <meta:generator>LibreOffice/25.2.7.2$Windows_X86_64 LibreOffice_project/5cbfd1ab6520636bb5f7b99185aa69bd7456825d</meta:generator>
    <meta:print-date>2025-01-04T16:07:11.302000000</meta:print-date>
    <meta:printed-by>Archivos PDF</meta:printed-by>
    <meta:document-statistic meta:table-count="0" meta:image-count="0" meta:object-count="0" meta:page-count="28" meta:paragraph-count="702" meta:word-count="6231" meta:character-count="35592" meta:non-whitespace-character-count="29532"/>
  </office:meta>
</office:document-meta>
</file>