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29bac5"/>
    </style:style>
    <style:style style:name="P67" style:family="paragraph" style:parent-style-name="Text_20_body">
      <style:paragraph-properties fo:line-height="100%"/>
      <style:text-properties fo:color="#00a933" loext:opacity="100%" style:font-name="Arial1" officeooo:rsid="0017c700" officeooo:paragraph-rsid="0243785a"/>
    </style:style>
    <style:style style:name="P68" style:family="paragraph" style:parent-style-name="Text_20_body">
      <style:paragraph-properties fo:line-height="100%"/>
      <style:text-properties fo:color="#00a933" loext:opacity="100%" style:font-name="Arial1" officeooo:rsid="0017c700" officeooo:paragraph-rsid="0244af53"/>
    </style:style>
    <style:style style:name="P69" style:family="paragraph" style:parent-style-name="Text_20_body">
      <style:paragraph-properties fo:line-height="100%"/>
      <style:text-properties fo:color="#00a933" loext:opacity="100%" style:font-name="Arial1" officeooo:rsid="0017c700" officeooo:paragraph-rsid="026010dc"/>
    </style:style>
    <style:style style:name="P70" style:family="paragraph" style:parent-style-name="Text_20_body">
      <style:paragraph-properties fo:line-height="100%"/>
      <style:text-properties fo:color="#00a933" loext:opacity="100%" style:font-name="Arial1" officeooo:rsid="0017c700" officeooo:paragraph-rsid="02611b1c"/>
    </style:style>
    <style:style style:name="P71" style:family="paragraph" style:parent-style-name="Text_20_body">
      <style:paragraph-properties fo:line-height="100%"/>
      <style:text-properties fo:color="#00a933" loext:opacity="100%" style:font-name="Arial1" officeooo:rsid="0017c700" officeooo:paragraph-rsid="0262cfc4"/>
    </style:style>
    <style:style style:name="P72" style:family="paragraph" style:parent-style-name="Text_20_body">
      <style:paragraph-properties fo:line-height="100%"/>
      <style:text-properties fo:color="#00a933" loext:opacity="100%" style:font-name="Arial1" officeooo:rsid="0017c700" officeooo:paragraph-rsid="0263ef18"/>
    </style:style>
    <style:style style:name="P73" style:family="paragraph" style:parent-style-name="Text_20_body">
      <style:paragraph-properties fo:line-height="100%"/>
      <style:text-properties fo:color="#00a933" loext:opacity="100%" style:font-name="Arial1" officeooo:rsid="0017c700" officeooo:paragraph-rsid="02655e58"/>
    </style:style>
    <style:style style:name="P74" style:family="paragraph" style:parent-style-name="Text_20_body">
      <style:paragraph-properties fo:line-height="100%"/>
      <style:text-properties fo:color="#00a933" loext:opacity="100%" style:font-name="Arial1" officeooo:rsid="0017c700" officeooo:paragraph-rsid="0267ea92"/>
    </style:style>
    <style:style style:name="P75" style:family="paragraph" style:parent-style-name="Text_20_body">
      <style:paragraph-properties fo:line-height="100%"/>
      <style:text-properties fo:color="#00a933" loext:opacity="100%" style:font-name="Arial1" officeooo:rsid="0017c700" officeooo:paragraph-rsid="0265f0df"/>
    </style:style>
    <style:style style:name="P76" style:family="paragraph" style:parent-style-name="Text_20_body">
      <style:paragraph-properties fo:line-height="100%"/>
      <style:text-properties fo:color="#00a933" loext:opacity="100%" style:font-name="Arial1" officeooo:rsid="0017c700" officeooo:paragraph-rsid="026b6d9d"/>
    </style:style>
    <style:style style:name="P77" style:family="paragraph" style:parent-style-name="Text_20_body">
      <style:paragraph-properties fo:line-height="100%"/>
      <style:text-properties fo:color="#00a933" loext:opacity="100%" style:font-name="Arial1" officeooo:rsid="0017c700" officeooo:paragraph-rsid="026cad15"/>
    </style:style>
    <style:style style:name="P78" style:family="paragraph" style:parent-style-name="Text_20_body">
      <style:paragraph-properties fo:line-height="100%"/>
      <style:text-properties fo:color="#00a933" loext:opacity="100%" style:font-name="Arial1" officeooo:rsid="0017c700" officeooo:paragraph-rsid="026ce633"/>
    </style:style>
    <style:style style:name="P79" style:family="paragraph" style:parent-style-name="Text_20_body">
      <style:paragraph-properties fo:line-height="100%"/>
      <style:text-properties fo:color="#00a933" loext:opacity="100%" style:font-name="Arial1" officeooo:rsid="0017c700" officeooo:paragraph-rsid="0273bc6d"/>
    </style:style>
    <style:style style:name="P80" style:family="paragraph" style:parent-style-name="Text_20_body">
      <style:paragraph-properties fo:line-height="100%"/>
      <style:text-properties fo:color="#00a933" loext:opacity="100%" style:font-name="Arial1" officeooo:rsid="0017c700" officeooo:paragraph-rsid="0275a1db"/>
    </style:style>
    <style:style style:name="P81" style:family="paragraph" style:parent-style-name="Text_20_body">
      <style:paragraph-properties fo:line-height="100%"/>
      <style:text-properties fo:color="#00a933" loext:opacity="100%" style:font-name="Arial1" officeooo:rsid="0017c700" officeooo:paragraph-rsid="02773f73"/>
    </style:style>
    <style:style style:name="P82" style:family="paragraph" style:parent-style-name="Text_20_body">
      <style:paragraph-properties fo:line-height="100%"/>
      <style:text-properties fo:color="#00a933" loext:opacity="100%" style:font-name="Arial1" officeooo:rsid="0017c700" officeooo:paragraph-rsid="0278fc4b"/>
    </style:style>
    <style:style style:name="P83" style:family="paragraph" style:parent-style-name="Text_20_body">
      <style:paragraph-properties fo:line-height="100%"/>
      <style:text-properties fo:color="#00a933" loext:opacity="100%" style:font-name="Arial1" officeooo:rsid="0017c700" officeooo:paragraph-rsid="0279eff7"/>
    </style:style>
    <style:style style:name="P84" style:family="paragraph" style:parent-style-name="Text_20_body">
      <style:paragraph-properties fo:line-height="100%"/>
      <style:text-properties fo:color="#00a933" loext:opacity="100%" style:font-name="Arial1" officeooo:rsid="0017c700" officeooo:paragraph-rsid="027aa592"/>
    </style:style>
    <style:style style:name="P85" style:family="paragraph" style:parent-style-name="Text_20_body">
      <style:paragraph-properties fo:line-height="100%"/>
      <style:text-properties fo:color="#00a933" loext:opacity="100%" style:font-name="Arial1" officeooo:rsid="0017c700" officeooo:paragraph-rsid="027a9c47"/>
    </style:style>
    <style:style style:name="P86" style:family="paragraph" style:parent-style-name="Text_20_body">
      <style:paragraph-properties fo:line-height="100%"/>
      <style:text-properties fo:color="#00a933" loext:opacity="100%" style:font-name="Arial1" officeooo:rsid="0017c700" officeooo:paragraph-rsid="027bc442"/>
    </style:style>
    <style:style style:name="P87" style:family="paragraph" style:parent-style-name="Text_20_body">
      <style:paragraph-properties fo:line-height="100%"/>
      <style:text-properties fo:color="#00a933" loext:opacity="100%" style:font-name="Arial1" officeooo:rsid="0017c700" officeooo:paragraph-rsid="027d4a81"/>
    </style:style>
    <style:style style:name="P88" style:family="paragraph" style:parent-style-name="Text_20_body">
      <style:paragraph-properties fo:line-height="100%"/>
      <style:text-properties fo:color="#00a933" loext:opacity="100%" style:font-name="Arial1" officeooo:rsid="0017c700" officeooo:paragraph-rsid="0280f154"/>
    </style:style>
    <style:style style:name="P89" style:family="paragraph" style:parent-style-name="Text_20_body">
      <style:paragraph-properties fo:line-height="100%"/>
      <style:text-properties fo:color="#00a933" loext:opacity="100%" style:font-name="Arial1" officeooo:rsid="0017c700" officeooo:paragraph-rsid="02812038"/>
    </style:style>
    <style:style style:name="P90" style:family="paragraph" style:parent-style-name="Text_20_body">
      <style:paragraph-properties fo:line-height="100%"/>
      <style:text-properties fo:color="#00a933" loext:opacity="100%" style:font-name="Arial1" officeooo:rsid="0017c700" officeooo:paragraph-rsid="0282fb75"/>
    </style:style>
    <style:style style:name="P91" style:family="paragraph" style:parent-style-name="Text_20_body">
      <style:paragraph-properties fo:line-height="100%"/>
      <style:text-properties fo:color="#00a933" loext:opacity="100%" style:font-name="Arial1" officeooo:rsid="0017c700" officeooo:paragraph-rsid="02801787"/>
    </style:style>
    <style:style style:name="P92" style:family="paragraph" style:parent-style-name="Text_20_body">
      <style:paragraph-properties fo:line-height="100%"/>
      <style:text-properties fo:color="#00a933" loext:opacity="100%" style:font-name="Arial1" officeooo:rsid="0017c700" officeooo:paragraph-rsid="028d046c"/>
    </style:style>
    <style:style style:name="P93" style:family="paragraph" style:parent-style-name="Text_20_body">
      <style:paragraph-properties fo:line-height="100%"/>
      <style:text-properties fo:color="#00a933" loext:opacity="100%" style:font-name="Arial1" officeooo:rsid="0017c700" officeooo:paragraph-rsid="028d0dce"/>
    </style:style>
    <style:style style:name="P94" style:family="paragraph" style:parent-style-name="Text_20_body">
      <style:paragraph-properties fo:line-height="100%"/>
      <style:text-properties fo:color="#00a933" loext:opacity="100%" style:font-name="Arial1" officeooo:rsid="0017c700" officeooo:paragraph-rsid="028dbff8"/>
    </style:style>
    <style:style style:name="P95" style:family="paragraph" style:parent-style-name="Text_20_body">
      <style:paragraph-properties fo:line-height="100%"/>
      <style:text-properties fo:color="#00a933" loext:opacity="100%" style:font-name="Arial1" officeooo:rsid="0017c700" officeooo:paragraph-rsid="0290d99a"/>
    </style:style>
    <style:style style:name="P96" style:family="paragraph" style:parent-style-name="Text_20_body">
      <style:paragraph-properties fo:line-height="100%"/>
      <style:text-properties fo:color="#00a933" loext:opacity="100%" style:font-name="Arial1" officeooo:rsid="0017c700" officeooo:paragraph-rsid="0291f76f"/>
    </style:style>
    <style:style style:name="P97" style:family="paragraph" style:parent-style-name="Text_20_body">
      <style:paragraph-properties fo:line-height="100%"/>
      <style:text-properties fo:color="#00a933" loext:opacity="100%" style:font-name="Arial1" officeooo:rsid="0017c700" officeooo:paragraph-rsid="029371c6"/>
    </style:style>
    <style:style style:name="P98" style:family="paragraph" style:parent-style-name="Text_20_body">
      <style:paragraph-properties fo:line-height="100%"/>
      <style:text-properties fo:color="#00a933" loext:opacity="100%" style:font-name="Arial1" officeooo:rsid="0017c700" officeooo:paragraph-rsid="0294937b"/>
    </style:style>
    <style:style style:name="P99" style:family="paragraph" style:parent-style-name="Text_20_body">
      <style:paragraph-properties fo:line-height="100%"/>
      <style:text-properties fo:color="#00a933" loext:opacity="100%" style:font-name="Arial1" officeooo:rsid="0017c700" officeooo:paragraph-rsid="029a911a"/>
    </style:style>
    <style:style style:name="P100" style:family="paragraph" style:parent-style-name="Text_20_body">
      <style:paragraph-properties fo:line-height="100%"/>
      <style:text-properties fo:color="#00a933" loext:opacity="100%" style:font-name="Arial1" officeooo:rsid="0017c700" officeooo:paragraph-rsid="029b81bf"/>
    </style:style>
    <style:style style:name="P101" style:family="paragraph" style:parent-style-name="Text_20_body">
      <style:paragraph-properties fo:line-height="100%"/>
      <style:text-properties fo:color="#00a933" loext:opacity="100%" style:font-name="Arial1" officeooo:rsid="0017c700" officeooo:paragraph-rsid="029cb498"/>
    </style:style>
    <style:style style:name="P102" style:family="paragraph" style:parent-style-name="Text_20_body">
      <style:paragraph-properties fo:line-height="100%"/>
      <style:text-properties fo:color="#00a933" loext:opacity="100%" style:font-name="Arial1" officeooo:rsid="0017c700" officeooo:paragraph-rsid="029da60a"/>
    </style:style>
    <style:style style:name="P103"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04" style:family="paragraph" style:parent-style-name="Text_20_body">
      <style:paragraph-properties fo:line-height="100%"/>
      <style:text-properties fo:color="#00a933" loext:opacity="100%" style:font-name="Arial1" style:text-underline-style="none" officeooo:rsid="0017c700" officeooo:paragraph-rsid="02a494f3"/>
    </style:style>
    <style:style style:name="P105"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106"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107" style:family="paragraph" style:parent-style-name="Text_20_body">
      <style:paragraph-properties fo:line-height="100%"/>
      <style:text-properties fo:color="#00a933" loext:opacity="100%" style:font-name="Arial1" style:text-underline-style="none" officeooo:rsid="0226a567" officeooo:paragraph-rsid="028d046c"/>
    </style:style>
    <style:style style:name="P108" style:family="paragraph" style:parent-style-name="Text_20_body">
      <style:paragraph-properties fo:line-height="100%"/>
      <style:text-properties fo:color="#00a933" loext:opacity="100%" style:font-name="Arial1" officeooo:paragraph-rsid="026fe807"/>
    </style:style>
    <style:style style:name="P109" style:family="paragraph" style:parent-style-name="Text_20_body">
      <style:paragraph-properties fo:line-height="100%"/>
      <style:text-properties fo:color="#00a933" loext:opacity="100%" style:font-name="Arial1" officeooo:paragraph-rsid="0275a1db"/>
    </style:style>
    <style:style style:name="P110"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94937b" fo:background-color="#1f1f1f"/>
    </style:style>
    <style:style style:name="P111"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2"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13"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14"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15"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16"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17" style:family="paragraph" style:parent-style-name="Text_20_body">
      <style:paragraph-properties fo:line-height="100%"/>
      <style:text-properties officeooo:rsid="0216a37b" officeooo:paragraph-rsid="0216a37b"/>
    </style:style>
    <style:style style:name="P118" style:family="paragraph" style:parent-style-name="Text_20_body">
      <style:paragraph-properties fo:line-height="100%"/>
      <style:text-properties officeooo:rsid="0216a37b" officeooo:paragraph-rsid="0216c522"/>
    </style:style>
    <style:style style:name="P119" style:family="paragraph" style:parent-style-name="Text_20_body">
      <style:paragraph-properties fo:line-height="100%"/>
      <style:text-properties officeooo:rsid="0216a37b" officeooo:paragraph-rsid="02171d48"/>
    </style:style>
    <style:style style:name="P120" style:family="paragraph" style:parent-style-name="Text_20_body">
      <style:paragraph-properties fo:line-height="100%"/>
      <style:text-properties officeooo:paragraph-rsid="024defaf"/>
    </style:style>
    <style:style style:name="P121" style:family="paragraph" style:parent-style-name="Text_20_body">
      <style:paragraph-properties fo:margin-top="0cm" fo:margin-bottom="0.499cm" style:contextual-spacing="false" fo:line-height="100%" fo:text-align="start" style:justify-single-word="false"/>
      <style:text-properties officeooo:paragraph-rsid="0294937b"/>
    </style:style>
    <style:style style:name="P122" style:family="paragraph" style:parent-style-name="Text_20_body">
      <style:paragraph-properties fo:margin-top="0cm" fo:margin-bottom="0.499cm" style:contextual-spacing="false" fo:line-height="100%" fo:text-align="start" style:justify-single-word="false"/>
      <style:text-properties officeooo:paragraph-rsid="02956b30"/>
    </style:style>
    <style:style style:name="P123" style:family="paragraph" style:parent-style-name="Text_20_body">
      <style:paragraph-properties fo:margin-top="0cm" fo:margin-bottom="0.499cm" style:contextual-spacing="false" fo:line-height="100%" fo:text-align="start" style:justify-single-word="false"/>
      <style:text-properties officeooo:paragraph-rsid="02973e57"/>
    </style:style>
    <style:style style:name="P124" style:family="paragraph" style:parent-style-name="Text_20_body">
      <style:paragraph-properties fo:margin-top="0cm" fo:margin-bottom="0.499cm" style:contextual-spacing="false" fo:line-height="100%" fo:text-align="start" style:justify-single-word="false"/>
      <style:text-properties officeooo:paragraph-rsid="0298cc30"/>
    </style:style>
    <style:style style:name="P125" style:family="paragraph" style:parent-style-name="Text_20_body">
      <style:paragraph-properties fo:margin-top="0cm" fo:margin-bottom="0.499cm" style:contextual-spacing="false" fo:line-height="100%" fo:text-align="start" style:justify-single-word="false"/>
      <style:text-properties officeooo:paragraph-rsid="029a911a"/>
    </style:style>
    <style:style style:name="P126" style:family="paragraph" style:parent-style-name="Text_20_body">
      <style:paragraph-properties fo:margin-top="0cm" fo:margin-bottom="0.499cm" style:contextual-spacing="false" fo:line-height="100%" fo:text-align="start" style:justify-single-word="false"/>
      <style:text-properties officeooo:paragraph-rsid="02a29933"/>
    </style:style>
    <style:style style:name="P127"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1" fo:font-size="13.5pt" fo:font-weight="normal" officeooo:rsid="011482c8" officeooo:paragraph-rsid="0294937b" fo:background-color="#1f1f1f"/>
    </style:style>
    <style:style style:name="P128" style:family="paragraph" style:parent-style-name="Text_20_body">
      <style:paragraph-properties fo:margin-top="0cm" fo:margin-bottom="0.499cm" style:contextual-spacing="false" fo:line-height="100%" fo:text-align="start" style:justify-single-word="false"/>
      <style:text-properties officeooo:rsid="0017c700" officeooo:paragraph-rsid="0294937b"/>
    </style:style>
    <style:style style:name="P12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73e57" fo:background-color="#121314"/>
    </style:style>
    <style:style style:name="P13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8cc30" fo:background-color="#121314"/>
    </style:style>
    <style:style style:name="P131"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93d6c" fo:background-color="#121314"/>
    </style:style>
    <style:style style:name="P132"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a911a" fo:background-color="#121314"/>
    </style:style>
    <style:style style:name="P133"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b81bf" fo:background-color="#121314"/>
    </style:style>
    <style:style style:name="P134"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da60a" fo:background-color="#121314"/>
    </style:style>
    <style:style style:name="P135"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02579" fo:background-color="#121314"/>
    </style:style>
    <style:style style:name="P136"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177ba" fo:background-color="#121314"/>
    </style:style>
    <style:style style:name="P137"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38"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39" style:family="paragraph" style:parent-style-name="Heading_20_3">
      <style:paragraph-properties fo:line-height="100%"/>
      <style:text-properties fo:color="#ffffff" loext:opacity="100%" style:font-name="Arial1" style:text-underline-style="none" officeooo:rsid="02a494f3" officeooo:paragraph-rsid="02a494f3"/>
    </style:style>
    <style:style style:name="P140"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41"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42" style:family="paragraph" style:parent-style-name="Heading_20_3">
      <style:paragraph-properties fo:line-height="100%"/>
      <style:text-properties style:text-underline-style="none" officeooo:rsid="020908b2" officeooo:paragraph-rsid="020908b2" fo:background-color="#bf0041"/>
    </style:style>
    <style:style style:name="P143"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44"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45"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46"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47"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48"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49"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50"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51"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52"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53"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54"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55"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56"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57"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58"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59"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60"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61"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6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6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64"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6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6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6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6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6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177ba" fo:background-color="#121314"/>
    </style:style>
    <style:style style:name="P17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56291" fo:background-color="#121314"/>
    </style:style>
    <style:style style:name="P171"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6060e" fo:background-color="#121314"/>
    </style:style>
    <style:style style:name="P172"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a56291" fo:background-color="#121314"/>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font-weight="normal" officeooo:rsid="029ea72c" fo:background-color="transparent" loext:char-shading-value="0"/>
    </style:style>
    <style:style style:name="T48" style:family="text">
      <style:text-properties style:text-underline-style="none" fo:background-color="transparent" loext:char-shading-value="0"/>
    </style:style>
    <style:style style:name="T49" style:family="text">
      <style:text-properties style:text-underline-style="none" officeooo:rsid="0234a03a" fo:background-color="transparent" loext:char-shading-value="0"/>
    </style:style>
    <style:style style:name="T50" style:family="text">
      <style:text-properties style:text-underline-style="none" officeooo:rsid="02530e64" fo:background-color="transparent" loext:char-shading-value="0"/>
    </style:style>
    <style:style style:name="T51" style:family="text">
      <style:text-properties style:text-underline-style="none" officeooo:rsid="024c2621" fo:background-color="transparent" loext:char-shading-value="0"/>
    </style:style>
    <style:style style:name="T52" style:family="text">
      <style:text-properties style:text-underline-style="none" officeooo:rsid="028981f5" fo:background-color="transparent" loext:char-shading-value="0"/>
    </style:style>
    <style:style style:name="T53" style:family="text">
      <style:text-properties style:text-underline-style="none" officeooo:rsid="023943ac" fo:background-color="transparent" loext:char-shading-value="0"/>
    </style:style>
    <style:style style:name="T54" style:family="text">
      <style:text-properties style:text-underline-style="none" officeooo:rsid="0236e83a" fo:background-color="transparent" loext:char-shading-value="0"/>
    </style:style>
    <style:style style:name="T55" style:family="text">
      <style:text-properties style:text-underline-style="none" officeooo:rsid="0244af53" fo:background-color="transparent" loext:char-shading-value="0"/>
    </style:style>
    <style:style style:name="T56" style:family="text">
      <style:text-properties style:text-underline-style="none" officeooo:rsid="02655e58" fo:background-color="transparent" loext:char-shading-value="0"/>
    </style:style>
    <style:style style:name="T57" style:family="text">
      <style:text-properties style:text-underline-style="none" officeooo:rsid="0279eff7" fo:background-color="transparent" loext:char-shading-value="0"/>
    </style:style>
    <style:style style:name="T58" style:family="text">
      <style:text-properties style:text-underline-style="none" officeooo:rsid="027aa592" fo:background-color="transparent" loext:char-shading-value="0"/>
    </style:style>
    <style:style style:name="T59" style:family="text">
      <style:text-properties style:text-underline-style="none" officeooo:rsid="029ea72c" fo:background-color="transparent" loext:char-shading-value="0"/>
    </style:style>
    <style:style style:name="T60" style:family="text">
      <style:text-properties style:text-underline-style="none" officeooo:rsid="02a29933" fo:background-color="transparent" loext:char-shading-value="0"/>
    </style:style>
    <style:style style:name="T61" style:family="text">
      <style:text-properties style:text-underline-style="none" officeooo:rsid="0216a37b"/>
    </style:style>
    <style:style style:name="T62" style:family="text">
      <style:text-properties fo:color="#ffffff" loext:opacity="100%" fo:font-size="12pt" officeooo:rsid="0207f6ae" fo:background-color="transparent" loext:char-shading-value="0" style:font-size-asian="12pt" style:font-size-complex="12pt"/>
    </style:style>
    <style:style style:name="T63" style:family="text">
      <style:text-properties fo:color="#ffffff" loext:opacity="100%" fo:font-size="12pt" officeooo:rsid="023c909b" fo:background-color="transparent" loext:char-shading-value="0" style:font-size-asian="12pt" style:font-size-complex="12pt"/>
    </style:style>
    <style:style style:name="T64" style:family="text">
      <style:text-properties fo:color="#ffffff" loext:opacity="100%" fo:font-size="12pt" officeooo:rsid="0207f6ae" style:font-size-asian="12pt" style:font-size-complex="12pt"/>
    </style:style>
    <style:style style:name="T65"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6"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67"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68"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69"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70"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71"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72"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3"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74"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5"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6"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77"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92"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3"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94"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5" style:family="text">
      <style:text-properties fo:color="#ffffff" loext:opacity="100%" fo:font-size="12pt" fo:font-weight="normal" officeooo:rsid="0235268e" fo:background-color="transparent" loext:char-shading-value="0" style:font-size-asian="12pt" style:font-size-complex="12pt"/>
    </style:style>
    <style:style style:name="T96" style:family="text">
      <style:text-properties fo:color="#ffffff" loext:opacity="100%" fo:font-size="12pt" fo:font-weight="normal" officeooo:rsid="020908b2" fo:background-color="transparent" loext:char-shading-value="0" style:font-size-asian="12pt" style:font-size-complex="12pt"/>
    </style:style>
    <style:style style:name="T97" style:family="text">
      <style:text-properties fo:color="#ffffff" loext:opacity="100%" fo:font-size="12pt" fo:font-weight="normal" officeooo:rsid="023aa484" fo:background-color="transparent" loext:char-shading-value="0" style:font-size-asian="12pt" style:font-size-complex="12pt"/>
    </style:style>
    <style:style style:name="T98" style:family="text">
      <style:text-properties fo:color="#ffffff" loext:opacity="100%" fo:font-size="12pt" fo:font-weight="normal" officeooo:rsid="023c909b" fo:background-color="transparent" loext:char-shading-value="0" style:font-size-asian="12pt" style:font-size-complex="12pt"/>
    </style:style>
    <style:style style:name="T99" style:family="text">
      <style:text-properties fo:color="#ffffff" loext:opacity="100%" fo:font-size="12pt" fo:font-weight="normal" officeooo:rsid="023d09dc" fo:background-color="transparent" loext:char-shading-value="0" style:font-size-asian="12pt" style:font-size-complex="12pt"/>
    </style:style>
    <style:style style:name="T100" style:family="text">
      <style:text-properties fo:color="#ffffff" loext:opacity="100%" fo:font-size="12pt" fo:font-weight="normal" officeooo:rsid="023ee483" fo:background-color="transparent" loext:char-shading-value="0" style:font-size-asian="12pt" style:font-size-complex="12pt"/>
    </style:style>
    <style:style style:name="T101" style:family="text">
      <style:text-properties fo:color="#ffffff" loext:opacity="100%" fo:font-size="12pt" fo:font-weight="normal" officeooo:rsid="024209b0" fo:background-color="transparent" loext:char-shading-value="0" style:font-size-asian="12pt" style:font-size-complex="12pt"/>
    </style:style>
    <style:style style:name="T102" style:family="text">
      <style:text-properties fo:color="#ffffff" loext:opacity="100%" fo:font-size="12pt" fo:font-weight="normal" officeooo:rsid="020bd315" fo:background-color="transparent" loext:char-shading-value="0" style:font-size-asian="12pt" style:font-size-complex="12pt"/>
    </style:style>
    <style:style style:name="T103" style:family="text">
      <style:text-properties fo:color="#ffffff" loext:opacity="100%" fo:font-size="12pt" fo:font-weight="normal" officeooo:rsid="020d2357" fo:background-color="transparent" loext:char-shading-value="0" style:font-size-asian="12pt" style:font-size-complex="12pt"/>
    </style:style>
    <style:style style:name="T104" style:family="text">
      <style:text-properties fo:color="#ffffff" loext:opacity="100%" fo:font-size="12pt" fo:font-weight="normal" officeooo:rsid="028d0dce" fo:background-color="transparent" loext:char-shading-value="0" style:font-size-asian="12pt" style:font-size-complex="12pt"/>
    </style:style>
    <style:style style:name="T105" style:family="text">
      <style:text-properties fo:color="#ffffff" loext:opacity="100%" fo:font-size="12pt" fo:font-weight="normal" officeooo:rsid="02a494f3" fo:background-color="transparent" loext:char-shading-value="0" style:font-size-asian="12pt" style:font-size-complex="12pt"/>
    </style:style>
    <style:style style:name="T106" style:family="text">
      <style:text-properties fo:color="#ffffff" loext:opacity="100%" style:font-name="Arial" fo:font-size="12pt" officeooo:rsid="0207f6ae" fo:background-color="transparent" loext:char-shading-value="0" style:font-size-asian="12pt" style:font-size-complex="12pt"/>
    </style:style>
    <style:style style:name="T107" style:family="text">
      <style:text-properties fo:color="#ffffff" loext:opacity="100%" style:font-name="Arial" fo:font-size="12pt" fo:font-weight="normal" officeooo:rsid="020908b2" fo:background-color="transparent" loext:char-shading-value="0" style:font-size-asian="12pt" style:font-size-complex="12pt"/>
    </style:style>
    <style:style style:name="T108" style:family="text">
      <style:text-properties fo:color="#ffffff" loext:opacity="100%" style:font-name="Arial" fo:font-size="12pt" fo:font-weight="normal" officeooo:rsid="02a494f3" fo:background-color="transparent" loext:char-shading-value="0" style:font-size-asian="12pt" style:font-size-complex="12pt"/>
    </style:style>
    <style:style style:name="T109"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10"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11"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12"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13" style:family="text">
      <style:text-properties fo:color="#ffffff" loext:opacity="100%" style:font-name="Arial" fo:font-size="14pt" style:text-underline-style="none" fo:font-weight="normal" officeooo:rsid="029cb498" fo:background-color="transparent" loext:char-shading-value="0" style:font-size-asian="14pt" style:font-size-complex="14pt"/>
    </style:style>
    <style:style style:name="T114" style:family="text">
      <style:text-properties fo:color="#ffffff" loext:opacity="100%" officeooo:rsid="0207f6ae"/>
    </style:style>
    <style:style style:name="T115"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2"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53" style:family="text">
      <style:text-properties fo:color="#ffffff" loext:opacity="100%" fo:font-size="14pt" style:text-underline-style="none" fo:font-weight="normal" officeooo:rsid="0291f76f" fo:background-color="transparent" loext:char-shading-value="0" style:font-size-asian="14pt" style:font-size-complex="14pt"/>
    </style:style>
    <style:style style:name="T154" style:family="text">
      <style:text-properties fo:color="#ffffff" loext:opacity="100%" fo:font-size="14pt" style:text-underline-style="none" fo:font-weight="normal" officeooo:rsid="029371c6" fo:background-color="transparent" loext:char-shading-value="0" style:font-size-asian="14pt" style:font-size-complex="14pt"/>
    </style:style>
    <style:style style:name="T155" style:family="text">
      <style:text-properties fo:color="#ffffff" loext:opacity="100%" fo:font-size="14pt" style:text-underline-style="none" fo:font-weight="normal" officeooo:rsid="0294937b" fo:background-color="transparent" loext:char-shading-value="0" style:font-size-asian="14pt" style:font-size-complex="14pt"/>
    </style:style>
    <style:style style:name="T156" style:family="text">
      <style:text-properties fo:color="#ffffff" loext:opacity="100%" fo:font-size="14pt" style:text-underline-style="none" fo:font-weight="normal" officeooo:rsid="029cb498" fo:background-color="transparent" loext:char-shading-value="0" style:font-size-asian="14pt" style:font-size-complex="14pt"/>
    </style:style>
    <style:style style:name="T157" style:family="text">
      <style:text-properties fo:color="#ffffff" loext:opacity="100%" fo:font-size="14pt" style:text-underline-style="none" fo:font-weight="normal" officeooo:rsid="024defaf" fo:background-color="#00a933" loext:char-shading-value="0" style:font-size-asian="14pt" style:font-size-complex="14pt"/>
    </style:style>
    <style:style style:name="T158" style:family="text">
      <style:text-properties fo:color="#ffffff" loext:opacity="100%" fo:font-size="14pt" style:text-underline-style="none" fo:font-weight="normal" officeooo:rsid="0228c36d" fo:background-color="#069a2e" loext:char-shading-value="0" style:font-size-asian="14pt" style:font-size-complex="14pt"/>
    </style:style>
    <style:style style:name="T159" style:family="text">
      <style:text-properties fo:color="#ffffff" loext:opacity="100%" fo:font-size="14pt" style:text-underline-style="none" fo:font-weight="normal" officeooo:rsid="028d046c" fo:background-color="#069a2e" loext:char-shading-value="0" style:font-size-asian="14pt" style:font-size-complex="14pt"/>
    </style:style>
    <style:style style:name="T160" style:family="text">
      <style:text-properties fo:color="#ffffff" loext:opacity="100%" fo:font-size="14pt" style:text-underline-style="none" fo:font-weight="normal" officeooo:rsid="0290d99a" fo:background-color="#069a2e" loext:char-shading-value="0" style:font-size-asian="14pt" style:font-size-complex="14pt"/>
    </style:style>
    <style:style style:name="T161" style:family="text">
      <style:text-properties fo:color="#ffffff" loext:opacity="100%" fo:font-size="14pt" fo:font-weight="normal" officeooo:rsid="020d2357" fo:background-color="transparent" loext:char-shading-value="0" style:font-size-asian="14pt" style:font-size-complex="14pt"/>
    </style:style>
    <style:style style:name="T162" style:family="text">
      <style:text-properties fo:color="#ffffff" loext:opacity="100%" fo:font-size="14pt" fo:font-weight="normal" officeooo:rsid="02113cfb" fo:background-color="transparent" loext:char-shading-value="0" style:font-size-asian="14pt" style:font-size-complex="14pt"/>
    </style:style>
    <style:style style:name="T163" style:family="text">
      <style:text-properties fo:color="#ffffff" loext:opacity="100%" fo:font-size="14pt" fo:font-weight="normal" officeooo:rsid="026e980c" fo:background-color="transparent" loext:char-shading-value="0" style:font-size-asian="14pt" style:font-size-complex="14pt"/>
    </style:style>
    <style:style style:name="T164" style:family="text">
      <style:text-properties fo:color="#ffffff" loext:opacity="100%" fo:font-size="14pt" fo:font-weight="normal" officeooo:rsid="026f46d2" fo:background-color="transparent" loext:char-shading-value="0" style:font-size-asian="14pt" style:font-size-complex="14pt"/>
    </style:style>
    <style:style style:name="T165" style:family="text">
      <style:text-properties fo:color="#ffffff" loext:opacity="100%" fo:font-size="14pt" fo:font-weight="normal" officeooo:rsid="026fe807" fo:background-color="transparent" loext:char-shading-value="0" style:font-size-asian="14pt" style:font-size-complex="14pt"/>
    </style:style>
    <style:style style:name="T166" style:family="text">
      <style:text-properties fo:color="#ffffff" loext:opacity="100%" fo:font-size="14pt" fo:font-weight="normal" officeooo:rsid="028d0dce" fo:background-color="transparent" loext:char-shading-value="0" style:font-size-asian="14pt" style:font-size-complex="14pt"/>
    </style:style>
    <style:style style:name="T167" style:family="text">
      <style:text-properties fo:color="#ffffff" loext:opacity="100%" fo:font-size="14pt" fo:font-weight="normal" officeooo:rsid="021c3799" style:font-size-asian="14pt" style:font-size-complex="14pt"/>
    </style:style>
    <style:style style:name="T168" style:family="text">
      <style:text-properties fo:color="#ffffff" loext:opacity="100%" fo:font-size="14pt" fo:font-weight="normal" officeooo:rsid="0257f2af" style:font-size-asian="14pt" style:font-size-complex="14pt"/>
    </style:style>
    <style:style style:name="T169" style:family="text">
      <style:text-properties fo:color="#ffffff" loext:opacity="100%" fo:font-size="14pt" fo:font-weight="normal" officeooo:rsid="025c4710" style:font-size-asian="14pt" style:font-size-complex="14pt"/>
    </style:style>
    <style:style style:name="T170" style:family="text">
      <style:text-properties fo:color="#ffffff" loext:opacity="100%" fo:font-size="14pt" fo:font-weight="normal" officeooo:rsid="026eb8ab" style:font-size-asian="14pt" style:font-size-complex="14pt"/>
    </style:style>
    <style:style style:name="T171" style:family="text">
      <style:text-properties fo:color="#ffffff" loext:opacity="100%" fo:font-size="14pt" fo:font-weight="normal" officeooo:rsid="0234a03a" style:font-size-asian="14pt" style:font-size-complex="14pt"/>
    </style:style>
    <style:style style:name="T172" style:family="text">
      <style:text-properties fo:color="#ffffff" loext:opacity="100%" fo:font-size="14pt" fo:font-weight="normal" officeooo:rsid="022b8b4d" style:font-size-asian="14pt" style:font-size-complex="14pt"/>
    </style:style>
    <style:style style:name="T173" style:family="text">
      <style:text-properties fo:color="#ffffff" loext:opacity="100%" fo:font-size="14pt" fo:font-weight="normal" officeooo:rsid="024fdc8c" style:font-size-asian="14pt" style:font-size-complex="14pt"/>
    </style:style>
    <style:style style:name="T174" style:family="text">
      <style:text-properties fo:color="#ffffff" loext:opacity="100%" fo:font-size="14pt" fo:font-weight="normal" officeooo:rsid="024aceee" style:font-size-asian="14pt" style:font-size-complex="14pt"/>
    </style:style>
    <style:style style:name="T175" style:family="text">
      <style:text-properties fo:color="#ffffff" loext:opacity="100%" fo:font-size="14pt" fo:font-weight="normal" officeooo:rsid="024defaf" style:font-size-asian="14pt" style:font-size-complex="14pt"/>
    </style:style>
    <style:style style:name="T176" style:family="text">
      <style:text-properties fo:color="#ffffff" loext:opacity="100%" fo:font-size="14pt" fo:font-weight="normal" officeooo:rsid="029cb498" style:font-size-asian="14pt" style:font-size-complex="14pt"/>
    </style:style>
    <style:style style:name="T177" style:family="text">
      <style:text-properties fo:color="#ffffff" loext:opacity="100%" fo:font-size="14pt" fo:font-weight="normal" officeooo:rsid="02212731" fo:background-color="#b47804" loext:char-shading-value="0" style:font-size-asian="14pt" style:font-size-complex="14pt"/>
    </style:style>
    <style:style style:name="T178" style:family="text">
      <style:text-properties fo:color="#ffffff" loext:opacity="100%" fo:font-size="14pt" fo:font-weight="normal" officeooo:rsid="022317e8" fo:background-color="#b47804" loext:char-shading-value="0" style:font-size-asian="14pt" style:font-size-complex="14pt"/>
    </style:style>
    <style:style style:name="T179" style:family="text">
      <style:text-properties fo:color="#ffffff" loext:opacity="100%" fo:font-size="14pt" fo:font-weight="normal" officeooo:rsid="024aceee" fo:background-color="#00a933" loext:char-shading-value="0" style:font-size-asian="14pt" style:font-size-complex="14pt"/>
    </style:style>
    <style:style style:name="T180" style:family="text">
      <style:text-properties fo:color="#ffffff" loext:opacity="100%" fo:font-size="14pt" fo:font-weight="normal" officeooo:rsid="024defaf" fo:background-color="#00a933" loext:char-shading-value="0" style:font-size-asian="14pt" style:font-size-complex="14pt"/>
    </style:style>
    <style:style style:name="T181" style:family="text">
      <style:text-properties fo:color="#ffffff" loext:opacity="100%" fo:font-size="14pt" fo:font-weight="normal" officeooo:rsid="0254b429" fo:background-color="#00a933" loext:char-shading-value="0" style:font-size-asian="14pt" style:font-size-complex="14pt"/>
    </style:style>
    <style:style style:name="T182" style:family="text">
      <style:text-properties fo:color="#ffffff" loext:opacity="100%" fo:font-size="14pt" fo:font-weight="normal" officeooo:rsid="0286b636" fo:background-color="#00a933" loext:char-shading-value="0" style:font-size-asian="14pt" style:font-size-complex="14pt"/>
    </style:style>
    <style:style style:name="T183" style:family="text">
      <style:text-properties fo:color="#ffffff" loext:opacity="100%" fo:font-size="14pt" fo:language="en" fo:country="US" style:text-underline-style="none" fo:background-color="transparent" loext:char-shading-value="0" style:font-size-asian="14pt" style:font-size-complex="14pt"/>
    </style:style>
    <style:style style:name="T184" style:family="text">
      <style:text-properties fo:color="#ffffff" loext:opacity="100%" fo:font-size="14pt" fo:language="en" fo:country="US" style:text-underline-style="none" officeooo:rsid="0294937b" fo:background-color="transparent" loext:char-shading-value="0" style:font-size-asian="14pt" style:font-size-complex="14pt"/>
    </style:style>
    <style:style style:name="T185" style:family="text">
      <style:text-properties fo:color="#ffffff" loext:opacity="100%" fo:font-size="14pt" fo:language="en" fo:country="US" style:text-underline-style="none" officeooo:rsid="029a911a" fo:background-color="transparent" loext:char-shading-value="0" style:font-size-asian="14pt" style:font-size-complex="14pt"/>
    </style:style>
    <style:style style:name="T186" style:family="text">
      <style:text-properties fo:color="#ffffff" loext:opacity="100%" fo:font-size="14pt" fo:language="en" fo:country="US" style:text-underline-style="none" fo:font-weight="normal" officeooo:rsid="029a911a" fo:background-color="transparent" loext:char-shading-value="0" style:font-size-asian="14pt" style:font-size-complex="14pt"/>
    </style:style>
    <style:style style:name="T187" style:family="text">
      <style:text-properties fo:color="#ffffff" loext:opacity="100%" fo:font-size="14pt" fo:language="en" fo:country="US" style:text-underline-style="none" fo:font-weight="normal" officeooo:rsid="02a29933" fo:background-color="transparent" loext:char-shading-value="0" style:font-size-asian="14pt" style:font-size-complex="14pt"/>
    </style:style>
    <style:style style:name="T188" style:family="text">
      <style:text-properties fo:color="#ffffff" loext:opacity="100%" style:font-name="Arial1" style:text-underline-style="none" officeooo:rsid="0216c522"/>
    </style:style>
    <style:style style:name="T189"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90" style:family="text">
      <style:text-properties fo:color="#ffffff" loext:opacity="100%" style:font-name="Arial1" fo:font-size="14pt" fo:font-weight="normal" fo:background-color="transparent" loext:char-shading-value="0" style:font-size-asian="14pt" style:font-size-complex="14pt"/>
    </style:style>
    <style:style style:name="T191" style:family="text">
      <style:text-properties fo:color="#ffffff" loext:opacity="100%" style:font-name="Arial1" officeooo:rsid="028d046c"/>
    </style:style>
    <style:style style:name="T192" style:family="text">
      <style:text-properties fo:color="#ffffff" loext:opacity="100%" style:font-name="Arial1" fo:font-size="12pt" officeooo:rsid="028d046c" style:font-size-asian="12pt" style:font-size-complex="12pt"/>
    </style:style>
    <style:style style:name="T193" style:family="text">
      <style:text-properties fo:color="#ffffff" loext:opacity="100%" fo:font-size="20pt" fo:font-weight="normal" officeooo:rsid="026fe807" style:font-size-asian="20pt" style:font-size-complex="20pt"/>
    </style:style>
    <style:style style:name="T194" style:family="text">
      <style:text-properties fo:color="#ffffff" loext:opacity="100%" fo:font-size="20pt" fo:font-weight="normal" officeooo:rsid="0227dcad" fo:background-color="#069a2e" loext:char-shading-value="0" style:font-size-asian="20pt" style:font-size-complex="20pt"/>
    </style:style>
    <style:style style:name="T195" style:family="text">
      <style:text-properties fo:color="#ffffff" loext:opacity="100%" fo:font-size="21pt" fo:font-weight="normal" officeooo:rsid="0286b636" fo:background-color="#b47804" loext:char-shading-value="0" style:font-size-asian="21pt" style:font-size-complex="21pt"/>
    </style:style>
    <style:style style:name="T196" style:family="text">
      <style:text-properties fo:color="#ffffff" loext:opacity="100%" fo:font-weight="normal" officeooo:rsid="02212731"/>
    </style:style>
    <style:style style:name="T197" style:family="text">
      <style:text-properties fo:color="#ffffff" loext:opacity="100%" style:text-line-through-style="none" style:text-line-through-type="none" fo:font-size="14pt" style:text-underline-style="none" fo:font-weight="normal" officeooo:rsid="0290d99a" style:text-blinking="false" fo:background-color="#069a2e" loext:char-shading-value="0" style:font-size-asian="14pt" style:font-size-complex="14pt" loext:padding="0cm" loext:border="none"/>
    </style:style>
    <style:style style:name="T198" style:family="text">
      <style:text-properties fo:color="#ffffff" loext:opacity="100%" style:text-line-through-style="none" style:text-line-through-type="none" fo:font-size="14pt" style:text-underline-style="none" fo:font-weight="normal" officeooo:rsid="029da60a" style:text-blinking="false" fo:background-color="#069a2e" loext:char-shading-value="0" style:font-size-asian="14pt" style:font-size-complex="14pt" loext:padding="0cm" loext:border="none"/>
    </style:style>
    <style:style style:name="T199" style:family="text">
      <style:text-properties fo:color="#ffffff" loext:opacity="100%" style:text-line-through-style="none" style:text-line-through-type="none" fo:font-size="14pt" fo:language="en" fo:country="US" style:text-underline-style="none" officeooo:rsid="029da60a" style:text-blinking="false" fo:background-color="transparent" loext:char-shading-value="0" style:font-size-asian="14pt" style:font-size-complex="14pt" loext:padding="0cm" loext:border="none"/>
    </style:style>
    <style:style style:name="T200" style:family="text">
      <style:text-properties fo:color="#ffffff" loext:opacity="100%" style:text-line-through-style="none" style:text-line-through-type="none" fo:font-size="14pt" fo:language="en" fo:country="US" style:text-underline-style="none" officeooo:rsid="02a02579" style:text-blinking="false" fo:background-color="transparent" loext:char-shading-value="0" style:font-size-asian="14pt" style:font-size-complex="14pt" loext:padding="0cm" loext:border="none"/>
    </style:style>
    <style:style style:name="T201" style:family="text">
      <style:text-properties fo:color="#ffffff" loext:opacity="100%" style:text-line-through-style="none" style:text-line-through-type="none" fo:font-size="14pt" fo:language="en" fo:country="US" style:text-underline-style="none" officeooo:rsid="02a177ba" style:text-blinking="false" fo:background-color="transparent" loext:char-shading-value="0" style:font-size-asian="14pt" style:font-size-complex="14pt" loext:padding="0cm" loext:border="none"/>
    </style:style>
    <style:style style:name="T202" style:family="text">
      <style:text-properties fo:color="#ffffff" loext:opacity="100%" style:text-line-through-style="none" style:text-line-through-type="none" fo:font-size="14pt" fo:language="en" fo:country="US" style:text-underline-style="none" officeooo:rsid="02a56291" style:text-blinking="false" fo:background-color="transparent" loext:char-shading-value="0" style:font-size-asian="14pt" style:font-size-complex="14pt" loext:padding="0cm" loext:border="none"/>
    </style:style>
    <style:style style:name="T203" style:family="text">
      <style:text-properties fo:color="#ffffff" loext:opacity="100%" style:text-line-through-style="none" style:text-line-through-type="none" fo:font-size="14pt" fo:language="en" fo:country="US" style:text-underline-style="none" officeooo:rsid="02a6060e" style:text-blinking="false" fo:background-color="transparent" loext:char-shading-value="0" style:font-size-asian="14pt" style:font-size-complex="14pt" loext:padding="0cm" loext:border="none"/>
    </style:style>
    <style:style style:name="T204" style:family="text">
      <style:text-properties fo:color="#ffffff" loext:opacity="100%" style:text-line-through-style="none" style:text-line-through-type="none" fo:font-size="14pt" fo:language="en" fo:country="US" style:text-underline-style="none" officeooo:rsid="0290d99a" style:text-blinking="false" fo:background-color="#069a2e" loext:char-shading-value="0" style:font-size-asian="14pt" style:font-size-complex="14pt" loext:padding="0cm" loext:border="none"/>
    </style:style>
    <style:style style:name="T205" style:family="text">
      <style:text-properties fo:color="#ffffff" loext:opacity="100%" style:text-line-through-style="none" style:text-line-through-type="none" fo:font-size="14pt" fo:language="en" fo:country="US" style:text-underline-style="none" officeooo:rsid="02a56291" style:text-blinking="false" fo:background-color="#069a2e" loext:char-shading-value="0" style:font-size-asian="14pt" style:font-size-complex="14pt" loext:padding="0cm" loext:border="none"/>
    </style:style>
    <style:style style:name="T206" style:family="text">
      <style:text-properties fo:color="#ffffff" loext:opacity="100%" style:text-line-through-style="none" style:text-line-through-type="none" style:font-name="Arial" fo:font-size="14pt" fo:language="en" fo:country="US" style:text-underline-style="none" officeooo:rsid="029da60a" style:text-blinking="false" fo:background-color="transparent" loext:char-shading-value="0" style:font-size-asian="14pt" style:font-size-complex="14pt" loext:padding="0cm" loext:border="none"/>
    </style:style>
    <style:style style:name="T207" style:family="text">
      <style:text-properties fo:color="#ffffff" loext:opacity="100%" style:text-line-through-style="none" style:text-line-through-type="none" style:font-name="Arial" fo:font-size="14pt" fo:language="en" fo:country="US" style:text-underline-style="none" officeooo:rsid="02a02579" style:text-blinking="false" fo:background-color="transparent" loext:char-shading-value="0" style:font-size-asian="14pt" style:font-size-complex="14pt" loext:padding="0cm" loext:border="none"/>
    </style:style>
    <style:style style:name="T208" style:family="text">
      <style:text-properties fo:color="#ffffff" loext:opacity="100%" style:text-line-through-style="none" style:text-line-through-type="none" style:font-name="Arial" fo:font-size="14pt" fo:language="en" fo:country="US" style:text-underline-style="none" officeooo:rsid="02a56291" style:text-blinking="false" fo:background-color="transparent" loext:char-shading-value="0" style:font-size-asian="14pt" style:font-size-complex="14pt" loext:padding="0cm" loext:border="none"/>
    </style:style>
    <style:style style:name="T209" style:family="text">
      <style:text-properties fo:color="#ffffff" loext:opacity="100%" style:text-line-through-style="none" style:text-line-through-type="none" style:font-name="Arial" fo:font-size="14pt" fo:language="en" fo:country="US" style:text-underline-style="none" officeooo:rsid="02a6060e" style:text-blinking="false" fo:background-color="transparent" loext:char-shading-value="0" style:font-size-asian="14pt" style:font-size-complex="14pt" loext:padding="0cm" loext:border="none"/>
    </style:style>
    <style:style style:name="T210" style:family="text">
      <style:text-properties fo:color="#ffffff" loext:opacity="100%"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11" style:family="text">
      <style:text-properties fo:color="#ffffff" loext:opacity="100%" fo:language="en" fo:country="US" style:text-underline-style="none" officeooo:rsid="02a29933" fo:background-color="transparent" loext:char-shading-value="0"/>
    </style:style>
    <style:style style:name="T212" style:family="text">
      <style:text-properties fo:background-color="transparent" loext:char-shading-value="0"/>
    </style:style>
    <style:style style:name="T213" style:family="text">
      <style:text-properties officeooo:rsid="020ebc40" fo:background-color="transparent" loext:char-shading-value="0"/>
    </style:style>
    <style:style style:name="T214" style:family="text">
      <style:text-properties officeooo:rsid="020908b2"/>
    </style:style>
    <style:style style:name="T215" style:family="text">
      <style:text-properties officeooo:rsid="02845fa8"/>
    </style:style>
    <style:style style:name="T216" style:family="text">
      <style:text-properties fo:color="#ffff38" loext:opacity="100%" officeooo:rsid="02845fa8"/>
    </style:style>
    <style:style style:name="T217"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218" style:family="text">
      <style:text-properties fo:font-weight="normal" fo:background-color="transparent" loext:char-shading-value="0"/>
    </style:style>
    <style:style style:name="T219" style:family="text">
      <style:text-properties fo:font-weight="normal" officeooo:rsid="023c909b" fo:background-color="transparent" loext:char-shading-value="0"/>
    </style:style>
    <style:style style:name="T220" style:family="text">
      <style:text-properties fo:font-weight="normal" officeooo:rsid="0240b662" fo:background-color="transparent" loext:char-shading-value="0"/>
    </style:style>
    <style:style style:name="T221" style:family="text">
      <style:text-properties fo:font-weight="normal" officeooo:rsid="024209b0" fo:background-color="transparent" loext:char-shading-value="0"/>
    </style:style>
    <style:style style:name="T222" style:family="text">
      <style:text-properties fo:font-weight="normal" officeooo:rsid="02425b33" fo:background-color="transparent" loext:char-shading-value="0"/>
    </style:style>
    <style:style style:name="T223" style:family="text">
      <style:text-properties fo:font-weight="normal" officeooo:rsid="020ebc40" fo:background-color="transparent" loext:char-shading-value="0"/>
    </style:style>
    <style:style style:name="T224" style:family="text">
      <style:text-properties fo:font-weight="normal" officeooo:rsid="026fe807" fo:background-color="transparent" loext:char-shading-value="0"/>
    </style:style>
    <style:style style:name="T225" style:family="text">
      <style:text-properties officeooo:rsid="0227dcad"/>
    </style:style>
    <style:style style:name="T226" style:family="text">
      <style:text-properties officeooo:rsid="02259ec8"/>
    </style:style>
    <style:style style:name="T227" style:family="text">
      <style:text-properties officeooo:rsid="0226a567"/>
    </style:style>
    <style:style style:name="T228" style:family="text">
      <style:text-properties officeooo:rsid="0216a37b"/>
    </style:style>
    <style:style style:name="T229" style:family="text">
      <style:text-properties officeooo:rsid="0216c522"/>
    </style:style>
    <style:style style:name="T230" style:family="text">
      <style:text-properties officeooo:rsid="02171d48"/>
    </style:style>
    <style:style style:name="T231" style:family="text">
      <style:text-properties fo:color="#469df9" loext:opacity="100%" style:font-name="Arial" fo:font-size="10pt" officeooo:rsid="02171d48" style:font-size-asian="10pt" style:font-size-complex="10pt"/>
    </style:style>
    <style:style style:name="T232" style:family="text">
      <style:text-properties fo:color="#c9211e" loext:opacity="100%" style:font-name="Arial1" fo:font-size="14pt" fo:font-weight="normal" officeooo:rsid="023aa484" style:font-size-asian="14pt" style:font-size-complex="14pt"/>
    </style:style>
    <style:style style:name="T233" style:family="text">
      <style:text-properties fo:color="#c9211e" loext:opacity="100%" style:font-name="Arial1" fo:font-size="14pt" officeooo:rsid="023c909b" style:font-size-asian="14pt" style:font-size-complex="14pt"/>
    </style:style>
    <style:style style:name="T234"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3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36" style:family="text">
      <style:text-properties style:text-line-through-style="none" style:text-line-through-type="none" style:text-underline-style="none" style:text-blinking="false" fo:background-color="transparent" loext:char-shading-value="0" loext:padding="0cm" loext:border="none"/>
    </style:style>
    <style:style style:name="T237" style:family="text">
      <style:text-properties style:text-line-through-style="none" style:text-line-through-type="none" fo:language="en" fo:country="US" style:text-underline-style="none" style:text-blinking="false" fo:background-color="transparent" loext:char-shading-value="0" loext:padding="0cm" loext:border="none"/>
    </style:style>
    <style:style style:name="T238" style:family="text">
      <style:text-properties style:text-line-through-style="none" style:text-line-through-type="none" fo:language="en" fo:country="US" style:text-underline-style="none" officeooo:rsid="029a911a" style:text-blinking="false" fo:background-color="transparent" loext:char-shading-value="0" loext:padding="0cm" loext:border="none"/>
    </style:style>
    <style:style style:name="T239" style:family="text">
      <style:text-properties style:text-line-through-style="none" style:text-line-through-type="none" fo:language="en" fo:country="US" style:text-underline-style="none" officeooo:rsid="02a02579" style:text-blinking="false" fo:background-color="transparent" loext:char-shading-value="0" loext:padding="0cm" loext:border="none"/>
    </style:style>
    <style:style style:name="T240" style:family="text">
      <style:text-properties style:text-line-through-style="none" style:text-line-through-type="none" fo:language="en" fo:country="US" style:text-underline-style="none" officeooo:rsid="02a177ba" style:text-blinking="false" fo:background-color="transparent" loext:char-shading-value="0" loext:padding="0cm" loext:border="none"/>
    </style:style>
    <style:style style:name="T241" style:family="text">
      <style:text-properties style:text-line-through-style="none" style:text-line-through-type="none" fo:language="en" fo:country="US" style:text-underline-style="none" officeooo:rsid="02a29933" style:text-blinking="false" fo:background-color="transparent" loext:char-shading-value="0" loext:padding="0cm" loext:border="none"/>
    </style:style>
    <style:style style:name="T242" style:family="text">
      <style:text-properties style:text-line-through-style="none" style:text-line-through-type="none" fo:language="en" fo:country="US" style:text-underline-style="none" officeooo:rsid="02a6060e" style:text-blinking="false" fo:background-color="transparent" loext:char-shading-value="0" loext:padding="0cm" loext:border="none"/>
    </style:style>
    <style:style style:name="T243" style:family="text">
      <style:text-properties style:text-line-through-style="none" style:text-line-through-type="none" fo:font-size="14pt" fo:language="en" fo:country="US" style:text-underline-style="none" style:text-blinking="false" fo:background-color="transparent" loext:char-shading-value="0" style:font-size-asian="14pt" style:font-size-complex="14pt" loext:padding="0cm" loext:border="none"/>
    </style:style>
    <style:style style:name="T244" style:family="text">
      <style:text-properties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245" style:family="text">
      <style:text-properties style:text-line-through-style="none" style:text-line-through-type="none" fo:font-size="14pt" fo:language="en" fo:country="US" style:text-underline-style="none" fo:font-weight="normal" officeooo:rsid="029a911a" style:text-blinking="false" fo:background-color="transparent" loext:char-shading-value="0" style:font-size-asian="14pt" style:font-size-complex="14pt" loext:padding="0cm" loext:border="none"/>
    </style:style>
    <style:style style:name="T246" style:family="text">
      <style:text-properties style:text-line-through-style="none" style:text-line-through-type="none" fo:font-size="14pt" fo:language="en" fo:country="US" style:text-underline-style="none" fo:font-weight="normal" style:text-blinking="false" fo:background-color="transparent" loext:char-shading-value="0" style:font-size-asian="14pt" style:font-size-complex="14pt" loext:padding="0cm" loext:border="none"/>
    </style:style>
    <style:style style:name="T247"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loext:padding="0cm" loext:border="none"/>
    </style:style>
    <style:style style:name="T248" style:family="text">
      <style:text-properties style:text-line-through-style="none" style:text-line-through-type="none" fo:font-size="14pt" style:text-underline-style="none" fo:font-weight="normal" officeooo:rsid="029a911a" style:text-blinking="false" fo:background-color="transparent" loext:char-shading-value="0" style:font-size-asian="14pt" style:font-size-complex="14pt" loext:padding="0cm" loext:border="none"/>
    </style:style>
    <style:style style:name="T249" style:family="text">
      <style:text-properties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50" style:family="text">
      <style:text-properties style:text-line-through-style="none" style:text-line-through-type="none" fo:font-size="15pt" fo:language="en" fo:country="US" style:text-underline-style="none" style:text-blinking="false" fo:background-color="transparent" loext:char-shading-value="0" style:font-size-asian="15pt" style:font-size-complex="15pt" loext:padding="0cm" loext:border="none"/>
    </style:style>
    <style:style style:name="T251" style:family="text">
      <style:text-properties style:text-line-through-style="none" style:text-line-through-type="none" fo:font-size="15pt" fo:language="en" fo:country="US" style:text-underline-style="none" officeooo:rsid="02a56291" style:text-blinking="false" fo:background-color="transparent" loext:char-shading-value="0" style:font-size-asian="15pt" style:font-size-complex="15pt" loext:padding="0cm" loext:border="none"/>
    </style:style>
    <style:style style:name="T252" style:family="text">
      <style:text-properties style:text-line-through-style="none" style:text-line-through-type="none" fo:font-size="15pt" fo:language="en" fo:country="US" style:text-underline-style="none" officeooo:rsid="02a6060e" style:text-blinking="false" fo:background-color="transparent" loext:char-shading-value="0" style:font-size-asian="15pt" style:font-size-complex="15pt" loext:padding="0cm" loext:border="none"/>
    </style:style>
    <style:style style:name="T253" style:family="text">
      <style:text-properties fo:color="#a1467e" loext:opacity="100%" fo:font-weight="normal" fo:background-color="transparent" loext:char-shading-value="0"/>
    </style:style>
    <style:style style:name="T254" style:family="text">
      <style:text-properties fo:color="#00a933" loext:opacity="100%" fo:font-weight="normal" fo:background-color="transparent" loext:char-shading-value="0"/>
    </style:style>
    <style:style style:name="T255" style:family="text">
      <style:text-properties fo:font-size="12pt" fo:background-color="transparent" loext:char-shading-value="0" style:font-size-asian="12pt" style:font-size-complex="12pt"/>
    </style:style>
    <style:style style:name="T256" style:family="text">
      <style:text-properties fo:font-size="12pt" style:text-underline-style="none" fo:background-color="transparent" loext:char-shading-value="0" style:font-size-asian="12pt" style:font-size-complex="12pt"/>
    </style:style>
    <style:style style:name="T257" style:family="text">
      <style:text-properties fo:font-size="12pt" style:text-underline-style="none" officeooo:rsid="02a29933" fo:background-color="transparent" loext:char-shading-value="0" style:font-size-asian="12pt" style:font-size-complex="12pt"/>
    </style:style>
    <style:style style:name="T258" style:family="text">
      <style:text-properties fo:color="#a7074b" loext:opacity="100%" fo:font-size="14pt" style:text-underline-style="none" fo:font-weight="normal" officeooo:rsid="025e5682" fo:background-color="#ffbf00" loext:char-shading-value="0" style:font-size-asian="14pt" style:font-size-complex="14pt"/>
    </style:style>
    <style:style style:name="T259" style:family="text">
      <style:text-properties fo:color="#ff7b72" loext:opacity="100%" style:font-name="Droid Sans Mono" fo:font-size="10.5pt" style:text-underline-style="none" fo:font-weight="normal" officeooo:rsid="02463c3d" fo:background-color="#121314" loext:char-shading-value="0"/>
    </style:style>
    <style:style style:name="T260" style:family="text">
      <style:text-properties fo:color="#bbbebf" loext:opacity="100%" style:font-name="Droid Sans Mono" fo:font-size="10.5pt" style:text-underline-style="none" fo:font-weight="normal" officeooo:rsid="02463c3d" fo:background-color="#121314" loext:char-shading-value="0"/>
    </style:style>
    <style:style style:name="T261" style:family="text">
      <style:text-properties fo:color="#4ec9b0" loext:opacity="100%" style:font-name="Droid Sans Mono" fo:font-size="10.5pt" style:text-underline-style="none" fo:font-weight="normal" officeooo:rsid="02463c3d" fo:background-color="#121314" loext:char-shading-value="0"/>
    </style:style>
    <style:style style:name="T262" style:family="text">
      <style:text-properties fo:color="#d4d4d4" loext:opacity="100%" style:font-name="Droid Sans Mono" fo:font-size="10.5pt" style:text-underline-style="none" fo:font-weight="normal" officeooo:rsid="02463c3d" fo:background-color="#121314" loext:char-shading-value="0"/>
    </style:style>
    <style:style style:name="T263"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64"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65"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66"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67"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68"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69"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70" style:family="text">
      <style:text-properties fo:color="#ff0000" loext:opacity="100%" fo:font-size="14pt" fo:font-weight="normal" officeooo:rsid="0243785a" fo:background-color="#ffff00" loext:char-shading-value="0" style:font-size-asian="14pt" style:font-size-complex="14pt"/>
    </style:style>
    <style:style style:name="T271"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72"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73"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74"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75"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76"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77"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78"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79"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80"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81"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82"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83"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84" style:family="text">
      <style:text-properties style:text-underline-style="solid" style:text-underline-width="auto" style:text-underline-color="font-color" fo:background-color="transparent" loext:char-shading-value="0"/>
    </style:style>
    <style:style style:name="T285" style:family="text">
      <style:text-properties officeooo:rsid="028d046c"/>
    </style:style>
    <style:style style:name="T286" style:family="text">
      <style:text-properties fo:language="en" fo:country="US" fo:background-color="transparent" loext:char-shading-value="0"/>
    </style:style>
    <style:style style:name="T287" style:family="text">
      <style:text-properties fo:language="en" fo:country="US" officeooo:rsid="0294937b" fo:background-color="transparent" loext:char-shading-value="0"/>
    </style:style>
    <style:style style:name="T288" style:family="text">
      <style:text-properties fo:language="en" fo:country="US" style:text-underline-style="none" fo:font-weight="normal" fo:background-color="transparent" loext:char-shading-value="0"/>
    </style:style>
    <style:style style:name="T289" style:family="text">
      <style:text-properties fo:language="en" fo:country="US" style:text-underline-style="none" fo:background-color="transparent" loext:char-shading-value="0"/>
    </style:style>
    <style:style style:name="T290" style:family="text">
      <style:text-properties fo:language="en" fo:country="US" style:text-underline-style="none" officeooo:rsid="029b8c1e" fo:background-color="transparent" loext:char-shading-value="0"/>
    </style:style>
    <style:style style:name="T291" style:family="text">
      <style:text-properties fo:language="en" fo:country="US" style:text-underline-style="none" officeooo:rsid="02a2993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62">La declaraci</text:span></text:span><text:span text:style-name="_2f__2f_C"><text:span text:style-name="T106">ón</text:span></text:span><text:span text:style-name="_2f__2f_C"><text:span text:style-name="T62"> de la variable es inversa a c:</text:span></text:span></text:p>
      <text:p text:style-name="P3"><text:span text:style-name="_3c_C_2b__2b__3e_"><text:span text:style-name="T212">Nombre_de_variable: tipo</text:span></text:span></text:p>
      <text:p text:style-name="P3"><text:span text:style-name="_3c_C_3e_">var1: f32</text:span></text:p>
      <text:p text:style-name="P3"><text:span text:style-name="_3c_C_3e_">var2: f64</text:span></text:p>
      <text:p text:style-name="P3"><text:span text:style-name="_3c_C_2b__2b__3e_"><text:span text:style-name="T64">Los tipos en comparativa:</text:span></text:span></text:p>
      <text:p text:style-name="P3"><text:span text:style-name="_3c_C_2b__2b__3e_"><text:span text:style-name="T114"/></text:span></text:p>
      <text:p text:style-name="P3"><text:span text:style-name="_3c_C_2b__2b__3e_"><text:span text:style-name="T1">int<text:tab/><text:tab/><text:tab/>-&gt; i32</text:span></text:span><text:span text:style-name="_3c_C_2b__2b__3e_"><text:span text:style-name="T214"><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214"><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214"><text:tab/><text:tab/><text:tab/><text:tab/><text:tab/>char*<text:tab/><text:tab/><text:tab/>-&gt; &amp;str </text:span></text:span><text:span text:style-name="_3c_C_2b__2b__3e_"><text:span text:style-name="T215">y &amp;’static str </text:span></text:span><text:span text:style-name="_3c_C_2b__2b__3e_"><text:span text:style-name="T216">(*nota)</text:span></text:span></text:p>
      <text:p text:style-name="P3"><text:span text:style-name="_3c_C_2b__2b__3e_"><text:span text:style-name="T1">double<text:tab/>-&gt; f64</text:span></text:span><text:span text:style-name="_3c_C_2b__2b__3e_"><text:span text:style-name="T214"><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217">*NOTA: en C se puede devolver un </text:span></text:span><text:span text:style-name="_3c_C_3e_"><text:span text:style-name="T4">char*</text:span></text:span><text:span text:style-name="_2f__2f_C"><text:span text:style-name="T217"> pero si se hace un </text:span></text:span><text:span text:style-name="_3c_C_3e_"><text:span text:style-name="T4">char str[] = “hola”</text:span></text:span><text:span text:style-name="_2f__2f_C"><text:span text:style-name="T217">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48">&amp;’static str</text:span></text:span><text:span text:style-name="_2f__2f_C"><text:span text:style-name="T217">, y cuando lo lea de un parametro donde morirá dentro de la función podremos usar un </text:span></text:span><text:span text:style-name="_3c_C_2b__2b__3e_"><text:span text:style-name="T48">&amp;str</text:span></text:span><text:span text:style-name="_2f__2f_C"><text:span text:style-name="T217">.</text:span></text:span></text:p>
      <text:p text:style-name="P4"><text:span text:style-name="_2f__2f_C"><text:span text:style-name="T217">El </text:span></text:span><text:span text:style-name="_3c_C_2b__2b__3e_"><text:span text:style-name="T48">‘</text:span></text:span><text:span text:style-name="_2f__2f_C"><text:span text:style-name="T217"> del </text:span></text:span><text:span text:style-name="_3c_C_2b__2b__3e_"><text:span text:style-name="T48">&amp;’</text:span></text:span><text:span text:style-name="_2f__2f_C"><text:span text:style-name="T217"> indica lifetime y se puede ver más abajo qué significa.</text:span></text:span></text:p>
      <text:p text:style-name="P5"><text:span text:style-name="_2f__2f_C"><text:span text:style-name="T65">Para asignar un valor a una variable seria:</text:span></text:span><text:span text:style-name="_2f__2f_C"><text:span text:style-name="T115"><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16">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48">LET</text:span></text:span><text:span text:style-name="_2f__2f_C"><text:span text:style-name="T117"> es para hacer que no pueda variar</text:span></text:span><text:span text:style-name="_2f__2f_C"><text:span text:style-name="T118"> (NO PUEDE SER GLOBAL).</text:span></text:span><text:span text:style-name="_2f__2f_C"><text:span text:style-name="T119"> </text:span></text:span><text:span text:style-name="_3c_C_2b__2b__3e_"><text:span text:style-name="T48">LET</text:span></text:span><text:span text:style-name="_2f__2f_C"><text:span text:style-name="T118"> </text:span></text:span><text:span text:style-name="_3c_C_2b__2b__3e_"><text:span text:style-name="T48">MUT</text:span></text:span><text:span text:style-name="_2f__2f_C"><text:span text:style-name="T117"> para que varie</text:span></text:span><text:span text:style-name="_2f__2f_C"><text:span text:style-name="T118"> (Hay que poner </text:span></text:span><text:span text:style-name="_3c_C_2b__2b__3e_"><text:span text:style-name="T48">let</text:span></text:span><text:span text:style-name="_2f__2f_C"><text:span text:style-name="T118"> delante)</text:span></text:span><text:span text:style-name="_2f__2f_C"><text:span text:style-name="T117">, y </text:span></text:span><text:span text:style-name="_3c_C_2b__2b__3e_"><text:span text:style-name="T48">CONST</text:span></text:span><text:span text:style-name="_2f__2f_C"><text:span text:style-name="T117"> para constante</text:span></text:span><text:span text:style-name="_2f__2f_C"><text:span text:style-name="T118"> (si puede ser global)</text:span></text:span></text:p>
      <text:p text:style-name="P8"><text:span text:style-name="_2f__2f_C"><text:span text:style-name="T120"/></text:span></text:p>
      <text:p text:style-name="P8"><text:span text:style-name="_3c_C_2b__2b__3e_"><text:span text:style-name="T48">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48">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5">Si a una variable le ponemos '_’ delante, esta variable aunque no se use, el compilador no se quejará de ella:</text:span></text:span></text:p>
      <text:p text:style-name="P9"><text:span text:style-name="_3c_C_3e_"><text:span text:style-name="T218">let </text:span></text:span><text:span text:style-name="_3c_C_2b__2b__3e_"><text:span text:style-name="T212">_</text:span></text:span><text:span text:style-name="_3c_C_3e_"><text:span text:style-name="T218">num: f32 = 0.4; </text:span></text:span><text:span text:style-name="_2f__2f_C"><text:span text:style-name="T218">//aunque no la use el compilador no lanzara un warning</text:span></text:span></text:p>
      <text:h text:style-name="P137" text:outline-level="3"/>
      <text:h text:style-name="P137" text:outline-level="3">VARIABLES DUPLAS</text:h>
      <text:p text:style-name="P111">Rust puede almacenar varias variables en duplas que pueden tener dos o más tipos de datos. Por ejemplo:</text:p>
      <text:p text:style-name="P111"><text:span text:style-name="_3c_C_3e_">let dupla1: </text:span><text:span text:style-name="_3c_C_2b__2b__3e_">(i32, i32) = (32, 42)</text:span><text:span text:style-name="_3c_C_3e_">;</text:span></text:p>
      <text:p text:style-name="P111"><text:span text:style-name="_3c_C_3e_">let dupla2: </text:span><text:span text:style-name="_3c_C_2b__2b__3e_">(i32, bool, &amp;str) = (32, true, "hola")</text:span><text:span text:style-name="_3c_C_3e_">;</text:span></text:p>
      <text:p text:style-name="P113">De tal forma que si queremos acceder a sus elementos seria:</text:p>
      <text:p text:style-name="P113"><text:span text:style-name="_3c_C_3e_">if dupla2</text:span><text:span text:style-name="_3c_C_2b__2b__3e_">.2</text:span><text:span text:style-name="_3c_C_3e_"> == "hola" {...}</text:span></text:p>
      <text:p text:style-name="P103"/>
      <text:h text:style-name="P138" text:outline-level="3">VARIABLES GLOBALES</text:h>
      <text:p text:style-name="P114">El tener una variable global en Rust es <text:s/>un problema, ya que puede haber dataraces para modificarla asi que tiene que estar protegida.. si no no deja. </text:p>
      <text:p text:style-name="P114">La forma clásica es:<text:line-break/></text:p>
      <text:p text:style-name="P117"><text:span text:style-name="_3c_C_2b__2b__3e_"><text:span text:style-name="T2">static mut </text:span></text:span><text:span text:style-name="_3c_C_3e_"><text:span text:style-name="T2">A: i32 = 0;</text:span></text:span><text:span text:style-name="_3c_C_3e_"><text:span text:style-name="T61"> </text:span></text:span><text:span text:style-name="_2f__2f_C"><text:span text:style-name="T2">//variable global</text:span></text:span></text:p>
      <text:p text:style-name="P117"><text:span text:style-name="_3c_C_3e_"><text:span text:style-name="T228">fn main(){</text:span></text:span></text:p>
      <text:p text:style-name="P117"><text:span text:style-name="_3c_C_3e_"><text:span text:style-name="T228"><text:tab/>if true{</text:span></text:span></text:p>
      <text:p text:style-name="P117"><text:span text:style-name="_3c_C_3e_"><text:span text:style-name="T228"><text:tab/><text:tab/></text:span></text:span><text:span text:style-name="_3c_C_2b__2b__3e_">unsafe{</text:span><text:span text:style-name="_3c_C_3e_"><text:span text:style-name="T228"> A = 10;</text:span></text:span><text:span text:style-name="_3c_C_2b__2b__3e_">}</text:span><text:span text:style-name="_3c_C_2b__2b__3e_"><text:span text:style-name="T228"> </text:span></text:span><text:span text:style-name="_2f__2f_C">//no se recomienda pero permitido</text:span><text:span text:style-name="_2f__2f_C"><text:span text:style-name="T229">. unsafe le dice el compilador que confie en el programador. </text:span></text:span></text:p>
      <text:p text:style-name="P117"><text:span text:style-name="_3c_C_3e_"><text:span text:style-name="T228"><text:tab/>}</text:span></text:span></text:p>
      <text:p text:style-name="P117"><text:span text:style-name="_3c_C_3e_"><text:span text:style-name="T228">}</text:span></text:span></text:p>
      <text:p text:style-name="P117"><text:span text:style-name="_3c_C_3e_"/></text:p>
      <text:p text:style-name="P118"><text:span text:style-name="_3c_C_2b__2b__3e_"><text:span text:style-name="T2">Unsafe</text:span></text:span><text:span text:style-name="_3c_C_3e_"><text:span text:style-name="T188"> es un peligro.. asi que usamos </text:span></text:span><text:span text:style-name="_3c_C_2b__2b__3e_"><text:span text:style-name="T2">atomic</text:span></text:span><text:span text:style-name="_3c_C_3e_"><text:span text:style-name="T188"> para no provocar dataraces:<text:line-break/></text:span></text:span></text:p>
      <text:p text:style-name="P118"><text:span text:style-name="_3c_C_2b__2b__3e_">use std::sync::atomic::{AtomicI32, ordering}</text:span></text:p>
      <text:p text:style-name="P118"><text:span text:style-name="_3c_C_3e_"><text:span text:style-name="T229">static A: </text:span></text:span><text:span text:style-name="_3c_C_2b__2b__3e_">AtomicI32</text:span><text:span text:style-name="_3c_C_3e_"><text:span text:style-name="T229"> = AtomicI32::new(0); </text:span></text:span><text:span text:style-name="_2f__2f_C"><text:span text:style-name="T229">//no hace reserva de memoria. Solo inicializa a cero</text:span></text:span></text:p>
      <text:p text:style-name="P119"><text:span text:style-name="_3c_C_3e_">fn main() {<text:line-break/></text:span><text:span text:style-name="_3c_C_3e_"><text:span text:style-name="T229"><text:tab/></text:span></text:span><text:span text:style-name="_3c_C_3e_">if true {<text:line-break/></text:span><text:span text:style-name="_3c_C_3e_"><text:span text:style-name="T2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230"> </text:span></text:span><text:span text:style-name="_2f__2f_C"><text:span text:style-name="T230">//Relaxed es el nivel más débil del ordenamiento at</text:span></text:span><text:span text:style-name="_2f__2f_C"><text:span text:style-name="T231">ó</text:span></text:span><text:span text:style-name="_2f__2f_C"><text:span text:style-name="T230">mico. solo </text:span></text:span></text:p>
      <text:p text:style-name="P119"><text:span text:style-name="_2f__2f_C"><text:span text:style-name="T230">me importa modificar el valor, no el orden del tiempo en que se haga.</text:span></text:span><text:span text:style-name="_3c_C_3e_"><text:line-break/> }<text:line-break/>}</text:span></text:p>
      <text:h text:style-name="P139" text:outline-level="3"><text:soft-page-break/>PUNTEROS A FUNCION</text:h>
      <text:p text:style-name="P104"><text:span text:style-name="_2f__2f_C"><text:span text:style-name="T105">Si tenemos una funci</text:span></text:span><text:span text:style-name="_2f__2f_C"><text:span text:style-name="T108">ón</text:span></text:span><text:span text:style-name="_2f__2f_C"><text:span text:style-name="T105">:<text:line-break/></text:span></text:span><text:span text:style-name="_3c_C_3e_"><text:span text:style-name="T218">fn suma(a: i32, b: i32) -&gt; i32 { a + b };</text:span></text:span></text:p>
      <text:p text:style-name="P104"><text:span text:style-name="_2f__2f_C"><text:span text:style-name="T105">el puntero a funcion ser</text:span></text:span><text:span text:style-name="_2f__2f_C"><text:span text:style-name="T108">í</text:span></text:span><text:span text:style-name="_2f__2f_C"><text:span text:style-name="T105">a:</text:span></text:span></text:p>
      <text:p text:style-name="P104"><text:span text:style-name="_3c_C_3e_"><text:span text:style-name="T218">let f = </text:span></text:span><text:span text:style-name="_3c_C_2b__2b__3e_"><text:span text:style-name="T212">fn(a, b) -&gt; i32 = suma</text:span></text:span><text:span text:style-name="_3c_C_3e_"><text:span text:style-name="T218">;</text:span></text:span></text:p>
      <text:p text:style-name="P104"><text:span text:style-name="_2f__2f_C"><text:span text:style-name="T105">y se usaria como:</text:span></text:span></text:p>
      <text:p text:style-name="P104"><text:span text:style-name="_3c_C_3e_"><text:span text:style-name="T218">let resultado = </text:span></text:span><text:span text:style-name="_3c_C_2b__2b__3e_"><text:span text:style-name="T212">f(4, 2);</text:span></text:span></text:p>
      <text:p text:style-name="P104"><text:span text:style-name="_2f__2f_C"><text:span text:style-name="T105">Si lo recibimos como argumento de la funci</text:span></text:span><text:span text:style-name="_2f__2f_C"><text:span text:style-name="T108">ón</text:span></text:span><text:span text:style-name="_2f__2f_C"><text:span text:style-name="T105">:</text:span></text:span></text:p>
      <text:p text:style-name="P104"><text:span text:style-name="_3c_C_3e_"><text:span text:style-name="T218">fn procesar_funcion&lt;T&gt;(</text:span></text:span><text:span text:style-name="_3c_C_2b__2b__3e_"><text:span text:style-name="T212">f: fn(&amp;T) -&gt; bool</text:span></text:span><text:span text:style-name="_3c_C_3e_"><text:span text:style-name="T218"> (o lo que sea));</text:span></text:span></text:p>
      <text:h text:style-name="P140" text:outline-level="3"/>
      <text:h text:style-name="P140" text:outline-level="3">PANIC!()</text:h>
      <text:p text:style-name="P10"><text:span text:style-name="_2f__2f_C"><text:span text:style-name="T96">R</text:span></text:span><text:span text:style-name="_2f__2f_C"><text:span text:style-name="T97">ust cuando encuentra un proceso que no puede solventar (por ejemplo dividir por cero) entra en </text:span></text:span><text:span text:style-name="_3c_C_2b__2b__3e_"><text:span text:style-name="T212">Panic</text:span></text:span><text:span text:style-name="_2f__2f_C"><text:span text:style-name="T97"> liberando toda la memoria y saliendo limpiamente. Para forzarlo se usa esto:</text:span></text:span></text:p>
      <text:p text:style-name="P10"><text:span text:style-name="_3c_C_3e_"><text:span text:style-name="T218">fn set_title(&amp;mut self, title: String){ </text:span></text:span><text:span text:style-name="_2f__2f_C"><text:span text:style-name="T218">//</text:span></text:span><text:span text:style-name="_2f__2f_C"><text:span text:style-name="T219">esto es un setter de una estructura por eso lleva el self</text:span></text:span></text:p>
      <text:p text:style-name="P10"><text:span text:style-name="_3c_C_3e_"><text:span text:style-name="T218"><text:tab/>if title.is_empty(){</text:span></text:span><text:span text:style-name="_3c_C_2b__2b__3e_"><text:span text:style-name="T212">panic!(“El título no puede ser vacio”);</text:span></text:span><text:span text:style-name="_3c_C_3e_"><text:span text:style-name="T218">} </text:span></text:span><text:span text:style-name="_2f__2f_C"><text:span text:style-name="T218">//</text:span></text:span><text:span text:style-name="_2f__2f_C"><text:span text:style-name="T219">panic hará salirse el programa</text:span></text:span></text:p>
      <text:p text:style-name="P10"><text:span text:style-name="_3c_C_3e_"><text:span text:style-name="T218"><text:tab/>if title.len() &gt; 50 {</text:span></text:span><text:span text:style-name="_3c_C_2b__2b__3e_"><text:span text:style-name="T212">panic!(</text:span></text:span><text:span text:style-name="_3c_C_3e_"><text:span text:style-name="T218">“El título es más largo de 50 bits”</text:span></text:span><text:span text:style-name="_3c_C_2b__2b__3e_"><text:span text:style-name="T212">)</text:span></text:span><text:span text:style-name="_3c_C_3e_"><text:span text:style-name="T218">;}</text:span></text:span></text:p>
      <text:p text:style-name="P10"><text:span text:style-name="_3c_C_3e_"><text:span text:style-name="T218"><text:tab/>self.title = title</text:span></text:span></text:p>
      <text:p text:style-name="P10"><text:span text:style-name="_3c_C_3e_"><text:span text:style-name="T218">}</text:span></text:span></text:p>
      <text:h text:style-name="P141" text:outline-level="3"><text:span text:style-name="_3c_C_3e_"><text:span text:style-name="T232">ExitCode</text:span></text:span></text:h>
      <text:p text:style-name="P11"><text:span text:style-name="_2f__2f_C"><text:span text:style-name="T63">Como en C, podemos retornar un valor de restorno 1 o 0 del programa. Para ello usamos el ExitCode de esta manera:</text:span></text:span></text:p>
      <text:p text:style-name="P11"><text:span text:style-name="_3c_C_2b__2b__3e_"><text:span text:style-name="T212">use std::process::ExitCode;</text:span></text:span></text:p>
      <text:p text:style-name="P11"><text:span text:style-name="_3c_C_3e_"><text:span text:style-name="T212">fn main() -</text:span></text:span><text:span text:style-name="_3c_C_2b__2b__3e_"><text:span text:style-name="T212"> &gt; ExitCode</text:span></text:span><text:span text:style-name="_3c_C_3e_"><text:span text:style-name="T212">{</text:span></text:span></text:p>
      <text:p text:style-name="P11"><text:span text:style-name="_3c_C_3e_"><text:span text:style-name="T212"><text:tab/>…</text:span></text:span></text:p>
      <text:p text:style-name="P11"><text:span text:style-name="_3c_C_3e_"><text:span text:style-name="T212"><text:tab/></text:span></text:span><text:span text:style-name="_3c_C_2b__2b__3e_"><text:span text:style-name="T212">ExitCode::from(0)</text:span></text:span></text:p>
      <text:p text:style-name="P11"><text:span text:style-name="_3c_C_3e_"><text:span text:style-name="T212">}</text:span></text:span></text:p>
      <text:p text:style-name="P11"><text:span text:style-name="_3c_C_3e_"><text:span text:style-name="T212"/></text:span></text:p>
      <text:h text:style-name="P141" text:outline-level="3"><text:span text:style-name="_3c_C_3e_"><text:span text:style-name="T233">Result()</text:span></text:span></text:h>
      <text:p text:style-name="P11"><text:span text:style-name="_2f__2f_C"><text:span text:style-name="T96">R</text:span></text:span><text:span text:style-name="_2f__2f_C"><text:span text:style-name="T97">ust </text:span></text:span><text:span text:style-name="_2f__2f_C"><text:span text:style-name="T98">la forma de devolver valores es muchas veces un Result(), que es una pareja donde el primero es un Ok</text:span></text:span><text:span text:style-name="_2f__2f_C"><text:span text:style-name="T99">(valor)</text:span></text:span><text:span text:style-name="_2f__2f_C"><text:span text:style-name="T98">, y el segundo un Err</text:span></text:span><text:span text:style-name="_2f__2f_C"><text:span text:style-name="T99">(error)</text:span></text:span><text:span text:style-name="_2f__2f_C"><text:span text:style-name="T98">. </text:span></text:span><text:span text:style-name="_2f__2f_C"><text:span text:style-name="T99">Es como un interruptor de dos posiciones</text:span></text:span></text:p>
      <text:p text:style-name="P12"><text:span text:style-name="_2f__2f_C"><text:span text:style-name="T234">// Devuelve un Ok con el resultado (f32) O un Err con un texto (&amp;'static str)</text:span></text:span></text:p>
      <text:p text:style-name="P12"><text:span text:style-name="_3c_C_3e_"><text:span text:style-name="T234">fn dividir(dividendo: f32, divisor: f32) -&gt; </text:span></text:span><text:span text:style-name="_3c_C_2b__2b__3e_"><text:span text:style-name="T236">Result&lt;f32, &amp;'static str&gt;</text:span></text:span><text:span text:style-name="_3c_C_3e_"><text:span text:style-name="T234"> {</text:span></text:span></text:p>
      <text:p text:style-name="P12"><text:span text:style-name="_3c_C_3e_"><text:span text:style-name="T234">if divisor == 0.0 {</text:span></text:span></text:p>
      <text:p text:style-name="P12"><text:soft-page-break/><text:span text:style-name="_3c_C_3e_"><text:span text:style-name="T234"><text:tab/></text:span></text:span><text:span text:style-name="_3c_C_2b__2b__3e_"><text:span text:style-name="T236">return Err(</text:span></text:span><text:span text:style-name="_3c_C_3e_"><text:span text:style-name="T234">"¡No se puede dividir entre cero!"); </text:span></text:span><text:span text:style-name="_2f__2f_C"><text:span text:style-name="T234">// Pasó algo malo</text:span></text:span></text:p>
      <text:p text:style-name="P12"><text:span text:style-name="_3c_C_3e_"><text:span text:style-name="T234">}</text:span></text:span></text:p>
      <text:p text:style-name="P12"><text:span text:style-name="_3c_C_2b__2b__3e_"><text:span text:style-name="T236">Ok(dividendo / divisor)</text:span></text:span><text:span text:style-name="_3c_C_3e_"><text:span text:style-name="T234"> // Todo salió bien }</text:span></text:span></text:p>
      <text:p text:style-name="P12"><text:span text:style-name="_3c_C_3e_"><text:span text:style-name="T234">fn main() {</text:span></text:span></text:p>
      <text:p text:style-name="P12"><text:span text:style-name="_3c_C_3e_"><text:span text:style-name="T234"><text:tab/>// Cómo usar el resultado con un 'match' limpio</text:span></text:span></text:p>
      <text:p text:style-name="P12"><text:span text:style-name="_3c_C_3e_"><text:span text:style-name="T234"><text:tab/></text:span></text:span><text:span text:style-name="_3c_C_2b__2b__3e_"><text:span text:style-name="T236">match</text:span></text:span><text:span text:style-name="_3c_C_3e_"><text:span text:style-name="T234"> dividir(10.0, 2.0) {</text:span></text:span></text:p>
      <text:p text:style-name="P12"><text:span text:style-name="_3c_C_3e_"><text:span text:style-name="T234"><text:tab/><text:tab/></text:span></text:span><text:span text:style-name="_3c_C_2b__2b__3e_"><text:span text:style-name="T236">Ok(resultado) =&gt;</text:span></text:span><text:span text:style-name="_3c_C_3e_"><text:span text:style-name="T234"> println!("El resultado es: {}", resultado),</text:span></text:span></text:p>
      <text:p text:style-name="P12"><text:span text:style-name="_3c_C_3e_"><text:span text:style-name="T234"><text:tab/><text:tab/></text:span></text:span><text:span text:style-name="_3c_C_2b__2b__3e_"><text:span text:style-name="T236">Err(mensaje) =&gt;</text:span></text:span><text:span text:style-name="_3c_C_3e_"><text:span text:style-name="T234"> println!("Error: {}", mensaje),</text:span></text:span></text:p>
      <text:p text:style-name="P12"><text:span text:style-name="_3c_C_3e_"><text:span text:style-name="T234"><text:tab/>} </text:span></text:span></text:p>
      <text:p text:style-name="P13"><text:span text:style-name="_3c_C_3e_"><text:span text:style-name="T234">}</text:span></text:span></text:p>
      <text:p text:style-name="P13"><text:span text:style-name="_2f__2f_C"><text:span text:style-name="T100">Vamos a verlo con una forma más compleja. Abriendo un archivo que puede dar errores:</text:span></text:span></text:p>
      <text:p text:style-name="P13"><text:span text:style-name="_3c_C_3e_"><text:span text:style-name="T218">fn process_file(str: &amp;str) - &gt; </text:span></text:span><text:span text:style-name="_3c_C_2b__2b__3e_"><text:span text:style-name="T212">Result &lt;(), &amp;’static str&gt;</text:span></text:span><text:span text:style-name="_3c_C_3e_"><text:span text:style-name="T218">{ </text:span></text:span><text:span text:style-name="_2f__2f_C"><text:span text:style-name="T218">//() no nos interesa el tipo devuelto. </text:span></text:span><text:span text:style-name="_2f__2f_C"><text:span text:style-name="T220">U</text:span></text:span><text:span text:style-name="_2f__2f_C"><text:span text:style-name="T218">n void.</text:span></text:span><text:span text:style-name="_3c_C_3e_"><text:span text:style-name="T218"><text:line-break/><text:tab/>If let Ok(input_file) = </text:span></text:span><text:a xlink:type="simple" xlink:href="../../../../../:open(str" text:style-name="Internet_20_link" text:visited-style-name="Visited_20_Internet_20_Link"><text:span text:style-name="_3c_C_3e_"><text:span text:style-name="T253">File::open(str</text:span></text:span></text:a><text:span text:style-name="_3c_C_3e_"><text:span text:style-name="T254">)</text:span></text:span><text:span text:style-name="_3c_C_3e_"><text:span text:style-name="T218">{</text:span></text:span><text:span text:style-name="_2f__2f_C"><text:span text:style-name="T220">//tras el open es un Result&lt;File, std::io:.error&gt;</text:span></text:span></text:p>
      <text:p text:style-name="P14"><text:span text:style-name="_3c_C_3e_"><text:span text:style-name="T220"><text:tab/><text:tab/>let _reader = BufReader::new(input_file);</text:span></text:span></text:p>
      <text:p text:style-name="P14"><text:span text:style-name="_3c_C_3e_"><text:span text:style-name="T220"><text:tab/><text:tab/>for line in _reader.lines(){</text:span></text:span></text:p>
      <text:p text:style-name="P15"><text:span text:style-name="_3c_C_3e_"><text:span text:style-name="T220"><text:tab/><text:tab/><text:tab/></text:span></text:span><text:span text:style-name="_3c_C_2b__2b__3e_"><text:span text:style-name="T212">let line = match line{</text:span></text:span></text:p>
      <text:p text:style-name="P15"><text:span text:style-name="_3c_C_2b__2b__3e_"><text:span text:style-name="T212"><text:tab/><text:tab/><text:tab/><text:tab/>Ok(value) =&gt; value,</text:span></text:span></text:p>
      <text:p text:style-name="P15"><text:span text:style-name="_3c_C_2b__2b__3e_"><text:span text:style-name="T212"><text:tab/><text:tab/><text:tab/><text:tab/>Err(e) =&gt; return Err(“Error: Error leyendo el archivo\n”),</text:span></text:span></text:p>
      <text:p text:style-name="P15"><text:span text:style-name="_3c_C_3e_"><text:span text:style-name="T221"><text:tab/><text:tab/><text:tab/></text:span></text:span><text:span text:style-name="_3c_C_2b__2b__3e_"><text:span text:style-name="T212">};</text:span></text:span></text:p>
      <text:p text:style-name="P14"><text:span text:style-name="_3c_C_3e_"><text:span text:style-name="T220"><text:tab/><text:tab/>}</text:span></text:span></text:p>
      <text:p text:style-name="P14"><text:span text:style-name="_3c_C_2b__2b__3e_"><text:span text:style-name="T212">return Ok(());</text:span></text:span></text:p>
      <text:p text:style-name="P15"><text:span text:style-name="_3c_C_3e_"><text:span text:style-name="T221">} else {</text:span></text:span></text:p>
      <text:p text:style-name="P15"><text:span text:style-name="_3c_C_3e_"><text:span text:style-name="T221"><text:tab/></text:span></text:span><text:span text:style-name="_3c_C_2b__2b__3e_"><text:span text:style-name="T212">return Err(“Error: No puede abrir el fichero\n”);</text:span></text:span></text:p>
      <text:p text:style-name="P15"><text:span text:style-name="_3c_C_3e_"><text:span text:style-name="T221">}</text:span></text:span></text:p>
      <text:p text:style-name="P15"><text:span text:style-name="_3c_C_3e_"><text:span text:style-name="T221">}</text:span></text:span></text:p>
      <text:p text:style-name="P15"><text:span text:style-name="_2f__2f_C"><text:span text:style-name="T101">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212">let line = line?;</text:span></text:span></text:p>
      <text:p text:style-name="P16"><text:span text:style-name="_2f__2f_C"><text:span text:style-name="T222">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212">let line = line.map_err(|_|, “Error: Error leyendo el archivo\n”)?;</text:span></text:span></text:p>
      <text:h text:style-name="P142" text:outline-level="3"><text:soft-page-break/></text:h>
      <text:h text:style-name="P142" text:outline-level="3">ESTRUCTURAS</text:h>
      <text:p text:style-name="P5"><text:span text:style-name="_2f__2f_C"><text:span text:style-name="T96">Rust no tiene objectos ni clases, pero s</text:span></text:span><text:span text:style-name="_2f__2f_C"><text:span text:style-name="T107">í </text:span></text:span><text:span text:style-name="_2f__2f_C"><text:span text:style-name="T96">que puede acercarse a ellos con las estructuras. En Rust todo es privado que se declare</text:span></text:span><text:span text:style-name="_2f__2f_C"><text:span text:style-name="T102">. Para hacerlo accesible hay que ponerle la palabra </text:span></text:span><text:span text:style-name="_3c_C_2b__2b__3e_"><text:span text:style-name="T255">pub</text:span></text:span><text:span text:style-name="_2f__2f_C"><text:span text:style-name="T102"> delante. No solo a la estructura</text:span></text:span><text:span text:style-name="_2f__2f_C"><text:span text:style-name="T103">.</text:span></text:span></text:p>
      <text:p text:style-name="P17"><text:span text:style-name="_2f__2f_C"><text:span text:style-name="T161">(</text:span></text:span><text:span text:style-name="_3c_C_3e_"><text:span text:style-name="T218">fichero.rs</text:span></text:span><text:span text:style-name="_2f__2f_C"><text:span text:style-name="T161">)</text:span></text:span></text:p>
      <text:p text:style-name="P17"><text:span text:style-name="_3c_C_2b__2b__3e_"><text:span text:style-name="T212">pub struct </text:span></text:span><text:span text:style-name="_3c_C_2b__2b__3e_"><text:span text:style-name="T213">P</text:span></text:span><text:span text:style-name="_3c_C_3e_"><text:span text:style-name="T218">rueba{</text:span></text:span><text:span text:style-name="_3c_C_3e_"><text:span text:style-name="T223"> </text:span></text:span><text:span text:style-name="_2f__2f_C"><text:span text:style-name="T223">//debe ser CamelCase P mayúscula</text:span></text:span></text:p>
      <text:p text:style-name="P17"><text:span text:style-name="_3c_C_3e_"><text:span text:style-name="T218"><text:tab/></text:span></text:span><text:span text:style-name="_3c_C_2b__2b__3e_"><text:span text:style-name="T212">pub</text:span></text:span><text:span text:style-name="_3c_C_3e_"><text:span text:style-name="T218"> var1: i32</text:span></text:span><text:span text:style-name="_3c_C_2b__2b__3e_"><text:span text:style-name="T212">,</text:span></text:span></text:p>
      <text:p text:style-name="P17"><text:span text:style-name="_3c_C_3e_"><text:span text:style-name="T218"><text:tab/></text:span></text:span><text:span text:style-name="_3c_C_2b__2b__3e_"><text:span text:style-name="T212">pub</text:span></text:span><text:span text:style-name="_3c_C_3e_"><text:span text:style-name="T218"> var2: char</text:span></text:span><text:span text:style-name="_3c_C_2b__2b__3e_"><text:span text:style-name="T212">,</text:span></text:span><text:span text:style-name="_3c_C_3e_"><text:span text:style-name="T223"> </text:span></text:span><text:span text:style-name="_2f__2f_C"><text:span text:style-name="T218">//si no son pub estas variables no se puede acceder a ellas</text:span></text:span></text:p>
      <text:p text:style-name="P17"><text:span text:style-name="_3c_C_3e_"><text:span text:style-name="T218">}</text:span></text:span></text:p>
      <text:p text:style-name="P93"><text:span text:style-name="_2f__2f_C"><text:span text:style-name="T104">Para declararlas hay que hacer asi, ya que tiene que declararse en la linea:</text:span></text:span></text:p>
      <text:p text:style-name="P93"><text:span text:style-name="_3c_C_2b__2b__3e_"><text:span text:style-name="T212">let kk = Prueba { n1: 32, str: 'b', }</text:span></text:span></text:p>
      <text:p text:style-name="P17"><text:span text:style-name="_2f__2f_C"><text:span text:style-name="T161"/></text:span></text:p>
      <text:p text:style-name="P17"><text:span text:style-name="_2f__2f_C"><text:span text:style-name="T166">Si la estructura esta en otro archivo (modulo) lo podemos </text:span></text:span><text:span text:style-name="_2f__2f_C"><text:span text:style-name="T161">Importa</text:span></text:span><text:span text:style-name="_2f__2f_C"><text:span text:style-name="T166">r</text:span></text:span><text:span text:style-name="_2f__2f_C"><text:span text:style-name="T161"> el </text:span></text:span><text:span text:style-name="_3c_C_3e_"><text:span text:style-name="T218">fichero.rs</text:span></text:span><text:span text:style-name="_2f__2f_C"><text:span text:style-name="T161"> como <text:line-break/></text:span></text:span></text:p>
      <text:p text:style-name="P18"><text:span text:style-name="_2f__2f_C"><text:span text:style-name="T162">(fichero: main.rs)</text:span></text:span></text:p>
      <text:p text:style-name="P17"><text:span text:style-name="_3c_C_2b__2b__3e_"><text:span text:style-name="T212">mod</text:span></text:span><text:span text:style-name="_3c_C_3e_"><text:span text:style-name="T218"> fichero;</text:span></text:span><text:span text:style-name="_3c_C_3e_"><text:span text:style-name="T223"> </text:span></text:span><text:span text:style-name="_2f__2f_C"><text:span text:style-name="T223">//importa el fichero fichero.rs</text:span></text:span></text:p>
      <text:p text:style-name="P17"><text:span text:style-name="_3c_C_3e_"><text:span text:style-name="T218">fn main(){</text:span></text:span></text:p>
      <text:p text:style-name="P17"><text:span text:style-name="_3c_C_3e_"><text:span text:style-name="T218"><text:tab/>let a = fichero::prueba { var1: 42, var2: 'a'</text:span></text:span><text:span text:style-name="_3c_C_3e_"><text:span text:style-name="T223">}</text:span></text:span><text:span text:style-name="_3c_C_3e_"><text:span text:style-name="T218">;</text:span></text:span></text:p>
      <text:p text:style-name="P17"><text:span text:style-name="_3c_C_3e_"><text:span text:style-name="T218">} </text:span></text:span></text:p>
      <text:p text:style-name="P17"><text:span text:style-name="_3c_C_3e_"><text:span text:style-name="T218"/></text:span></text:p>
      <text:p text:style-name="P18"><text:span text:style-name="_2f__2f_C"><text:span text:style-name="T121">Ahora imaginemos que tenemos un archivo.rs que tiene esto:</text:span></text:span></text:p>
      <text:p text:style-name="P18"><text:span text:style-name="_2f__2f_C"><text:span text:style-name="T121">(</text:span></text:span><text:span text:style-name="_3c_C_3e_"><text:span text:style-name="T4">fichero.rs</text:span></text:span><text:span text:style-name="_2f__2f_C"><text:span text:style-name="T121">)</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21">No habr</text:span></text:span><text:span text:style-name="_2f__2f_C"><text:span text:style-name="T109">í</text:span></text:span><text:span text:style-name="_2f__2f_C"><text:span text:style-name="T121">a problema en darle valor dentro de fichero.rs PERO si queremos acceder a el, tendriamos que hacer un metodo de la estructura en el propio archivo fichero.rs:<text:line-break/><text:line-break/></text:span></text:span><text:span text:style-name="_3c_C_2b__2b__3e_"><text:span text:style-name="T48">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oft-page-break/><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22">En el main.rs:<text:line-break/></text:span></text:span></text:p>
      <text:p text:style-name="P20"><text:span text:style-name="_3c_C_3e_"><text:span text:style-name="T4">mod fichero;</text:span></text:span></text:p>
      <text:p text:style-name="P20"><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23">También se puede definir una estructura como:</text:span></text:span></text:p>
      <text:p text:style-name="P22"><text:span text:style-name="_3c_C_2b__2b__3e_"><text:span text:style-name="T48">struct St1(i32);</text:span></text:span></text:p>
      <text:p text:style-name="P22"><text:span text:style-name="_3c_C_2b__2b__3e_"><text:span text:style-name="T48">struct St2(f32, String, bool);</text:span></text:span></text:p>
      <text:p text:style-name="P22"><text:span text:style-name="_2f__2f_C"><text:span text:style-name="T123">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23">Y para acceder a sus campos sería con </text:span></text:span><text:span text:style-name="_3c_C_2b__2b__3e_"><text:span text:style-name="T48">.0</text:span></text:span><text:span text:style-name="_2f__2f_C"><text:span text:style-name="T123">, .</text:span></text:span><text:span text:style-name="_3c_C_2b__2b__3e_"><text:span text:style-name="T48">1</text:span></text:span><text:span text:style-name="_2f__2f_C"><text:span text:style-name="T123">, </text:span></text:span><text:span text:style-name="_3c_C_2b__2b__3e_"><text:span text:style-name="T48">.2</text:span></text:span><text:span text:style-name="_2f__2f_C"><text:span text:style-name="T123">,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43" text:outline-level="3"><text:span text:style-name="_3c_C_3e_"><text:span text:style-name="T167">FUNCIONES</text:span></text:span></text:h>
      <text:p text:style-name="P23"><text:span text:style-name="_2f__2f_C"><text:span text:style-name="T124">Las funciones en Rust estan divididas entre las que no devuelven nada y las que s</text:span></text:span><text:span text:style-name="_2f__2f_C"><text:span text:style-name="T110">í</text:span></text:span><text:span text:style-name="_2f__2f_C"><text:span text:style-name="T124">. </text:span></text:span></text:p>
      <text:p text:style-name="P23"><text:span text:style-name="_2f__2f_C"><text:span text:style-name="T124">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24">DEVUELVE:</text:span></text:span></text:p>
      <text:p text:style-name="P23"><text:span text:style-name="_3c_C_3e_"><text:span text:style-name="T4">fn<text:tab/>suma(num1: &amp;i32, num2: &amp;i32) </text:span></text:span><text:span text:style-name="_3c_C_2b__2b__3e_"><text:span text:style-name="T48">-&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oft-page-break/><text:span text:style-name="_3c_C_3e_"><text:span text:style-name="T4">}</text:span></text:span></text:p>
      <text:p text:style-name="P23"><text:span text:style-name="_2f__2f_C"><text:span text:style-name="T124">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24">Para </text:span></text:span><text:span text:style-name="_2f__2f_C"><text:span text:style-name="T125">cambiar el valor de un numero</text:span></text:span><text:span text:style-name="_2f__2f_C"><text:span text:style-name="T124">:</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pan text:style-name="_2f__2f_C"><text:span text:style-name="T125">y para llamarla:</text:span></text:span></text:p>
      <text:p text:style-name="P24"><text:span text:style-name="_3c_C_3e_"><text:span text:style-name="T4">cambia(&amp;mut x);</text:span></text:span></text:p>
      <text:p text:style-name="P24"><text:span text:style-name="_3c_C_3e_"><text:span text:style-name="T4"/></text:span></text:p>
      <text:h text:style-name="P144" text:outline-level="3"><text:span text:style-name="_3c_C_3e_"><text:span text:style-name="T168">ENUMS</text:span></text:span></text:h>
      <text:p text:style-name="P25"><text:span text:style-name="_2f__2f_C"><text:span text:style-name="T126">Los enums son tipos de variable como en C++11 y funcionan igual</text:span></text:span><text:span text:style-name="_2f__2f_C"><text:span text:style-name="T127"> salvo por los métodos que no se pueden hacer en C++</text:span></text:span><text:span text:style-name="_2f__2f_C"><text:span text:style-name="T126">:</text:span></text:span></text:p>
      <text:p text:style-name="P25"><text:span text:style-name="_3c_C_2b__2b__3e_"><text:span text:style-name="T48">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26">De tal forma que para darle un valor se puede hacer:</text:span></text:span></text:p>
      <text:p text:style-name="P25"><text:span text:style-name="_3c_C_3e_"><text:span text:style-name="T4">let animal: Animales = </text:span></text:span><text:span text:style-name="_3c_C_2b__2b__3e_"><text:span text:style-name="T48">Animales::Mosca;</text:span></text:span></text:p>
      <text:p text:style-name="P25"><text:span text:style-name="_2f__2f_C"><text:span text:style-name="T126"/></text:span></text:p>
      <text:p text:style-name="P25"><text:span text:style-name="_2f__2f_C"><text:span text:style-name="T126">Podríamos crear funciones propias como:</text:span></text:span></text:p>
      <text:p text:style-name="P25"><text:span text:style-name="_3c_C_2b__2b__3e_"><text:span text:style-name="T48">impl Animales</text:span></text:span><text:span text:style-name="_3c_C_3e_"><text:span text:style-name="T4">{</text:span></text:span></text:p>
      <text:p text:style-name="P25"><text:span text:style-name="_3c_C_3e_"><text:span text:style-name="T4"><text:tab/></text:span></text:span><text:span text:style-name="_3c_C_2b__2b__3e_"><text:span text:style-name="T48">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48">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48">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48">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oft-page-break/><text:span text:style-name="_2f__2f_C"><text:span text:style-name="T126">Siempre habrá que definir cada uno de los Enums en los </text:span></text:span><text:span text:style-name="_3c_C_2b__2b__3e_"><text:span text:style-name="T48">match</text:span></text:span><text:span text:style-name="_2f__2f_C"><text:span text:style-name="T126">, por que si no el compilador dará error. A no ser que se utilize el </text:span></text:span><text:span text:style-name="_2f__2f_C"><text:span text:style-name="T127">comodín</text:span></text:span><text:span text:style-name="_2f__2f_C"><text:span text:style-name="T126"> "</text:span></text:span><text:span text:style-name="_3c_C_2b__2b__3e_"><text:span text:style-name="T48">_</text:span></text:span><text:span text:style-name="_2f__2f_C"><text:span text:style-name="T126">" </text:span></text:span><text:span text:style-name="_2f__2f_C"><text:span text:style-name="T127">que alberga a los restantes.</text:span></text:span><text:span text:style-name="_2f__2f_C"><text:span text:style-name="T126"><text:line-break/></text:span></text:span></text:p>
      <text:p text:style-name="P25"><text:span text:style-name="_3c_C_3e_"><text:span text:style-name="T48">impl Animales{</text:span></text:span></text:p>
      <text:p text:style-name="P25"><text:span text:style-name="_3c_C_3e_"><text:span text:style-name="T48"><text:tab/>fn es_mamifero(&amp;self) -&gt; bool{</text:span></text:span></text:p>
      <text:p text:style-name="P25"><text:span text:style-name="_3c_C_3e_"><text:span text:style-name="T48"><text:tab/><text:tab/>match self {</text:span></text:span></text:p>
      <text:p text:style-name="P25"><text:span text:style-name="_3c_C_3e_"><text:span text:style-name="T48"><text:tab/><text:tab/><text:tab/>Animales::Mosca =&gt; false,</text:span></text:span></text:p>
      <text:p text:style-name="P25"><text:span text:style-name="_3c_C_3e_"><text:span text:style-name="T48"><text:tab/><text:tab/><text:tab/></text:span></text:span><text:span text:style-name="_3c_C_2b__2b__3e_"><text:span text:style-name="T48">_ =&gt;</text:span></text:span><text:span text:style-name="_3c_C_3e_"><text:span text:style-name="T48"> true</text:span></text:span></text:p>
      <text:p text:style-name="P25"><text:span text:style-name="_3c_C_3e_"><text:span text:style-name="T48"><text:tab/><text:tab/>}</text:span></text:span></text:p>
      <text:p text:style-name="P25"><text:span text:style-name="_3c_C_3e_"><text:span text:style-name="T48"><text:tab/>}</text:span></text:span></text:p>
      <text:p text:style-name="P25"><text:span text:style-name="_3c_C_3e_"><text:span text:style-name="T48">}</text:span></text:span></text:p>
      <text:p text:style-name="P26"><text:span text:style-name="_2f__2f_C"><text:span text:style-name="T128">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48">.es_mamifero() </text:span></text:span><text:span text:style-name="_3c_C_3e_"><text:span text:style-name="T4">{...}</text:span></text:span></text:p>
      <text:p text:style-name="P26"><text:span text:style-name="_3c_C_3e_"><text:span text:style-name="T4"/></text:span></text:p>
      <text:h text:style-name="P145" text:outline-level="3"><text:span text:style-name="_3c_C_3e_"><text:span text:style-name="T168">ENUMS</text:span></text:span><text:span text:style-name="_3c_C_3e_"><text:span text:style-name="T169"> con variables extra</text:span></text:span></text:h>
      <text:p text:style-name="P27"><text:span text:style-name="_2f__2f_C"><text:span text:style-name="T129">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48">{</text:span></text:span></text:p>
      <text:p text:style-name="P27"><text:span text:style-name="_3c_C_2b__2b__3e_"><text:span text:style-name="T48"><text:tab/><text:tab/>asignado_a: String,</text:span></text:span></text:p>
      <text:p text:style-name="P27"><text:span text:style-name="_3c_C_2b__2b__3e_"><text:span text:style-name="T48"><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29">Y la forma de acceder a ello no es mediante un </text:span></text:span></text:p>
      <text:p text:style-name="P27"><text:span text:style-name="_2f__2f_C"><text:span text:style-name="T129"/></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48">//error de compilación</text:span></text:span></text:p>
      <text:p text:style-name="P27"><text:span text:style-name="_2f__2f_C"><text:span text:style-name="T129"/></text:span></text:p>
      <text:p text:style-name="P27"><text:span text:style-name="_2f__2f_C"><text:span text:style-name="T129">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48">{ asignado_a }</text:span></text:span><text:span text:style-name="_3c_C_3e_"><text:span text:style-name="T4"> =&gt; { println! "Lo hace: {}",</text:span></text:span><text:span text:style-name="_3c_C_2b__2b__3e_"><text:span text:style-name="T48">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oft-page-break/><text:span text:style-name="_2f__2f_C"><text:span text:style-name="T258">PERO CUIDADO!!!!</text:span></text:span><text:span text:style-name="_2f__2f_C"><text:span text:style-name="T130">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30">al </text:span></text:span><text:span text:style-name="_3c_C_3e_"><text:span text:style-name="T4">match</text:span></text:span><text:span text:style-name="_2f__2f_C"><text:span text:style-name="T130"> y por lo tanto al querer usar el </text:span></text:span><text:span text:style-name="_3c_C_3e_"><text:span text:style-name="T4">Status</text:span></text:span><text:span text:style-name="_2f__2f_C"><text:span text:style-name="T130"> de la instancia después daría error de compilación. Para ello es mejor hacer:</text:span></text:span></text:p>
      <text:p text:style-name="P28"><text:span text:style-name="_3c_C_3e_"><text:span text:style-name="T4">match </text:span></text:span><text:span text:style-name="_3c_C_2b__2b__3e_"><text:span text:style-name="T48">&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30"> y ahí se podria usar sin problemas después.</text:span></text:span></text:p>
      <text:h text:style-name="P146" text:outline-level="3"><text:span text:style-name="_3c_C_3e_"><text:span text:style-name="T167"/></text:span></text:h>
      <text:p text:style-name="P29"><text:span text:style-name="_2f__2f_C"><text:span text:style-name="T163">También se puede hacer el acceso con el if let. </text:span></text:span></text:p>
      <text:p text:style-name="P29"><text:span text:style-name="_3c_C_3e_"><text:span text:style-name="T218">impl Ticket{</text:span></text:span></text:p>
      <text:p text:style-name="P29"><text:span text:style-name="_3c_C_3e_"><text:span text:style-name="T218"><text:tab/>pub fn assigned_to(&amp;self) -&gt; &amp;str{</text:span></text:span></text:p>
      <text:p text:style-name="P29"><text:span text:style-name="_3c_C_3e_"><text:span text:style-name="T218"><text:tab/><text:tab/>if let Status::EnProgreso { asignado_a : kk } = &amp;self.status { kk }</text:span></text:span></text:p>
      <text:p text:style-name="P29"><text:span text:style-name="_3c_C_3e_"><text:span text:style-name="T218"><text:tab/><text:tab/>else { panic!();}</text:span></text:span></text:p>
      <text:p text:style-name="P29"><text:span text:style-name="_3c_C_3e_"><text:span text:style-name="T218"><text:tab/>}</text:span></text:span></text:p>
      <text:p text:style-name="P29"><text:span text:style-name="_3c_C_3e_"><text:span text:style-name="T218">}</text:span></text:span></text:p>
      <text:p text:style-name="P29"><text:span text:style-name="_2f__2f_C"><text:span text:style-name="T163">Es complicado de entender pero ahi va:</text:span></text:span></text:p>
      <text:p text:style-name="P29"><text:span text:style-name="_2f__2f_C"><text:span text:style-name="T163">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212">if let PLANTILLA (nueva variable) = algo que existe o no.</text:span></text:span></text:p>
      <text:p text:style-name="P29"><text:span text:style-name="_2f__2f_C"><text:span text:style-name="T163"/></text:span></text:p>
      <text:p text:style-name="P29"><text:span text:style-name="_2f__2f_C"><text:span text:style-name="T163">asi que se leería, que si esto: </text:span></text:span><text:span text:style-name="_3c_C_2b__2b__3e_"><text:span text:style-name="T212">self.status</text:span></text:span><text:span text:style-name="_2f__2f_C"><text:span text:style-name="T163"> existe y se adapta a que sea un </text:span></text:span><text:span text:style-name="_3c_C_3e_"><text:span text:style-name="T218">Status::EnProgreso { asignado_a },</text:span></text:span><text:span text:style-name="_2f__2f_C"><text:span text:style-name="T163"> entonces mete ese </text:span></text:span><text:span text:style-name="_3c_C_3e_"><text:span text:style-name="T218">asignado_a</text:span></text:span><text:span text:style-name="_2f__2f_C"><text:span text:style-name="T163"> dentro de la variable </text:span></text:span><text:span text:style-name="_3c_C_3e_"><text:span text:style-name="T218">kk</text:span></text:span><text:span text:style-name="_2f__2f_C"><text:span text:style-name="T163"> y devuelve ese </text:span></text:span><text:span text:style-name="_3c_C_3e_"><text:span text:style-name="T218">kk</text:span></text:span><text:span text:style-name="_2f__2f_C"><text:span text:style-name="T163"> de esta forma </text:span></text:span><text:span text:style-name="_3c_C_3e_"><text:span text:style-name="T218">{ kk }</text:span></text:span><text:span text:style-name="_2f__2f_C"><text:span text:style-name="T163">.</text:span></text:span><text:span text:style-name="_2f__2f_C"><text:span text:style-name="T164"> El meter ese valor, se llama DESTRUCTURACION. Sacar el valor de la caja y meterlo dentro.</text:span></text:span></text:p>
      <text:p text:style-name="P30"><text:span text:style-name="_2f__2f_C"><text:span text:style-name="T164">Por qué es necesario? por que quizá podríamos pensar hacer un:</text:span></text:span></text:p>
      <text:p text:style-name="P30"><text:span text:style-name="_3c_C_3e_"><text:span text:style-name="T218">if Status::EnProgreso.asignado_a == {asignado_a = paco}</text:span></text:span><text:span text:style-name="_2f__2f_C"><text:span text:style-name="T164"> pero primero no sabemos a quien está asignado, y segundo que pasaría si no existe ese </text:span></text:span><text:span text:style-name="_3c_C_3e_"><text:span text:style-name="T212">EnProgreso</text:span></text:span><text:span text:style-name="_2f__2f_C"><text:span text:style-name="T164"> y es un </text:span></text:span><text:span text:style-name="_3c_C_3e_"><text:span text:style-name="T218">Status::Hecho</text:span></text:span><text:span text:style-name="_2f__2f_C"><text:span text:style-name="T164">? no existiría el </text:span></text:span><text:span text:style-name="_3c_C_3e_"><text:span text:style-name="T218">.asignado_a</text:span></text:span><text:span text:style-name="_2f__2f_C"><text:span text:style-name="T164">, y por lo tanto daría un </text:span></text:span><text:span text:style-name="_3c_C_2b__2b__3e_"><text:span text:style-name="T212">segfaul</text:span></text:span><text:span text:style-name="_2f__2f_C"><text:span text:style-name="T164">.</text:span></text:span></text:p>
      <text:p text:style-name="P29"><text:span text:style-name="_2f__2f_C"><text:span text:style-name="T163">Todo se podría haber resumido asi:</text:span></text:span></text:p>
      <text:p text:style-name="P29"><text:span text:style-name="_3c_C_3e_"><text:span text:style-name="T218">if let Status::EnProgreso { </text:span></text:span><text:span text:style-name="_3c_C_2b__2b__3e_"><text:span text:style-name="T212">asignado_a</text:span></text:span><text:span text:style-name="_3c_C_3e_"><text:span text:style-name="T218"> } = &amp;self.status { </text:span></text:span><text:span text:style-name="_3c_C_2b__2b__3e_"><text:span text:style-name="T212">asignado_a</text:span></text:span><text:span text:style-name="_3c_C_3e_"><text:span text:style-name="T218"> } else....</text:span></text:span></text:p>
      <text:p text:style-name="P31"><text:span text:style-name="_2f__2f_C"><text:span text:style-name="T163"/></text:span></text:p>
      <text:p text:style-name="P31"><text:span text:style-name="_2f__2f_C"><text:span text:style-name="T165">Pero importante. Fijarse lo que devuelve: </text:span></text:span></text:p>
      <text:p text:style-name="P31"><text:span text:style-name="_3c_C_3e_"><text:span text:style-name="T218">pub fn assigned_to(&amp;self) -&gt; &amp;str{</text:span></text:span></text:p>
      <text:p text:style-name="P31"><text:soft-page-break/><text:span text:style-name="_2f__2f_C"><text:span text:style-name="T165">Es decir una dirección de memoria (</text:span></text:span><text:span text:style-name="_3c_C_3e_"><text:span text:style-name="T218">char*</text:span></text:span><text:span text:style-name="_2f__2f_C"><text:span text:style-name="T165">) por lo tanto el segundo </text:span></text:span><text:span text:style-name="_3c_C_3e_"><text:span text:style-name="T218">asignado_a</text:span></text:span><text:span text:style-name="_2f__2f_C"><text:span text:style-name="T165"> o el </text:span></text:span><text:span text:style-name="_3c_C_3e_"><text:span text:style-name="T218">{kk}</text:span></text:span><text:span text:style-name="_2f__2f_C"><text:span text:style-name="T165"> primero, son direcciones de memoria y está bien. Si devolviéramos valores, entonces tendría que ir como </text:span></text:span><text:span text:style-name="_3c_C_2b__2b__3e_"><text:span text:style-name="T212">*asignado_a</text:span></text:span><text:span text:style-name="_2f__2f_C"><text:span text:style-name="T165">.</text:span></text:span></text:p>
      <text:p text:style-name="P31"><text:span text:style-name="_3c_C_3e_"><text:span text:style-name="T218">enum Shape{</text:span></text:span></text:p>
      <text:p text:style-name="P31"><text:span text:style-name="_3c_C_3e_"><text:span text:style-name="T218"><text:tab/>Circle { radius: f64}, Square { border: f64 }, Rectangle { width: f64 }, </text:span></text:span></text:p>
      <text:p text:style-name="P31"><text:span text:style-name="_3c_C_3e_"><text:span text:style-name="T218">}</text:span></text:span></text:p>
      <text:p text:style-name="P31"><text:span text:style-name="_3c_C_3e_"><text:span text:style-name="T218">impl Shape {</text:span></text:span></text:p>
      <text:p text:style-name="P31"><text:span text:style-name="_3c_C_3e_"><text:span text:style-name="T218"><text:tab/>pub fn radius(&amp;self) -&gt; </text:span></text:span><text:span text:style-name="_3c_C_2b__2b__3e_"><text:span text:style-name="T212">f64</text:span></text:span><text:span text:style-name="_3c_C_3e_"><text:span text:style-name="T218">{</text:span></text:span></text:p>
      <text:p text:style-name="P31"><text:span text:style-name="_3c_C_3e_"><text:span text:style-name="T218"><text:tab/><text:tab/>if let Shape::Circle { radius } = </text:span></text:span><text:span text:style-name="_3c_C_2b__2b__3e_"><text:span text:style-name="T212">&amp;</text:span></text:span><text:span text:style-name="_3c_C_3e_"><text:span text:style-name="T218">self { </text:span></text:span><text:span text:style-name="_3c_C_2b__2b__3e_"><text:span text:style-name="T212">*radius</text:span></text:span><text:span text:style-name="_3c_C_3e_"><text:span text:style-name="T218"> } </text:span></text:span><text:span text:style-name="_2f__2f_C"><text:span text:style-name="T218">//derreferencia por ser </text:span></text:span><text:span text:style-name="_2f__2f_C"><text:span text:style-name="T224">&amp;self</text:span></text:span></text:p>
      <text:p text:style-name="P31"><text:span text:style-name="_3c_C_3e_"><text:span text:style-name="T218"><text:tab/><text:tab/>else { panic!(); }</text:span></text:span></text:p>
      <text:p text:style-name="P31"><text:span text:style-name="_3c_C_3e_"><text:span text:style-name="T218"><text:tab/>}</text:span></text:span></text:p>
      <text:p text:style-name="P108"><text:span text:style-name="_3c_C_3e_"><text:span text:style-name="T218">}</text:span></text:span></text:p>
      <text:p text:style-name="P105"><text:span text:style-name="_3c_C_3e_"><text:span text:style-name="T170"/></text:span></text:p>
      <text:h text:style-name="P146" text:outline-level="3"><text:span text:style-name="_3c_C_3e_"><text:span text:style-name="T167">FUNCIONES</text:span></text:span><text:span text:style-name="_3c_C_3e_"><text:span text:style-name="T171"> CLOSURE |</text:span></text:span><text:span text:style-name="_3c_C_3e_"><text:span text:style-name="T176">argumentos de funcion </text:span></text:span><text:span text:style-name="_3c_C_3e_"><text:span text:style-name="T171">|</text:span></text:span></text:h>
      <text:p text:style-name="P32"><text:span text:style-name="_2f__2f_C"><text:span text:style-name="T131">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31">Pero podemos hacerla Closure</text:span></text:span><text:span text:style-name="_2f__2f_C"><text:span text:style-name="T156"> (o funci</text:span></text:span><text:span text:style-name="_2f__2f_C"><text:span text:style-name="T113">ó</text:span></text:span><text:span text:style-name="_2f__2f_C"><text:span text:style-name="T156">n an</text:span></text:span><text:span text:style-name="_2f__2f_C"><text:span text:style-name="T113">ó</text:span></text:span><text:span text:style-name="_2f__2f_C"><text:span text:style-name="T156">nima)</text:span></text:span><text:span text:style-name="_2f__2f_C"><text:span text:style-name="T131">:</text:span></text:span></text:p>
      <text:p text:style-name="P32"><text:span text:style-name="_3c_C_2b__2b__3e_"><text:span text:style-name="T48">let sumar = |x</text:span></text:span><text:span text:style-name="_3c_C_2b__2b__3e_"><text:span text:style-name="T49">,</text:span></text:span><text:span text:style-name="_3c_C_2b__2b__3e_"><text:span text:style-name="T48"> y| x + y;</text:span></text:span></text:p>
      <text:p text:style-name="P32"><text:span text:style-name="_2f__2f_C"><text:span text:style-name="T131">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31">esto mismo se puede hacer en una unica linea asi:</text:span></text:span></text:p>
      <text:p text:style-name="P32"><text:span text:style-name="_3c_C_2b__2b__3e_"><text:span text:style-name="T48">let sumar = </text:span></text:span><text:span text:style-name="_3c_C_2b__2b__3e_"><text:span text:style-name="T49">(</text:span></text:span><text:span text:style-name="_3c_C_2b__2b__3e_"><text:span text:style-name="T48">|x</text:span></text:span><text:span text:style-name="_3c_C_2b__2b__3e_"><text:span text:style-name="T49">,</text:span></text:span><text:span text:style-name="_3c_C_2b__2b__3e_"><text:span text:style-name="T48"> y| x + y</text:span></text:span><text:span text:style-name="_3c_C_2b__2b__3e_"><text:span text:style-name="T49">)(2, 3);</text:span></text:span></text:p>
      <text:p text:style-name="P101"><text:span text:style-name="_2f__2f_C"><text:span text:style-name="T156">Donde los argumentos que se le pasan est</text:span></text:span><text:span text:style-name="_2f__2f_C"><text:span text:style-name="T113">á</text:span></text:span><text:span text:style-name="_2f__2f_C"><text:span text:style-name="T156">n entre </text:span></text:span><text:span text:style-name="_3c_C_2b__2b__3e_"><text:span text:style-name="T48">| |</text:span></text:span><text:span text:style-name="_2f__2f_C"><text:span text:style-name="T156"> y los parametros est</text:span></text:span><text:span text:style-name="_2f__2f_C"><text:span text:style-name="T113">á</text:span></text:span><text:span text:style-name="_2f__2f_C"><text:span text:style-name="T156">n entre par</text:span></text:span><text:span text:style-name="_2f__2f_C"><text:span text:style-name="T113">é</text:span></text:span><text:span text:style-name="_2f__2f_C"><text:span text:style-name="T156">ntesis.</text:span></text:span></text:p>
      <text:p text:style-name="P32"><text:span text:style-name="_2f__2f_C"><text:span text:style-name="T131"/></text:span></text:p>
      <text:h text:style-name="P147" text:outline-level="3"><text:soft-page-break/><text:span text:style-name="_3c_C_3e_"><text:span text:style-name="T193"/></text:span></text:h>
      <text:h text:style-name="P147" text:outline-level="3"><text:span text:style-name="_3c_C_3e_"><text:span text:style-name="T193">TRAITS</text:span></text:span></text:h>
      <text:h text:style-name="P151" text:outline-level="3"><text:span text:style-name="_3c_C_3e_"><text:span text:style-name="T172">SOBRECARGA DE OPERADORES</text:span></text:span></text:h>
      <text:p text:style-name="P33"><text:span text:style-name="_2f__2f_C"><text:span text:style-name="T132">Rust tiene sobrecarga de operadores, y la forma de declararlos es en el </text:span></text:span><text:span text:style-name="_3c_C_2b__2b__3e_"><text:span text:style-name="T48">impl</text:span></text:span><text:span text:style-name="_2f__2f_C"><text:span text:style-name="T132"> de tal forma:</text:span></text:span></text:p>
      <text:p text:style-name="P34"><text:span text:style-name="_3c_C_3e_"><text:span text:style-name="T4">use std::ops::Add;</text:span></text:span><text:span text:style-name="_2f__2f_C"><text:span text:style-name="T133">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59">use</text:span></text:span><text:span text:style-name="_2f__2f_C"><text:span text:style-name="T260"> </text:span></text:span><text:span text:style-name="_2f__2f_C"><text:span text:style-name="T261">std</text:span></text:span><text:span text:style-name="_2f__2f_C"><text:span text:style-name="T262">::</text:span></text:span><text:span text:style-name="_2f__2f_C"><text:span text:style-name="T261">ops</text:span></text:span><text:span text:style-name="_2f__2f_C"><text:span text:style-name="T262">::</text:span></text:span><text:span text:style-name="_2f__2f_C"><text:span text:style-name="T260">{</text:span></text:span><text:span text:style-name="_2f__2f_C"><text:span text:style-name="T261">Add</text:span></text:span><text:span text:style-name="_2f__2f_C"><text:span text:style-name="T260">, </text:span></text:span><text:span text:style-name="_2f__2f_C"><text:span text:style-name="T261">AddAssign</text:span></text:span><text:span text:style-name="_2f__2f_C"><text:span text:style-name="T260">, </text:span></text:span><text:span text:style-name="_2f__2f_C"><text:span text:style-name="T261">Sub</text:span></text:span><text:span text:style-name="_2f__2f_C"><text:span text:style-name="T260">, </text:span></text:span><text:span text:style-name="_2f__2f_C"><text:span text:style-name="T261">SubAssign</text:span></text:span><text:span text:style-name="_2f__2f_C"><text:span text:style-name="T260">, </text:span></text:span><text:span text:style-name="_2f__2f_C"><text:span text:style-name="T261">Mul</text:span></text:span><text:span text:style-name="_2f__2f_C"><text:span text:style-name="T260">, </text:span></text:span><text:span text:style-name="_2f__2f_C"><text:span text:style-name="T261">MulAssign</text:span></text:span><text:span text:style-name="_2f__2f_C"><text:span text:style-name="T260">, </text:span></text:span><text:span text:style-name="_2f__2f_C"><text:span text:style-name="T261">Div</text:span></text:span><text:span text:style-name="_2f__2f_C"><text:span text:style-name="T260">, </text:span></text:span><text:span text:style-name="_2f__2f_C"><text:span text:style-name="T261">DivAssign</text:span></text:span><text:span text:style-name="_2f__2f_C"><text:span text:style-name="T260">};</text:span></text:span></text:p>
      <text:p text:style-name="P34"><text:span text:style-name="_2f__2f_C"><text:span text:style-name="T18"/></text:span></text:p>
      <text:p text:style-name="P36"><text:span text:style-name="_2f__2f_C"><text:span text:style-name="T234">// Es muy útil derivar Copy y Clone para tipos matemáticos simples </text:span></text:span><text:span text:style-name="_2f__2f_C"><text:span text:style-name="T235">hay que hacerlo copy por que sino será un clone que pierde su propiedad y no se puede usar al pasarlo a dicha función.</text:span></text:span></text:p>
      <text:p text:style-name="P36"><text:span text:style-name="_3c_C_2b__2b__3e_"><text:span text:style-name="T236">#[derive(Debug, Clone, Copy)]</text:span></text:span></text:p>
      <text:p text:style-name="P33"><text:span text:style-name="_3c_C_3e_"><text:span text:style-name="T4">struct Vector3{...}</text:span></text:span></text:p>
      <text:p text:style-name="P33"><text:span text:style-name="_3c_C_2b__2b__3e_"><text:span text:style-name="T48">impl</text:span></text:span><text:span text:style-name="_3c_C_3e_"><text:span text:style-name="T4"><text:tab/></text:span></text:span><text:span text:style-name="_3c_C_2b__2b__3e_"><text:span text:style-name="T48">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48">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pan text:style-name="_2f__2f_C"><text:span text:style-name="T134">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48">AddAssign</text:span></text:span><text:span text:style-name="_3c_C_3e_"><text:span text:style-name="T4"> for Vector3{</text:span></text:span></text:p>
      <text:p text:style-name="P36"><text:span text:style-name="_3c_C_3e_"><text:span text:style-name="T4"><text:tab/>fn </text:span></text:span><text:span text:style-name="_3c_C_2b__2b__3e_"><text:span text:style-name="T48">add_assign</text:span></text:span><text:span text:style-name="_3c_C_3e_"><text:span text:style-name="T4">(</text:span></text:span><text:span text:style-name="_3c_C_2b__2b__3e_"><text:span text:style-name="T48">&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35">La sobrecarga es con nombre may</text:span></text:span><text:span text:style-name="_2f__2f_C"><text:span text:style-name="T111">ú</text:span></text:span><text:span text:style-name="_2f__2f_C"><text:span text:style-name="T135">scula, y la funci</text:span></text:span><text:span text:style-name="_2f__2f_C"><text:span text:style-name="T111">ón</text:span></text:span><text:span text:style-name="_2f__2f_C"><text:span text:style-name="T135"> en min</text:span></text:span><text:span text:style-name="_2f__2f_C"><text:span text:style-name="T111">ú</text:span></text:span><text:span text:style-name="_2f__2f_C"><text:span text:style-name="T135">scula pero llamada igual. La lista es la siguiente para las sobrecargas (entre par</text:span></text:span><text:span text:style-name="_2f__2f_C"><text:span text:style-name="T111">éntesis el nombre a la función)</text:span></text:span><text:span text:style-name="_2f__2f_C"><text:span text:style-name="T135">:</text:span></text:span></text:p>
      <text:p text:style-name="P38"><text:span text:style-name="_2f__2f_C"><text:span text:style-name="T263">+<text:tab/>-&gt; <text:tab/>Add (add)<text:tab/><text:tab/><text:tab/><text:tab/></text:span></text:span><text:span text:style-name="_2f__2f_C"><text:span text:style-name="T264"><text:tab/><text:tab/><text:tab/><text:tab/></text:span></text:span><text:span text:style-name="_2f__2f_C"><text:span text:style-name="T263">+=<text:tab/>-&gt;<text:tab/><text:tab/>AddAssign (add</text:span></text:span><text:span text:style-name="_2f__2f_C"><text:span text:style-name="T265">_</text:span></text:span><text:span text:style-name="_2f__2f_C"><text:span text:style-name="T263">assign)<text:tab/><text:tab/><text:tab/><text:tab/><text:tab/></text:span></text:span></text:p>
      <text:p text:style-name="P38"><text:span text:style-name="_2f__2f_C"><text:span text:style-name="T263">-<text:tab/>-&gt;<text:tab/></text:span></text:span><text:span text:style-name="_2f__2f_C"><text:span text:style-name="T265"><text:tab/></text:span></text:span><text:span text:style-name="_2f__2f_C"><text:span text:style-name="T263">Sub (sub)</text:span></text:span><text:span text:style-name="_2f__2f_C"><text:span text:style-name="T265"><text:tab/><text:tab/><text:tab/><text:tab/></text:span></text:span><text:span text:style-name="_2f__2f_C"><text:span text:style-name="T264"><text:tab/><text:tab/><text:tab/><text:tab/></text:span></text:span><text:span text:style-name="_2f__2f_C"><text:span text:style-name="T265">-=<text:tab/><text:tab/>-&gt;<text:tab/><text:tab/>SubAssign (sub_assign)</text:span></text:span></text:p>
      <text:p text:style-name="P39"><text:span text:style-name="_2f__2f_C"><text:span text:style-name="T263">*<text:tab/>-&gt;<text:tab/><text:tab/>Mul (mul)</text:span></text:span><text:span text:style-name="_2f__2f_C"><text:span text:style-name="T265"><text:tab/><text:tab/><text:tab/><text:tab/></text:span></text:span><text:span text:style-name="_2f__2f_C"><text:span text:style-name="T264"><text:tab/><text:tab/><text:tab/><text:tab/></text:span></text:span><text:span text:style-name="_2f__2f_C"><text:span text:style-name="T265">*=<text:tab/><text:tab/>-&gt;<text:tab/><text:tab/>MulAssign (mul_assign)</text:span></text:span></text:p>
      <text:p text:style-name="P39"><text:span text:style-name="_2f__2f_C"><text:span text:style-name="T265">/</text:span></text:span><text:span text:style-name="_2f__2f_C"><text:span text:style-name="T266"><text:tab/></text:span></text:span><text:span text:style-name="_2f__2f_C"><text:span text:style-name="T265">-&gt;<text:tab/><text:tab/>Div (div)<text:tab/><text:tab/><text:tab/><text:tab/><text:tab/></text:span></text:span><text:span text:style-name="_2f__2f_C"><text:span text:style-name="T264"><text:tab/><text:tab/><text:tab/><text:tab/></text:span></text:span><text:span text:style-name="_2f__2f_C"><text:span text:style-name="T265">/=<text:tab/><text:tab/>-&gt;<text:tab/><text:tab/>DivAssign<text:tab/>(div_assign)</text:span></text:span></text:p>
      <text:p text:style-name="P39"><text:span text:style-name="_2f__2f_C"><text:span text:style-name="T265">%</text:span></text:span><text:span text:style-name="_2f__2f_C"><text:span text:style-name="T266"> </text:span></text:span><text:span text:style-name="_2f__2f_C"><text:span text:style-name="T265"><text:tab/>-&gt;<text:tab/>Rem </text:span></text:span><text:span text:style-name="_2f__2f_C"><text:span text:style-name="T263">(rem</text:span></text:span><text:span text:style-name="_2f__2f_C"><text:span text:style-name="T265">)</text:span></text:span><text:span text:style-name="_2f__2f_C"><text:span text:style-name="T263"><text:tab/></text:span></text:span><text:span text:style-name="_2f__2f_C"><text:span text:style-name="T265"><text:tab/><text:tab/><text:tab/></text:span></text:span><text:span text:style-name="_2f__2f_C"><text:span text:style-name="T264"><text:tab/><text:tab/><text:tab/><text:tab/></text:span></text:span><text:span text:style-name="_2f__2f_C"><text:span text:style-name="T265">%=<text:tab/>-&gt;<text:tab/><text:tab/>RemAssign (rem_assign)</text:span></text:span></text:p>
      <text:p text:style-name="P40"><text:soft-page-break/><text:span text:style-name="_2f__2f_C"><text:span text:style-name="T263">==<text:tab/>-&gt; PartialEq</text:span></text:span><text:span text:style-name="_2f__2f_C"><text:span text:style-name="T264"> (eq)</text:span></text:span><text:span text:style-name="_2f__2f_C"><text:span text:style-name="T263"><text:tab/><text:tab/></text:span></text:span><text:span text:style-name="_2f__2f_C"><text:span text:style-name="T267"><text:tab/><text:tab/><text:tab/></text:span></text:span><text:span text:style-name="_2f__2f_C"><text:span text:style-name="T263"><text:tab/></text:span></text:span><text:span text:style-name="_2f__2f_C"><text:span text:style-name="T264">!=<text:tab/><text:tab/>-&gt;<text:tab/><text:tab/>PartialEq (</text:span></text:span><text:span text:style-name="_2f__2f_C"><text:span text:style-name="T268">ne</text:span></text:span><text:span text:style-name="_2f__2f_C"><text:span text:style-name="T264">)</text:span></text:span></text:p>
      <text:p text:style-name="P41"><text:span text:style-name="_2f__2f_C"><text:span text:style-name="T263">[ ]</text:span></text:span><text:span text:style-name="_2f__2f_C"><text:span text:style-name="T264"><text:tab/><text:tab/>-&gt;</text:span></text:span><text:span text:style-name="_2f__2f_C"><text:span text:style-name="T266"> </text:span></text:span><text:span text:style-name="_2f__2f_C"><text:span text:style-name="T264">Index (index)</text:span></text:span><text:span text:style-name="_2f__2f_C"><text:span text:style-name="T266"><text:tab/></text:span></text:span><text:span text:style-name="_2f__2f_C"><text:span text:style-name="T263"><text:tab/><text:tab/></text:span></text:span><text:span text:style-name="_2f__2f_C"><text:span text:style-name="T264"><text:tab/><text:tab/><text:tab/><text:tab/>[ ] =<text:tab/>-&gt;<text:tab/><text:tab/>IndexMut (index_mut)</text:span></text:span></text:p>
      <text:p text:style-name="P41"><text:span text:style-name="_2f__2f_C"><text:span text:style-name="T266">-x<text:tab/><text:tab/>-&gt; Neg (neg)<text:tab/><text:tab/><text:tab/><text:tab/><text:tab/><text:tab/><text:tab/><text:tab/>!x = -&gt;<text:tab/><text:tab/>Not (not)</text:span></text:span></text:p>
      <text:p text:style-name="P42"><text:span text:style-name="_2f__2f_C"><text:span text:style-name="T266">&amp;<text:tab/><text:tab/>-&gt; BitAnd (bitand)<text:tab/><text:tab/><text:tab/><text:tab/><text:tab/></text:span></text:span><text:span text:style-name="_2f__2f_C"><text:span text:style-name="T269"><text:tab/></text:span></text:span><text:span text:style-name="_2f__2f_C"><text:span text:style-name="T267">&amp;=</text:span></text:span><text:span text:style-name="_2f__2f_C"><text:span text:style-name="T266"><text:tab/>-&gt;<text:tab/><text:tab/></text:span></text:span><text:span text:style-name="_2f__2f_C"><text:span text:style-name="T267">BitAndAssign (bit_and_assign)</text:span></text:span></text:p>
      <text:p text:style-name="P42"><text:span text:style-name="_2f__2f_C"><text:span text:style-name="T267">|<text:tab/><text:tab/>-&gt; BitOr (bitor)<text:tab/><text:tab/><text:tab/><text:tab/><text:tab/><text:tab/><text:tab/>|=<text:tab/><text:tab/>-&gt;<text:tab/><text:tab/>BitOrAssign (bit_or_assign)</text:span></text:span></text:p>
      <text:p text:style-name="P42"><text:span text:style-name="_2f__2f_C"><text:span text:style-name="T267">^<text:tab/><text:tab/>-&gt;<text:tab/>BitXor (bitxor)<text:tab/><text:tab/><text:tab/><text:tab/><text:tab/><text:tab/>^=<text:tab/>-&gt;<text:tab/><text:tab/>BitXorAssign (bit_xor_assign)</text:span></text:span></text:p>
      <text:p text:style-name="P42"><text:span text:style-name="_2f__2f_C"><text:span text:style-name="T267">&lt;&lt;<text:tab/>-&gt;<text:tab/>Shl<text:tab/>(shl)<text:tab/><text:tab/><text:tab/><text:tab/><text:tab/><text:tab/><text:tab/><text:tab/><text:tab/>&lt;&lt;=<text:tab/>-&gt;<text:tab/><text:tab/>ShlAssign (shl_assign)</text:span></text:span></text:p>
      <text:p text:style-name="P42"><text:span text:style-name="_2f__2f_C"><text:span text:style-name="T267">&gt;&gt;<text:tab/>-&gt;<text:tab/>Shr<text:tab/>(shr)<text:tab/><text:tab/><text:tab/><text:tab/><text:tab/><text:tab/><text:tab/><text:tab/>&gt;&gt;=<text:tab/>-&gt;<text:tab/><text:tab/>ShrAssign (shr_assign)</text:span></text:span></text:p>
      <text:p text:style-name="P42"><text:span text:style-name="_2f__2f_C"><text:span text:style-name="T267">*x<text:tab/><text:tab/>-&gt;<text:tab/>Deref (deref)<text:tab/><text:tab/><text:tab/><text:tab/><text:tab/><text:tab/><text:tab/>*x=<text:tab/>-&gt;<text:tab/><text:tab/>DerefMut (deref_mut)</text:span></text:span></text:p>
      <text:p text:style-name="P42"><text:span text:style-name="_2f__2f_C"><text:span text:style-name="T267">x..y<text:tab/>-&gt;<text:tab/>Range </text:span></text:span><text:span text:style-name="_2f__2f_C"><text:span text:style-name="T268">(no hay</text:span></text:span><text:span text:style-name="_2f__2f_C"><text:span text:style-name="T267">)<text:tab/><text:tab/><text:tab/></text:span></text:span><text:span text:style-name="_2f__2f_C"><text:span text:style-name="T268"><text:tab/><text:tab/></text:span></text:span><text:span text:style-name="_2f__2f_C"><text:span text:style-name="T267"><text:tab/>()<text:tab/>-&gt;<text:tab/><text:tab/>Fn, FnMut, FnOnce (</text:span></text:span><text:span text:style-name="_2f__2f_C"><text:span text:style-name="T268">call</text:span></text:span><text:span text:style-name="_2f__2f_C"><text:span text:style-name="T267">)</text:span></text:span></text:p>
      <text:p text:style-name="P43"><text:span text:style-name="_2f__2f_C"><text:span text:style-name="T135"><text:tab/></text:span></text:span><text:span text:style-name="_2f__2f_C"><text:span text:style-name="T267"><text:tab/><text:tab/><text:tab/></text:span></text:span><text:span text:style-name="_2f__2f_C"><text:span text:style-name="T263">&lt;, &lt;=, &gt;, &gt;=<text:tab/>-&gt; PartialOrd (partial_cm</text:span></text:span><text:span text:style-name="_2f__2f_C"><text:span text:style-name="T268">p</text:span></text:span><text:span text:style-name="_2f__2f_C"><text:span text:style-name="T264">)</text:span></text:span><text:span text:style-name="_2f__2f_C"><text:span text:style-name="T263"><text:tab/><text:tab/></text:span></text:span></text:p>
      <text:p text:style-name="P43"><text:span text:style-name="_2f__2f_C"><text:span text:style-name="T263"/></text:span></text:p>
      <text:p text:style-name="P44"><text:span text:style-name="_2f__2f_C"><text:span text:style-name="T136">Para alterar el orden por ejemplo en una multiplicacion de un Vector3 por ejemplo seria:<text:line-break/><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48">&lt;Vect3&gt;</text:span></text:span><text:span text:style-name="_3c_C_3e_"><text:span text:style-name="T4"> for </text:span></text:span><text:span text:style-name="_3c_C_2b__2b__3e_"><text:span text:style-name="T48">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48">self</text:span></text:span><text:span text:style-name="_3c_C_3e_"><text:span text:style-name="T4"> * other.x, y: </text:span></text:span><text:span text:style-name="_3c_C_2b__2b__3e_"><text:span text:style-name="T48">self</text:span></text:span><text:span text:style-name="_3c_C_3e_"><text:span text:style-name="T4"> * other.y, z: </text:span></text:span><text:span text:style-name="_3c_C_2b__2b__3e_"><text:span text:style-name="T48">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37">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48">&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oft-page-break/><text:span text:style-name="_2f__2f_C"><text:span text:style-name="T137">El formato es:<text:line-break/></text:span></text:span></text:p>
      <text:p text:style-name="P46"><text:span text:style-name="_3c_C_3e_"><text:span text:style-name="T4">impl Trait</text:span></text:span><text:span text:style-name="_3c_C_2b__2b__3e_"><text:span text:style-name="T48">&lt;RightHandElement&gt;</text:span></text:span><text:span text:style-name="_3c_C_3e_"><text:span text:style-name="T4"> for </text:span></text:span><text:span text:style-name="_3c_C_2b__2b__3e_"><text:span text:style-name="T48">LeftHandElement</text:span></text:span></text:p>
      <text:p text:style-name="P46"><text:span text:style-name="_2f__2f_C"><text:span text:style-name="T137">entonces el self es del tipo del LeftHandElement</text:span></text:span></text:p>
      <text:p text:style-name="P44"><text:span text:style-name="_2f__2f_C"><text:span text:style-name="T136"/></text:span></text:p>
      <text:h text:style-name="P152" text:outline-level="3"><text:span text:style-name="_3c_C_3e_"><text:span text:style-name="T172">SOBRECARGA DE OPERADORES </text:span></text:span><text:span text:style-name="_3c_C_3e_"><text:span text:style-name="T173">por instancia</text:span></text:span></text:h>
      <text:p text:style-name="P48"><text:span text:style-name="_2f__2f_C"><text:span text:style-name="T138">En la sobrecarga hemos visto que teniamos que hacer un:</text:span></text:span></text:p>
      <text:p text:style-name="P48"><text:span text:style-name="_3c_C_2b__2b__3e_"><text:span text:style-name="T48">#[derive(Debug, Clone, Copy)] </text:span></text:span><text:span text:style-name="_2f__2f_C"><text:span text:style-name="T138">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48">&lt;’a, ‘b&gt;</text:span></text:span><text:span text:style-name="_3c_C_3e_"><text:span text:style-name="T4"> Add</text:span></text:span><text:span text:style-name="_3c_C_2b__2b__3e_"><text:span text:style-name="T48">&lt;&amp;’b Vect3&gt;</text:span></text:span><text:span text:style-name="_3c_C_3e_"><text:span text:style-name="T4"> for </text:span></text:span><text:span text:style-name="_3c_C_2b__2b__3e_"><text:span text:style-name="T48">&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48">&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38">y para usarlo sería :</text:span></text:span></text:p>
      <text:p text:style-name="P48"><text:span text:style-name="_3c_C_3e_"><text:span text:style-name="T4">let v3 = </text:span></text:span><text:span text:style-name="_3c_C_2b__2b__3e_"><text:span text:style-name="T48">&amp;</text:span></text:span><text:span text:style-name="_3c_C_3e_"><text:span text:style-name="T4">v1 + </text:span></text:span><text:span text:style-name="_3c_C_2b__2b__3e_"><text:span text:style-name="T48">&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53" text:outline-level="3"><text:span text:style-name="_3c_C_3e_"><text:span text:style-name="T177"/></text:span></text:h>
      <text:h text:style-name="P154" text:outline-level="3"><text:span text:style-name="_3c_C_3e_"><text:span text:style-name="T174">TRAITS</text:span></text:span><text:span text:style-name="_3c_C_3e_"><text:span text:style-name="T175">. Para el uso de Templates en sobrecarga operadores</text:span></text:span></text:h>
      <text:p text:style-name="P49"><text:span text:style-name="_2f__2f_C"><text:span text:style-name="T139">Hemos visto que se puede hacer la sobrecarga de operadores de la multiplicación</text:span></text:span><text:span text:style-name="_2f__2f_C"><text:span text:style-name="T140">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48">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oft-page-break/><text:span text:style-name="_3c_C_3e_"><text:span text:style-name="T4">pub struct Vect3</text:span></text:span><text:span text:style-name="_3c_C_2b__2b__3e_"><text:span text:style-name="T48">&lt;T&gt;</text:span></text:span><text:span text:style-name="_3c_C_3e_"><text:span text:style-name="T4">{pub x: </text:span></text:span><text:span text:style-name="_3c_C_2b__2b__3e_"><text:span text:style-name="T48">T</text:span></text:span><text:span text:style-name="_3c_C_3e_"><text:span text:style-name="T4">, pub y: </text:span></text:span><text:span text:style-name="_3c_C_2b__2b__3e_"><text:span text:style-name="T48">T</text:span></text:span><text:span text:style-name="_3c_C_3e_"><text:span text:style-name="T4">, pub z: </text:span></text:span><text:span text:style-name="_3c_C_2b__2b__3e_"><text:span text:style-name="T48">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48">&lt;T&gt;</text:span></text:span><text:span text:style-name="_3c_C_3e_"><text:span text:style-name="T4"> Mul</text:span></text:span><text:span text:style-name="_3c_C_2b__2b__3e_"><text:span text:style-name="T48">&lt;T&gt;</text:span></text:span><text:span text:style-name="_3c_C_3e_"><text:span text:style-name="T4"> for Vect3</text:span></text:span><text:span text:style-name="_3c_C_2b__2b__3e_"><text:span text:style-name="T48">&lt;T&gt;</text:span></text:span></text:p>
      <text:p text:style-name="P49"><text:span text:style-name="_3c_C_2b__2b__3e_"><text:span text:style-name="T48">where</text:span></text:span></text:p>
      <text:p text:style-name="P49"><text:span text:style-name="_3c_C_3e_"><text:span text:style-name="T4"><text:tab/></text:span></text:span><text:span text:style-name="_2f__2f_C"><text:span text:style-name="T48">//esto es la condición y nos dice que T tiene que ser un número y poder copiarse</text:span></text:span></text:p>
      <text:p text:style-name="P49"><text:span text:style-name="_3c_C_3e_"><text:span text:style-name="T4"><text:tab/></text:span></text:span><text:span text:style-name="_3c_C_2b__2b__3e_"><text:span text:style-name="T48">T: Num + Copy</text:span></text:span><text:span text:style-name="_3c_C_2b__2b__3e_"><text:span text:style-name="T50">, </text:span></text:span><text:span text:style-name="_2f__2f_C"><text:span text:style-name="T50">//fijarse que es , no ; el + inica "and"</text:span></text:span></text:p>
      <text:p text:style-name="P49"><text:span text:style-name="_2f__2f_C"><text:span text:style-name="T50">//si hubieramos querido hacerlo con un solo tipo, podriamos heberlo metido, pero también asi:</text:span></text:span></text:p>
      <text:p text:style-name="P49"><text:span text:style-name="_2f__2f_C"><text:span text:style-name="T50">//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48">&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48">T</text:span></text:span><text:span text:style-name="_3c_C_3e_"><text:span text:style-name="T4">) -&gt; Vect3</text:span></text:span><text:span text:style-name="_3c_C_2b__2b__3e_"><text:span text:style-name="T48">&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pan text:style-name="_3c_C_3e_"><text:span text:style-name="T22"><text:tab/></text:span></text:span><text:span text:style-name="_3c_C_3e_"><text:span text:style-name="T4">}</text:span></text:span></text:p>
      <text:p text:style-name="P49"><text:span text:style-name="_3c_C_3e_"><text:span text:style-name="T218">}</text:span></text:span></text:p>
      <text:p text:style-name="P106"><text:span text:style-name="_3c_C_3e_"><text:span text:style-name="T177"/></text:span></text:p>
      <text:h text:style-name="P155" text:outline-level="3"><text:span text:style-name="_3c_C_3e_"><text:span text:style-name="T179">TRAITS</text:span></text:span><text:span text:style-name="_3c_C_3e_"><text:span text:style-name="T180">. Añadir un nuevo método a un tipo</text:span></text:span></text:h>
      <text:p text:style-name="P50"><text:span text:style-name="_2f__2f_C"><text:span text:style-name="T141">Como hemos visto, podemos hacer sobrecarga de operadores para un nuevo tipo de variable que tengamos. Para ello usábamos unos traits ya definidos que los cargábamos con:</text:span></text:span></text:p>
      <text:p text:style-name="P50"><text:span text:style-name="_3c_C_2b__2b__3e_"><text:span text:style-name="T48">use std::ops::{Add, Sub, …};</text:span></text:span></text:p>
      <text:p text:style-name="P50"><text:span text:style-name="_2f__2f_C"><text:span text:style-name="T141">Pero y si quisieramos construir nuestros propios métodos a dichos tipos nuevos O A LOS YA STANDARD?</text:span></text:span></text:p>
      <text:p text:style-name="P50"><text:span text:style-name="_3c_C_2b__2b__3e_"><text:span text:style-name="T48">trait &lt;nuevo_trait&gt; {fn &lt;método&gt; (parametros)</text:span></text:span><text:span text:style-name="_3c_C_2b__2b__3e_"><text:span text:style-name="T51">;</text:span></text:span><text:span text:style-name="_3c_C_2b__2b__3e_"><text:span text:style-name="T48">}</text:span></text:span></text:p>
      <text:p text:style-name="P50"><text:span text:style-name="_2f__2f_C"><text:span text:style-name="T141">de tal forma que quedaría para saber si un numero i32 es par:</text:span></text:span></text:p>
      <text:p text:style-name="P50"><text:span text:style-name="_3c_C_2b__2b__3e_"><text:span text:style-name="T48">trait </text:span></text:span><text:span text:style-name="_3c_C_2b__2b__3e_"><text:span text:style-name="T51">E</text:span></text:span><text:span text:style-name="_3c_C_2b__2b__3e_"><text:span text:style-name="T48">sPar{ fn es_par(self) -&gt; bool;}</text:span></text:span></text:p>
      <text:p text:style-name="P50"><text:span text:style-name="_3c_C_3e_"><text:span text:style-name="T4">impl </text:span></text:span><text:span text:style-name="_3c_C_2b__2b__3e_"><text:span text:style-name="T48">EsPar</text:span></text:span><text:span text:style-name="_3c_C_3e_"><text:span text:style-name="T4"> for </text:span></text:span><text:span text:style-name="_3c_C_2b__2b__3e_"><text:span text:style-name="T48">i32</text:span></text:span><text:span text:style-name="_3c_C_3e_"><text:span text:style-name="T4">{</text:span></text:span></text:p>
      <text:p text:style-name="P50"><text:span text:style-name="_3c_C_3e_"><text:span text:style-name="T4"><text:tab/>fn </text:span></text:span><text:span text:style-name="_3c_C_2b__2b__3e_"><text:span text:style-name="T48">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oft-page-break/><text:span text:style-name="_2f__2f_C"><text:span text:style-name="T141">Y ahora lo podriamos implementar como:<text:line-break/></text:span></text:span><text:span text:style-name="_3c_C_3e_"><text:span text:style-name="T4">if 42i32</text:span></text:span><text:span text:style-name="_3c_C_2b__2b__3e_"><text:span text:style-name="T48">.es_par()</text:span></text:span><text:span text:style-name="_3c_C_3e_"><text:span text:style-name="T4"> {...}</text:span></text:span></text:p>
      <text:p text:style-name="P50"><text:span text:style-name="_3c_C_3e_"><text:span text:style-name="T4"/></text:span></text:p>
      <text:p text:style-name="P51"><text:span text:style-name="_2f__2f_C"><text:span text:style-name="T142">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42"> en otro archivo paralelo al main.rs que se llama "</text:span></text:span><text:span text:style-name="_3c_C_2b__2b__3e_"><text:span text:style-name="T48">tools</text:span></text:span><text:span text:style-name="_2f__2f_C"><text:span text:style-name="T142">" pues en main tendríamos que poner:</text:span></text:span></text:p>
      <text:p text:style-name="P51"><text:span text:style-name="_3c_C_2b__2b__3e_"><text:span text:style-name="T48">mod tools;</text:span></text:span></text:p>
      <text:p text:style-name="P51"><text:span text:style-name="_3c_C_2b__2b__3e_"><text:span text:style-name="T48">use tools::EsPar;</text:span></text:span></text:p>
      <text:p text:style-name="P51"><text:span text:style-name="_2f__2f_C"><text:span text:style-name="T142">y ahí ya sí que sería visto.</text:span></text:span></text:p>
      <text:p text:style-name="P51"><text:span text:style-name="_2f__2f_C"><text:span text:style-name="T142">si hicieramos un:</text:span></text:span></text:p>
      <text:p text:style-name="P51"><text:span text:style-name="_3c_C_2b__2b__3e_"><text:span text:style-name="T48">trait....</text:span></text:span></text:p>
      <text:p text:style-name="P51"><text:span text:style-name="_3c_C_2b__2b__3e_"><text:span text:style-name="T48">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48">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56" text:outline-level="3"><text:span text:style-name="_3c_C_3e_"><text:span text:style-name="T179">TRAITS</text:span></text:span><text:span text:style-name="_3c_C_3e_"><text:span text:style-name="T180">. </text:span></text:span><text:span text:style-name="_3c_C_3e_"><text:span text:style-name="T181">Implementar el from e into a un tipo nuevo</text:span></text:span></text:h>
      <text:p text:style-name="P52"><text:span text:style-name="_2f__2f_C"><text:span text:style-name="T143">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43">...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43">Recordemos que para convertir de un &amp;str a String habia que hacer:</text:span></text:span></text:p>
      <text:p text:style-name="P52"><text:span text:style-name="_3c_C_3e_"><text:span text:style-name="T48">let s = "hola"</text:span></text:span><text:span text:style-name="_3c_C_2b__2b__3e_"><text:span text:style-name="T48">.into()</text:span></text:span><text:span text:style-name="_3c_C_3e_"><text:span text:style-name="T48">;</text:span></text:span></text:p>
      <text:p text:style-name="P52"><text:span text:style-name="_2f__2f_C"><text:span text:style-name="T143">o </text:span></text:span></text:p>
      <text:p text:style-name="P52"><text:span text:style-name="_3c_C_3e_"><text:span text:style-name="T4">let s = String::</text:span></text:span><text:span text:style-name="_3c_C_2b__2b__3e_"><text:span text:style-name="T48">from</text:span></text:span><text:span text:style-name="_3c_C_3e_"><text:span text:style-name="T4">("hola");</text:span></text:span></text:p>
      <text:p text:style-name="P52"><text:span text:style-name="_2f__2f_C"><text:span text:style-name="T143">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43">hemos de hacer esto:</text:span></text:span></text:p>
      <text:p text:style-name="P52"><text:span text:style-name="_3c_C_2b__2b__3e_"><text:span text:style-name="T48">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oft-page-break/><text:span text:style-name="_3c_C_3e_"><text:span text:style-name="T4">}</text:span></text:span></text:p>
      <text:p text:style-name="P52"><text:span text:style-name="_2f__2f_C"><text:span text:style-name="T143">y con eso ya podremos hacer cosas como:</text:span></text:span></text:p>
      <text:p text:style-name="P52"><text:span text:style-name="_3c_C_3e_"><text:span text:style-name="T4">let kk: WrappingU32 = 42</text:span></text:span><text:span text:style-name="_3c_C_2b__2b__3e_"><text:span text:style-name="T48">.into()</text:span></text:span><text:span text:style-name="_3c_C_3e_"><text:span text:style-name="T4">;</text:span></text:span></text:p>
      <text:p text:style-name="P52"><text:span text:style-name="_3c_C_3e_"><text:span text:style-name="T4">let kk = WrappingU32::</text:span></text:span><text:span text:style-name="_3c_C_2b__2b__3e_"><text:span text:style-name="T48">from(42)</text:span></text:span><text:span text:style-name="_3c_C_3e_"><text:span text:style-name="T4">;</text:span></text:span></text:p>
      <text:p text:style-name="P52"><text:span text:style-name="_3c_C_3e_"><text:span text:style-name="T4"/></text:span></text:p>
      <text:h text:style-name="P154" text:outline-level="3"><text:span text:style-name="_3c_C_3e_"><text:span text:style-name="T179">TRAITS</text:span></text:span><text:span text:style-name="_3c_C_3e_"><text:span text:style-name="T180">. </text:span></text:span><text:span text:style-name="_3c_C_3e_"><text:span text:style-name="T182">Display, debug y Error</text:span></text:span></text:h>
      <text:p text:style-name="P49"><text:span text:style-name="_2f__2f_C"><text:span text:style-name="T66">Podemos hacer que nuestras funciones devuelvan un </text:span></text:span><text:span text:style-name="_3c_C_2b__2b__3e_"><text:span text:style-name="T48">Result(Ok, Err)</text:span></text:span><text:span text:style-name="_2f__2f_C"><text:span text:style-name="T66"> de tal manera que al sacar el resultado tengamos que hacer un </text:span></text:span><text:span text:style-name="_3c_C_2b__2b__3e_"><text:span text:style-name="T48">unwrap()</text:span></text:span><text:span text:style-name="_2f__2f_C"><text:span text:style-name="T66"> o un </text:span></text:span><text:span text:style-name="_3c_C_2b__2b__3e_"><text:span text:style-name="T48">match</text:span></text:span><text:span text:style-name="_2f__2f_C"><text:span text:style-name="T66"> para dilucida</text:span></text:span><text:span text:style-name="_2f__2f_C"><text:span text:style-name="T67">r</text:span></text:span><text:span text:style-name="_2f__2f_C"><text:span text:style-name="T66"> cual de los dos han sido, pero podemos hacerlo de forma más cómoda implementando nuestros </text:span></text:span><text:span text:style-name="_3c_C_3e_"><text:span text:style-name="T4">traits</text:span></text:span><text:span text:style-name="_2f__2f_C"><text:span text:style-name="T66"> de </text:span></text:span><text:span text:style-name="_3c_C_2b__2b__3e_"><text:span text:style-name="T48">Display</text:span></text:span><text:span text:style-name="_2f__2f_C"><text:span text:style-name="T66">, </text:span></text:span><text:span text:style-name="_3c_C_2b__2b__3e_"><text:span text:style-name="T48">Debug</text:span></text:span><text:span text:style-name="_2f__2f_C"><text:span text:style-name="T66"> y </text:span></text:span><text:span text:style-name="_3c_C_2b__2b__3e_"><text:span text:style-name="T48">Error</text:span></text:span><text:span text:style-name="_2f__2f_C"><text:span text:style-name="T66">.<text:line-break/></text:span></text:span><text:span text:style-name="_3c_C_2b__2b__3e_"><text:span text:style-name="T48">Debug</text:span></text:span><text:span text:style-name="_2f__2f_C"><text:span text:style-name="T66"> se autogenera cuando se le mete el </text:span></text:span><text:span text:style-name="_3c_C_2b__2b__3e_"><text:span text:style-name="T48">#[derive(Debug)]</text:span></text:span><text:span text:style-name="_2f__2f_C"><text:span text:style-name="T66">, que es el que suelta los errores y los tipos para informar en el log del programa por debajo.<text:line-break/>pero si queremos informar al usuario de un error en tiempo de ejecución usamos el </text:span></text:span><text:span text:style-name="_3c_C_2b__2b__3e_"><text:span text:style-name="T48">Display</text:span></text:span><text:span text:style-name="_2f__2f_C"><text:span text:style-name="T66">,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pan text:style-name="_2f__2f_C"><text:span text:style-name="T4">//1.definimos nuestro tipo de error y le añadimos el Debug. El tipo podria ser un Enum</text:span></text:span></text:p>
      <text:p text:style-name="P49"><text:span text:style-name="_3c_C_2b__2b__3e_"><text:span text:style-name="T48">#[derive(Debug)]</text:span></text:span></text:p>
      <text:p text:style-name="P49"><text:span text:style-name="_3c_C_2b__2b__3e_"><text:span text:style-name="T48">struct EdadInvalidaError;</text:span></text:span></text:p>
      <text:p text:style-name="P49"><text:span text:style-name="_2f__2f_C"><text:span text:style-name="T48">//2. implementamos Display para el usuario final</text:span></text:span></text:p>
      <text:p text:style-name="P49"><text:span text:style-name="_3c_C_2b__2b__3e_"><text:span text:style-name="T48">impl fmt::Display for EdadInvalidaError {</text:span></text:span></text:p>
      <text:p text:style-name="P49"><text:span text:style-name="_3c_C_2b__2b__3e_"><text:span text:style-name="T48"><text:tab/>fn fmt(&amp;self, f: &amp;mut fmt::Formatter) - &gt; fmt::Result {</text:span></text:span></text:p>
      <text:p text:style-name="P49"><text:span text:style-name="_3c_C_2b__2b__3e_"><text:span text:style-name="T48"><text:tab/><text:tab/>write!(f, “Lo siento, debes ser mayor de 18 años para entrar.”) </text:span></text:span><text:span text:style-name="_2f__2f_C"><text:span text:style-name="T48">//ver write apuntes.</text:span></text:span></text:p>
      <text:p text:style-name="P49"><text:span text:style-name="_3c_C_2b__2b__3e_"><text:span text:style-name="T48"><text:tab/>}</text:span></text:span></text:p>
      <text:p text:style-name="P49"><text:span text:style-name="_3c_C_2b__2b__3e_"><text:span text:style-name="T48">}</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48">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48">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68">Todo esto para qué? Se verá en el main:</text:span></text:span></text:p>
      <text:p text:style-name="P53"><text:span text:style-name="_3c_C_3e_"><text:span text:style-name="T4">fn main() {</text:span></text:span></text:p>
      <text:p text:style-name="P53"><text:soft-page-break/><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69">Parece que tengo que seguir desempaquetando el tipo de error ya que hago el if let. Pero por qué es necesario en proyectos profesionales de Rust? por que el operador </text:span></text:span><text:span text:style-name="_3c_C_2b__2b__3e_"><text:span text:style-name="T48">?</text:span></text:span><text:span text:style-name="_2f__2f_C"><text:span text:style-name="T69"> no se puede usar sin el trait de error.. y para ello es necesario el de Display.</text:span></text:span></text:p>
      <text:p text:style-name="P54"><text:span text:style-name="_2f__2f_C"><text:span text:style-name="T69">Entonces como se podria usar el </text:span></text:span><text:span text:style-name="_3c_C_2b__2b__3e_"><text:span text:style-name="T48">?</text:span></text:span><text:span text:style-name="_2f__2f_C"><text:span text:style-name="T69"> sin el if let para desempaquetar?</text:span></text:span></text:p>
      <text:p text:style-name="P55"><text:span text:style-name="_3c_C_3e_"><text:span text:style-name="T4">fn main() </text:span></text:span><text:span text:style-name="_3c_C_2b__2b__3e_"><text:span text:style-name="T48">- &gt; Result&lt;(), EdadInvalidaError&gt;</text:span></text:span><text:span text:style-name="_3c_C_3e_"><text:span text:style-name="T4"> {</text:span></text:span></text:p>
      <text:p text:style-name="P55"><text:span text:style-name="_3c_C_3e_"><text:span text:style-name="T4"><text:tab/>let resultado = verifica_entrada(16)</text:span></text:span><text:span text:style-name="_3c_C_2b__2b__3e_"><text:span text:style-name="T48">?</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48">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69">P</text:span></text:span><text:span text:style-name="_2f__2f_C"><text:span text:style-name="T70">ero aquí no imprimiría el mensaje de: </text:span></text:span><text:span text:style-name="_3c_C_2b__2b__3e_"><text:span text:style-name="T48">Lo siento, debes ser mayor de 18 años para entrar. </text:span></text:span><text:span text:style-name="_2f__2f_C"><text:span text:style-name="T69">P</text:span></text:span><text:span text:style-name="_2f__2f_C"><text:span text:style-name="T70">ara que lo hiciera tendría que devolver el main otra cosa. </text:span></text:span><text:span text:style-name="_2f__2f_C"><text:span text:style-name="T71">Usamos la librería anyhow. <text:line-break/>Para ello en [dependencies] del Cargo.toml ponemos</text:span></text:span></text:p>
      <text:p text:style-name="P57"><text:span text:style-name="_2f__2f_C"><text:span text:style-name="T71">[dependencies]</text:span></text:span></text:p>
      <text:p text:style-name="P57"><text:span text:style-name="_2f__2f_C"><text:span text:style-name="T71">anyhow = “1.0”</text:span></text:span></text:p>
      <text:p text:style-name="P57"><text:span text:style-name="_2f__2f_C"><text:span text:style-name="T71">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48">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2"/></text:span></text:p>
      <text:p text:style-name="P54"><text:span text:style-name="_2f__2f_C"><text:span text:style-name="T69"/></text:span></text:p>
      <text:h text:style-name="P148" text:outline-level="3"><text:soft-page-break/><text:span text:style-name="_3c_C_3e_"><text:span text:style-name="T195">BUCLES</text:span></text:span></text:h>
      <text:p text:style-name="P120"><text:span text:style-name="_3c_C_3e_"><text:span text:style-name="T157"/></text:span></text:p>
      <text:h text:style-name="P153" text:outline-level="3"><text:span text:style-name="_3c_C_3e_"><text:span text:style-name="T177">WHILE</text:span></text:span></text:h>
      <text:p text:style-name="P58"><text:span text:style-name="_2f__2f_C"><text:span text:style-name="T144">El bucle while es:</text:span></text:span></text:p>
      <text:p text:style-name="P58"><text:span text:style-name="_3c_C_3e_"><text:span text:style-name="T4">let mut i: u32 = 1;<text:line-break/></text:span></text:span><text:span text:style-name="_3c_C_2b__2b__3e_"><text:span text:style-name="T48">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45">La condici</text:span></text:span><text:span text:style-name="_2f__2f_C"><text:span text:style-name="T112">ón</text:span></text:span><text:span text:style-name="_2f__2f_C"><text:span text:style-name="T145"> nunca va entre par</text:span></text:span><text:span text:style-name="_2f__2f_C"><text:span text:style-name="T112">é</text:span></text:span><text:span text:style-name="_2f__2f_C"><text:span text:style-name="T145">ntesis para evitar la confusi</text:span></text:span><text:span text:style-name="_2f__2f_C"><text:span text:style-name="T112">ón</text:span></text:span><text:span text:style-name="_2f__2f_C"><text:span text:style-name="T145"> de C ya que en rust la condici</text:span></text:span><text:span text:style-name="_2f__2f_C"><text:span text:style-name="T112">ón</text:span></text:span><text:span text:style-name="_2f__2f_C"><text:span text:style-name="T145"> es una expresi</text:span></text:span><text:span text:style-name="_2f__2f_C"><text:span text:style-name="T112">ón</text:span></text:span><text:span text:style-name="_2f__2f_C"><text:span text:style-name="T145"> booleana. Esto es un error:</text:span></text:span></text:p>
      <text:p text:style-name="P59"><text:span text:style-name="_3c_C_3e_"><text:span text:style-name="T4">while 5</text:span></text:span><text:span text:style-name="_2f__2f_C"><text:span text:style-name="T145"> o </text:span></text:span><text:span text:style-name="_3c_C_3e_"><text:span text:style-name="T4">while (5)</text:span></text:span></text:p>
      <text:h text:style-name="P153" text:outline-level="3"><text:span text:style-name="_3c_C_3e_"><text:span text:style-name="T196"/></text:span></text:h>
      <text:h text:style-name="P153" text:outline-level="3"><text:span text:style-name="_3c_C_3e_"><text:span text:style-name="T196"/></text:span></text:h>
      <text:h text:style-name="P153" text:outline-level="3"><text:span text:style-name="_3c_C_3e_"><text:span text:style-name="T177">LOOP</text:span></text:span></text:h>
      <text:p text:style-name="P58"><text:span text:style-name="_2f__2f_C"><text:span text:style-name="T144">loop es infinito a no ser que se saque</text:span></text:span></text:p>
      <text:p text:style-name="P58"><text:span text:style-name="_3c_C_2b__2b__3e_"><text:span text:style-name="T48">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57" text:outline-level="3"><text:span text:style-name="_3c_C_3e_"><text:span text:style-name="T178">FOR</text:span></text:span></text:h>
      <text:p text:style-name="P59"><text:span text:style-name="_2f__2f_C"><text:span text:style-name="T145">El for en Rust es bajo iteradores</text:span></text:span></text:p>
      <text:p text:style-name="P59"><text:span text:style-name="_3c_C_2b__2b__3e_"><text:span text:style-name="T48">for elemento in iterable {...}</text:span></text:span></text:p>
      <text:p text:style-name="P59"><text:span text:style-name="_2f__2f_C"><text:span text:style-name="T145">Por ejemplo:</text:span></text:span></text:p>
      <text:p text:style-name="P59"><text:span text:style-name="_3c_C_2b__2b__3e_"><text:span text:style-name="T48">for i in 0..10{</text:span></text:span><text:span text:style-name="_3c_C_3e_"><text:span text:style-name="T4"> ... }</text:span></text:span><text:span text:style-name="_3c_C_2b__2b__3e_"><text:span text:style-name="T48"> </text:span></text:span><text:span text:style-name="_2f__2f_C"><text:span text:style-name="T48">//i va de 0 a 9</text:span></text:span></text:p>
      <text:p text:style-name="P60"><text:span text:style-name="_3c_C_2b__2b__3e_"><text:span text:style-name="T48">for i in 0..</text:span></text:span><text:span text:style-name="_3c_C_2b__2b__3e_"><text:span text:style-name="T53">=</text:span></text:span><text:span text:style-name="_3c_C_2b__2b__3e_"><text:span text:style-name="T48">10{</text:span></text:span><text:span text:style-name="_3c_C_3e_"><text:span text:style-name="T4"> ... }</text:span></text:span><text:span text:style-name="_3c_C_2b__2b__3e_"><text:span text:style-name="T48"> </text:span></text:span><text:span text:style-name="_2f__2f_C"><text:span text:style-name="T48">//i va de 0 a </text:span></text:span><text:span text:style-name="_2f__2f_C"><text:span text:style-name="T53">10</text:span></text:span></text:p>
      <text:p text:style-name="P59"><text:span text:style-name="_2f__2f_C"><text:span text:style-name="T145">o con matrices:</text:span></text:span></text:p>
      <text:p text:style-name="P59"><text:span text:style-name="_3c_C_3e_"><text:span text:style-name="T4">let v = [1, 2, 3];</text:span></text:span></text:p>
      <text:p text:style-name="P59"><text:span text:style-name="_3c_C_2b__2b__3e_"><text:span text:style-name="T48">for i in v</text:span></text:span><text:span text:style-name="_3c_C_3e_"><text:span text:style-name="T4">{ ... }</text:span></text:span></text:p>
      <text:p text:style-name="P61"><text:soft-page-break/><text:span text:style-name="_2f__2f_C"><text:span text:style-name="T146">Si queremos ir en inversa debemos aplicar el método .rev()</text:span></text:span><text:span text:style-name="_2f__2f_C"><text:span text:style-name="T145">:</text:span></text:span></text:p>
      <text:p text:style-name="P61"><text:span text:style-name="_3c_C_2b__2b__3e_"><text:span text:style-name="T48">for i in </text:span></text:span><text:span text:style-name="_3c_C_2b__2b__3e_"><text:span text:style-name="T54">(</text:span></text:span><text:span text:style-name="_3c_C_2b__2b__3e_"><text:span text:style-name="T48">0..10</text:span></text:span><text:span text:style-name="_3c_C_2b__2b__3e_"><text:span text:style-name="T54">).rev()</text:span></text:span><text:span text:style-name="_3c_C_2b__2b__3e_"><text:span text:style-name="T48">{</text:span></text:span><text:span text:style-name="_3c_C_3e_"><text:span text:style-name="T4"> ... }</text:span></text:span><text:span text:style-name="_3c_C_2b__2b__3e_"><text:span text:style-name="T48">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49" text:outline-level="3"><text:span text:style-name="_3c_C_3e_"><text:span text:style-name="T194"/></text:span></text:h>
      <text:h text:style-name="P149" text:outline-level="3"><text:span text:style-name="_3c_C_3e_"><text:span text:style-name="T194">COLLECTIONS (contenedores)</text:span></text:span></text:h>
      <text:p text:style-name="P62"><text:span text:style-name="_2f__2f_C"><text:span text:style-name="T147">Como en C++ tenemos contenedores:</text:span></text:span></text:p>
      <text:p text:style-name="P62"><text:span text:style-name="_2f__2f_C"><text:span text:style-name="T147"/></text:span></text:p>
      <text:p text:style-name="P92"><text:span text:style-name="_2f__2f_C"><text:span text:style-name="T159">ARRAYS</text:span></text:span></text:p>
      <text:p text:style-name="P115">Podemos usar <text:span text:style-name="T285">arrays</text:span> como en C:<text:line-break/><text:span text:style-name="_3c_C_2b__2b__3e_">let x: </text:span><text:span text:style-name="_3c_C_2b__2b__3e_"><text:span text:style-name="T225">[i32; 3]</text:span></text:span><text:span text:style-name="_3c_C_2b__2b__3e_"> = [1, 2 , 3];</text:span><text:span text:style-name="_3c_C_2b__2b__3e_"><text:span text:style-name="T285"> </text:span></text:span><text:span text:style-name="_2f__2f_C"><text:span text:style-name="T225">//let x = [1, 2, 3]; puede ser asi tambien y el deduciria el tipo.</text:span></text:span></text:p>
      <text:p text:style-name="P115"><text:span text:style-name="_2f__2f_C"><text:span text:style-name="T192">Y si fueran todos el mismo elemento podria definirse como:</text:span></text:span></text:p>
      <text:p text:style-name="P115"><text:span text:style-name="_3c_C_3e_">let x : [i32; 3] = </text:span><text:span text:style-name="_3c_C_2b__2b__3e_">[0; 3]</text:span><text:span text:style-name="_3c_C_3e_">; //x seria [0,0,0]</text:span><text:span text:style-name="_2f__2f_C"><text:span text:style-name="T191"><text:line-break/></text:span></text:span></text:p>
      <text:p text:style-name="P115"><text:span text:style-name="_2f__2f_C"/></text:p>
      <text:p text:style-name="P115"><text:span text:style-name="_3c_C_3e_">println!("{}", x[1]); </text:span><text:span text:style-name="_2f__2f_C">//imprimiría 2, pero es arriesgado</text:span></text:p>
      <text:p text:style-name="P115"><text:span text:style-name="_3c_C_3e_"><text:span text:style-name="T226">println!("{}", x[7]);</text:span></text:span><text:span text:style-name="_2f__2f_C"> //Entraría en modo "panic" que saldría de forma segura. No soltaria basura</text:span></text:p>
      <text:p text:style-name="P115"><text:span text:style-name="_2f__2f_C"/></text:p>
      <text:p text:style-name="P116">Para hacerlo de forma segura se puede usar </text:p>
      <text:p text:style-name="P116"><text:span text:style-name="_3c_C_2b__2b__3e_">x.get(1)</text:span><text:span text:style-name="_3c_C_3e_">; </text:span><text:span text:style-name="_2f__2f_C">//devolveria "Some(2)" en mayusculas la S</text:span></text:p>
      <text:p text:style-name="P116"><text:span text:style-name="_3c_C_3e_">x.get(7);</text:span><text:span text:style-name="_2f__2f_C"> //devolveria "None" en mayusculas la N</text:span></text:p>
      <text:p text:style-name="P116">Por lo tanto para usarlo por que un x.get(1) devolveria en pantalla un some(2) con un println! tenemos que hacer:<text:line-break/><text:line-break/><text:span text:style-name="_3c_C_2b__2b__3e_">if let Some(</text:span><text:span text:style-name="_3c_C_2b__2b__3e_"><text:span text:style-name="T227">i</text:span></text:span><text:span text:style-name="_3c_C_2b__2b__3e_">) = x.get(1) </text:span><text:span text:style-name="_3c_C_3e_">{</text:span></text:p>
      <text:p text:style-name="P116"><text:span text:style-name="_3c_C_3e_"><text:tab/>println!("{}", </text:span><text:span text:style-name="_3c_C_3e_"><text:span text:style-name="T227">i</text:span></text:span><text:span text:style-name="_3c_C_3e_"><text:span text:style-name="T225">)</text:span></text:span><text:span text:style-name="_3c_C_3e_">;</text:span></text:p>
      <text:p text:style-name="P116"><text:span text:style-name="_3c_C_3e_">}</text:span><text:span text:style-name="_3c_C_3e_"><text:span text:style-name="T225"> </text:span></text:span><text:span text:style-name="_3c_C_3e_">else {</text:span></text:p>
      <text:p text:style-name="P116"><text:span text:style-name="_3c_C_3e_"><text:tab/>println!("no existe");</text:span></text:p>
      <text:p text:style-name="P116"><text:span text:style-name="_3c_C_3e_">}</text:span></text:p>
      <text:p text:style-name="P116">O en formáto Rust:</text:p>
      <text:p text:style-name="P116"/>
      <text:p text:style-name="P107"><text:span text:style-name="_3c_C_2b__2b__3e_">match x.get(2) {</text:span></text:p>
      <text:p text:style-name="P107"><text:span text:style-name="_3c_C_2b__2b__3e_"><text:tab/>Some(i) =&gt; println!("{}", i),</text:span></text:p>
      <text:p text:style-name="P107"><text:span text:style-name="_3c_C_2b__2b__3e_"><text:tab/>None<text:tab/>=&gt;<text:tab/> println!("No existe"),</text:span></text:p>
      <text:p text:style-name="P107"><text:span text:style-name="_3c_C_2b__2b__3e_">}</text:span></text:p>
      <text:p text:style-name="P112"><text:soft-page-break/><text:span text:style-name="_2f__2f_C"><text:span text:style-name="T190">El </text:span></text:span><text:span text:style-name="_3c_C_2b__2b__3e_"><text:span text:style-name="T212">.get</text:span></text:span><text:span text:style-name="_2f__2f_C"><text:span text:style-name="T190"> lo que hace es devolver un </text:span></text:span><text:span text:style-name="_3c_C_2b__2b__3e_"><text:span text:style-name="T212">OPTION</text:span></text:span><text:span text:style-name="_2f__2f_C"><text:span text:style-name="T190"> que puede ser un </text:span></text:span><text:span text:style-name="_3c_C_2b__2b__3e_"><text:span text:style-name="T212">Some(T)</text:span></text:span><text:span text:style-name="_2f__2f_C"><text:span text:style-name="T190"> es decir algo, o </text:span></text:span><text:span text:style-name="_3c_C_2b__2b__3e_"><text:span text:style-name="T212">None</text:span></text:span><text:span text:style-name="_2f__2f_C"><text:span text:style-name="T190">.. es decir nada. Explicado más abajo en la parte de memorias.</text:span></text:span></text:p>
      <text:p text:style-name="P62"><text:span text:style-name="_2f__2f_C"><text:span text:style-name="T147"/></text:span></text:p>
      <text:p text:style-name="P62"><text:span text:style-name="_2f__2f_C"><text:span text:style-name="T147"/></text:span></text:p>
      <text:p text:style-name="P62"><text:span text:style-name="_2f__2f_C"><text:span text:style-name="T147"/></text:span></text:p>
      <text:p text:style-name="P63"><text:span text:style-name="_2f__2f_C"><text:span text:style-name="T158">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48">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48">Para acceder a los datos se puede usar:</text:span></text:span></text:p>
      <text:p text:style-name="P64"><text:span text:style-name="_3c_C_3e_"><text:span text:style-name="T4">v[i]; </text:span></text:span><text:span text:style-name="_2f__2f_C"><text:span text:style-name="T4">//puede ser panic</text:span></text:span></text:p>
      <text:p text:style-name="P64"><text:span text:style-name="_3c_C_3e_"><text:span text:style-name="T4">v.get(i);</text:span></text:span><text:span text:style-name="_2f__2f_C"><text:span text:style-name="T4"> //seguro.</text:span></text:span></text:p>
      <text:p text:style-name="P94"><text:span text:style-name="_2f__2f_C"><text:span text:style-name="T152">Tambien se puede inicializar el vector en el momento de ser declarado con una macro:</text:span></text:span></text:p>
      <text:p text:style-name="P94"><text:span text:style-name="_3c_C_2b__2b__3e_"><text:span text:style-name="T48">let numeros = vec![1, 2, 3]</text:span></text:span></text:p>
      <text:p text:style-name="P94"><text:span text:style-name="_2f__2f_C"><text:span text:style-name="T152">Y se podria inicializar la memoria ya de principio con:</text:span></text:span></text:p>
      <text:p text:style-name="P94"><text:span text:style-name="_3c_C_3e_"><text:span text:style-name="T4">let mut numeros = </text:span></text:span><text:span text:style-name="_3c_C_2b__2b__3e_"><text:span text:style-name="T48">Vec::with_capacity(3);</text:span></text:span></text:p>
      <text:p text:style-name="P64"><text:span text:style-name="_2f__2f_C"><text:span text:style-name="T148">El tamaño es con:</text:span></text:span></text:p>
      <text:p text:style-name="P64"><text:span text:style-name="_3c_C_3e_"><text:span text:style-name="T4">v.len();</text:span></text:span></text:p>
      <text:p text:style-name="P65"><text:span text:style-name="_2f__2f_C"><text:span text:style-name="T149">Se puede usar iteradores:</text:span></text:span></text:p>
      <text:p text:style-name="P65"><text:span text:style-name="_3c_C_3e_"><text:span text:style-name="T4">let mut it = v</text:span></text:span><text:span text:style-name="_3c_C_2b__2b__3e_"><text:span text:style-name="T48">.iter();</text:span></text:span><text:span text:style-name="_3c_C_2b__2b__3e_"><text:span text:style-name="T59"> </text:span></text:span><text:span text:style-name="_2f__2f_C"><text:span text:style-name="T59">//el iterador NO SE SITUA en el primer elemento sino ANTES</text:span></text:span></text:p>
      <text:p text:style-name="P65"><text:span text:style-name="_3c_C_2b__2b__3e_"><text:span text:style-name="T48">it.next();</text:span></text:span><text:span text:style-name="_3c_C_3e_"><text:span text:style-name="T4"> </text:span></text:span><text:span text:style-name="_2f__2f_C"><text:span text:style-name="T4">//es el siguiente.</text:span></text:span><text:span text:style-name="_2f__2f_C"><text:span text:style-name="T47"> En este caso seria ya el PRIMER elemento</text:span></text:span></text:p>
      <text:p text:style-name="P65"><text:span text:style-name="_3c_C_2b__2b__3e_"><text:span text:style-name="T48">it.next_back()</text:span></text:span><text:span text:style-name="_3c_C_3e_"><text:span text:style-name="T4">; </text:span></text:span><text:span text:style-name="_2f__2f_C"><text:span text:style-name="T47">//</text:span></text:span><text:span text:style-name="_2f__2f_C"><text:span text:style-name="T4">es el anterior</text:span></text:span><text:span text:style-name="_2f__2f_C"><text:span text:style-name="T47">, PERO EMPEZANDO POR ATRAS y se situa DETRAS del ultimo</text:span></text:span></text:p>
      <text:p text:style-name="P65"><text:span text:style-name="_2f__2f_C"><text:span text:style-name="T149">Los dos devuelven Option&lt;&amp;T&gt;</text:span></text:span><text:span text:style-name="_2f__2f_C"><text:span text:style-name="T150"> por lo tanto para usarlos:</text:span></text:span></text:p>
      <text:p text:style-name="P66"><text:span text:style-name="_3c_C_3e_"><text:span text:style-name="T4">if let Some(x) = it.next(){...}</text:span></text:span></text:p>
      <text:p text:style-name="P65"><text:span text:style-name="_2f__2f_C"><text:span text:style-name="T149"/></text:span></text:p>
      <text:p text:style-name="P63"><text:span text:style-name="_2f__2f_C"><text:span text:style-name="T151"/></text:span></text:p>
      <text:p text:style-name="P112"><text:span text:style-name="_2f__2f_C"><text:span text:style-name="T189"/></text:span></text:p>
      <text:p text:style-name="P63"><text:span text:style-name="_2f__2f_C"><text:span text:style-name="T151"/></text:span></text:p>
      <text:p text:style-name="P63"><text:span text:style-name="_2f__2f_C"><text:span text:style-name="T151">3. STRING</text:span></text:span></text:p>
      <text:p text:style-name="P63"><text:span text:style-name="_2f__2f_C"><text:span text:style-name="T151"/></text:span></text:p>
      <text:p text:style-name="P63"><text:soft-page-break/><text:span text:style-name="_2f__2f_C"><text:span text:style-name="T151">4. HASHMAP</text:span></text:span></text:p>
      <text:p text:style-name="P63"><text:span text:style-name="_2f__2f_C"><text:span text:style-name="T151"/></text:span></text:p>
      <text:p text:style-name="P63"><text:span text:style-name="_2f__2f_C"><text:span text:style-name="T151">5. VECDEQUE</text:span></text:span></text:p>
      <text:p text:style-name="P63"><text:span text:style-name="_2f__2f_C"><text:span text:style-name="T151"/></text:span></text:p>
      <text:p text:style-name="P63"><text:span text:style-name="_2f__2f_C"><text:span text:style-name="T151">6. HASHSET</text:span></text:span></text:p>
      <text:p text:style-name="P63"><text:span text:style-name="_2f__2f_C"><text:span text:style-name="T151"/></text:span></text:p>
      <text:p text:style-name="P63"><text:span text:style-name="_2f__2f_C"><text:span text:style-name="T151">7. BTREEMAP</text:span></text:span></text:p>
      <text:p text:style-name="P63"><text:span text:style-name="_2f__2f_C"><text:span text:style-name="T151"/></text:span></text:p>
      <text:p text:style-name="P63"><text:span text:style-name="_2f__2f_C"><text:span text:style-name="T151"/></text:span></text:p>
      <text:p text:style-name="P95"><text:span text:style-name="_2f__2f_C"><text:span text:style-name="T160"/></text:span></text:p>
      <text:p text:style-name="P95"><text:span text:style-name="_2f__2f_C"><text:span text:style-name="T160"/></text:span></text:p>
      <text:p text:style-name="P95"><text:span text:style-name="_2f__2f_C"><text:span text:style-name="T160"/></text:span></text:p>
      <text:p text:style-name="P95"><text:span text:style-name="_2f__2f_C"><text:span text:style-name="T160">ITERADORES</text:span></text:span></text:p>
      <text:p text:style-name="P96"><text:span text:style-name="_2f__2f_C"><text:span text:style-name="T153">Ya hemos visto en los vectores dinamicos que se pueden usar iteradores:</text:span></text:span></text:p>
      <text:p text:style-name="P96"><text:span text:style-name="_3c_C_3e_"><text:span text:style-name="T4">let mut v: Vec&lt;i32&gt; = Vec::new();</text:span></text:span></text:p>
      <text:p text:style-name="P96"><text:span text:style-name="_3c_C_3e_"><text:span text:style-name="T4">v.push(1);</text:span></text:span></text:p>
      <text:p text:style-name="P96"><text:span text:style-name="_3c_C_3e_"><text:span text:style-name="T4">v.push(3);</text:span></text:span></text:p>
      <text:p text:style-name="P96"><text:span text:style-name="_3c_C_2b__2b__3e_"><text:span text:style-name="T48">let mut it = v.iter();</text:span></text:span><text:span text:style-name="_3c_C_2b__2b__3e_"><text:span text:style-name="T60"> </text:span></text:span><text:span text:style-name="_2f__2f_C"><text:span text:style-name="T257">//TYPE: std::slice::Iter&lt;'_, T&gt; donde T es el tipo de lo que se mete</text:span></text:span></text:p>
      <text:p text:style-name="P96"><text:span text:style-name="_2f__2f_C"><text:span text:style-name="T153">Esto situa el iterador al principio del vector (en el 1).</text:span></text:span></text:p>
      <text:p text:style-name="P97"><text:span text:style-name="_2f__2f_C"><text:span text:style-name="T154">Ese iterador es inmutable (&amp;T) pero se pueden hacer mutables:<text:line-break/></text:span></text:span><text:span text:style-name="_3c_C_2b__2b__3e_"><text:span text:style-name="T48">v.iter_mut() </text:span></text:span><text:span text:style-name="_2f__2f_C"><text:span text:style-name="T256">//</text:span></text:span><text:span text:style-name="_2f__2f_C"><text:span text:style-name="T257">TYPE: std::slice::IterMut&lt;'_, T&gt;</text:span></text:span></text:p>
      <text:p text:style-name="P97"><text:span text:style-name="_2f__2f_C"><text:span text:style-name="T154">o consume el vector y toma los elementos por propiedad (ownership)</text:span></text:span></text:p>
      <text:p text:style-name="P97"><text:span text:style-name="_3c_C_2b__2b__3e_"><text:span text:style-name="T48">v.into_iter();</text:span></text:span><text:span text:style-name="_3c_C_2b__2b__3e_"><text:span text:style-name="T60"> </text:span></text:span><text:span text:style-name="_2f__2f_C"><text:span text:style-name="T257">//TYPE: std::vec::IntoIter&lt;T&gt;</text:span></text:span></text:p>
      <text:p text:style-name="P97"><text:span text:style-name="_3c_C_2b__2b__3e_"><text:span text:style-name="T48"/></text:span></text:p>
      <text:p text:style-name="P98"><text:span text:style-name="_2f__2f_C"><text:span text:style-name="T155">Al respecto del into_iter(), podemos implementar un iterador para una estructura como en C++. Por ejemplo en C++ tenemos:<text:line-break/></text:span></text:span></text:p>
      <text:p text:style-name="P127"><text:span text:style-name="_3c_C_3e_"><text:span text:style-name="T286">struct Ticket { std::string title; };</text:span></text:span></text:p>
      <text:p text:style-name="P127"><text:span text:style-name="_3c_C_3e_"><text:span text:style-name="T286">struct TicketStore {</text:span></text:span></text:p>
      <text:p text:style-name="P127"><text:span text:style-name="_3c_C_3e_"><text:span text:style-name="T286"><text:tab/>std::vector&lt;Ticket&gt; tickets; </text:span></text:span><text:span text:style-name="_2f__2f_C"><text:span text:style-name="T286">//instancia</text:span></text:span></text:p>
      <text:p text:style-name="P127"><text:span text:style-name="_3c_C_3e_"><text:span text:style-name="T286"><text:tab/></text:span></text:span><text:span text:style-name="_3c_C_3e_"><text:span text:style-name="T287">auto </text:span></text:span><text:span text:style-name="_3c_C_2b__2b__3e_"><text:span text:style-name="T286">begin() { return tickets.begin(); } </text:span></text:span><text:span text:style-name="_2f__2f_C"><text:span text:style-name="T286">//</text:span></text:span><text:span text:style-name="_2f__2f_C"><text:span text:style-name="T287">auto = std::vector&lt;Ticket&gt;::iterator</text:span></text:span></text:p>
      <text:p text:style-name="P127"><text:span text:style-name="_3c_C_3e_"><text:span text:style-name="T286"><text:tab/></text:span></text:span><text:span text:style-name="_3c_C_3e_"><text:span text:style-name="T287">auto </text:span></text:span><text:span text:style-name="_3c_C_2b__2b__3e_"><text:span text:style-name="T286">end() { return tickets.end(); } };</text:span></text:span></text:p>
      <text:p text:style-name="P127"><text:soft-page-break/><text:span text:style-name="_3c_C_3e_"><text:span text:style-name="T286">int main() {</text:span></text:span></text:p>
      <text:p text:style-name="P127"><text:span text:style-name="_3c_C_2b__2b__3e_"><text:span text:style-name="T286"><text:tab/>TicketStore tienda;</text:span></text:span></text:p>
      <text:p text:style-name="P127"><text:span text:style-name="_3c_C_3e_"><text:span text:style-name="T286"><text:tab/>tienda.tickets.push_back({"hola"});</text:span></text:span></text:p>
      <text:p text:style-name="P127"><text:span text:style-name="_3c_C_3e_"><text:span text:style-name="T286"><text:tab/>tienda.tickets.push_back({"mundo"});</text:span></text:span></text:p>
      <text:p text:style-name="P127"><text:span text:style-name="_3c_C_3e_"><text:span text:style-name="T286">}</text:span></text:span></text:p>
      <text:p text:style-name="P127"><text:span text:style-name="_2f__2f_C"><text:span text:style-name="T286">//ahora gracias a begin() y end() podemos meterlo en un for:</text:span></text:span></text:p>
      <text:p text:style-name="P127"><text:span text:style-name="_2f__2f_C"><text:span text:style-name="T287">//</text:span></text:span><text:span text:style-name="_2f__2f_C"><text:span text:style-name="T286">for (it = tienda.begin(); it != tienda.end(); it++){</text:span></text:span></text:p>
      <text:p text:style-name="P127"><text:span text:style-name="_3c_C_3e_"><text:span text:style-name="T287">for (const auto&amp; ticket: tienda) { </text:span></text:span><text:span text:style-name="_2f__2f_C"><text:span text:style-name="T287">//por cada ticket que este en tienda.</text:span></text:span></text:p>
      <text:p text:style-name="P127"><text:span text:style-name="_3c_C_3e_"><text:span text:style-name="T286"><text:tab/>std::cout &lt;&lt; </text:span></text:span><text:span text:style-name="_3c_C_3e_"><text:span text:style-name="T287">ticket.</text:span></text:span><text:span text:style-name="_3c_C_3e_"><text:span text:style-name="T286">title &lt;&lt; std::endl;</text:span></text:span></text:p>
      <text:p text:style-name="P127"><text:span text:style-name="_3c_C_3e_"><text:span text:style-name="T289">}</text:span></text:span></text:p>
      <text:p text:style-name="P110"><text:span text:style-name="_2f__2f_C"><text:span text:style-name="T184">Pues en Rust seria:</text:span></text:span></text:p>
      <text:p text:style-name="P128"><text:span text:style-name="_3c_C_3e_"><text:span text:style-name="T288">#[derive(Clone)]</text:span></text:span></text:p>
      <text:p text:style-name="P128"><text:span text:style-name="_3c_C_3e_"><text:span text:style-name="T288">pub struct TicketStore{ tickets: Vec&lt;Ticket&gt; }</text:span></text:span></text:p>
      <text:p text:style-name="P128"><text:span text:style-name="_3c_C_3e_"><text:span text:style-name="T288">#[derive(Clone, Debug, PartialEq)]</text:span></text:span></text:p>
      <text:p text:style-name="P128"><text:span text:style-name="_3c_C_3e_"><text:span text:style-name="T288">pub struct Ticket {</text:span></text:span></text:p>
      <text:p text:style-name="P128"><text:span text:style-name="_3c_C_3e_"><text:span text:style-name="T288"><text:tab/>pub title: TicketTitle,</text:span></text:span></text:p>
      <text:p text:style-name="P128"><text:span text:style-name="_3c_C_3e_"><text:span text:style-name="T288"><text:tab/>pub description: TicketDescription,</text:span></text:span></text:p>
      <text:p text:style-name="P128"><text:span text:style-name="_3c_C_3e_"><text:span text:style-name="T288"><text:tab/>pub status: Status,</text:span></text:span></text:p>
      <text:p text:style-name="P128"><text:span text:style-name="_3c_C_3e_"><text:span text:style-name="T288">}</text:span></text:span></text:p>
      <text:p text:style-name="P128"><text:span text:style-name="_3c_C_3e_"><text:span text:style-name="T288">#[derive(Clone, Debug, Copy, PartialEq)]</text:span></text:span></text:p>
      <text:p text:style-name="P128"><text:span text:style-name="_3c_C_3e_"><text:span text:style-name="T288">pub enum Status {</text:span></text:span></text:p>
      <text:p text:style-name="P128"><text:span text:style-name="_3c_C_3e_"><text:span text:style-name="T288"><text:tab/>ToDo, InProgress, Done,</text:span></text:span></text:p>
      <text:p text:style-name="P121"><text:span text:style-name="_3c_C_3e_"><text:span text:style-name="T288">}</text:span></text:span></text:p>
      <text:p text:style-name="P121"><text:span text:style-name="_3c_C_3e_"><text:span text:style-name="T288">impl TicketStore {</text:span></text:span></text:p>
      <text:p text:style-name="P121"><text:span text:style-name="_3c_C_3e_"><text:span text:style-name="T288"><text:tab/>pub fn new() - &gt; Self {</text:span></text:span></text:p>
      <text:p text:style-name="P121"><text:span text:style-name="_3c_C_3e_"><text:span text:style-name="T288"><text:tab/><text:tab/>Self { tickets: Vec::new() }</text:span></text:span></text:p>
      <text:p text:style-name="P121"><text:soft-page-break/><text:span text:style-name="_3c_C_3e_"><text:span text:style-name="T288"><text:tab/>}</text:span></text:span></text:p>
      <text:p text:style-name="P124"><text:span text:style-name="_3c_C_3e_"><text:span text:style-name="T288"><text:tab/>pub fn add_ticket(&amp;mut self, ticket: Ticket) { self.tickets.push(ticket); } </text:span></text:span></text:p>
      <text:p text:style-name="P121"><text:span text:style-name="_3c_C_3e_"><text:span text:style-name="T288">}</text:span></text:span></text:p>
      <text:p text:style-name="P122"><text:span text:style-name="_3c_C_2b__2b__3e_"><text:span text:style-name="T289">impl IntoIterator for TicketStore {</text:span></text:span></text:p>
      <text:p text:style-name="P122"><text:span text:style-name="_3c_C_2b__2b__3e_"><text:span text:style-name="T289"><text:tab/></text:span></text:span><text:span text:style-name="_2f__2f_C"><text:span text:style-name="T289">// Item es lo que devuelve el iterador *it que es un tickets: Vec&lt;Ticket&gt;</text:span></text:span></text:p>
      <text:p text:style-name="P122"><text:span text:style-name="_3c_C_2b__2b__3e_"><text:span text:style-name="T289"><text:tab/>type Item = Ticket;</text:span></text:span></text:p>
      <text:p text:style-name="P122"><text:span text:style-name="_3c_C_2b__2b__3e_"><text:span text:style-name="T289"><text:s text:c="2"/><text:tab/></text:span></text:span><text:span text:style-name="_2f__2f_C"><text:span text:style-name="T289">/* IntoIter es el tipo de iterador que devuelve. Si lo vemos en C++ es un</text:span></text:span></text:p>
      <text:p text:style-name="P122"><text:span text:style-name="_2f__2f_C"><text:span text:style-name="T289"><text:tab/>std::vector&lt;Ticket&gt;::iterator que si vemos es lo devuelto en el metodo</text:span></text:span></text:p>
      <text:p text:style-name="P122"><text:span text:style-name="_2f__2f_C"><text:span text:style-name="T289"><text:tab/>begin() y end() con el auto. Pues esto en Rust es std::vec::IntoIter&lt;Ticket&gt;</text:span></text:span></text:p>
      <text:p text:style-name="P122"><text:span text:style-name="_2f__2f_C"><text:span text:style-name="T289"><text:tab/>es decir "IntoIter" es lo mismo que "iterator" en c++ */</text:span></text:span></text:p>
      <text:p text:style-name="P122"><text:span text:style-name="_3c_C_2b__2b__3e_"><text:span text:style-name="T289"><text:tab/>type IntoIter = std::vec::IntoIter&lt;Ticket&gt;; </text:span></text:span><text:span text:style-name="_2f__2f_C"><text:span text:style-name="T289">//el iterator devuelto es tipo</text:span></text:span><text:span text:style-name="_2f__2f_C"><text:span text:style-name="T290"> </text:span></text:span><text:span text:style-name="_2f__2f_C"><text:span text:style-name="T289"><text:tab/>std::vec::IntoIter&lt;Ticket&gt;. es decir el mismo que devuelve los Vector.</text:span></text:span></text:p>
      <text:p text:style-name="P122"><text:span text:style-name="_3c_C_2b__2b__3e_"><text:span text:style-name="T289"><text:tab/>fn into_iter(self) -&gt; Self::IntoIter { </text:span></text:span><text:span text:style-name="_2f__2f_C"><text:span text:style-name="T289">//devolvemos un iterador</text:span></text:span></text:p>
      <text:p text:style-name="P122"><text:span text:style-name="_3c_C_2b__2b__3e_"><text:span text:style-name="T289"><text:tab/><text:tab/>let mut it = self.tickets.into_iter();</text:span></text:span></text:p>
      <text:p text:style-name="P123"><text:span text:style-name="_3c_C_2b__2b__3e_"><text:span text:style-name="T289"><text:tab/><text:tab/>it</text:span></text:span></text:p>
      <text:p text:style-name="P123"><text:span text:style-name="_3c_C_2b__2b__3e_"><text:span text:style-name="T289"><text:tab/><text:tab/></text:span></text:span><text:span text:style-name="_2f__2f_C"><text:span text:style-name="T289">//o directamente la linea self.tickets.into_iter() sin ;</text:span></text:span></text:p>
      <text:p text:style-name="P122"><text:span text:style-name="_3c_C_2b__2b__3e_"><text:span text:style-name="T289"><text:tab/>}</text:span></text:span></text:p>
      <text:p text:style-name="P129"><text:span text:style-name="_2f__2f_C"><text:span text:style-name="T183">A partir de ello se podria meter en un bucle for:</text:span></text:span></text:p>
      <text:p text:style-name="P129"><text:span text:style-name="_3c_C_3e_"><text:span text:style-name="T289">fn main(){</text:span></text:span></text:p>
      <text:p text:style-name="P129"><text:span text:style-name="_3c_C_3e_"><text:span text:style-name="T289"><text:tab/>let mut tienda = TicketStore::new();</text:span></text:span></text:p>
      <text:p text:style-name="P131"><text:span text:style-name="_3c_C_3e_"><text:span text:style-name="T289"><text:tab/>let mi_ticket = Ticket {</text:span></text:span></text:p>
      <text:p text:style-name="P131"><text:span text:style-name="_3c_C_3e_"><text:span text:style-name="T289"><text:tab/><text:tab/>title: "hola".into(),</text:span></text:span></text:p>
      <text:p text:style-name="P131"><text:span text:style-name="_3c_C_3e_"><text:span text:style-name="T289"><text:tab/><text:tab/>description: "".into(),</text:span></text:span></text:p>
      <text:p text:style-name="P131"><text:span text:style-name="_3c_C_3e_"><text:span text:style-name="T289"><text:tab/><text:tab/>status: Status::ToDo,</text:span></text:span></text:p>
      <text:p text:style-name="P131"><text:span text:style-name="_3c_C_3e_"><text:span text:style-name="T289"><text:tab/>}</text:span></text:span></text:p>
      <text:p text:style-name="P131"><text:span text:style-name="_3c_C_3e_"><text:span text:style-name="T289"><text:tab/>tienda.add_ticket(mi_ticket);</text:span></text:span></text:p>
      <text:p text:style-name="P130"><text:soft-page-break/><text:span text:style-name="_3c_C_3e_"><text:span text:style-name="T289"><text:tab/>for ticket in tienda {</text:span></text:span></text:p>
      <text:p text:style-name="P130"><text:span text:style-name="_3c_C_3e_"><text:span text:style-name="T289"><text:tab/><text:tab/>println!("Ticket: {:?}", ticket.title);</text:span></text:span></text:p>
      <text:p text:style-name="P130"><text:span text:style-name="_3c_C_3e_"><text:span text:style-name="T289"><text:tab/>} </text:span></text:span></text:p>
      <text:p text:style-name="P129"><text:span text:style-name="_3c_C_3e_"><text:span text:style-name="T289">}</text:span></text:span></text:p>
      <text:p text:style-name="P126"><text:span text:style-name="_2f__2f_C"><text:span text:style-name="T186">si nos fijamos en la Firma de la funcion </text:span></text:span><text:span text:style-name="_3c_C_2b__2b__3e_"><text:span text:style-name="T289">into_iter()</text:span></text:span><text:span text:style-name="_3c_C_2b__2b__3e_"><text:span text:style-name="T291"> </text:span></text:span></text:p>
      <text:p text:style-name="P126"><text:span text:style-name="_3c_C_2b__2b__3e_"><text:span text:style-name="T211">(</text:span></text:span><text:span text:style-name="_3c_C_2b__2b__3e_"><text:span text:style-name="T249">fn</text:span></text:span><text:span text:style-name="_3c_C_2b__2b__3e_"><text:span text:style-name="T241"> funcion</text:span></text:span><text:span text:style-name="_3c_C_2b__2b__3e_"><text:span text:style-name="T249">(iter: std::vec::IntoIter&lt;Ticket&gt;</text:span></text:span><text:span text:style-name="_3c_C_2b__2b__3e_"><text:span text:style-name="T210">)</text:span></text:span></text:p>
      <text:p text:style-name="P125"><text:span text:style-name="_3c_C_3e_"><text:span text:style-name="T288">impl IntoIterator for TicketStore {</text:span></text:span></text:p>
      <text:p text:style-name="P125"><text:span text:style-name="_3c_C_3e_"><text:span text:style-name="T288"><text:tab/>type Item = Ticket;</text:span></text:span></text:p>
      <text:p text:style-name="P125"><text:span text:style-name="_3c_C_3e_"><text:span text:style-name="T288"><text:s text:c="2"/><text:tab/>type IntoIter = std::vec::IntoIter&lt;Ticket&gt;; </text:span></text:span></text:p>
      <text:p text:style-name="P125"><text:span text:style-name="_3c_C_3e_"><text:span text:style-name="T288"><text:tab/>fn into_iter(self) -&gt; Self::IntoIter { //devolvemos un iterador</text:span></text:span></text:p>
      <text:p text:style-name="P125"><text:span text:style-name="_3c_C_3e_"><text:span text:style-name="T288"><text:tab/><text:tab/>self.tickets.into_iter()</text:span></text:span></text:p>
      <text:p text:style-name="P132"><text:span text:style-name="_3c_C_3e_"><text:span text:style-name="T289"><text:tab/>}</text:span></text:span></text:p>
      <text:p text:style-name="P133"><text:span text:style-name="_3c_C_3e_"><text:span text:style-name="T289">}</text:span></text:span></text:p>
      <text:p text:style-name="P126"><text:span text:style-name="_2f__2f_C"><text:span text:style-name="T186">para definir </text:span></text:span><text:span text:style-name="_3c_C_2b__2b__3e_"><text:span text:style-name="T289">iter()</text:span></text:span><text:span text:style-name="_2f__2f_C"><text:span text:style-name="T186"> seria</text:span></text:span><text:span text:style-name="_2f__2f_C"><text:span text:style-name="T187"> (</text:span></text:span><text:span text:style-name="_3c_C_2b__2b__3e_"><text:span text:style-name="T237">fn funcion(iter: std::slice::Iter&lt;'_, Ticket&gt;)</text:span></text:span><text:span text:style-name="_2f__2f_C"><text:span text:style-name="T187">)</text:span></text:span><text:span text:style-name="_2f__2f_C"><text:span text:style-name="T186">:</text:span></text:span></text:p>
      <text:p text:style-name="P132"><text:span text:style-name="_2f__2f_C"><text:span text:style-name="T185"/></text:span></text:p>
      <text:p text:style-name="P132"><text:span text:style-name="_2f__2f_C"><text:span text:style-name="T237">// </text:span></text:span><text:span text:style-name="_2f__2f_C"><text:span text:style-name="T238">i</text:span></text:span><text:span text:style-name="_2f__2f_C"><text:span text:style-name="T237">mplementamos el trait para la REFERENCIA (&amp;TicketStore)</text:span></text:span></text:p>
      <text:p text:style-name="P132"><text:span text:style-name="_3c_C_3e_"><text:span text:style-name="T243">impl&lt;'a&gt; IntoIterator for &amp;'a TicketStore {</text:span></text:span></text:p>
      <text:p text:style-name="P132"><text:span text:style-name="_3c_C_3e_"><text:span text:style-name="T244"><text:tab/></text:span></text:span><text:span text:style-name="_3c_C_3e_"><text:span text:style-name="T243">type Item = &amp;'a Ticket; </text:span></text:span><text:span text:style-name="_2f__2f_C"><text:span text:style-name="T237">// Ahora devuelve referencias, no el Ticket entero</text:span></text:span></text:p>
      <text:p text:style-name="P125"><text:span text:style-name="_2f__2f_C"><text:span text:style-name="T245"><text:tab/></text:span></text:span><text:span text:style-name="_3c_C_3e_"><text:span text:style-name="T246">type IntoIter = std::slice::Iter&lt;'a, Ticket&gt;; </text:span></text:span><text:span text:style-name="_2f__2f_C"><text:span text:style-name="T237">// La máquina de Vec para referencias</text:span></text:span></text:p>
      <text:p text:style-name="P132"><text:span text:style-name="_3c_C_3e_"><text:span text:style-name="T244"><text:tab/></text:span></text:span><text:span text:style-name="_3c_C_3e_"><text:span text:style-name="T243">fn into_iter(self) -&gt; Self::IntoIter {</text:span></text:span></text:p>
      <text:p text:style-name="P132"><text:span text:style-name="_3c_C_3e_"><text:span text:style-name="T244"><text:tab/></text:span></text:span><text:span text:style-name="_3c_C_3e_"><text:span text:style-name="T243"> self.tickets.iter() </text:span></text:span><text:span text:style-name="_2f__2f_C"><text:span text:style-name="T237">// Delegamos en .iter() del vector</text:span></text:span></text:p>
      <text:p text:style-name="P132"><text:span text:style-name="_3c_C_3e_"><text:span text:style-name="T244"><text:tab/></text:span></text:span><text:span text:style-name="_3c_C_3e_"><text:span text:style-name="T243"> } </text:span></text:span></text:p>
      <text:p text:style-name="P132"><text:span text:style-name="_3c_C_3e_"><text:span text:style-name="T243">}</text:span></text:span></text:p>
      <text:p text:style-name="P126"><text:span text:style-name="_2f__2f_C"><text:span text:style-name="T186">para definir </text:span></text:span><text:span text:style-name="_3c_C_2b__2b__3e_"><text:span text:style-name="T289">iter_mut()</text:span></text:span><text:span text:style-name="_2f__2f_C"><text:span text:style-name="T186"> seria</text:span></text:span><text:span text:style-name="_2f__2f_C"><text:span text:style-name="T187"> (</text:span></text:span><text:span text:style-name="_3c_C_2b__2b__3e_"><text:span text:style-name="T237">fn funcion_mut(iter: std::slice::IterMut&lt;'_, Ticket&gt;)</text:span></text:span><text:span text:style-name="_2f__2f_C"><text:span text:style-name="T187">)</text:span></text:span><text:span text:style-name="_2f__2f_C"><text:span text:style-name="T186">:</text:span></text:span></text:p>
      <text:p text:style-name="P100"><text:span text:style-name="_2f__2f_C"><text:span text:style-name="T234">// Implementamos para la REFERENCIA MUTABLE (&amp;mut TicketStore)</text:span></text:span><text:span text:style-name="_3c_C_3e_"><text:span text:style-name="T247"> </text:span></text:span></text:p>
      <text:p text:style-name="P100"><text:soft-page-break/><text:span text:style-name="_3c_C_3e_"><text:span text:style-name="T247">impl&lt;'a&gt; IntoIterator for &amp;'a mut TicketStore { </text:span></text:span></text:p>
      <text:p text:style-name="P99"><text:span text:style-name="_3c_C_3e_"><text:span text:style-name="T248"><text:tab/></text:span></text:span><text:span text:style-name="_3c_C_3e_"><text:span text:style-name="T247">type Item = &amp;'a mut Ticket; </text:span></text:span><text:span text:style-name="_2f__2f_C"><text:span text:style-name="T234">// Devuelve referencias mutables</text:span></text:span></text:p>
      <text:p text:style-name="P99"><text:span text:style-name="_3c_C_3e_"><text:span text:style-name="T248"><text:tab/></text:span></text:span><text:span text:style-name="_3c_C_3e_"><text:span text:style-name="T247">type IntoIter = std::slice::IterMut&lt;'a, Ticket&gt;; </text:span></text:span><text:span text:style-name="_2f__2f_C"><text:span text:style-name="T234">// La máquina para mutables</text:span></text:span></text:p>
      <text:p text:style-name="P99"><text:span text:style-name="_3c_C_3e_"><text:span text:style-name="T248"><text:tab/></text:span></text:span><text:span text:style-name="_3c_C_3e_"><text:span text:style-name="T247">fn into_iter(self) -&gt; Self::IntoIter {</text:span></text:span></text:p>
      <text:p text:style-name="P99"><text:span text:style-name="_3c_C_3e_"><text:span text:style-name="T248"><text:tab/><text:tab/></text:span></text:span><text:span text:style-name="_3c_C_3e_"><text:span text:style-name="T247">self.tickets.iter_mut() </text:span></text:span><text:span text:style-name="_2f__2f_C"><text:span text:style-name="T234">// Delegamos en .iter_mut() del vector </text:span></text:span></text:p>
      <text:p text:style-name="P100"><text:span text:style-name="_3c_C_3e_"><text:span text:style-name="T248"><text:tab/></text:span></text:span><text:span text:style-name="_3c_C_3e_"><text:span text:style-name="T247">} </text:span></text:span></text:p>
      <text:p text:style-name="P100"><text:span text:style-name="_3c_C_3e_"><text:span text:style-name="T247">}</text:span></text:span></text:p>
      <text:p text:style-name="P100"><text:span text:style-name="_3c_C_3e_"><text:span text:style-name="T247"/></text:span></text:p>
      <text:p text:style-name="P102"><text:span text:style-name="_2f__2f_C"><text:span text:style-name="T197">ITERADORES</text:span></text:span><text:span text:style-name="_2f__2f_C"><text:span text:style-name="T198">. Combinators y Collect</text:span></text:span></text:p>
      <text:p text:style-name="P135"><text:a xlink:type="simple" xlink:href="https://doc.rust-lang.org/std/iter/trait.Iterator.html#method.filter" text:style-name="Internet_20_link" text:visited-style-name="Visited_20_Internet_20_Link"><text:span text:style-name="_2f__2f_C"><text:span text:style-name="T199">https://doc.rust-lang.org/std/iter/trait.Iterator.html#method.filter</text:span></text:span></text:a></text:p>
      <text:p text:style-name="P134"><text:span text:style-name="_2f__2f_C"><text:span text:style-name="T199">Los iteradores tienen m</text:span></text:span><text:span text:style-name="_2f__2f_C"><text:span text:style-name="T206">é</text:span></text:span><text:span text:style-name="_2f__2f_C"><text:span text:style-name="T199">todos, que se llaman combinators. El mas famoso ya introducido es </text:span></text:span><text:span text:style-name="_3c_C_2b__2b__3e_"><text:span text:style-name="T237">.next()</text:span></text:span><text:span text:style-name="_2f__2f_C"><text:span text:style-name="T199"> que avanza hasta el </text:span></text:span><text:span text:style-name="_2f__2f_C"><text:span text:style-name="T200">primero y luego el segundo, etc...</text:span></text:span><text:span text:style-name="_2f__2f_C"><text:span text:style-name="T199">(como un it++)</text:span></text:span><text:span text:style-name="_2f__2f_C"><text:span text:style-name="T200"> o un </text:span></text:span><text:span text:style-name="_3c_C_2b__2b__3e_"><text:span text:style-name="T237">.next_back()</text:span></text:span><text:span text:style-name="_2f__2f_C"><text:span text:style-name="T200"> que avanza desde el final hacia el </text:span></text:span><text:span text:style-name="_2f__2f_C"><text:span text:style-name="T207">ú</text:span></text:span><text:span text:style-name="_2f__2f_C"><text:span text:style-name="T200">ltimo. Esos son los <text:s/>m</text:span></text:span><text:span text:style-name="_2f__2f_C"><text:span text:style-name="T207">ás</text:span></text:span><text:span text:style-name="_2f__2f_C"><text:span text:style-name="T200"> importantes, pero hay otros como:</text:span></text:span></text:p>
      <text:p text:style-name="P135"><text:span text:style-name="_3c_C_3e_"><text:span text:style-name="T237"/></text:span></text:p>
      <text:p text:style-name="P135"><text:span text:style-name="_3c_C_3e_"><text:span text:style-name="T237">let numeros = vec![1, 2, 3, 4, 5];</text:span></text:span></text:p>
      <text:p text:style-name="P135"><text:span text:style-name="_2f__2f_C"><text:span text:style-name="T237">//sumamos SOLO los números PARES</text:span></text:span></text:p>
      <text:p text:style-name="P135"><text:span text:style-name="_3c_C_3e_"><text:span text:style-name="T237">let solucion: u32 = numer</text:span></text:span><text:span text:style-name="_3c_C_3e_"><text:span text:style-name="T239">o</text:span></text:span><text:span text:style-name="_3c_C_3e_"><text:span text:style-name="T237">s.iter()</text:span></text:span></text:p>
      <text:p text:style-name="P135"><text:span text:style-name="_3c_C_3e_"><text:span text:style-name="T237"><text:tab/></text:span></text:span><text:span text:style-name="_3c_C_2b__2b__3e_"><text:span text:style-name="T237">.filter(|&amp;n| n % 2 == 0) </text:span></text:span><text:span text:style-name="_2f__2f_C"><text:span text:style-name="T237">//selecciona solo los pares. es una función Closure</text:span></text:span></text:p>
      <text:p text:style-name="P135"><text:span text:style-name="_3c_C_3e_"><text:span text:style-name="T237"><text:tab/></text:span></text:span><text:span text:style-name="_3c_C_2b__2b__3e_"><text:span text:style-name="T237">.map(|&amp;n| n * n)</text:span></text:span><text:span text:style-name="_3c_C_3e_"><text:span text:style-name="T237"> </text:span></text:span><text:span text:style-name="_2f__2f_C"><text:span text:style-name="T237">//funciona como una tuberia: de los pares los multiplica por si mismos</text:span></text:span></text:p>
      <text:p text:style-name="P135"><text:span text:style-name="_3c_C_3e_"><text:span text:style-name="T237"><text:tab/></text:span></text:span><text:span text:style-name="_3c_C_2b__2b__3e_"><text:span text:style-name="T237">.sum();</text:span></text:span><text:span text:style-name="_3c_C_3e_"><text:span text:style-name="T237"> </text:span></text:span><text:span text:style-name="_2f__2f_C"><text:span text:style-name="T237">//va sumando todos y al final se mete en solucion.</text:span></text:span></text:p>
      <text:p text:style-name="P135"><text:span text:style-name="_2f__2f_C"><text:span text:style-name="T200">Toto esto se podria haber puesto en una linea como:<text:line-break/></text:span></text:span></text:p>
      <text:p text:style-name="P135"><text:span text:style-name="_3c_C_2b__2b__3e_"><text:span text:style-name="T237">let solucion: u32 = numeros.iter().filter(|&amp;n| n % 2 == 0).map(........</text:span></text:span></text:p>
      <text:p text:style-name="P136"><text:span text:style-name="_2f__2f_C"><text:span text:style-name="T200">Es decir funciona como una tuberia (pipe)</text:span></text:span><text:span text:style-name="_2f__2f_C"><text:span text:style-name="T201">. Pero el valor se almacena en una variable pero se puede perder. La forma de almacenarlo en un Vector que va haciendo reserva de memoria en el heap es con </text:span></text:span><text:span text:style-name="_3c_C_2b__2b__3e_"><text:span text:style-name="T237">.collect()</text:span></text:span></text:p>
      <text:p text:style-name="P136"><text:span text:style-name="_2f__2f_C"><text:span text:style-name="T200"/></text:span></text:p>
      <text:p text:style-name="P136"><text:span text:style-name="_3c_C_3e_"><text:span text:style-name="T237">l</text:span></text:span><text:span text:style-name="_3c_C_2b__2b__3e_"><text:span text:style-name="T237">et solucion: Vec&lt;u32&gt; </text:span></text:span><text:span text:style-name="_3c_C_3e_"><text:span text:style-name="T237">= numer</text:span></text:span><text:span text:style-name="_3c_C_3e_"><text:span text:style-name="T239">o</text:span></text:span><text:span text:style-name="_3c_C_3e_"><text:span text:style-name="T237">s.iter()</text:span></text:span></text:p>
      <text:p text:style-name="P136"><text:span text:style-name="_3c_C_3e_"><text:span text:style-name="T237"><text:tab/></text:span></text:span><text:span text:style-name="_3c_C_2b__2b__3e_"><text:span text:style-name="T237">.filter(|&amp;n| n % 2 == 0) </text:span></text:span><text:span text:style-name="_2f__2f_C"><text:span text:style-name="T237">//selecciona solo los pares. es una función Closure</text:span></text:span></text:p>
      <text:p text:style-name="P136"><text:soft-page-break/><text:span text:style-name="_3c_C_3e_"><text:span text:style-name="T237"><text:tab/></text:span></text:span><text:span text:style-name="_3c_C_2b__2b__3e_"><text:span text:style-name="T237">.map(|&amp;n| n * n)</text:span></text:span><text:span text:style-name="_3c_C_3e_"><text:span text:style-name="T237"> </text:span></text:span><text:span text:style-name="_2f__2f_C"><text:span text:style-name="T237">//funciona como una tuberia: de los pares los multiplica por si mismos</text:span></text:span></text:p>
      <text:p text:style-name="P136"><text:span text:style-name="_3c_C_3e_"><text:span text:style-name="T237"><text:tab/></text:span></text:span><text:span text:style-name="_3c_C_2b__2b__3e_"><text:span text:style-name="T237">.</text:span></text:span><text:span text:style-name="_3c_C_2b__2b__3e_"><text:span text:style-name="T240">collect</text:span></text:span><text:span text:style-name="_3c_C_2b__2b__3e_"><text:span text:style-name="T237">();</text:span></text:span><text:span text:style-name="_3c_C_3e_"><text:span text:style-name="T237"> </text:span></text:span><text:span text:style-name="_2f__2f_C"><text:span text:style-name="T237">//</text:span></text:span><text:span text:style-name="_2f__2f_C"><text:span text:style-name="T240">Los mete en un vector</text:span></text:span></text:p>
      <text:p text:style-name="P136"><text:span text:style-name="_2f__2f_C"><text:span text:style-name="T200"><text:s/></text:span></text:span><text:span text:style-name="_2f__2f_C"><text:span text:style-name="T201">O</text:span></text:span></text:p>
      <text:p text:style-name="P136"><text:span text:style-name="_3c_C_2b__2b__3e_"><text:span text:style-name="T237">let solucion </text:span></text:span><text:span text:style-name="_3c_C_3e_"><text:span text:style-name="T237">= numer</text:span></text:span><text:span text:style-name="_3c_C_3e_"><text:span text:style-name="T239">o</text:span></text:span><text:span text:style-name="_3c_C_3e_"><text:span text:style-name="T237">s.iter()</text:span></text:span></text:p>
      <text:p text:style-name="P136"><text:span text:style-name="_3c_C_3e_"><text:span text:style-name="T237"><text:tab/></text:span></text:span><text:span text:style-name="_3c_C_2b__2b__3e_"><text:span text:style-name="T237">.filter(|&amp;n| n % 2 == 0) </text:span></text:span><text:span text:style-name="_2f__2f_C"><text:span text:style-name="T237">//selecciona solo los pares. es una función Closure</text:span></text:span></text:p>
      <text:p text:style-name="P136"><text:span text:style-name="_3c_C_3e_"><text:span text:style-name="T237"><text:tab/></text:span></text:span><text:span text:style-name="_3c_C_2b__2b__3e_"><text:span text:style-name="T237">.map(|&amp;n| n * n)</text:span></text:span><text:span text:style-name="_3c_C_3e_"><text:span text:style-name="T237"> </text:span></text:span><text:span text:style-name="_2f__2f_C"><text:span text:style-name="T237">//funciona como una tuberia: de los pares los multiplica por si mismos</text:span></text:span></text:p>
      <text:p text:style-name="P136"><text:span text:style-name="_3c_C_3e_"><text:span text:style-name="T237"><text:tab/></text:span></text:span><text:span text:style-name="_3c_C_2b__2b__3e_"><text:span text:style-name="T237">.</text:span></text:span><text:span text:style-name="_3c_C_2b__2b__3e_"><text:span text:style-name="T240">collect::&lt;Vec&lt;u32&gt;&gt;</text:span></text:span><text:span text:style-name="_3c_C_2b__2b__3e_"><text:span text:style-name="T237">;</text:span></text:span><text:span text:style-name="_3c_C_3e_"><text:span text:style-name="T237"> </text:span></text:span><text:span text:style-name="_2f__2f_C"><text:span text:style-name="T237">//</text:span></text:span><text:span text:style-name="_2f__2f_C"><text:span text:style-name="T240">TurboFish ya que se parece a pez -&gt; ::&lt;&gt;</text:span></text:span></text:p>
      <text:p text:style-name="P136"><text:span text:style-name="_2f__2f_C"><text:span text:style-name="T201"/></text:span></text:p>
      <text:p text:style-name="P172"><text:span text:style-name="_2f__2f_C"><text:span text:style-name="T204">ITERADORES</text:span></text:span><text:span text:style-name="_2f__2f_C"><text:span text:style-name="T205"> como argumentos funcion. impl Trait.</text:span></text:span></text:p>
      <text:p text:style-name="P170"><text:span text:style-name="_2f__2f_C"><text:span text:style-name="T202">Hemos visto que podr</text:span></text:span><text:span text:style-name="_2f__2f_C"><text:span text:style-name="T208">í</text:span></text:span><text:span text:style-name="_2f__2f_C"><text:span text:style-name="T202">amos recibir en una funci</text:span></text:span><text:span text:style-name="_2f__2f_C"><text:span text:style-name="T208">ó</text:span></text:span><text:span text:style-name="_2f__2f_C"><text:span text:style-name="T202">n un iterador para hacer con el lo que quisieramos:</text:span></text:span></text:p>
      <text:p text:style-name="P170"><text:span text:style-name="_2f__2f_C"><text:span text:style-name="T202">para .iter(): </text:span></text:span><text:span text:style-name="_3c_C_3e_"><text:span text:style-name="T250">fn funcion(iter: </text:span></text:span><text:span text:style-name="_3c_C_2b__2b__3e_"><text:span text:style-name="T250">std::slice::Iter&lt;'_, T&gt;</text:span></text:span><text:span text:style-name="_3c_C_3e_"><text:span text:style-name="T250">);</text:span></text:span></text:p>
      <text:p text:style-name="P170"><text:span text:style-name="_2f__2f_C"><text:span text:style-name="T202">para .iter_mut(): </text:span></text:span><text:span text:style-name="_3c_C_3e_"><text:span text:style-name="T250">fn funcion(iter: </text:span></text:span><text:span text:style-name="_3c_C_2b__2b__3e_"><text:span text:style-name="T250">std::slice::Iter</text:span></text:span><text:span text:style-name="_3c_C_2b__2b__3e_"><text:span text:style-name="T251">Mut</text:span></text:span><text:span text:style-name="_3c_C_2b__2b__3e_"><text:span text:style-name="T250">&lt;'_, T&gt;</text:span></text:span><text:span text:style-name="_3c_C_3e_"><text:span text:style-name="T250">);</text:span></text:span></text:p>
      <text:p text:style-name="P170"><text:span text:style-name="_2f__2f_C"><text:span text:style-name="T202">para .into_iter(): </text:span></text:span><text:span text:style-name="_3c_C_3e_"><text:span text:style-name="T250">fn funcion(iter: </text:span></text:span><text:span text:style-name="_3c_C_2b__2b__3e_"><text:span text:style-name="T250">std::vec::IntoIter&lt;T&gt;</text:span></text:span><text:span text:style-name="_3c_C_3e_"><text:span text:style-name="T250">);</text:span></text:span></text:p>
      <text:p text:style-name="P170"><text:span text:style-name="_2f__2f_C"><text:span text:style-name="T202"/></text:span></text:p>
      <text:p text:style-name="P171"><text:span text:style-name="_2f__2f_C"><text:span text:style-name="T202">Pero claro, dicha funci</text:span></text:span><text:span text:style-name="_2f__2f_C"><text:span text:style-name="T208">ó</text:span></text:span><text:span text:style-name="_2f__2f_C"><text:span text:style-name="T202">n solo admitir</text:span></text:span><text:span text:style-name="_2f__2f_C"><text:span text:style-name="T208">í</text:span></text:span><text:span text:style-name="_2f__2f_C"><text:span text:style-name="T203">a un iterador de un VECTOR, por que as</text:span></text:span><text:span text:style-name="_2f__2f_C"><text:span text:style-name="T209">í</text:span></text:span><text:span text:style-name="_2f__2f_C"><text:span text:style-name="T203"> son sus firmas. las de </text:span></text:span><text:span text:style-name="_3c_C_3e_"><text:span text:style-name="T237">VecDeque</text:span></text:span><text:span text:style-name="_2f__2f_C"><text:span text:style-name="T203"> son </text:span></text:span><text:span text:style-name="_3c_C_2b__2b__3e_"><text:span text:style-name="T237">std::collections::vec_deque::Iter</text:span></text:span><text:span text:style-name="_2f__2f_C"><text:span text:style-name="T203"> y las de </text:span></text:span><text:span text:style-name="_3c_C_3e_"><text:span text:style-name="T237">LinkedList</text:span></text:span><text:span text:style-name="_2f__2f_C"><text:span text:style-name="T203"> son: </text:span></text:span><text:span text:style-name="_3c_C_2b__2b__3e_"><text:span text:style-name="T237">std::collections::linked_list::Iter</text:span></text:span></text:p>
      <text:p text:style-name="P171"><text:span text:style-name="_2f__2f_C"><text:span text:style-name="T203">Si quisieramos aceptar el de cualquiera:</text:span></text:span></text:p>
      <text:p text:style-name="P171"><text:span text:style-name="_2f__2f_C"><text:span text:style-name="T202"/></text:span></text:p>
      <text:p text:style-name="P171"><text:span text:style-name="_2f__2f_C"><text:span text:style-name="T202">para .iter(): </text:span></text:span><text:span text:style-name="_3c_C_3e_"><text:span text:style-name="T250">fn funcion(iter: </text:span></text:span><text:span text:style-name="_3c_C_2b__2b__3e_"><text:span text:style-name="T252">impl Iterator&lt;Item = &amp;T&gt;</text:span></text:span><text:span text:style-name="_3c_C_3e_"><text:span text:style-name="T250">);</text:span></text:span><text:span text:style-name="_3c_C_3e_"><text:span text:style-name="T252"> </text:span></text:span><text:span text:style-name="_2f__2f_C"><text:span text:style-name="T242">//.iter() da un &amp;</text:span></text:span></text:p>
      <text:p text:style-name="P171"><text:span text:style-name="_2f__2f_C"><text:span text:style-name="T202">para .iter_mut(): </text:span></text:span><text:span text:style-name="_3c_C_3e_"><text:span text:style-name="T250">fn funcion(iter: </text:span></text:span><text:span text:style-name="_3c_C_2b__2b__3e_"><text:span text:style-name="T252">impl Iterator&lt;Item = &amp;mut T&gt;</text:span></text:span><text:span text:style-name="_3c_C_3e_"><text:span text:style-name="T250">);</text:span></text:span><text:span text:style-name="_2f__2f_C"><text:span text:style-name="T242">//da un &amp;</text:span></text:span></text:p>
      <text:p text:style-name="P171"><text:span text:style-name="_2f__2f_C"><text:span text:style-name="T202">para .into_iter(): </text:span></text:span><text:span text:style-name="_3c_C_3e_"><text:span text:style-name="T250">fn funcion(iter: </text:span></text:span><text:span text:style-name="_3c_C_2b__2b__3e_"><text:span text:style-name="T252">impl Iterator&lt;Item = T&gt;</text:span></text:span><text:span text:style-name="_3c_C_3e_"><text:span text:style-name="T250">);</text:span></text:span><text:span text:style-name="_3c_C_3e_"><text:span text:style-name="T252"> </text:span></text:span><text:span text:style-name="_2f__2f_C"><text:span text:style-name="T242">//da por valor</text:span></text:span></text:p>
      <text:h text:style-name="P158" text:outline-level="3"><text:soft-page-break/><text:span text:style-name="_3c_C_3e_"><text:span text:style-name="T270"/></text:span></text:h>
      <text:h text:style-name="P158" text:outline-level="3"><text:span text:style-name="_3c_C_3e_"><text:span text:style-name="T270">RESERVA DE MEMORIA EN EL HEAP</text:span></text:span></text:h>
      <text:p text:style-name="P67"><text:span text:style-name="_2f__2f_C"><text:span text:style-name="T72">No se puede. Rust lo prohibe. De hecho esa es la protección de Rust frente a las fugas de memoria, punteros colgantes etc. Cuando nosotros hacemos una estructura como:</text:span></text:span></text:p>
      <text:p text:style-name="P67"><text:span text:style-name="_3c_C_3e_"><text:span text:style-name="T4">pub struct Estructura{</text:span></text:span></text:p>
      <text:p text:style-name="P67"><text:span text:style-name="_3c_C_3e_"><text:span text:style-name="T4"><text:tab/>dato1: u32,</text:span></text:span></text:p>
      <text:p text:style-name="P67"><text:span text:style-name="_3c_C_3e_"><text:span text:style-name="T4"><text:tab/>dato2: String,</text:span></text:span></text:p>
      <text:p text:style-name="P67"><text:span text:style-name="_3c_C_3e_"><text:span text:style-name="T4">}</text:span></text:span></text:p>
      <text:p text:style-name="P67"><text:span text:style-name="_3c_C_3e_"><text:span text:style-name="T4"/></text:span></text:p>
      <text:p text:style-name="P67"><text:span text:style-name="_3c_C_3e_"><text:span text:style-name="T4">fn main ()</text:span></text:span><text:span text:style-name="_3c_C_2b__2b__3e_"><text:span text:style-name="T48">{</text:span></text:span></text:p>
      <text:p text:style-name="P67"><text:span text:style-name="_3c_C_3e_"><text:span text:style-name="T4"><text:tab/></text:span></text:span><text:span text:style-name="_2f__2f_C"><text:span text:style-name="T4">//Rust no deja hacer esto:</text:span></text:span></text:p>
      <text:p text:style-name="P67"><text:span text:style-name="_2f__2f_C"><text:span text:style-name="T4"><text:tab/>//let mi_estructura: Estructura; por que contendría valores basura. Algo prohibido en Rust.</text:span></text:span></text:p>
      <text:p text:style-name="P67"><text:span text:style-name="_2f__2f_C"><text:span text:style-name="T4"><text:tab/>//Sino que hay que inicializarla de esta manera:</text:span></text:span></text:p>
      <text:p text:style-name="P67"><text:span text:style-name="_3c_C_3e_"><text:span text:style-name="T4"><text:tab/></text:span></text:span><text:span text:style-name="_3c_C_2b__2b__3e_"><text:span text:style-name="T48">let mi_estructura = Estructura{</text:span></text:span></text:p>
      <text:p text:style-name="P67"><text:span text:style-name="_3c_C_2b__2b__3e_"><text:span text:style-name="T48"><text:tab/><text:tab/>dato1: 32, </text:span></text:span><text:span text:style-name="_2f__2f_C"><text:span text:style-name="T48">//se asigna 4 bytes en el STACK ya que sabe cuanto son y es más rapido.</text:span></text:span></text:p>
      <text:p text:style-name="P67"><text:span text:style-name="_3c_C_2b__2b__3e_"><text:span text:style-name="T48"><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7"><text:span text:style-name="_3c_C_3e_"><text:span text:style-name="T4"><text:tab/>}</text:span></text:span></text:p>
      <text:p text:style-name="P67"><text:span text:style-name="_3c_C_2b__2b__3e_"><text:span text:style-name="T48">}</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7"><text:span text:style-name="_2f__2f_C"><text:span text:style-name="T72"/></text:span></text:p>
      <text:p text:style-name="P67"><text:span text:style-name="_2f__2f_C"><text:span text:style-name="T72">Para elementos que no sabemos cuanto van a ser de grandes, como String o Vector, se hace esto:</text:span></text:span></text:p>
      <text:p text:style-name="P67"><text:span text:style-name="_3c_C_3e_"><text:span text:style-name="T4">let mut s = </text:span></text:span><text:span text:style-name="_3c_C_2b__2b__3e_"><text:span text:style-name="T48">String::with_capacity(5);</text:span></text:span><text:span text:style-name="_2f__2f_C"><text:span text:style-name="T48">//</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8"><text:span text:style-name="_2f__2f_C"><text:span text:style-name="T72">Pa</text:span></text:span><text:span text:style-name="_2f__2f_C"><text:span text:style-name="T73">ra los vectores, por ejemplo capacidad para 5 numeros enteros:</text:span></text:span></text:p>
      <text:p text:style-name="P68"><text:span text:style-name="_3c_C_2b__2b__3e_"><text:span text:style-name="T48">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8"><text:span text:style-name="_3c_C_3e_"><text:span text:style-name="T4">v.push(12); </text:span></text:span><text:span text:style-name="_2f__2f_C"><text:span text:style-name="T4">//la longitud pasa a ser 1 y la capacidad sigue siendo 5.</text:span></text:span></text:p>
      <text:p text:style-name="P68"><text:span text:style-name="_2f__2f_C"><text:span text:style-name="T4"/></text:span></text:p>
      <text:p text:style-name="P68"><text:span text:style-name="_2f__2f_C"><text:span text:style-name="T73">En ambos como en el caso de la estructura, al salir de su scope {}, se hace el free automatico.. pero se podría forzar un free con esta instrucción antes de terminar las llaves:</text:span></text:span></text:p>
      <text:p text:style-name="P68"><text:span text:style-name="_3c_C_2b__2b__3e_"><text:span text:style-name="T55">drop(v);</text:span></text:span></text:p>
      <text:p text:style-name="P68"><text:span text:style-name="_3c_C_2b__2b__3e_"><text:span text:style-name="T48">drop(</text:span></text:span><text:span text:style-name="_3c_C_2b__2b__3e_"><text:span text:style-name="T55">s</text:span></text:span><text:span text:style-name="_3c_C_2b__2b__3e_"><text:span text:style-name="T48">);</text:span></text:span></text:p>
      <text:p text:style-name="P68"><text:span text:style-name="_3c_C_2b__2b__3e_"><text:span text:style-name="T48"/></text:span></text:p>
      <text:h text:style-name="P159" text:outline-level="3"><text:soft-page-break/><text:span text:style-name="_3c_C_3e_"><text:span text:style-name="T271">TIEMPO DE VIDA. LIFETIME. OWNERSHIP!!!</text:span></text:span></text:h>
      <text:p text:style-name="P69"><text:span text:style-name="_2f__2f_C"><text:span text:style-name="T74">Rust para preservar la memoria, tiene un método que es el </text:span></text:span><text:span text:style-name="_3c_C_2b__2b__3e_"><text:span text:style-name="T48">ownership</text:span></text:span><text:span text:style-name="_2f__2f_C"><text:span text:style-name="T74">. Si por ejemplo hacemos esto:</text:span></text:span></text:p>
      <text:p text:style-name="P69"><text:span text:style-name="_3c_C_3e_"><text:span text:style-name="T31">let num = 32;</text:span></text:span></text:p>
      <text:p text:style-name="P69"><text:span text:style-name="_3c_C_3e_"><text:span text:style-name="T31">ft_funcion(num);</text:span></text:span></text:p>
      <text:p text:style-name="P69"><text:span text:style-name="_3c_C_3e_"><text:span text:style-name="T31">println!("{}", num); </text:span></text:span></text:p>
      <text:p text:style-name="P69"><text:span text:style-name="_2f__2f_C"><text:span text:style-name="T74">No hay problema por que los tipos básicos, tienen implementando </text:span></text:span><text:span text:style-name="_3c_C_2b__2b__3e_"><text:span text:style-name="T48">Trait</text:span></text:span><text:span text:style-name="_2f__2f_C"><text:span text:style-name="T75"> </text:span></text:span><text:span text:style-name="_2f__2f_C"><text:span text:style-name="T74">el </text:span></text:span><text:span text:style-name="_3c_C_2b__2b__3e_"><text:span text:style-name="T48">Copy</text:span></text:span><text:span text:style-name="_2f__2f_C"><text:span text:style-name="T74"> o </text:span></text:span><text:span text:style-name="_3c_C_2b__2b__3e_"><text:span text:style-name="T48">Clone</text:span></text:span><text:span text:style-name="_2f__2f_C"><text:span text:style-name="T74"> de los mismos y por lo tanto el compilador no dará problema.</text:span></text:span></text:p>
      <text:p text:style-name="P69"><text:span text:style-name="_2f__2f_C"><text:span text:style-name="T74">Pero si tenemos un:</text:span></text:span></text:p>
      <text:p text:style-name="P69"><text:span text:style-name="_3c_C_3e_"><text:span text:style-name="T31">struct MiStruct{ dato: i32</text:span></text:span><text:span text:style-name="_3c_C_3e_"><text:span text:style-name="T32"> </text:span></text:span><text:span text:style-name="_3c_C_3e_"><text:span text:style-name="T31">};</text:span></text:span></text:p>
      <text:p text:style-name="P69"><text:span text:style-name="_3c_C_3e_"><text:span text:style-name="T31">let kk = MiStruct {dato: 42</text:span></text:span><text:span text:style-name="_3c_C_3e_"><text:span text:style-name="T32"> </text:span></text:span><text:span text:style-name="_3c_C_3e_"><text:span text:style-name="T31">};</text:span></text:span></text:p>
      <text:p text:style-name="P69"><text:span text:style-name="_3c_C_2b__2b__3e_"><text:span text:style-name="T48">ft_funcion(kk); </text:span></text:span><text:span text:style-name="_2f__2f_C"><text:span text:style-name="T31">//hemos perdido el ownership aqui. Ya no es dueña kk de los datos. Se han transferido a la función</text:span></text:span></text:p>
      <text:p text:style-name="P69"><text:span text:style-name="_3c_C_3e_"><text:span text:style-name="T31">println!("{}", kk.dato); </text:span></text:span><text:span text:style-name="_2f__2f_C"><text:span text:style-name="T31">//da error aqui por que no tiene el ownership ya.</text:span></text:span></text:p>
      <text:p text:style-name="P69"><text:span text:style-name="_2f__2f_C"><text:span text:style-name="T74"/></text:span></text:p>
      <text:p text:style-name="P69"><text:span text:style-name="_2f__2f_C"><text:span text:style-name="T74">Esto se puede arreglar con una sola linea y es implementando el </text:span></text:span><text:span text:style-name="_3c_C_2b__2b__3e_"><text:span text:style-name="T48">Trait</text:span></text:span><text:span text:style-name="_2f__2f_C"><text:span text:style-name="T74"> de </text:span></text:span><text:span text:style-name="_3c_C_2b__2b__3e_"><text:span text:style-name="T48">Copy Clone</text:span></text:span><text:span text:style-name="_2f__2f_C"><text:span text:style-name="T74"> para la estructura.. y se tiene que hacer arriba de ella:</text:span></text:span></text:p>
      <text:p text:style-name="P69"><text:span text:style-name="_3c_C_2b__2b__3e_"><text:span text:style-name="T48">#[derive(Copy, Clone)]</text:span></text:span></text:p>
      <text:p text:style-name="P70"><text:span text:style-name="_3c_C_3e_"><text:span text:style-name="T31">struct MiStruct{ dato: i32, };</text:span></text:span></text:p>
      <text:p text:style-name="P70"><text:span text:style-name="_3c_C_3e_"><text:span text:style-name="T31">.... </text:span></text:span><text:span text:style-name="_2f__2f_C"><text:span text:style-name="T31">//el resto del código.</text:span></text:span><text:span text:style-name="_3c_C_3e_"><text:span text:style-name="T31"> </text:span></text:span></text:p>
      <text:p text:style-name="P70"><text:span text:style-name="_2f__2f_C"><text:span text:style-name="T75">Ahora no daría error de compilación ya que la estructura al llamarse a la función, se copiaría. </text:span></text:span></text:p>
      <text:p text:style-name="P70"><text:span text:style-name="_2f__2f_C"><text:span text:style-name="T75">Si la estructura tuviera un String dentro, el Copy no se puede hacer ya que parte de los datos del String se almacenan en el Heap, y por lo tanto hay que aplicar un </text:span></text:span><text:span text:style-name="_3c_C_2b__2b__3e_"><text:span text:style-name="T48">.clone()</text:span></text:span><text:span text:style-name="_2f__2f_C"><text:span text:style-name="T75">:</text:span></text:span></text:p>
      <text:p text:style-name="P70"><text:span text:style-name="_3c_C_2b__2b__3e_"><text:span text:style-name="T48">#[derive(Clone)]</text:span></text:span></text:p>
      <text:p text:style-name="P70"><text:span text:style-name="_3c_C_3e_"><text:span text:style-name="T31">struct MiStruct{ dato: </text:span></text:span><text:span text:style-name="_3c_C_2b__2b__3e_"><text:span text:style-name="T48">String</text:span></text:span><text:span text:style-name="_3c_C_3e_"><text:span text:style-name="T31"> };</text:span></text:span></text:p>
      <text:p text:style-name="P70"><text:span text:style-name="_3c_C_3e_"><text:span text:style-name="T31">let kk = MiStruct {dato: "hola mundo".into(),};</text:span></text:span></text:p>
      <text:p text:style-name="P70"><text:span text:style-name="_3c_C_3e_"><text:span text:style-name="T31">ft_funcion(</text:span></text:span><text:span text:style-name="_3c_C_2b__2b__3e_"><text:span text:style-name="T48">kk.clone()</text:span></text:span><text:span text:style-name="_3c_C_3e_"><text:span text:style-name="T31">); </text:span></text:span><text:span text:style-name="_2f__2f_C"><text:span text:style-name="T31">//y ahí pasamos un clone y no se pierde.</text:span></text:span></text:p>
      <text:p text:style-name="P70"><text:span text:style-name="_2f__2f_C"><text:span text:style-name="T75"/></text:span></text:p>
      <text:p text:style-name="P71"><text:span text:style-name="_2f__2f_C"><text:span text:style-name="T76">Esto mismo pasaría si en vez de a una función se le pasa a un match, o cualquier cosa que esté entre llaves {}.<text:line-break/></text:span></text:span><text:span text:style-name="_2f__2f_C"><text:span text:style-name="T274">Para no hacer copia se puede pasar la referencia como en C++:</text:span></text:span></text:p>
      <text:p text:style-name="P72"><text:span text:style-name="_3c_C_3e_"><text:span text:style-name="T31">struct MiStruct{ dato: i32</text:span></text:span><text:span text:style-name="_3c_C_3e_"><text:span text:style-name="T32"> </text:span></text:span><text:span text:style-name="_3c_C_3e_"><text:span text:style-name="T31">};</text:span></text:span></text:p>
      <text:p text:style-name="P72"><text:span text:style-name="_3c_C_3e_"><text:span text:style-name="T31">let kk = MiStruct {dato: 42</text:span></text:span><text:span text:style-name="_3c_C_3e_"><text:span text:style-name="T32"> </text:span></text:span><text:span text:style-name="_3c_C_3e_"><text:span text:style-name="T31">};</text:span></text:span></text:p>
      <text:p text:style-name="P72"><text:span text:style-name="_3c_C_3e_"><text:span text:style-name="T48">ft_funcion(</text:span></text:span><text:span text:style-name="_3c_C_2b__2b__3e_"><text:span text:style-name="T48">&amp;</text:span></text:span><text:span text:style-name="_3c_C_3e_"><text:span text:style-name="T48">kk);</text:span></text:span><text:span text:style-name="_3c_C_2b__2b__3e_"><text:span text:style-name="T48"> </text:span></text:span><text:span text:style-name="_2f__2f_C"><text:span text:style-name="T31">//</text:span></text:span><text:span text:style-name="_2f__2f_C"><text:span text:style-name="T33">donde la funcion recibe un &amp; tambien como fn ft_funcion(kk: &amp;MiStruct);</text:span></text:span></text:p>
      <text:p text:style-name="P72"><text:span text:style-name="_3c_C_3e_"><text:span text:style-name="T31">println!("{}", kk.dato); </text:span></text:span><text:span text:style-name="_2f__2f_C"><text:span text:style-name="T31">//</text:span></text:span><text:span text:style-name="_2f__2f_C"><text:span text:style-name="T33">ya no da error.</text:span></text:span></text:p>
      <text:p text:style-name="P73"><text:span text:style-name="_2f__2f_C"><text:span text:style-name="T77">Y lo mismo pasándolo a un match:</text:span></text:span></text:p>
      <text:p text:style-name="P73"><text:soft-page-break/><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48">{</text:span></text:span><text:span text:style-name="_3c_C_2b__2b__3e_"><text:span text:style-name="T56"> </text:span></text:span><text:span text:style-name="_3c_C_2b__2b__3e_"><text:span text:style-name="T48">asignado_a: String,},</text:span></text:span><text:span text:style-name="_3c_C_3e_"><text:span text:style-name="T4"><text:tab/>Hecho,}</text:span></text:span></text:p>
      <text:p text:style-name="P73"><text:span text:style-name="_3c_C_3e_"><text:span text:style-name="T4">match </text:span></text:span><text:span text:style-name="_3c_C_2b__2b__3e_"><text:span text:style-name="T48">&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3"><text:span text:style-name="_3c_C_3e_"><text:span text:style-name="T4"><text:tab/>Status::EnProgreso</text:span></text:span><text:span text:style-name="_3c_C_3e_"><text:span text:style-name="T48">{ asignado_a }</text:span></text:span><text:span text:style-name="_3c_C_3e_"><text:span text:style-name="T4"> =&gt; { println! "Lo hace: {}",</text:span></text:span><text:span text:style-name="_3c_C_3e_"><text:span text:style-name="T48"> asignado_a</text:span></text:span><text:span text:style-name="_3c_C_3e_"><text:span text:style-name="T4">; },</text:span></text:span></text:p>
      <text:p text:style-name="P73"><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3"><text:span text:style-name="_3c_C_3e_"><text:span text:style-name="T34"/></text:span></text:p>
      <text:p text:style-name="P73"><text:span text:style-name="_2f__2f_C"><text:span text:style-name="T77">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77"> la estructura kk va asegurarse a vivir durante TODO el tiempo de la función, aunque luego se haga llamada a otras funciones:</text:span></text:span></text:p>
      <text:p text:style-name="P73"><text:span text:style-name="_2f__2f_C"><text:span text:style-name="T77"/></text:span></text:p>
      <text:p text:style-name="P74"><text:span text:style-name="_3c_C_3e_"><text:span text:style-name="T31">struct ST {dato: String}; </text:span></text:span><text:span text:style-name="_2f__2f_C"><text:span text:style-name="T31">//debe estar fuera para ser reconocida por funcion1 y funcion2</text:span></text:span></text:p>
      <text:p text:style-name="P73"><text:span text:style-name="_3c_C_3e_"><text:span text:style-name="T31">fn main(){</text:span></text:span></text:p>
      <text:p text:style-name="P73"><text:span text:style-name="_3c_C_3e_"><text:span text:style-name="T31"><text:tab/>let st = ST { dato: "hola".into() };</text:span></text:span></text:p>
      <text:p text:style-name="P75"><text:span text:style-name="_3c_C_3e_"><text:span text:style-name="T31"><text:tab/>funcion1(</text:span></text:span><text:span text:style-name="_3c_C_2b__2b__3e_"><text:span text:style-name="T48">&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5"><text:span text:style-name="_3c_C_3e_"><text:span text:style-name="T31"><text:tab/>println!("{}", st.dato); </text:span></text:span><text:span text:style-name="_2f__2f_C"><text:span text:style-name="T31">//compila sin problema por que no perdió el ownership.<text:tab/></text:span></text:span></text:p>
      <text:p text:style-name="P73"><text:span text:style-name="_3c_C_3e_"><text:span text:style-name="T31">}</text:span></text:span></text:p>
      <text:p text:style-name="P75"><text:span text:style-name="_2f__2f_C"><text:span text:style-name="T31">//En Rust no hace falta declarar las funciones antes de usarlas.</text:span></text:span></text:p>
      <text:p text:style-name="P75"><text:span text:style-name="_3c_C_3e_"><text:span text:style-name="T31">fn funcion1(</text:span></text:span><text:span text:style-name="_3c_C_2b__2b__3e_"><text:span text:style-name="T48">st: &amp;ST</text:span></text:span><text:span text:style-name="_3c_C_3e_"><text:span text:style-name="T31">){ </text:span></text:span></text:p>
      <text:p text:style-name="P74"><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4"><text:span text:style-name="_3c_C_3e_"><text:span text:style-name="T31"><text:tab/>funcion2(</text:span></text:span><text:span text:style-name="_3c_C_2b__2b__3e_"><text:span text:style-name="T48">st</text:span></text:span><text:span text:style-name="_3c_C_3e_"><text:span text:style-name="T31">); </text:span></text:span></text:p>
      <text:p text:style-name="P75"><text:span text:style-name="_3c_C_3e_"><text:span text:style-name="T31"><text:tab/>println!("{}", st.dato); </text:span></text:span><text:span text:style-name="_2f__2f_C"><text:span text:style-name="T31">//compila</text:span></text:span></text:p>
      <text:p text:style-name="P75"><text:span text:style-name="_3c_C_3e_"><text:span text:style-name="T31">}</text:span></text:span></text:p>
      <text:p text:style-name="P75"><text:span text:style-name="_3c_C_3e_"><text:span text:style-name="T31">fn funcion2(</text:span></text:span><text:span text:style-name="_3c_C_2b__2b__3e_"><text:span text:style-name="T48">st: &amp;ST</text:span></text:span><text:span text:style-name="_3c_C_3e_"><text:span text:style-name="T31">){</text:span></text:span></text:p>
      <text:p text:style-name="P75"><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5"><text:span text:style-name="_3c_C_3e_"><text:span text:style-name="T31">}</text:span></text:span></text:p>
      <text:p text:style-name="P75"><text:span text:style-name="_3c_C_3e_"><text:span text:style-name="T31"/></text:span></text:p>
      <text:p text:style-name="P76"><text:span text:style-name="_2f__2f_C"><text:span text:style-name="T275">LIFETIMES!!</text:span></text:span></text:p>
      <text:p text:style-name="P76"><text:span text:style-name="_2f__2f_C"><text:span text:style-name="T78">Cuando es obligatorio usar LIFETIMES? (</text:span></text:span><text:span text:style-name="_3c_C_3e_"><text:span text:style-name="T31">&lt;'loquesea&gt;</text:span></text:span><text:span text:style-name="_2f__2f_C"><text:span text:style-name="T78">) con una referencia </text:span></text:span><text:span text:style-name="_3c_C_2b__2b__3e_"><text:span text:style-name="T48">&amp;</text:span></text:span><text:span text:style-name="_2f__2f_C"><text:span text:style-name="T78">?</text:span></text:span></text:p>
      <text:p text:style-name="P76"><text:span text:style-name="_2f__2f_C"><text:span text:style-name="T78">1. Cuando guardamos una referencia en un STRUCT o ENUM:</text:span></text:span></text:p>
      <text:p text:style-name="P76"><text:span text:style-name="_3c_C_3e_"><text:span text:style-name="T37"><text:tab/></text:span></text:span><text:span text:style-name="_3c_C_3e_"><text:span text:style-name="T31">struct ST { texto: </text:span></text:span><text:span text:style-name="_3c_C_2b__2b__3e_"><text:span text:style-name="T48">&amp;str</text:span></text:span><text:span text:style-name="_3c_C_3e_"><text:span text:style-name="T31">}</text:span></text:span><text:span text:style-name="_2f__2f_C"><text:span text:style-name="T78"> </text:span></text:span><text:span text:style-name="_2f__2f_C"><text:span text:style-name="T48">//&amp;str es como un char*. pero ERROR!! Rust no sabe cuanto vive</text:span></text:span></text:p>
      <text:p text:style-name="P76"><text:span text:style-name="_2f__2f_C"><text:span text:style-name="T78"><text:tab/>Para Solucionarlo:</text:span></text:span></text:p>
      <text:p text:style-name="P77"><text:span text:style-name="_2f__2f_C"><text:span text:style-name="T79"><text:tab/></text:span></text:span><text:span text:style-name="_2f__2f_C"><text:span text:style-name="T48">//primero se define el lifetime y luego se aplica. el ST&lt;'a&gt; va a tener un str que vive 'a y no menos.</text:span></text:span></text:p>
      <text:p text:style-name="P76"><text:span text:style-name="_3c_C_3e_"><text:span text:style-name="T48"><text:tab/>struct ST</text:span></text:span><text:span text:style-name="_3c_C_2b__2b__3e_"><text:span text:style-name="T48">&lt;'a&gt; </text:span></text:span><text:span text:style-name="_3c_C_3e_"><text:span text:style-name="T48">{texto: </text:span></text:span><text:span text:style-name="_3c_C_2b__2b__3e_"><text:span text:style-name="T48">&amp;'a</text:span></text:span><text:span text:style-name="_3c_C_3e_"><text:span text:style-name="T48"> str, } /</text:span></text:span><text:span text:style-name="_2f__2f_C"><text:span text:style-name="T48">/Significa que ST no puede vivir más que el texto str, por <text:tab/>que si no tendríamos un puntero basura.</text:span></text:span></text:p>
      <text:p text:style-name="P76"><text:span text:style-name="_2f__2f_C"><text:span text:style-name="T48"/></text:span></text:p>
      <text:p text:style-name="P78"><text:soft-page-break/><text:span text:style-name="_2f__2f_C"><text:span text:style-name="T80">2</text:span></text:span><text:span text:style-name="_2f__2f_C"><text:span text:style-name="T78">. Cuando </text:span></text:span><text:span text:style-name="_2f__2f_C"><text:span text:style-name="T80">pasamos varias referencias que devuelve una de ellas. Si una función recibe dos o más referencias y devuelve otra referencia, el compilador se confunde y no sabe cual de los parámetros proviene del dato resuelto.</text:span></text:span></text:p>
      <text:p text:style-name="P78"><text:span text:style-name="_2f__2f_C"><text:span text:style-name="T80"><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8"><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8"><text:span text:style-name="_2f__2f_C"><text:span text:style-name="T80"><text:tab/></text:span></text:span><text:span text:style-name="_2f__2f_C"><text:span text:style-name="T78">Para</text:span></text:span><text:span text:style-name="_2f__2f_C"><text:span text:style-name="T80"> solucionarlo:</text:span></text:span></text:p>
      <text:p text:style-name="P78"><text:span text:style-name="_2f__2f_C"><text:span text:style-name="T80"><text:tab/></text:span></text:span><text:span text:style-name="_3c_C_3e_"><text:span text:style-name="T31">fn el_mas_largo</text:span></text:span><text:span text:style-name="_3c_C_2b__2b__3e_"><text:span text:style-name="T48">&lt;'a&gt;</text:span></text:span><text:span text:style-name="_3c_C_3e_"><text:span text:style-name="T31">(x: </text:span></text:span><text:span text:style-name="_3c_C_2b__2b__3e_"><text:span text:style-name="T48">&amp;'a</text:span></text:span><text:span text:style-name="_3c_C_3e_"><text:span text:style-name="T31"> str, y: </text:span></text:span><text:span text:style-name="_3c_C_2b__2b__3e_"><text:span text:style-name="T48">&amp;'a</text:span></text:span><text:span text:style-name="_3c_C_3e_"><text:span text:style-name="T31"> str) -&gt; </text:span></text:span><text:span text:style-name="_3c_C_2b__2b__3e_"><text:span text:style-name="T48">&amp;'a</text:span></text:span><text:span text:style-name="_3c_C_3e_"><text:span text:style-name="T31"> str{</text:span></text:span></text:p>
      <text:p text:style-name="P78"><text:span text:style-name="_3c_C_3e_"><text:span text:style-name="T31"><text:tab/><text:tab/>if x.len() &gt; y.len() { x } else { y } </text:span></text:span><text:span text:style-name="_2f__2f_C"><text:span text:style-name="T31">//la referencia devuelta vivirá tanto como la menor.</text:span></text:span></text:p>
      <text:p text:style-name="P78"><text:span text:style-name="_3c_C_3e_"><text:span text:style-name="T31"><text:tab/>}</text:span></text:span></text:p>
      <text:p text:style-name="P78"><text:span text:style-name="_3c_C_3e_"><text:span text:style-name="T31"/></text:span></text:p>
      <text:h text:style-name="P160" text:outline-level="3"><text:span text:style-name="_3c_C_3e_"><text:span text:style-name="T272">OPTION</text:span></text:span></text:h>
      <text:p text:style-name="P79"><text:span text:style-name="_2f__2f_C"><text:span text:style-name="T81">Qué pasa en C cuando tenemos un </text:span></text:span><text:span text:style-name="_3c_C_3e_"><text:span text:style-name="T31">Char* str = NULL</text:span></text:span><text:span text:style-name="_2f__2f_C"><text:span text:style-name="T81">, y le hacemos un </text:span></text:span><text:span text:style-name="_3c_C_3e_"><text:span text:style-name="T31">str[0]</text:span></text:span><text:span text:style-name="_2f__2f_C"><text:span text:style-name="T81">,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9"><text:span text:style-name="_2f__2f_C"><text:span text:style-name="T81">Es decir, si no checkeamos que primero existe </text:span></text:span><text:span text:style-name="_3c_C_3e_"><text:span text:style-name="T31">str</text:span></text:span><text:span text:style-name="_2f__2f_C"><text:span text:style-name="T81">, entonces se puede producir el crash. </text:span></text:span></text:p>
      <text:p text:style-name="P79"><text:span text:style-name="_2f__2f_C"><text:span text:style-name="T81">Rust evita esto, devolviendo en muchos casos y métodos un tipo llamado </text:span></text:span><text:span text:style-name="_3c_C_2b__2b__3e_"><text:span text:style-name="T48">OPTION</text:span></text:span><text:span text:style-name="_2f__2f_C"><text:span text:style-name="T81">, que en sí es un enum:</text:span></text:span></text:p>
      <text:p text:style-name="P79"><text:span text:style-name="_2f__2f_C"><text:span text:style-name="T81"/></text:span></text:p>
      <text:p text:style-name="P79"><text:span text:style-name="_3c_C_2b__2b__3e_"><text:span text:style-name="T48">enum Option&lt;T&gt;{</text:span></text:span></text:p>
      <text:p text:style-name="P79"><text:span text:style-name="_3c_C_2b__2b__3e_"><text:span text:style-name="T48"><text:tab/>Some(T),</text:span></text:span></text:p>
      <text:p text:style-name="P79"><text:span text:style-name="_3c_C_2b__2b__3e_"><text:span text:style-name="T48"><text:tab/>None,</text:span></text:span></text:p>
      <text:p text:style-name="P79"><text:span text:style-name="_3c_C_2b__2b__3e_"><text:span text:style-name="T48">}</text:span></text:span></text:p>
      <text:p text:style-name="P79"><text:span text:style-name="_2f__2f_C"><text:span text:style-name="T81"/></text:span></text:p>
      <text:p text:style-name="P79"><text:span text:style-name="_2f__2f_C"><text:span text:style-name="T81">Es decir devuelve una Tupla de valores. Un </text:span></text:span><text:span text:style-name="_3c_C_2b__2b__3e_"><text:span text:style-name="T48">Some(T)</text:span></text:span><text:span text:style-name="_2f__2f_C"><text:span text:style-name="T81"> si devuelve "algo" (y </text:span></text:span><text:span text:style-name="_3c_C_3e_"><text:span text:style-name="T31">Some</text:span></text:span><text:span text:style-name="_2f__2f_C"><text:span text:style-name="T81"> es palabra reservada para ello) o un </text:span></text:span><text:span text:style-name="_3c_C_2b__2b__3e_"><text:span text:style-name="T48">None</text:span></text:span><text:span text:style-name="_2f__2f_C"><text:span text:style-name="T81">, es decir nada. </text:span></text:span></text:p>
      <text:p text:style-name="P79"><text:span text:style-name="_2f__2f_C"><text:span text:style-name="T81">Esto puede ser un número o algo.. o una dirección de memoria o un </text:span></text:span><text:span text:style-name="_3c_C_3e_"><text:span text:style-name="T31">NULL</text:span></text:span><text:span text:style-name="_2f__2f_C"><text:span text:style-name="T81">. De esa manera siempre estamos protegidos.</text:span></text:span></text:p>
      <text:p text:style-name="P80"><text:span text:style-name="_2f__2f_C"><text:span text:style-name="T81">Para </text:span></text:span><text:span text:style-name="_2f__2f_C"><text:span text:style-name="T82">usarlo puede ser asi:</text:span></text:span></text:p>
      <text:p text:style-name="P80"><text:span text:style-name="_2f__2f_C"><text:span text:style-name="T82">Recordando la estructura </text:span></text:span><text:span text:style-name="_3c_C_3e_"><text:span text:style-name="T31">Ticket</text:span></text:span><text:span text:style-name="_2f__2f_C"><text:span text:style-name="T82"> que tenia un </text:span></text:span><text:span text:style-name="_3c_C_3e_"><text:span text:style-name="T31">status</text:span></text:span><text:span text:style-name="_2f__2f_C"><text:span text:style-name="T82"> de </text:span></text:span><text:span text:style-name="_3c_C_3e_"><text:span text:style-name="T31">enum Status</text:span></text:span><text:span text:style-name="_2f__2f_C"><text:span text:style-name="T82"> con </text:span></text:span><text:span text:style-name="_3c_C_3e_"><text:span text:style-name="T31">assigned_to</text:span></text:span><text:span text:style-name="_2f__2f_C"><text:span text:style-name="T82"> en el de </text:span></text:span><text:span text:style-name="_3c_C_3e_"><text:span text:style-name="T31">InProgress</text:span></text:span><text:span text:style-name="_2f__2f_C"><text:span text:style-name="T82">:</text:span></text:span></text:p>
      <text:p text:style-name="P80"><text:span text:style-name="_3c_C_3e_"><text:span text:style-name="T31">pub fn assigned_to(&amp;self) -&gt; </text:span></text:span><text:span text:style-name="_3c_C_2b__2b__3e_"><text:span text:style-name="T48">Option&lt;&amp;String&gt;</text:span></text:span><text:span text:style-name="_3c_C_3e_"><text:span text:style-name="T31">{ /</text:span></text:span><text:span text:style-name="_2f__2f_C"><text:span text:style-name="T31">/ya no tendremos que hacer panic ya que la otra opción seria un None (null).</text:span></text:span></text:p>
      <text:p text:style-name="P80"><text:span text:style-name="_3c_C_3e_"><text:span text:style-name="T31">if let Status::InProgress { assigned_to } = &amp;self.status { </text:span></text:span><text:span text:style-name="_3c_C_2b__2b__3e_"><text:span text:style-name="T48">Some(assigned_to)</text:span></text:span><text:span text:style-name="_3c_C_3e_"><text:span text:style-name="T31"> }</text:span></text:span></text:p>
      <text:p text:style-name="P109"><text:span text:style-name="_3c_C_3e_"><text:span text:style-name="T31">else { </text:span></text:span><text:span text:style-name="_3c_C_2b__2b__3e_"><text:span text:style-name="T48">None</text:span></text:span><text:span text:style-name="_3c_C_3e_"><text:span text:style-name="T31"> }</text:span></text:span></text:p>
      <text:p text:style-name="P79"><text:span text:style-name="_2f__2f_C"><text:span text:style-name="T82"/></text:span></text:p>
      <text:h text:style-name="P161" text:outline-level="3"><text:span text:style-name="_3c_C_3e_"><text:span text:style-name="T273">RESULT</text:span></text:span></text:h>
      <text:p text:style-name="P81"><text:span text:style-name="_2f__2f_C"><text:span text:style-name="T81">E</text:span></text:span><text:span text:style-name="_2f__2f_C"><text:span text:style-name="T83">s la otra tupla de Rust, y en este caso es:</text:span></text:span></text:p>
      <text:p text:style-name="P81"><text:soft-page-break/><text:span text:style-name="_3c_C_2b__2b__3e_"><text:span text:style-name="T48">enum RESULT&lt;T, J&gt;{</text:span></text:span></text:p>
      <text:p text:style-name="P81"><text:span text:style-name="_3c_C_2b__2b__3e_"><text:span text:style-name="T48"><text:tab/>Ok(T),</text:span></text:span></text:p>
      <text:p text:style-name="P81"><text:span text:style-name="_3c_C_2b__2b__3e_"><text:span text:style-name="T48"><text:tab/>Err(J),</text:span></text:span></text:p>
      <text:p text:style-name="P81"><text:span text:style-name="_3c_C_2b__2b__3e_"><text:span text:style-name="T48">}</text:span></text:span></text:p>
      <text:p text:style-name="P81"><text:span text:style-name="_2f__2f_C"><text:span text:style-name="T83">En este caso estamos viendo el resultado de una operación o paso a función que queramos probar.</text:span></text:span></text:p>
      <text:p text:style-name="P81"><text:span text:style-name="_3c_C_3e_"><text:span text:style-name="T31">fn dividir (dividendo: i32, divisor: i32) -&gt; </text:span></text:span><text:span text:style-name="_3c_C_2b__2b__3e_"><text:span text:style-name="T48">Result &lt;i32, String&gt;</text:span></text:span><text:span text:style-name="_3c_C_3e_"><text:span text:style-name="T31">{</text:span></text:span></text:p>
      <text:p text:style-name="P81"><text:span text:style-name="_3c_C_3e_"><text:span text:style-name="T31"><text:tab/>if divisor == 0 {</text:span></text:span></text:p>
      <text:p text:style-name="P81"><text:span text:style-name="_3c_C_3e_"><text:span text:style-name="T31"><text:tab/><text:tab/></text:span></text:span><text:span text:style-name="_3c_C_2b__2b__3e_"><text:span text:style-name="T48">Err("No se puede dividir por cero!".to_string()</text:span></text:span></text:p>
      <text:p text:style-name="P81"><text:span text:style-name="_3c_C_3e_"><text:span text:style-name="T31"><text:tab/>}</text:span></text:span></text:p>
      <text:p text:style-name="P81"><text:span text:style-name="_3c_C_3e_"><text:span text:style-name="T31"><text:tab/>else{</text:span></text:span></text:p>
      <text:p text:style-name="P81"><text:span text:style-name="_3c_C_3e_"><text:span text:style-name="T31"><text:tab/><text:tab/></text:span></text:span><text:span text:style-name="_3c_C_2b__2b__3e_"><text:span text:style-name="T48">Ok(dividento / divisor)</text:span></text:span></text:p>
      <text:p text:style-name="P81"><text:span text:style-name="_3c_C_3e_"><text:span text:style-name="T31"><text:tab/>}</text:span></text:span></text:p>
      <text:p text:style-name="P81"><text:span text:style-name="_3c_C_3e_"><text:span text:style-name="T31">}</text:span></text:span></text:p>
      <text:p text:style-name="P81"><text:span text:style-name="_3c_C_3e_"><text:span text:style-name="T31">fn main{</text:span></text:span></text:p>
      <text:p text:style-name="P81"><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1"><text:span text:style-name="_3c_C_3e_"><text:span text:style-name="T31"><text:tab/>match resultado{</text:span></text:span></text:p>
      <text:p text:style-name="P81"><text:span text:style-name="_3c_C_3e_"><text:span text:style-name="T31"><text:tab/><text:tab/>Ok(i) =&gt; println!("El resultado es: {}", i),</text:span></text:span></text:p>
      <text:p text:style-name="P81"><text:span text:style-name="_3c_C_3e_"><text:span text:style-name="T31"><text:tab/><text:tab/>Err(str) =&gt; println!("{}", str),</text:span></text:span></text:p>
      <text:p text:style-name="P81"><text:span text:style-name="_3c_C_3e_"><text:span text:style-name="T31"><text:tab/>}</text:span></text:span></text:p>
      <text:p text:style-name="P81"><text:span text:style-name="_3c_C_3e_"><text:span text:style-name="T31">}</text:span></text:span></text:p>
      <text:p text:style-name="P81"><text:span text:style-name="_2f__2f_C"><text:span text:style-name="T83">También en vez del </text:span></text:span><text:span text:style-name="_3c_C_3e_"><text:span text:style-name="T31">match</text:span></text:span><text:span text:style-name="_2f__2f_C"><text:span text:style-name="T83"> que es muy largo, se podría haber puesto:</text:span></text:span></text:p>
      <text:p text:style-name="P81"><text:span text:style-name="_3c_C_3e_"><text:span text:style-name="T31">let resultado = dividir(10,2)</text:span></text:span><text:span text:style-name="_3c_C_2b__2b__3e_"><text:span text:style-name="T48">.unwrap()</text:span></text:span><text:span text:style-name="_3c_C_3e_"><text:span text:style-name="T31">; </text:span></text:span><text:span text:style-name="_2f__2f_C"><text:span text:style-name="T31">//si es Err entonces hay un panic.</text:span></text:span></text:p>
      <text:p text:style-name="P81"><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1"><text:span text:style-name="_2f__2f_C"><text:span text:style-name="T83"/></text:span></text:p>
      <text:p text:style-name="P81"><text:span text:style-name="_2f__2f_C"><text:span text:style-name="T84">Y ese</text:span></text:span><text:span text:style-name="_2f__2f_C"><text:span text:style-name="T83"> panic hubiera salido </text:span></text:span><text:span text:style-name="_2f__2f_C"><text:span text:style-name="T84">CON el</text:span></text:span><text:span text:style-name="_2f__2f_C"><text:span text:style-name="T83"> msg de error</text:span></text:span><text:span text:style-name="_2f__2f_C"><text:span text:style-name="T84"> definido en la función</text:span></text:span><text:span text:style-name="_2f__2f_C"><text:span text:style-name="T83">. Si queremos uno </text:span></text:span><text:span text:style-name="_2f__2f_C"><text:span text:style-name="T84">más personalizado </text:span></text:span><text:span text:style-name="_2f__2f_C"><text:span text:style-name="T83">podríamos hacer:</text:span></text:span></text:p>
      <text:p text:style-name="P81"><text:span text:style-name="_3c_C_3e_"><text:span text:style-name="T31">let resultado = dividir(10,2)</text:span></text:span><text:span text:style-name="_3c_C_2b__2b__3e_"><text:span text:style-name="T48">.expect("No se puede dividir por cero");</text:span></text:span><text:span text:style-name="_3c_C_3e_"><text:span text:style-name="T31"> </text:span></text:span><text:span text:style-name="_2f__2f_C"><text:span text:style-name="T31">//saldrían los dos errores de texto y también hace panic.</text:span></text:span></text:p>
      <text:p text:style-name="P81"><text:span text:style-name="_2f__2f_C"><text:span text:style-name="T31"/></text:span></text:p>
      <text:p text:style-name="P81"><text:span text:style-name="_2f__2f_C"><text:span text:style-name="T31"/></text:span></text:p>
      <text:h text:style-name="P150" text:outline-level="3"><text:span text:style-name="_3c_C_3e_"><text:span text:style-name="T276">MACROS</text:span></text:span></text:h>
      <text:p text:style-name="P82"><text:span text:style-name="_2f__2f_C"><text:span text:style-name="T85">Las Macros en Rust son como magia negra. Componen código a partir de lo que se les pasa y realizan acciones o devuelven valores dependiendo de ello. Todas ellas son </text:span></text:span><text:soft-page-break/><text:span text:style-name="_2f__2f_C"><text:span text:style-name="T85">activadas cuando en la palabra clave, se le pone un </text:span></text:span><text:span text:style-name="_3c_C_2b__2b__3e_"><text:span text:style-name="T48">!</text:span></text:span><text:span text:style-name="_2f__2f_C"><text:span text:style-name="T85"> al final. Las más famosas:<text:line-break/></text:span></text:span></text:p>
      <text:h text:style-name="P162" text:outline-level="3"><text:span text:style-name="_3c_C_3e_"><text:span text:style-name="T277">print!()</text:span></text:span></text:h>
      <text:p text:style-name="P82"><text:span text:style-name="_2f__2f_C"><text:span text:style-name="T85">Imprime el texto en pantalla sin salto de linea. El texto puede quedarse esperando en el buffer de la consola y no aparecer en pantalla hasta que se imprima un salto de linea:</text:span></text:span></text:p>
      <text:p text:style-name="P83"><text:span text:style-name="_3c_C_3e_"><text:span text:style-name="T31">fn main(){</text:span></text:span></text:p>
      <text:p text:style-name="P83"><text:span text:style-name="_3c_C_3e_"><text:span text:style-name="T31"><text:tab/></text:span></text:span><text:span text:style-name="_3c_C_3e_"><text:span text:style-name="T41">let str: &amp;str = “hola ”;</text:span></text:span></text:p>
      <text:p text:style-name="P83"><text:span text:style-name="_3c_C_3e_"><text:span text:style-name="T31"><text:tab/></text:span></text:span><text:span text:style-name="_3c_C_2b__2b__3e_"><text:span text:style-name="T48">print!(“</text:span></text:span><text:span text:style-name="_3c_C_2b__2b__3e_"><text:span text:style-name="T57">{}</text:span></text:span><text:span text:style-name="_3c_C_2b__2b__3e_"><text:span text:style-name="T48">”, </text:span></text:span><text:span text:style-name="_3c_C_2b__2b__3e_"><text:span text:style-name="T57">str</text:span></text:span><text:span text:style-name="_3c_C_2b__2b__3e_"><text:span text:style-name="T48">); </text:span></text:span><text:span text:style-name="_2f__2f_C"><text:span text:style-name="T48">//</text:span></text:span><text:span text:style-name="_2f__2f_C"><text:span text:style-name="T57">el {} es como el %s del printf, pero no hace falta poner el tipo.</text:span></text:span></text:p>
      <text:p text:style-name="P83"><text:span text:style-name="_3c_C_3e_"><text:span text:style-name="T31"><text:tab/>print!(“ mundo!);</text:span></text:span></text:p>
      <text:p text:style-name="P83"><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3"><text:span text:style-name="_3c_C_3e_"><text:span text:style-name="T31">}</text:span></text:span></text:p>
      <text:p text:style-name="P83"><text:span text:style-name="_2f__2f_C"><text:span text:style-name="T86">Para soltarlo en pantalla si queremos antes de finalización de Scope se necesita el </text:span></text:span><text:span text:style-name="_3c_C_2b__2b__3e_"><text:span text:style-name="T48">flush()</text:span></text:span><text:span text:style-name="_2f__2f_C"><text:span text:style-name="T86"><text:line-break/></text:span></text:span></text:p>
      <text:p text:style-name="P83"><text:span text:style-name="_3c_C_3e_"><text:span text:style-name="T31">use std::io::{self, Write}; </text:span></text:span><text:span text:style-name="_2f__2f_C"><text:span text:style-name="T31">//necesario para el flush()</text:span></text:span></text:p>
      <text:p text:style-name="P83"><text:span text:style-name="_3c_C_3e_"><text:span text:style-name="T31">fn main(){</text:span></text:span></text:p>
      <text:p text:style-name="P83"><text:span text:style-name="_3c_C_3e_"><text:span text:style-name="T31"><text:tab/>print!(“hola”);<text:line-break/><text:tab/>print!(“ mundo!);</text:span></text:span></text:p>
      <text:p text:style-name="P83"><text:span text:style-name="_3c_C_3e_"><text:span text:style-name="T31"><text:tab/>io::stdout()::flush().unwrap(); </text:span></text:span><text:span text:style-name="_2f__2f_C"><text:span text:style-name="T31">//sin esto no imprimiría. Unwrap() por que devuelve un Result</text:span></text:span></text:p>
      <text:p text:style-name="P84"><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4"><text:span text:style-name="_2f__2f_C"><text:span text:style-name="T42"><text:tab/>Mejor que un while true{} por optimización de código.</text:span></text:span></text:p>
      <text:p text:style-name="P83"><text:span text:style-name="_3c_C_3e_"><text:span text:style-name="T31">}</text:span></text:span></text:p>
      <text:p text:style-name="P85"><text:span text:style-name="_2f__2f_C"><text:span text:style-name="T87">Sin el </text:span></text:span><text:span text:style-name="_3c_C_2b__2b__3e_"><text:span text:style-name="T48">flush()</text:span></text:span><text:span text:style-name="_2f__2f_C"><text:span text:style-name="T87"> si pusieramos </text:span></text:span><text:span text:style-name="_3c_C_3e_"><text:span text:style-name="T31">print!(“ mundo!</text:span></text:span><text:span text:style-name="_3c_C_2b__2b__3e_"><text:span text:style-name="T48">\n</text:span></text:span><text:span text:style-name="_3c_C_3e_"><text:span text:style-name="T31">”);</text:span></text:span><text:span text:style-name="_2f__2f_C"><text:span text:style-name="T87"> sí que lo imprimiría, pero para eso usamos uno </text:span></text:span><text:span text:style-name="_3c_C_2b__2b__3e_"><text:span text:style-name="T48">println!()</text:span></text:span></text:p>
      <text:p text:style-name="P85"><text:span text:style-name="_3c_C_2b__2b__3e_"><text:span text:style-name="T48"/></text:span></text:p>
      <text:h text:style-name="P163" text:outline-level="3"><text:span text:style-name="_3c_C_3e_"><text:span text:style-name="T277"/></text:span></text:h>
      <text:h text:style-name="P163" text:outline-level="3"><text:span text:style-name="_3c_C_3e_"><text:span text:style-name="T277">print</text:span></text:span><text:span text:style-name="_3c_C_3e_"><text:span text:style-name="T278">ln</text:span></text:span><text:span text:style-name="_3c_C_3e_"><text:span text:style-name="T277">!()</text:span></text:span></text:h>
      <text:p text:style-name="P84"><text:span text:style-name="_2f__2f_C"><text:span text:style-name="T88">La diferencia es que imprime el salto de linea y por lo tanto vacia el buffer:</text:span></text:span></text:p>
      <text:p text:style-name="P84"><text:span text:style-name="_3c_C_3e_"><text:span text:style-name="T31">fn main(){</text:span></text:span></text:p>
      <text:p text:style-name="P84"><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4"><text:span text:style-name="_3c_C_3e_"><text:span text:style-name="T31"><text:tab/></text:span></text:span><text:span text:style-name="_3c_C_2b__2b__3e_"><text:span text:style-name="T48">println!(“</text:span></text:span><text:span text:style-name="_3c_C_2b__2b__3e_"><text:span text:style-name="T58">hola {}, str</text:span></text:span><text:span text:style-name="_3c_C_2b__2b__3e_"><text:span text:style-name="T48">);</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4"><text:span text:style-name="_2f__2f_C"><text:span text:style-name="T31"><text:tab/></text:span></text:span><text:span text:style-name="_3c_C_3e_"><text:span text:style-name="T31">loop{}</text:span></text:span></text:p>
      <text:p text:style-name="P84"><text:span text:style-name="_3c_C_3e_"><text:span text:style-name="T31">}</text:span></text:span></text:p>
      <text:p text:style-name="P84"><text:span text:style-name="_3c_C_3e_"><text:span text:style-name="T31"/></text:span></text:p>
      <text:h text:style-name="P164" text:outline-level="3"><text:soft-page-break/><text:span text:style-name="_3c_C_3e_"><text:span text:style-name="T279">format</text:span></text:span><text:span text:style-name="_3c_C_3e_"><text:span text:style-name="T277">!()</text:span></text:span></text:h>
      <text:p text:style-name="P86"><text:span text:style-name="_2f__2f_C"><text:span text:style-name="T89">No imprime nada. Es como el OstringStream de C++ para no ir reajustando la memoria en cada + que le hagamos al String. Devuelve un String siempre:</text:span></text:span></text:p>
      <text:p text:style-name="P86"><text:span text:style-name="_3c_C_3e_"><text:span text:style-name="T31">fn main(){</text:span></text:span></text:p>
      <text:p text:style-name="P86"><text:span text:style-name="_3c_C_3e_"><text:span text:style-name="T31"><text:tab/>let nombre = “Paco”; </text:span></text:span><text:span text:style-name="_2f__2f_C"><text:span text:style-name="T31">//aquí nombre es un &amp;str (char*) estático</text:span></text:span></text:p>
      <text:p text:style-name="P86"><text:span text:style-name="_3c_C_3e_"><text:span text:style-name="T31"><text:tab/>let msg =</text:span></text:span><text:span text:style-name="_3c_C_2b__2b__3e_"><text:span text:style-name="T48"> format!(“hola, {}!”, nombre);</text:span></text:span><text:span text:style-name="_3c_C_3e_"><text:span text:style-name="T31"> </text:span></text:span><text:span text:style-name="_2f__2f_C"><text:span text:style-name="T31">//aquí msg es un String.</text:span></text:span></text:p>
      <text:p text:style-name="P86"><text:span text:style-name="_3c_C_3e_"><text:span text:style-name="T31"><text:tab/>println(“{}”, msg); </text:span></text:span><text:span text:style-name="_2f__2f_C"><text:span text:style-name="T31">//para imprimirlo.. Si no no hará nada y al salir del scope liberará <text:tab/>memoria.</text:span></text:span></text:p>
      <text:p text:style-name="P86"><text:span text:style-name="_3c_C_3e_"><text:span text:style-name="T31">}</text:span></text:span></text:p>
      <text:p text:style-name="P86"><text:span text:style-name="_3c_C_3e_"><text:span text:style-name="T31"/></text:span></text:p>
      <text:h text:style-name="P164" text:outline-level="3"><text:span text:style-name="_3c_C_3e_"><text:span text:style-name="T279">write</text:span></text:span><text:span text:style-name="_3c_C_3e_"><text:span text:style-name="T277">!()</text:span></text:span></text:h>
      <text:p text:style-name="P86"><text:span text:style-name="_2f__2f_C"><text:span text:style-name="T89">No imprime nada en pantalla por si solo. Escribe en variables, archivos o red.</text:span></text:span></text:p>
      <text:p text:style-name="P86"><text:span text:style-name="_2f__2f_C"><text:span text:style-name="T89">1. Como ostringstream de c++. Escribir a un String:</text:span></text:span></text:p>
      <text:p text:style-name="P86"><text:span text:style-name="_2f__2f_C"><text:span text:style-name="T89"><text:tab/></text:span></text:span><text:span text:style-name="_3c_C_2b__2b__3e_"><text:span text:style-name="T48">use std::fmt::Write;</text:span></text:span><text:span text:style-name="_3c_C_3e_"><text:span text:style-name="T31"> </text:span></text:span><text:span text:style-name="_2f__2f_C"><text:span text:style-name="T31">//Obligatorio para escribir en Strings</text:span></text:span></text:p>
      <text:p text:style-name="P86"><text:span text:style-name="_3c_C_3e_"><text:span text:style-name="T31"><text:tab/>fn main(){</text:span></text:span></text:p>
      <text:p text:style-name="P86"><text:span text:style-name="_3c_C_3e_"><text:span text:style-name="T31"><text:tab/><text:tab/></text:span></text:span><text:span text:style-name="_3c_C_2b__2b__3e_"><text:span text:style-name="T48">let mut buffer </text:span></text:span><text:span text:style-name="_3c_C_3e_"><text:span text:style-name="T31">= String::from(“”); </text:span></text:span><text:span text:style-name="_2f__2f_C"><text:span text:style-name="T31">//aunque sea vacio ya existe.</text:span></text:span></text:p>
      <text:p text:style-name="P86"><text:span text:style-name="_3c_C_3e_"><text:span text:style-name="T31"><text:tab/><text:tab/></text:span></text:span><text:span text:style-name="_3c_C_2b__2b__3e_"><text:span text:style-name="T48">write!(&amp;mut buffer, “paso {}, <text:s/>paso{}.”, 1, 2).unwrap();</text:span></text:span><text:span text:style-name="_2f__2f_C"><text:span text:style-name="T31">//Devuelve un Result asi que<text:tab/><text:tab/><text:tab/><text:tab/>unwrap() para desempaquetarlo</text:span></text:span></text:p>
      <text:p text:style-name="P86"><text:span text:style-name="_3c_C_3e_"><text:span text:style-name="T31"><text:tab/><text:tab/>println(“{}”, buffer); </text:span></text:span><text:span text:style-name="_2f__2f_C"><text:span text:style-name="T31">//imprimirá “paso 1, paso 2.”</text:span></text:span></text:p>
      <text:p text:style-name="P86"><text:span text:style-name="_3c_C_3e_"><text:span text:style-name="T31"><text:tab/>}</text:span></text:span></text:p>
      <text:p text:style-name="P87"><text:span text:style-name="_2f__2f_C"><text:span text:style-name="T90">2</text:span></text:span><text:span text:style-name="_2f__2f_C"><text:span text:style-name="T89">. </text:span></text:span><text:span text:style-name="_2f__2f_C"><text:span text:style-name="T90">Escribir en un Archivo:</text:span></text:span></text:p>
      <text:p text:style-name="P87"><text:span text:style-name="_3c_C_3e_"><text:span text:style-name="T31"><text:tab/></text:span></text:span><text:span text:style-name="_3c_C_2b__2b__3e_"><text:span text:style-name="T48">use std::fs::File;</text:span></text:span></text:p>
      <text:p text:style-name="P87"><text:span text:style-name="_3c_C_3e_"><text:span text:style-name="T31"><text:tab/></text:span></text:span><text:span text:style-name="_3c_C_2b__2b__3e_"><text:span text:style-name="T48">use std::io::Write as IoWrite;</text:span></text:span><text:span text:style-name="_3c_C_3e_"><text:span text:style-name="T31"> </text:span></text:span><text:span text:style-name="_2f__2f_C"><text:span text:style-name="T31">//obligatorio para escribir en archivos/sockets</text:span></text:span></text:p>
      <text:p text:style-name="P87"><text:span text:style-name="_3c_C_3e_"><text:span text:style-name="T31"><text:tab/>fn funcion(){</text:span></text:span></text:p>
      <text:p text:style-name="P87"><text:span text:style-name="_3c_C_3e_"><text:span text:style-name="T31"><text:tab/><text:tab/></text:span></text:span><text:span text:style-name="_2f__2f_C"><text:span text:style-name="T31">//creamos el archivo en el disco duro</text:span></text:span></text:p>
      <text:p text:style-name="P87"><text:span text:style-name="_3c_C_3e_"><text:span text:style-name="T31"><text:tab/><text:tab/>let mut archivo =</text:span></text:span><text:span text:style-name="_3c_C_2b__2b__3e_"><text:span text:style-name="T48"> </text:span></text:span><text:a xlink:type="simple" xlink:href="../../../../../../:create" text:style-name="Internet_20_link" text:visited-style-name="Visited_20_Internet_20_Link"><text:span text:style-name="_3c_C_2b__2b__3e_"><text:span text:style-name="T284">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7"><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7"><text:span text:style-name="_3c_C_3e_"><text:span text:style-name="T31"><text:tab/><text:tab/></text:span></text:span><text:span text:style-name="_3c_C_2b__2b__3e_"><text:span text:style-name="T48">write!(&amp;mut archivo, “Error crítico en el año {}, 2026).unwrap();</text:span></text:span></text:p>
      <text:p text:style-name="P87"><text:span text:style-name="_3c_C_3e_"><text:span text:style-name="T31"><text:tab/>}</text:span></text:span></text:p>
      <text:p text:style-name="P86"><text:span text:style-name="_3c_C_3e_"><text:span text:style-name="T31"/></text:span></text:p>
      <text:h text:style-name="P165" text:outline-level="3"><text:span text:style-name="_3c_C_3e_"><text:span text:style-name="T280">panic!</text:span></text:span><text:span text:style-name="_3c_C_3e_"><text:span text:style-name="T281">()</text:span></text:span></text:h>
      <text:p text:style-name="P88"><text:span text:style-name="_2f__2f_C"><text:span text:style-name="T91">Ya tratado más arriba en los apuntes.</text:span></text:span></text:p>
      <text:p text:style-name="P86"><text:span text:style-name="_3c_C_3e_"><text:span text:style-name="T31"/></text:span></text:p>
      <text:h text:style-name="P166" text:outline-level="3"><text:soft-page-break/><text:span text:style-name="_3c_C_3e_"><text:span text:style-name="T281">todo</text:span></text:span><text:span text:style-name="_3c_C_3e_"><text:span text:style-name="T280">!</text:span></text:span><text:span text:style-name="_3c_C_3e_"><text:span text:style-name="T281">()</text:span></text:span></text:h>
      <text:p text:style-name="P89"><text:span text:style-name="_2f__2f_C"><text:span text:style-name="T92">Sirve para indicarnos que debemos hacer algo en una función o lo que sea. Saltará un Panic!() cuando llegue.</text:span></text:span></text:p>
      <text:p text:style-name="P89"><text:span text:style-name="_2f__2f_C"><text:span text:style-name="T92"/></text:span></text:p>
      <text:h text:style-name="P167" text:outline-level="3"><text:span text:style-name="_3c_C_3e_"><text:span text:style-name="T280">unre</text:span></text:span><text:span text:style-name="_3c_C_3e_"><text:span text:style-name="T282">achable</text:span></text:span><text:span text:style-name="_3c_C_3e_"><text:span text:style-name="T280">!</text:span></text:span><text:span text:style-name="_3c_C_3e_"><text:span text:style-name="T281">()</text:span></text:span></text:h>
      <text:p text:style-name="P90"><text:span text:style-name="_2f__2f_C"><text:span text:style-name="T93">Cuando estemos 100% seguro de que el flujo del programa nunca debería llegar a ese punto. Si por algún motivo llegase, lanzará un panic:</text:span></text:span></text:p>
      <text:p text:style-name="P90"><text:span text:style-name="_3c_C_3e_"><text:span text:style-name="T31">let semaforo = “azul”;</text:span></text:span></text:p>
      <text:p text:style-name="P90"><text:span text:style-name="_3c_C_3e_"><text:span text:style-name="T31">match semaforo {</text:span></text:span></text:p>
      <text:p text:style-name="P90"><text:span text:style-name="_3c_C_3e_"><text:span text:style-name="T31"><text:tab/>“verde” =&gt; avanzar();</text:span></text:span></text:p>
      <text:p text:style-name="P90"><text:span text:style-name="_3c_C_3e_"><text:span text:style-name="T31"><text:tab/>“rojo” =&gt; detener();</text:span></text:span></text:p>
      <text:p text:style-name="P90"><text:span text:style-name="_3c_C_3e_"><text:span text:style-name="T31"><text:tab/>_ =&gt; </text:span></text:span><text:span text:style-name="_3c_C_2b__2b__3e_"><text:span text:style-name="T48">unreachable!();</text:span></text:span><text:span text:style-name="_3c_C_3e_"><text:span text:style-name="T31"> </text:span></text:span><text:span text:style-name="_2f__2f_C"><text:span text:style-name="T31">//como es azul hará panic!()</text:span></text:span></text:p>
      <text:p text:style-name="P90"><text:span text:style-name="_3c_C_3e_"><text:span text:style-name="T31">}</text:span></text:span></text:p>
      <text:p text:style-name="P89"><text:span text:style-name="_3c_C_3e_"><text:span text:style-name="T31"/></text:span></text:p>
      <text:h text:style-name="P167" text:outline-level="3"><text:span text:style-name="_3c_C_3e_"><text:span text:style-name="T282">unimplemented</text:span></text:span><text:span text:style-name="_3c_C_3e_"><text:span text:style-name="T280">!</text:span></text:span><text:span text:style-name="_3c_C_3e_"><text:span text:style-name="T281">()</text:span></text:span></text:h>
      <text:p text:style-name="P90"><text:span text:style-name="_2f__2f_C"><text:span text:style-name="T93">Cuando no tenemos intención de programar esa parte de código:</text:span></text:span></text:p>
      <text:p text:style-name="P90"><text:span text:style-name="_3c_C_3e_"><text:span text:style-name="T31">fn pagar_con_cheque(){</text:span></text:span></text:p>
      <text:p text:style-name="P90"><text:span text:style-name="_3c_C_3e_"><text:span text:style-name="T31"><text:tab/></text:span></text:span><text:span text:style-name="_3c_C_2b__2b__3e_"><text:span text:style-name="T48">unimplemented!();</text:span></text:span><text:span text:style-name="_3c_C_3e_"><text:span text:style-name="T31"> </text:span></text:span><text:span text:style-name="_2f__2f_C"><text:span text:style-name="T31">//el programa no soporta cheques. Si se llama panic()!</text:span></text:span></text:p>
      <text:p text:style-name="P90"><text:span text:style-name="_3c_C_3e_"><text:span text:style-name="T31">}</text:span></text:span></text:p>
      <text:p text:style-name="P89"><text:span text:style-name="_3c_C_3e_"><text:span text:style-name="T31"/></text:span></text:p>
      <text:h text:style-name="P168" text:outline-level="3"><text:span text:style-name="_3c_C_3e_"><text:span text:style-name="T283">assert_eq</text:span></text:span><text:span text:style-name="_3c_C_3e_"><text:span text:style-name="T277">!(</text:span></text:span><text:span text:style-name="_3c_C_3e_"><text:span text:style-name="T283">valor a, valor b</text:span></text:span><text:span text:style-name="_3c_C_3e_"><text:span text:style-name="T277">)</text:span></text:span></text:h>
      <text:p text:style-name="P91"><text:span text:style-name="_2f__2f_C"><text:span text:style-name="T94">Sirve para comprobar que dos valores son exactamente iguales. Si lo son, el programa continua en silencio. Si no, se produce un </text:span></text:span><text:span text:style-name="_3c_C_2b__2b__3e_"><text:span text:style-name="T48">panic!</text:span></text:span></text:p>
      <text:p text:style-name="P91"><text:span text:style-name="_3c_C_3e_"><text:span text:style-name="T31">fn sumar(a: i32, b: i32) - &gt; i32{ a + b }</text:span></text:span></text:p>
      <text:p text:style-name="P91"><text:span text:style-name="_3c_C_3e_"><text:span text:style-name="T31">fn main() {</text:span></text:span></text:p>
      <text:p text:style-name="P91"><text:span text:style-name="_3c_C_3e_"><text:span text:style-name="T31"><text:tab/>let resultado = sumar(2, 2);</text:span></text:span></text:p>
      <text:p text:style-name="P91"><text:span text:style-name="_3c_C_3e_"><text:span text:style-name="T31"><text:tab/></text:span></text:span><text:span text:style-name="_3c_C_2b__2b__3e_"><text:span text:style-name="T48">assert_eq!(resultado, 4);</text:span></text:span><text:span text:style-name="_3c_C_3e_"><text:span text:style-name="T31"> </text:span></text:span><text:span text:style-name="_2f__2f_C"><text:span text:style-name="T31">//pasará en silencio</text:span></text:span></text:p>
      <text:p text:style-name="P91"><text:span text:style-name="_3c_C_3e_"><text:span text:style-name="T31"><text:tab/></text:span></text:span><text:span text:style-name="_3c_C_2b__2b__3e_"><text:span text:style-name="T48">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1"><text:span text:style-name="_3c_C_3e_"><text:span text:style-name="T31">}</text:span></text:span></text:p>
      <text:p text:style-name="P91"><text:span text:style-name="_2f__2f_C"><text:span text:style-name="T94">Cuando tenemos un tipo propio como un </text:span></text:span><text:span text:style-name="_3c_C_3e_"><text:span text:style-name="T31">Struct</text:span></text:span><text:span text:style-name="_2f__2f_C"><text:span text:style-name="T94"> debemos añadirle al </text:span></text:span><text:span text:style-name="_3c_C_3e_"><text:span text:style-name="T31">Struct</text:span></text:span><text:span text:style-name="_2f__2f_C"><text:span text:style-name="T94">, </text:span></text:span><text:span text:style-name="_3c_C_3e_"><text:span text:style-name="T31">Enum</text:span></text:span><text:span text:style-name="_2f__2f_C"><text:span text:style-name="T94"> o lo que sea un </text:span></text:span><text:span text:style-name="_3c_C_2b__2b__3e_"><text:span text:style-name="T48">#[derive(PartialEq, Debug)]</text:span></text:span><text:span text:style-name="_2f__2f_C"><text:span text:style-name="T94">,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4T14:28:16.067589475</dc:date>
    <meta:editing-duration>P3DT11H2M26S</meta:editing-duration>
    <meta:editing-cycles>526</meta:editing-cycles>
    <meta:generator>LibreOffice/7.3.7.2$Linux_X86_64 LibreOffice_project/30$Build-2</meta:generator>
    <meta:print-date>2025-01-04T16:07:11.302000000</meta:print-date>
    <meta:printed-by>Archivos PDF</meta:printed-by>
    <meta:document-statistic meta:table-count="0" meta:image-count="0" meta:object-count="0" meta:page-count="34" meta:paragraph-count="845" meta:word-count="7340" meta:character-count="42777" meta:non-whitespace-character-count="35660"/>
  </office:meta>
</office:document-meta>
</file>